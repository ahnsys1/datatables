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sans-serif"/>
    <style:font-face style:name="Google Sans Flex" svg:font-family="'Google Sans Flex', 'Google Sans', 'Helvetica Neue',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4" style:family="table">
      <style:table-properties style:width="6.4646in" table:align="left"/>
    </style:style>
    <style:style style:name="Table4.A" style:family="table-column">
      <style:table-column-properties style:column-width="1.0979in"/>
    </style:style>
    <style:style style:name="Table4.B" style:family="table-column">
      <style:table-column-properties style:column-width="2.6521in"/>
    </style:style>
    <style:style style:name="Table4.C" style:family="table-column">
      <style:table-column-properties style:column-width="2.7146in"/>
    </style:style>
    <style:style style:name="Table4.A1" style:family="table-cell">
      <style:table-cell-properties style:vertical-align="middle" fo:padding="0.0194in" fo:border="none"/>
    </style:style>
    <style:style style:name="Table5" style:family="table">
      <style:table-properties style:width="6.6931in" table:align="left"/>
    </style:style>
    <style:style style:name="Table5.A" style:family="table-column">
      <style:table-column-properties style:column-width="1.3667in"/>
    </style:style>
    <style:style style:name="Table5.B" style:family="table-column">
      <style:table-column-properties style:column-width="1.3958in"/>
    </style:style>
    <style:style style:name="Table5.C" style:family="table-column">
      <style:table-column-properties style:column-width="1.7056in"/>
    </style:style>
    <style:style style:name="Table5.D" style:family="table-column">
      <style:table-column-properties style:column-width="2.225in"/>
    </style:style>
    <style:style style:name="Table5.A1" style:family="table-cell">
      <style:table-cell-properties style:vertical-align="middle" fo:padding="0.0194in" fo:border="0.05pt solid #000000"/>
    </style:style>
    <style:style style:name="Table1" style:family="table">
      <style:table-properties style:width="1.3215in" table:align="left"/>
    </style:style>
    <style:style style:name="Table1.A" style:family="table-column">
      <style:table-column-properties style:column-width="0.5903in"/>
    </style:style>
    <style:style style:name="Table1.B" style:family="table-column">
      <style:table-column-properties style:column-width="0.7313in"/>
    </style:style>
    <style:style style:name="Table1.A1" style:family="table-cell">
      <style:table-cell-properties style:vertical-align="middle" fo:padding="0.0194in" fo:border="0.05pt solid #000000"/>
    </style:style>
    <style:style style:name="Table2" style:family="table">
      <style:table-properties style:width="4.4924in" table:align="left" fo:background-color="#f0f4f9">
        <style:background-image/>
      </style:table-properties>
    </style:style>
    <style:style style:name="Table2.A" style:family="table-column">
      <style:table-column-properties style:column-width="2.0778in"/>
    </style:style>
    <style:style style:name="Table2.B" style:family="table-column">
      <style:table-column-properties style:column-width="2.4146in"/>
    </style:style>
    <style:style style:name="Table2.A1" style:family="table-cell">
      <style:table-cell-properties style:vertical-align="middle" fo:padding="0.0194in" fo:border="none"/>
    </style:style>
    <style:style style:name="Table3" style:family="table">
      <style:table-properties style:width="6.6931in" table:align="left" fo:background-color="#f0f4f9">
        <style:background-image/>
      </style:table-properties>
    </style:style>
    <style:style style:name="Table3.A" style:family="table-column">
      <style:table-column-properties style:column-width="0.8854in"/>
    </style:style>
    <style:style style:name="Table3.B" style:family="table-column">
      <style:table-column-properties style:column-width="2.5417in"/>
    </style:style>
    <style:style style:name="Table3.C" style:family="table-column">
      <style:table-column-properties style:column-width="3.266in"/>
    </style:style>
    <style:style style:name="Table3.A1" style:family="table-cell">
      <style:table-cell-properties style:vertical-align="middle" fo:padding="0.0194in" fo:border="none"/>
    </style:style>
    <style:style style:name="P1" style:family="paragraph" style:parent-style-name="Preformatted_20_Text">
      <style:paragraph-properties fo:margin-left="0in" fo:margin-right="0in" fo:orphans="2" fo:widows="2" fo:text-indent="0in" style:auto-text-indent="false"/>
      <style:text-properties fo:font-variant="normal" fo:text-transform="none" fo:color="#1f1f1f" loext:opacity="100%" style:font-name="Google Sans Flex" fo:font-size="12pt" fo:letter-spacing="normal" fo:font-style="normal" fo:font-weight="normal"/>
    </style:style>
    <style:style style:name="P2" style:family="paragraph" style:parent-style-name="Text_20_body">
      <style:paragraph-properties fo:margin-left="0in" fo:margin-right="0in" fo:orphans="2" fo:widows="2" fo:text-indent="0in" style:auto-text-indent="false"/>
      <style:text-properties fo:font-variant="normal" fo:text-transform="none" fo:color="#1f1f1f" loext:opacity="100%" style:font-name="Google Sans Flex" fo:font-size="12pt" fo:letter-spacing="normal" fo:font-style="normal" fo:font-weight="normal"/>
    </style:style>
    <style:style style:name="P3" style:family="paragraph" style:parent-style-name="Standard">
      <style:paragraph-properties fo:margin-left="0in" fo:margin-right="0in" fo:orphans="2" fo:widows="2" fo:text-indent="0in" style:auto-text-indent="false"/>
      <style:text-properties fo:font-variant="normal" fo:text-transform="none" fo:color="#1f1f1f" loext:opacity="100%" style:font-name="Google Sans Flex" fo:font-size="12pt" fo:letter-spacing="normal" fo:font-style="normal" fo:font-weight="normal"/>
    </style:style>
    <style:style style:name="P4" style:family="paragraph" style:parent-style-name="Text_20_body">
      <style:paragraph-properties fo:margin-left="0in" fo:margin-right="0in" fo:orphans="2" fo:widows="2" fo:text-indent="0in" style:auto-text-indent="false"/>
      <style:text-properties fo:font-variant="normal" fo:text-transform="none" fo:color="#1f1f1f" loext:opacity="100%" style:font-name="Google Sans Flex" fo:font-size="12pt" fo:letter-spacing="normal" fo:font-style="normal" fo:font-weight="normal" loext:padding="0in" loext:border="none"/>
    </style:style>
    <style:style style:name="P5" style:family="paragraph" style:parent-style-name="Text_20_body">
      <style:paragraph-properties fo:margin-left="0in" fo:margin-right="0in" fo:text-indent="0in" style:auto-text-indent="false"/>
    </style:style>
    <style:style style:name="P6" style:family="paragraph" style:parent-style-name="Standard">
      <style:paragraph-properties fo:margin-left="0in" fo:margin-right="0in" fo:margin-top="0in" fo:margin-bottom="0in" style:contextual-spacing="false" fo:text-indent="0in" style:auto-text-indent="false"/>
    </style:style>
    <style:style style:name="P7" style:family="paragraph" style:parent-style-name="Heading_20_3">
      <style:paragraph-properties fo:margin-left="0in" fo:margin-right="0in" fo:margin-top="0in" fo:margin-bottom="0.0972in" style:contextual-spacing="false" fo:line-height="114%" fo:text-indent="0in" style:auto-text-indent="false"/>
      <style:text-properties style:font-name="Google Sans"/>
    </style:style>
    <style:style style:name="P8" style:family="paragraph" style:parent-style-name="Heading_20_4">
      <style:paragraph-properties fo:margin-left="0in" fo:margin-right="0in" fo:margin-top="0in" fo:margin-bottom="0.0972in" style:contextual-spacing="false" fo:line-height="114%" fo:text-indent="0in" style:auto-text-indent="false"/>
      <style:text-properties style:font-name="Google Sans"/>
    </style:style>
    <style:style style:name="P9" style:family="paragraph" style:parent-style-name="Heading_20_4">
      <style:paragraph-properties fo:margin-left="0in" fo:margin-right="0in" fo:margin-top="0in" fo:margin-bottom="0.0835in" style:contextual-spacing="false" fo:line-height="114%" fo:text-indent="0in" style:auto-text-indent="false"/>
    </style:style>
    <style:style style:name="P10" style:family="paragraph" style:parent-style-name="Preformatted_20_Text">
      <style:paragraph-properties fo:margin-left="0in" fo:margin-right="0in" fo:margin-top="0in" fo:margin-bottom="0in" style:contextual-spacing="false" fo:line-height="114%" fo:text-indent="0in" style:auto-text-indent="false"/>
    </style:style>
    <style:style style:name="P11" style:family="paragraph" style:parent-style-name="Table_20_Contents">
      <style:paragraph-properties fo:margin-left="0in" fo:margin-right="0in" fo:margin-top="0in" fo:margin-bottom="0in" style:contextual-spacing="false" fo:line-height="114%" fo:text-indent="0in" style:auto-text-indent="false"/>
    </style:style>
    <style:style style:name="P12" style:family="paragraph" style:parent-style-name="Text_20_body">
      <style:paragraph-properties fo:margin-left="0in" fo:margin-right="0in" fo:margin-top="0in" fo:margin-bottom="0.0972in" style:contextual-spacing="false" fo:line-height="114%" fo:text-indent="0in" style:auto-text-indent="false"/>
    </style:style>
    <style:style style:name="P13" style:family="paragraph" style:parent-style-name="Preformatted_20_Text">
      <style:paragraph-properties fo:margin-top="0in" fo:margin-bottom="0in" style:contextual-spacing="false" fo:line-height="114%"/>
    </style:style>
    <style:style style:name="P14"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style:style>
    <style:style style:name="P15"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style:style>
    <style:style style:name="P16" style:family="paragraph" style:parent-style-name="Text_20_body">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7"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fo:font-weight="bold"/>
    </style:style>
    <style:style style:name="P18"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fo:font-weight="bold"/>
    </style:style>
    <style:style style:name="P19" style:family="paragraph" style:parent-style-name="Horizontal_20_Line">
      <style:paragraph-properties fo:line-height="175%"/>
    </style:style>
    <style:style style:name="P20" style:family="paragraph" style:parent-style-name="Horizontal_20_Line">
      <style:paragraph-properties fo:margin-left="0in" fo:margin-right="0in" fo:margin-top="0in" fo:margin-bottom="0in" style:contextual-spacing="false" fo:line-height="175%"/>
    </style:style>
    <style:style style:name="P21" style:family="paragraph" style:parent-style-name="Preformatted_20_Text">
      <style:paragraph-properties fo:margin-left="0in" fo:margin-right="0in" fo:margin-top="0in" fo:margin-bottom="0in" style:contextual-spacing="false" fo:line-height="175%"/>
    </style:style>
    <style:style style:name="P22" style:family="paragraph" style:parent-style-name="Preformatted_20_Text">
      <style:paragraph-properties fo:margin-left="0in" fo:margin-right="0in" fo:margin-top="0in" fo:margin-bottom="0in" style:contextual-spacing="false" fo:line-height="175%" fo:text-indent="0in" style:auto-text-indent="false"/>
    </style:style>
    <style:style style:name="P23" style:family="paragraph" style:parent-style-name="Heading_20_3">
      <style:paragraph-properties fo:margin-left="0in" fo:margin-right="0in" fo:margin-top="0.2917in" fo:margin-bottom="0.0835in" style:contextual-spacing="false" style:line-height-at-least="0.25in" fo:text-indent="0in" style:auto-text-indent="false"/>
      <style:text-properties style:font-name="Google Sans Flex" fo:font-size="12pt" fo:letter-spacing="normal" fo:font-weight="bold" fo:background-color="#ffffff" loext:padding="0in" loext:border="none"/>
    </style:style>
    <style:style style:name="P24" style:family="paragraph" style:parent-style-name="Heading_20_4">
      <style:paragraph-properties fo:margin-left="0in" fo:margin-right="0in" fo:margin-top="0.2917in" fo:margin-bottom="0.0835in" style:contextual-spacing="false" style:line-height-at-least="0.25in" fo:text-indent="0in" style:auto-text-indent="false"/>
      <style:text-properties style:font-name="Google Sans Flex" fo:font-size="12pt" fo:letter-spacing="normal" fo:font-weight="bold" fo:background-color="#ffffff" loext:padding="0in" loext:border="none"/>
    </style:style>
    <style:style style:name="P25" style:family="paragraph" style:parent-style-name="Text_20_body">
      <style:paragraph-properties fo:margin-left="0in" fo:margin-right="0in" fo:margin-top="0in" fo:margin-bottom="0.0835in" style:contextual-spacing="false" fo:line-height="175%" fo:text-indent="0in" style:auto-text-indent="false"/>
      <style:text-properties style:font-name="Google Sans Flex" fo:font-size="12pt" fo:letter-spacing="normal" fo:font-weight="bold" fo:background-color="#ffffff" loext:padding="0in" loext:border="none"/>
    </style:style>
    <style:style style:name="P26" style:family="paragraph" style:parent-style-name="Text_20_body">
      <style:paragraph-properties fo:margin-left="0in" fo:margin-right="0in" fo:margin-top="0in" fo:margin-bottom="0.0835in" style:contextual-spacing="false" fo:line-height="175%" fo:text-indent="0in" style:auto-text-indent="false"/>
      <style:text-properties style:font-name="Google Sans Flex" fo:font-size="12pt" fo:letter-spacing="normal" fo:font-weight="normal" fo:background-color="#ffffff" loext:padding="0in" loext:border="none"/>
    </style:style>
    <style:style style:name="P27" style:family="paragraph" style:parent-style-name="Text_20_body">
      <style:paragraph-properties fo:margin-left="0in" fo:margin-right="0in" fo:margin-top="0in" fo:margin-bottom="0.1665in" style:contextual-spacing="false" fo:line-height="175%" fo:text-indent="0in" style:auto-text-indent="false"/>
      <style:text-properties style:font-name="Google Sans Flex" fo:font-size="12pt" fo:letter-spacing="normal" fo:font-weight="normal" fo:background-color="#ffffff" loext:padding="0in" loext:border="none"/>
    </style:style>
    <style:style style:name="P28" style:family="paragraph" style:parent-style-name="Text_20_body">
      <style:paragraph-properties fo:margin-left="0in" fo:margin-right="0in" fo:margin-top="0in" fo:margin-bottom="0.1665in" style:contextual-spacing="false" fo:line-height="175%" fo:text-indent="0in" style:auto-text-indent="false"/>
      <style:text-properties style:font-name="Google Sans Flex" fo:font-size="12pt" fo:letter-spacing="normal" fo:font-weight="normal"/>
    </style:style>
    <style:style style:name="P29" style:family="paragraph" style:parent-style-name="Text_20_body">
      <style:paragraph-properties fo:margin-left="0in" fo:margin-right="0in" fo:margin-top="0in" fo:margin-bottom="0.1665in" style:contextual-spacing="false" fo:line-height="175%" fo:text-indent="0in" style:auto-text-indent="false"/>
      <style:text-properties style:font-name="Google Sans Flex" fo:font-size="12pt" fo:letter-spacing="normal" fo:font-style="italic" fo:font-weight="normal" fo:background-color="#ffffff" loext:padding="0in" loext:border="none"/>
    </style:style>
    <style:style style:name="P30" style:family="paragraph" style:parent-style-name="Table_20_Contents">
      <style:paragraph-properties fo:margin-left="0in" fo:margin-right="0in" style:line-height-at-least="0.2083in" fo:text-indent="0in" style:auto-text-indent="false"/>
      <style:text-properties style:font-name="Google Sans Flex" fo:font-size="10.5pt" fo:letter-spacing="normal" fo:font-weight="normal"/>
    </style:style>
    <style:style style:name="P31" style:family="paragraph" style:parent-style-name="Table_20_Contents">
      <style:paragraph-properties fo:margin-left="0in" fo:margin-right="0in" style:line-height-at-least="0.2083in" fo:text-indent="0in" style:auto-text-indent="false"/>
      <style:text-properties style:font-name="Google Sans Flex" fo:font-size="10.5pt" fo:letter-spacing="normal" fo:font-weight="bold"/>
    </style:style>
    <style:style style:name="P32" style:family="paragraph" style:parent-style-name="Text_20_body">
      <style:paragraph-properties fo:margin-left="0in" fo:margin-right="0in" fo:margin-top="0.1665in" fo:margin-bottom="0.1665in" style:contextual-spacing="false" style:line-height-at-least="0.2083in" fo:text-indent="0in" style:auto-text-indent="false"/>
      <style:text-properties style:font-name="Google Sans Flex" fo:font-size="10.5pt" fo:letter-spacing="normal" fo:font-weight="bold" fo:background-color="#ffffff" loext:padding="0in" loext:border="none"/>
    </style:style>
    <style:style style:name="P33" style:family="paragraph" style:parent-style-name="Heading_20_4">
      <style:paragraph-properties fo:margin-left="0in" fo:margin-right="0in" fo:margin-top="0.2917in" fo:margin-bottom="0.0835in" style:contextual-spacing="false" style:line-height-at-least="0.2083in" fo:text-indent="0in" style:auto-text-indent="false"/>
    </style:style>
    <style:style style:name="P34" style:family="paragraph" style:parent-style-name="Heading_20_3">
      <style:paragraph-properties fo:margin-left="0in" fo:margin-right="0in" fo:margin-top="0.2917in" fo:margin-bottom="0.0835in" style:contextual-spacing="false" style:line-height-at-least="0.2083in" fo:text-indent="0in" style:auto-text-indent="false"/>
    </style:style>
    <style:style style:name="P35" style:family="paragraph" style:parent-style-name="Table_20_Contents">
      <style:paragraph-properties fo:margin-left="0in" fo:margin-right="0in" style:line-height-at-least="0.2083in" fo:text-indent="0in" style:auto-text-indent="false"/>
    </style:style>
    <style:style style:name="P36" style:family="paragraph" style:parent-style-name="Text_20_body">
      <style:paragraph-properties fo:margin-left="0in" fo:margin-right="0in" fo:margin-top="0in" fo:margin-bottom="0.1665in" style:contextual-spacing="false" style:line-height-at-least="0.2083in" fo:text-indent="0in" style:auto-text-indent="false"/>
    </style:style>
    <style:style style:name="P37" style:family="paragraph" style:parent-style-name="Text_20_body">
      <style:paragraph-properties fo:margin-left="0in" fo:margin-right="0in" fo:margin-top="0in" fo:margin-bottom="0.0835in" style:contextual-spacing="false" style:line-height-at-least="0.2083in" fo:text-indent="0in" style:auto-text-indent="false"/>
    </style:style>
    <style:style style:name="P38" style:family="paragraph" style:parent-style-name="Preformatted_20_Text">
      <style:paragraph-properties fo:margin-left="0in" fo:margin-right="0in" fo:margin-top="0in" fo:margin-bottom="0in" style:contextual-spacing="false" fo:line-height="175%" fo:text-indent="0in" style:auto-text-indent="false"/>
      <style:text-properties fo:color="#5f6368" loext:opacity="100%"/>
    </style:style>
    <style:style style:name="P39" style:family="paragraph" style:parent-style-name="Text_20_body">
      <style:paragraph-properties fo:margin-left="0in" fo:margin-right="0in" fo:margin-top="0in" fo:margin-bottom="0in" style:contextual-spacing="false" style:line-height-at-least="0.2917in" fo:text-indent="0in" style:auto-text-indent="false" style:writing-mode="lr-tb"/>
      <style:text-properties fo:color="#1f1f1f" loext:opacity="100%" style:font-name="Google Sans Flex" fo:font-size="12pt" fo:letter-spacing="normal" fo:font-weight="normal" loext:padding="0in" loext:border="none"/>
    </style:style>
    <style:style style:name="P40" style:family="paragraph" style:parent-style-name="Text_20_body">
      <style:paragraph-properties fo:margin-left="0in" fo:margin-right="0in" fo:margin-top="0in" fo:margin-bottom="0in" style:contextual-spacing="false" style:line-height-at-least="0.2917in" fo:text-indent="0in" style:auto-text-indent="false" style:writing-mode="lr-tb"/>
      <style:text-properties fo:color="#1f1f1f" loext:opacity="100%" style:font-name="Google Sans Flex" fo:font-size="12pt" fo:letter-spacing="normal" fo:font-weight="normal" fo:background-color="#ffffff" loext:padding="0in" loext:border="none"/>
    </style:style>
    <style:style style:name="P41" style:family="paragraph" style:parent-style-name="Text_20_body">
      <style:text-properties fo:background-color="#ffffff" loext:padding="0in" loext:border="none"/>
    </style:style>
    <style:style style:name="P42" style:family="paragraph" style:parent-style-name="Horizontal_20_Line">
      <style:paragraph-properties fo:line-height="175%"/>
      <style:text-properties fo:background-color="#ffffff"/>
    </style:style>
    <style:style style:name="P43" style:family="paragraph" style:parent-style-name="Text_20_body">
      <style:paragraph-properties fo:margin-left="0in" fo:margin-right="0in" fo:margin-top="0in" fo:margin-bottom="0in" style:contextual-spacing="false" style:line-height-at-least="0.25in" fo:text-align="center" style:justify-single-word="false" fo:orphans="1" fo:text-indent="0in" style:auto-text-indent="false" fo:padding="0in" fo:border="none"/>
    </style:style>
    <style:style style:name="P44" style:family="paragraph" style:parent-style-name="Text_20_body">
      <style:paragraph-properties fo:margin-left="0in" fo:margin-right="0in" style:line-height-at-least="0.1665in" fo:text-align="center" style:justify-single-word="false" fo:text-indent="0in" style:auto-text-indent="false"/>
    </style:style>
    <style:style style:name="P45" style:family="paragraph" style:parent-style-name="Text_20_body">
      <style:paragraph-properties fo:margin-left="0in" fo:margin-right="0in" fo:margin-top="0in" fo:margin-bottom="0in" style:contextual-spacing="false" style:line-height-at-least="0.25in" fo:text-align="center" style:justify-single-word="false" fo:orphans="1" fo:text-indent="0in" style:auto-text-indent="false" fo:padding="0in" fo:border="none"/>
      <style:text-properties loext:padding="0in" loext:border="none"/>
    </style:style>
    <style:style style:name="P46" style:family="paragraph" style:parent-style-name="Preformatted_20_Text">
      <style:text-properties officeooo:paragraph-rsid="0011e7e3"/>
    </style:style>
    <style:style style:name="P47" style:family="paragraph" style:parent-style-name="Preformatted_20_Text">
      <style:paragraph-properties fo:margin-top="0in" fo:margin-bottom="0.1965in" style:contextual-spacing="false"/>
    </style:style>
    <style:style style:name="P48" style:family="paragraph" style:parent-style-name="Text_20_body">
      <style:text-properties fo:color="#c9211e" loext:opacity="100%" style:font-name="Google Sans Flex" fo:font-size="22pt" fo:letter-spacing="normal" fo:font-weight="normal" style:font-size-asian="22pt" style:font-size-complex="22pt" loext:padding="0in" loext:border="none"/>
    </style:style>
    <style:style style:name="P49" style:family="paragraph" style:parent-style-name="Text_20_body">
      <style:paragraph-properties fo:break-before="page" style:writing-mode="lr-tb"/>
      <style:text-properties fo:color="#c9211e" loext:opacity="100%" style:font-name="Google Sans Flex" fo:font-size="22pt" fo:letter-spacing="normal" fo:font-weight="normal" style:font-size-asian="22pt" style:font-size-complex="22pt" loext:padding="0in" loext:border="none"/>
    </style:style>
    <style:style style:name="P50" style:family="paragraph" style:parent-style-name="Preformatted_20_Text">
      <style:paragraph-properties fo:margin-left="0in" fo:margin-right="0in" fo:margin-top="0in" fo:margin-bottom="0in" style:contextual-spacing="false" fo:line-height="175%" fo:text-indent="0in" style:auto-text-indent="false"/>
      <style:text-properties fo:color="#fa903e" loext:opacity="100%"/>
    </style:style>
    <style:style style:name="P51" style:family="paragraph" style:parent-style-name="Table_20_Contents">
      <style:text-properties fo:font-weight="bold"/>
    </style:style>
    <style:style style:name="P52" style:family="paragraph" style:parent-style-name="Text_20_body">
      <style:text-properties fo:font-weight="bold"/>
    </style:style>
    <style:style style:name="P53" style:family="paragraph" style:parent-style-name="Text_20_body">
      <style:text-properties fo:font-weight="bold" officeooo:paragraph-rsid="00189f69"/>
    </style:style>
    <style:style style:name="P54" style:family="paragraph" style:parent-style-name="Text_20_body">
      <style:paragraph-properties fo:margin-top="0in" fo:margin-bottom="0in" style:contextual-spacing="false"/>
    </style:style>
    <style:style style:name="P55" style:family="paragraph" style:parent-style-name="Text_20_body">
      <style:text-properties officeooo:paragraph-rsid="00142238"/>
    </style:style>
    <style:style style:name="P56" style:family="paragraph" style:parent-style-name="Preformatted_20_Text" style:list-style-name="L1"/>
    <style:style style:name="P57" style:family="paragraph" style:parent-style-name="Preformatted_20_Text" style:list-style-name="L1">
      <style:paragraph-properties fo:margin-top="0in" fo:margin-bottom="0.1965in" style:contextual-spacing="false"/>
    </style:style>
    <style:style style:name="P58" style:family="paragraph" style:parent-style-name="Preformatted_20_Text">
      <style:text-properties fo:color="#c9211e" loext:opacity="100%" fo:font-size="28pt" officeooo:rsid="00142238" officeooo:paragraph-rsid="00142238" style:font-size-asian="28pt" style:font-size-complex="28pt"/>
    </style:style>
    <style:style style:name="P59" style:family="paragraph" style:parent-style-name="Preformatted_20_Text" style:list-style-name="L6">
      <style:paragraph-properties fo:margin-left="0in" fo:margin-right="0in" fo:margin-top="0in" fo:margin-bottom="0in" style:contextual-spacing="false" fo:line-height="175%" fo:text-indent="0in" style:auto-text-indent="false" fo:padding="0in" fo:border="none"/>
    </style:style>
    <style:style style:name="P60" style:family="paragraph" style:parent-style-name="Preformatted_20_Text" style:list-style-name="L7">
      <style:paragraph-properties fo:margin-left="0in" fo:margin-right="0in" fo:margin-top="0in" fo:margin-bottom="0in" style:contextual-spacing="false" fo:line-height="175%" fo:text-indent="0in" style:auto-text-indent="false" fo:padding="0in" fo:border="none"/>
    </style:style>
    <style:style style:name="P61" style:family="paragraph" style:parent-style-name="Preformatted_20_Text" style:list-style-name="L13">
      <style:paragraph-properties fo:margin-left="0in" fo:margin-right="0in" fo:margin-top="0in" fo:margin-bottom="0in" style:contextual-spacing="false" fo:line-height="175%" fo:text-indent="0in" style:auto-text-indent="false" fo:padding="0in" fo:border="none"/>
    </style:style>
    <style:style style:name="P62" style:family="paragraph" style:parent-style-name="Preformatted_20_Text" style:list-style-name="L14">
      <style:paragraph-properties fo:margin-left="0in" fo:margin-right="0in" fo:margin-top="0in" fo:margin-bottom="0in" style:contextual-spacing="false" fo:line-height="175%" fo:text-indent="0in" style:auto-text-indent="false" fo:padding="0in" fo:border="none"/>
    </style:style>
    <style:style style:name="P63" style:family="paragraph" style:parent-style-name="Preformatted_20_Text" style:list-style-name="L15">
      <style:paragraph-properties fo:margin-left="0in" fo:margin-right="0in" fo:margin-top="0in" fo:margin-bottom="0in" style:contextual-spacing="false" fo:line-height="175%" fo:text-indent="0in" style:auto-text-indent="false" fo:padding="0in" fo:border="none"/>
    </style:style>
    <style:style style:name="P64" style:family="paragraph" style:parent-style-name="Preformatted_20_Text" style:list-style-name="L17">
      <style:paragraph-properties fo:margin-left="0in" fo:margin-right="0in" fo:margin-top="0in" fo:margin-bottom="0in" style:contextual-spacing="false" fo:line-height="175%" fo:text-indent="0in" style:auto-text-indent="false" fo:padding="0in" fo:border="none"/>
    </style:style>
    <style:style style:name="P65" style:family="paragraph" style:parent-style-name="Preformatted_20_Text" style:list-style-name="L26">
      <style:paragraph-properties fo:margin-left="0in" fo:margin-right="0in" fo:margin-top="0in" fo:margin-bottom="0in" style:contextual-spacing="false" fo:line-height="175%" fo:text-indent="0in" style:auto-text-indent="false" fo:padding="0in" fo:border="none"/>
    </style:style>
    <style:style style:name="P66" style:family="paragraph" style:parent-style-name="Preformatted_20_Text" style:list-style-name="L26">
      <style:paragraph-properties fo:margin-left="0in" fo:margin-right="0in" fo:margin-top="0in" fo:margin-bottom="0in" style:contextual-spacing="false" fo:line-height="175%" fo:padding="0in" fo:border="none"/>
    </style:style>
    <style:style style:name="P67" style:family="paragraph" style:parent-style-name="Preformatted_20_Text" style:list-style-name="L27">
      <style:paragraph-properties fo:margin-left="0in" fo:margin-right="0in" fo:margin-top="0in" fo:margin-bottom="0in" style:contextual-spacing="false" fo:line-height="175%" fo:text-indent="0in" style:auto-text-indent="false" fo:padding="0in" fo:border="none"/>
    </style:style>
    <style:style style:name="P68" style:family="paragraph" style:parent-style-name="Preformatted_20_Text" style:list-style-name="L31">
      <style:paragraph-properties fo:margin-left="0in" fo:margin-right="0in" fo:margin-top="0in" fo:margin-bottom="0in" style:contextual-spacing="false" fo:line-height="175%" fo:text-indent="0in" style:auto-text-indent="false" fo:padding="0in" fo:border="none"/>
    </style:style>
    <style:style style:name="P69" style:family="paragraph" style:parent-style-name="Preformatted_20_Text" style:list-style-name="L31">
      <style:paragraph-properties fo:margin-left="0in" fo:margin-right="0in" fo:margin-top="0in" fo:margin-bottom="0in" style:contextual-spacing="false" fo:line-height="175%" fo:padding="0in" fo:border="none"/>
    </style:style>
    <style:style style:name="P70" style:family="paragraph" style:parent-style-name="Preformatted_20_Text" style:list-style-name="L31">
      <style:paragraph-properties fo:margin-left="0in" fo:margin-right="0in" fo:margin-top="0in" fo:margin-bottom="0in" style:contextual-spacing="false" fo:line-height="175%" fo:text-indent="0in" style:auto-text-indent="false" fo:padding="0in" fo:border="none"/>
      <style:text-properties fo:color="#5f6368" loext:opacity="100%"/>
    </style:style>
    <style:style style:name="P71" style:family="paragraph" style:parent-style-name="Text_20_body" style:list-style-name="L1"/>
    <style:style style:name="P72" style:family="paragraph" style:parent-style-name="Text_20_body" style:list-style-name="L1">
      <style:paragraph-properties fo:margin-left="0in" fo:margin-right="0in" fo:text-indent="0in" style:auto-text-indent="false"/>
    </style:style>
    <style:style style:name="P73" style:family="paragraph" style:parent-style-name="Text_20_body" style:list-style-name="L1">
      <style:text-properties fo:font-weight="bold"/>
    </style:style>
    <style:style style:name="P74" style:family="paragraph" style:parent-style-name="Text_20_body" style:list-style-name="L2"/>
    <style:style style:name="P75" style:family="paragraph" style:parent-style-name="Text_20_body" style:list-style-name="L3"/>
    <style:style style:name="P76" style:family="paragraph" style:parent-style-name="Text_20_body" style:list-style-name="L4"/>
    <style:style style:name="P77" style:family="paragraph" style:parent-style-name="Text_20_body" style:list-style-name="L5">
      <style:paragraph-properties fo:margin-left="0in" fo:margin-right="0in" fo:margin-top="0.0835in" fo:margin-bottom="0.0835in" style:contextual-spacing="false" style:line-height-at-least="0.2083in" fo:text-indent="0in" style:auto-text-indent="false" fo:padding="0in" fo:border="none"/>
    </style:style>
    <style:style style:name="P78" style:family="paragraph" style:parent-style-name="Text_20_body" style:list-style-name="L13">
      <style:paragraph-properties fo:margin-left="0in" fo:margin-right="0in" fo:margin-top="0.0835in" fo:margin-bottom="0.0835in" style:contextual-spacing="false" style:line-height-at-least="0.2083in" fo:text-indent="0in" style:auto-text-indent="false" fo:padding="0in" fo:border="none"/>
    </style:style>
    <style:style style:name="P79" style:family="paragraph" style:parent-style-name="Text_20_body" style:list-style-name="L14">
      <style:paragraph-properties fo:margin-left="0in" fo:margin-right="0in" fo:margin-top="0.0835in" fo:margin-bottom="0.0835in" style:contextual-spacing="false" style:line-height-at-least="0.2083in" fo:text-indent="0in" style:auto-text-indent="false" fo:padding="0in" fo:border="none"/>
    </style:style>
    <style:style style:name="P80" style:family="paragraph" style:parent-style-name="Text_20_body" style:list-style-name="L15">
      <style:paragraph-properties fo:margin-left="0in" fo:margin-right="0in" fo:margin-top="0.0835in" fo:margin-bottom="0.0835in" style:contextual-spacing="false" style:line-height-at-least="0.2083in" fo:text-indent="0in" style:auto-text-indent="false" fo:padding="0in" fo:border="none"/>
    </style:style>
    <style:style style:name="P81" style:family="paragraph" style:parent-style-name="Text_20_body" style:list-style-name="L16">
      <style:paragraph-properties fo:margin-left="0in" fo:margin-right="0in" fo:margin-top="0.0835in" fo:margin-bottom="0.0835in" style:contextual-spacing="false" style:line-height-at-least="0.2083in" fo:text-indent="0in" style:auto-text-indent="false" fo:padding="0in" fo:border="none"/>
    </style:style>
    <style:style style:name="P82" style:family="paragraph" style:parent-style-name="Text_20_body" style:list-style-name="L23">
      <style:paragraph-properties fo:margin-left="0in" fo:margin-right="0in" fo:margin-top="0.0835in" fo:margin-bottom="0.0835in" style:contextual-spacing="false" style:line-height-at-least="0.2083in" fo:text-indent="0in" style:auto-text-indent="false" fo:padding="0in" fo:border="none"/>
    </style:style>
    <style:style style:name="P83" style:family="paragraph" style:parent-style-name="Text_20_body" style:list-style-name="L24">
      <style:paragraph-properties fo:margin-left="0in" fo:margin-right="0in" fo:margin-top="0.0835in" fo:margin-bottom="0.0835in" style:contextual-spacing="false" style:line-height-at-least="0.2083in" fo:text-indent="0in" style:auto-text-indent="false" fo:padding="0in" fo:border="none"/>
    </style:style>
    <style:style style:name="P84" style:family="paragraph" style:parent-style-name="Text_20_body" style:list-style-name="L25">
      <style:paragraph-properties fo:margin-left="0in" fo:margin-right="0in" fo:margin-top="0.0835in" fo:margin-bottom="0.0835in" style:contextual-spacing="false" style:line-height-at-least="0.2083in" fo:text-indent="0in" style:auto-text-indent="false" fo:padding="0in" fo:border="none"/>
    </style:style>
    <style:style style:name="P85" style:family="paragraph" style:parent-style-name="Text_20_body" style:list-style-name="L26">
      <style:paragraph-properties fo:margin-left="0in" fo:margin-right="0in" fo:margin-top="0.0835in" fo:margin-bottom="0.0835in" style:contextual-spacing="false" style:line-height-at-least="0.2083in" fo:text-indent="0in" style:auto-text-indent="false" fo:padding="0in" fo:border="none"/>
    </style:style>
    <style:style style:name="P86" style:family="paragraph" style:parent-style-name="Text_20_body" style:list-style-name="L27">
      <style:paragraph-properties fo:margin-left="0in" fo:margin-right="0in" fo:margin-top="0.0835in" fo:margin-bottom="0.0835in" style:contextual-spacing="false" style:line-height-at-least="0.2083in" fo:text-indent="0in" style:auto-text-indent="false" fo:padding="0in" fo:border="none"/>
    </style:style>
    <style:style style:name="P87" style:family="paragraph" style:parent-style-name="Text_20_body" style:list-style-name="L28">
      <style:paragraph-properties fo:margin-left="0in" fo:margin-right="0in" fo:margin-top="0.0835in" fo:margin-bottom="0.0835in" style:contextual-spacing="false" style:line-height-at-least="0.2083in" fo:text-indent="0in" style:auto-text-indent="false" fo:padding="0in" fo:border="none"/>
    </style:style>
    <style:style style:name="P88" style:family="paragraph" style:parent-style-name="Text_20_body" style:list-style-name="L29">
      <style:paragraph-properties fo:margin-left="0in" fo:margin-right="0in" fo:margin-top="0.0835in" fo:margin-bottom="0.0835in" style:contextual-spacing="false" style:line-height-at-least="0.2083in" fo:text-indent="0in" style:auto-text-indent="false" fo:padding="0in" fo:border="none"/>
    </style:style>
    <style:style style:name="P89" style:family="paragraph" style:parent-style-name="Text_20_body" style:list-style-name="L30">
      <style:paragraph-properties fo:margin-left="0in" fo:margin-right="0in" fo:margin-top="0.0835in" fo:margin-bottom="0.0835in" style:contextual-spacing="false" style:line-height-at-least="0.2083in" fo:text-indent="0in" style:auto-text-indent="false" fo:padding="0in" fo:border="none"/>
    </style:style>
    <style:style style:name="P90" style:family="paragraph" style:parent-style-name="Text_20_body" style:list-style-name="L31">
      <style:paragraph-properties fo:margin-left="0in" fo:margin-right="0in" fo:margin-top="0.0835in" fo:margin-bottom="0.0835in" style:contextual-spacing="false" style:line-height-at-least="0.2083in" fo:text-indent="0in" style:auto-text-indent="false" fo:padding="0in" fo:border="none"/>
    </style:style>
    <style:style style:name="P91" style:family="paragraph" style:parent-style-name="Text_20_body" style:list-style-name="L6">
      <style:paragraph-properties fo:margin-left="0in" fo:margin-right="0in" fo:margin-top="0.0835in" fo:margin-bottom="0.0835in" style:contextual-spacing="false" fo:line-height="175%" fo:text-indent="0in" style:auto-text-indent="false" fo:padding="0in" fo:border="none"/>
      <style:text-properties style:font-name="Google Sans Flex" fo:font-size="12pt" fo:letter-spacing="normal" fo:font-weight="bold" fo:background-color="#ffffff" loext:padding="0in" loext:border="none"/>
    </style:style>
    <style:style style:name="P92" style:family="paragraph" style:parent-style-name="Text_20_body" style:list-style-name="L7">
      <style:paragraph-properties fo:margin-left="0in" fo:margin-right="0in" fo:margin-top="0.0835in" fo:margin-bottom="0.0835in" style:contextual-spacing="false" fo:line-height="175%" fo:text-indent="0in" style:auto-text-indent="false" fo:padding="0in" fo:border="none"/>
      <style:text-properties style:font-name="Google Sans Flex" fo:font-size="12pt" fo:letter-spacing="normal" fo:font-weight="bold" fo:background-color="#ffffff" loext:padding="0in" loext:border="none"/>
    </style:style>
    <style:style style:name="P93" style:family="paragraph" style:parent-style-name="Text_20_body" style:list-style-name="L13">
      <style:paragraph-properties fo:margin-left="0in" fo:margin-right="0in" fo:margin-top="0.0835in" fo:margin-bottom="0.0835in" style:contextual-spacing="false" fo:line-height="175%" fo:text-indent="0in" style:auto-text-indent="false" fo:padding="0in" fo:border="none"/>
      <style:text-properties style:font-name="Google Sans Flex" fo:font-size="12pt" fo:letter-spacing="normal" fo:font-weight="bold" fo:background-color="#ffffff" loext:padding="0in" loext:border="none"/>
    </style:style>
    <style:style style:name="P94" style:family="paragraph" style:parent-style-name="Text_20_body" style:list-style-name="L14">
      <style:paragraph-properties fo:margin-left="0in" fo:margin-right="0in" fo:margin-top="0.0835in" fo:margin-bottom="0.0835in" style:contextual-spacing="false" fo:line-height="175%" fo:text-indent="0in" style:auto-text-indent="false" fo:padding="0in" fo:border="none"/>
      <style:text-properties style:font-name="Google Sans Flex" fo:font-size="12pt" fo:letter-spacing="normal" fo:font-weight="bold" fo:background-color="#ffffff" loext:padding="0in" loext:border="none"/>
    </style:style>
    <style:style style:name="P95" style:family="paragraph" style:parent-style-name="Text_20_body" style:list-style-name="L15">
      <style:paragraph-properties fo:margin-left="0in" fo:margin-right="0in" fo:margin-top="0.0835in" fo:margin-bottom="0.0835in" style:contextual-spacing="false" fo:line-height="175%" fo:text-indent="0in" style:auto-text-indent="false" fo:padding="0in" fo:border="none"/>
      <style:text-properties style:font-name="Google Sans Flex" fo:font-size="12pt" fo:letter-spacing="normal" fo:font-weight="bold" fo:background-color="#ffffff" loext:padding="0in" loext:border="none"/>
    </style:style>
    <style:style style:name="P96" style:family="paragraph" style:parent-style-name="Text_20_body" style:list-style-name="L17">
      <style:paragraph-properties fo:margin-left="0in" fo:margin-right="0in" fo:margin-top="0.0835in" fo:margin-bottom="0.0835in" style:contextual-spacing="false" fo:line-height="175%" fo:text-indent="0in" style:auto-text-indent="false" fo:padding="0in" fo:border="none"/>
      <style:text-properties style:font-name="Google Sans Flex" fo:font-size="12pt" fo:letter-spacing="normal" fo:font-weight="bold" fo:background-color="#ffffff" loext:padding="0in" loext:border="none"/>
    </style:style>
    <style:style style:name="P97" style:family="paragraph" style:parent-style-name="Text_20_body" style:list-style-name="L26">
      <style:paragraph-properties fo:margin-left="0in" fo:margin-right="0in" fo:margin-top="0.0835in" fo:margin-bottom="0.0835in" style:contextual-spacing="false" fo:line-height="175%" fo:text-indent="0in" style:auto-text-indent="false" fo:padding="0in" fo:border="none"/>
      <style:text-properties style:font-name="Google Sans Flex" fo:font-size="12pt" fo:letter-spacing="normal" fo:font-weight="bold" fo:background-color="#ffffff" loext:padding="0in" loext:border="none"/>
    </style:style>
    <style:style style:name="P98" style:family="paragraph" style:parent-style-name="Text_20_body" style:list-style-name="L27">
      <style:paragraph-properties fo:margin-left="0in" fo:margin-right="0in" fo:margin-top="0.0835in" fo:margin-bottom="0.0835in" style:contextual-spacing="false" fo:line-height="175%" fo:text-indent="0in" style:auto-text-indent="false" fo:padding="0in" fo:border="none"/>
      <style:text-properties style:font-name="Google Sans Flex" fo:font-size="12pt" fo:letter-spacing="normal" fo:font-weight="bold" fo:background-color="#ffffff" loext:padding="0in" loext:border="none"/>
    </style:style>
    <style:style style:name="P99" style:family="paragraph" style:parent-style-name="Text_20_body" style:list-style-name="L17">
      <style:paragraph-properties fo:margin-left="0in" fo:margin-right="0in" fo:margin-top="0.0835in" fo:margin-bottom="0.0835in" style:contextual-spacing="false" fo:line-height="175%" fo:text-indent="0in" style:auto-text-indent="false" fo:padding="0in" fo:border="none"/>
      <style:text-properties style:font-name="Google Sans Flex" fo:font-size="12pt" fo:letter-spacing="normal" fo:font-weight="normal" fo:background-color="#ffffff" loext:padding="0in" loext:border="none"/>
    </style:style>
    <style:style style:name="P100" style:family="paragraph" style:parent-style-name="Text_20_body" style:list-style-name="L23">
      <style:paragraph-properties fo:margin-left="0in" fo:margin-right="0in" fo:margin-top="0.0835in" fo:margin-bottom="0.0835in" style:contextual-spacing="false" fo:line-height="175%" fo:text-indent="0in" style:auto-text-indent="false" fo:padding="0in" fo:border="none"/>
      <style:text-properties style:font-name="Google Sans Flex" fo:font-size="12pt" fo:letter-spacing="normal" fo:font-weight="normal" fo:background-color="#ffffff" loext:padding="0in" loext:border="none"/>
    </style:style>
    <style:style style:name="P101" style:family="paragraph" style:parent-style-name="Text_20_body" style:list-style-name="L24">
      <style:paragraph-properties fo:margin-left="0in" fo:margin-right="0in" fo:margin-top="0.0835in" fo:margin-bottom="0.0835in" style:contextual-spacing="false" fo:line-height="175%" fo:text-indent="0in" style:auto-text-indent="false" fo:padding="0in" fo:border="none"/>
      <style:text-properties style:font-name="Google Sans Flex" fo:font-size="12pt" fo:letter-spacing="normal" fo:font-weight="normal" fo:background-color="#ffffff" loext:padding="0in" loext:border="none"/>
    </style:style>
    <style:style style:name="P102" style:family="paragraph" style:parent-style-name="Text_20_body" style:list-style-name="L29">
      <style:paragraph-properties fo:margin-left="0in" fo:margin-right="0in" fo:margin-top="0.0835in" fo:margin-bottom="0.0835in" style:contextual-spacing="false" fo:line-height="175%" fo:text-indent="0in" style:auto-text-indent="false" fo:padding="0in" fo:border="none"/>
      <style:text-properties style:font-name="Google Sans Flex" fo:font-size="12pt" fo:letter-spacing="normal" fo:font-weight="normal" fo:background-color="#ffffff" loext:padding="0in" loext:border="none"/>
    </style:style>
    <style:style style:name="P103" style:family="paragraph" style:parent-style-name="Text_20_body" style:list-style-name="L31">
      <style:paragraph-properties fo:margin-left="0in" fo:margin-right="0in" fo:margin-top="0.0835in" fo:margin-bottom="0.0835in" style:contextual-spacing="false" fo:line-height="175%" fo:text-indent="0in" style:auto-text-indent="false" fo:padding="0in" fo:border="none"/>
      <style:text-properties style:font-name="Google Sans Flex" fo:font-size="12pt" fo:letter-spacing="normal" fo:font-weight="normal" fo:background-color="#ffffff" loext:padding="0in" loext:border="none"/>
    </style:style>
    <style:style style:name="P104" style:family="paragraph" style:parent-style-name="Text_20_body" style:list-style-name="L26">
      <style:paragraph-properties fo:margin-left="0in" fo:margin-right="0in" fo:margin-top="0.0835in" fo:margin-bottom="0.0835in" style:contextual-spacing="false" fo:line-height="175%" fo:text-indent="0in" style:auto-text-indent="false" fo:padding="0in" fo:border="none"/>
      <style:text-properties style:font-name="Google Sans Flex" fo:font-size="12pt" fo:letter-spacing="normal" fo:font-style="italic" fo:font-weight="normal" fo:background-color="#ffffff" loext:padding="0in" loext:border="none"/>
    </style:style>
    <style:style style:name="P105" style:family="paragraph" style:parent-style-name="Text_20_body" style:list-style-name="L6">
      <style:paragraph-properties fo:margin-left="0in" fo:margin-right="0in" fo:margin-top="0.1665in" fo:margin-bottom="0.1665in" style:contextual-spacing="false" style:line-height-at-least="0.2083in" fo:text-indent="0in" style:auto-text-indent="false" fo:padding="0in" fo:border="none"/>
      <style:text-properties style:font-name="Google Sans Flex" fo:font-size="10.5pt" fo:letter-spacing="normal" fo:font-weight="bold" fo:background-color="#ffffff" loext:padding="0in" loext:border="none"/>
    </style:style>
    <style:style style:name="P106" style:family="paragraph" style:parent-style-name="Text_20_body" style:list-style-name="L7">
      <style:paragraph-properties fo:margin-left="0in" fo:margin-right="0in" fo:margin-top="0.1665in" fo:margin-bottom="0.1665in" style:contextual-spacing="false" style:line-height-at-least="0.2083in" fo:text-indent="0in" style:auto-text-indent="false" fo:padding="0in" fo:border="none"/>
      <style:text-properties style:font-name="Google Sans Flex" fo:font-size="10.5pt" fo:letter-spacing="normal" fo:font-weight="bold" fo:background-color="#ffffff" loext:padding="0in" loext:border="none"/>
    </style:style>
    <style:style style:name="P107" style:family="paragraph" style:parent-style-name="Text_20_body" style:list-style-name="L13">
      <style:paragraph-properties fo:margin-left="0in" fo:margin-right="0in" fo:margin-top="0.1665in" fo:margin-bottom="0.1665in" style:contextual-spacing="false" style:line-height-at-least="0.2083in" fo:text-indent="0in" style:auto-text-indent="false" fo:padding="0in" fo:border="none"/>
      <style:text-properties style:font-name="Google Sans Flex" fo:font-size="10.5pt" fo:letter-spacing="normal" fo:font-weight="bold" fo:background-color="#ffffff" loext:padding="0in" loext:border="none"/>
    </style:style>
    <style:style style:name="P108" style:family="paragraph" style:parent-style-name="Text_20_body" style:list-style-name="L14">
      <style:paragraph-properties fo:margin-left="0in" fo:margin-right="0in" fo:margin-top="0.1665in" fo:margin-bottom="0.1665in" style:contextual-spacing="false" style:line-height-at-least="0.2083in" fo:text-indent="0in" style:auto-text-indent="false" fo:padding="0in" fo:border="none"/>
      <style:text-properties style:font-name="Google Sans Flex" fo:font-size="10.5pt" fo:letter-spacing="normal" fo:font-weight="bold" fo:background-color="#ffffff" loext:padding="0in" loext:border="none"/>
    </style:style>
    <style:style style:name="P109" style:family="paragraph" style:parent-style-name="Text_20_body" style:list-style-name="L15">
      <style:paragraph-properties fo:margin-left="0in" fo:margin-right="0in" fo:margin-top="0.1665in" fo:margin-bottom="0.1665in" style:contextual-spacing="false" style:line-height-at-least="0.2083in" fo:text-indent="0in" style:auto-text-indent="false" fo:padding="0in" fo:border="none"/>
      <style:text-properties style:font-name="Google Sans Flex" fo:font-size="10.5pt" fo:letter-spacing="normal" fo:font-weight="bold" fo:background-color="#ffffff" loext:padding="0in" loext:border="none"/>
    </style:style>
    <style:style style:name="P110" style:family="paragraph" style:parent-style-name="Text_20_body" style:list-style-name="L17">
      <style:paragraph-properties fo:margin-left="0in" fo:margin-right="0in" fo:margin-top="0.1665in" fo:margin-bottom="0.1665in" style:contextual-spacing="false" style:line-height-at-least="0.2083in" fo:text-indent="0in" style:auto-text-indent="false" fo:padding="0in" fo:border="none"/>
      <style:text-properties style:font-name="Google Sans Flex" fo:font-size="10.5pt" fo:letter-spacing="normal" fo:font-weight="bold" fo:background-color="#ffffff" loext:padding="0in" loext:border="none"/>
    </style:style>
    <style:style style:name="P111" style:family="paragraph" style:parent-style-name="Text_20_body" style:list-style-name="L26">
      <style:paragraph-properties fo:margin-left="0in" fo:margin-right="0in" fo:margin-top="0.1665in" fo:margin-bottom="0.1665in" style:contextual-spacing="false" style:line-height-at-least="0.2083in" fo:text-indent="0in" style:auto-text-indent="false" fo:padding="0in" fo:border="none"/>
      <style:text-properties style:font-name="Google Sans Flex" fo:font-size="10.5pt" fo:letter-spacing="normal" fo:font-weight="bold" fo:background-color="#ffffff" loext:padding="0in" loext:border="none"/>
    </style:style>
    <style:style style:name="P112" style:family="paragraph" style:parent-style-name="Text_20_body" style:list-style-name="L27">
      <style:paragraph-properties fo:margin-left="0in" fo:margin-right="0in" fo:margin-top="0.1665in" fo:margin-bottom="0.1665in" style:contextual-spacing="false" style:line-height-at-least="0.2083in" fo:text-indent="0in" style:auto-text-indent="false" fo:padding="0in" fo:border="none"/>
      <style:text-properties style:font-name="Google Sans Flex" fo:font-size="10.5pt" fo:letter-spacing="normal" fo:font-weight="bold" fo:background-color="#ffffff" loext:padding="0in" loext:border="none"/>
    </style:style>
    <style:style style:name="P113" style:family="paragraph" style:parent-style-name="Text_20_body" style:list-style-name="L31">
      <style:paragraph-properties fo:margin-left="0in" fo:margin-right="0in" fo:margin-top="0.1665in" fo:margin-bottom="0.1665in" style:contextual-spacing="false" style:line-height-at-least="0.2083in" fo:text-indent="0in" style:auto-text-indent="false" fo:padding="0in" fo:border="none"/>
      <style:text-properties style:font-name="Google Sans Flex" fo:font-size="10.5pt" fo:letter-spacing="normal" fo:font-weight="bold" fo:background-color="#ffffff" loext:padding="0in" loext:border="none"/>
    </style:style>
    <style:style style:name="P114" style:family="paragraph" style:parent-style-name="Text_20_body" style:list-style-name="L8"/>
    <style:style style:name="P115" style:family="paragraph" style:parent-style-name="Text_20_body" style:list-style-name="L9"/>
    <style:style style:name="P116" style:family="paragraph" style:parent-style-name="Text_20_body" style:list-style-name="L10"/>
    <style:style style:name="P117" style:family="paragraph" style:parent-style-name="Text_20_body" style:list-style-name="L11"/>
    <style:style style:name="P118" style:family="paragraph" style:parent-style-name="Text_20_body" style:list-style-name="L12"/>
    <style:style style:name="P119" style:family="paragraph" style:parent-style-name="Text_20_body" style:list-style-name="L18">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20" style:family="paragraph" style:parent-style-name="Text_20_body" style:list-style-name="L19">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21" style:family="paragraph" style:parent-style-name="Text_20_body" style:list-style-name="L20">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22" style:family="paragraph" style:parent-style-name="Text_20_body" style:list-style-name="L21">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23" style:family="paragraph" style:parent-style-name="Text_20_body" style:list-style-name="L22">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24" style:family="paragraph" style:parent-style-name="Text_20_body" style:list-style-name="L19">
      <style:paragraph-properties fo:margin-left="0in" fo:margin-right="0in" fo:margin-top="0in" fo:margin-bottom="0.0972in" style:contextual-spacing="false" fo:line-height="114%" fo:text-indent="0in" style:auto-text-indent="false" fo:padding="0in" fo:border="none"/>
      <style:text-properties style:font-name="Google Sans Text" fo:font-weight="bold"/>
    </style:style>
    <style:style style:name="T1" style:family="text">
      <style:text-properties fo:font-weight="bold"/>
    </style:style>
    <style:style style:name="T2" style:family="text">
      <style:text-properties fo:font-style="italic"/>
    </style:style>
    <style:style style:name="T3" style:family="text">
      <style:text-properties fo:font-size="12pt" fo:background-color="transparent" loext:char-shading-value="0"/>
    </style:style>
    <style:style style:name="T4" style:family="text">
      <style:text-properties style:font-name="Google Sans Text"/>
    </style:style>
    <style:style style:name="T5" style:family="text">
      <style:text-properties style:font-name="Google Sans Text" fo:font-size="12pt" fo:background-color="transparent" loext:char-shading-value="0"/>
    </style:style>
    <style:style style:name="T6" style:family="text">
      <style:text-properties style:font-name="Google Sans Text" fo:font-weight="bold"/>
    </style:style>
    <style:style style:name="T7" style:family="text">
      <style:text-properties style:font-name="Google Sans Text" fo:background-color="transparent" loext:char-shading-value="0"/>
    </style:style>
    <style:style style:name="T8" style:family="text">
      <style:text-properties style:font-name="Google Sans"/>
    </style:style>
    <style:style style:name="T9" style:family="text">
      <style:text-properties style:font-name="Google Sans Flex" fo:font-size="12pt" fo:letter-spacing="normal" fo:font-weight="normal"/>
    </style:style>
    <style:style style:name="T10" style:family="text">
      <style:text-properties style:font-name="Google Sans Flex" fo:font-size="12pt" fo:letter-spacing="normal" fo:font-weight="normal" fo:background-color="#f0f4f9" loext:char-shading-value="0" loext:padding="0in" loext:border="none"/>
    </style:style>
    <style:style style:name="T11" style:family="text">
      <style:text-properties style:font-name="Google Sans Flex" fo:font-size="12pt" fo:letter-spacing="normal" fo:font-weight="normal" fo:background-color="#ffffff" loext:char-shading-value="0"/>
    </style:style>
    <style:style style:name="T12" style:family="text">
      <style:text-properties style:font-name="Google Sans Flex" fo:font-size="12pt" fo:letter-spacing="normal" fo:font-weight="normal" fo:background-color="#ffffff" loext:char-shading-value="0" loext:padding="0in" loext:border="none"/>
    </style:style>
    <style:style style:name="T13" style:family="text">
      <style:text-properties style:font-name="Google Sans Flex" fo:font-size="12pt" fo:letter-spacing="normal" fo:font-weight="bold" fo:background-color="#ffffff" loext:char-shading-value="0"/>
    </style:style>
    <style:style style:name="T14" style:family="text">
      <style:text-properties style:font-name="Google Sans Flex" fo:font-size="12pt" fo:letter-spacing="normal" fo:font-weight="bold" fo:background-color="#ffffff" loext:char-shading-value="0" loext:padding="0in" loext:border="none"/>
    </style:style>
    <style:style style:name="T15" style:family="text">
      <style:text-properties style:font-name="Google Sans Flex" fo:font-size="12pt" fo:letter-spacing="normal" fo:font-style="italic" fo:font-weight="normal" fo:background-color="#ffffff" loext:char-shading-value="0" loext:padding="0in" loext:border="none"/>
    </style:style>
    <style:style style:name="T16" style:family="text">
      <style:text-properties style:font-name="Google Sans Flex" fo:font-size="10.5pt" fo:letter-spacing="normal" fo:font-weight="normal"/>
    </style:style>
    <style:style style:name="T17" style:family="text">
      <style:text-properties style:font-name="Google Sans Flex" fo:font-size="10.5pt" fo:letter-spacing="normal" fo:font-weight="normal" fo:background-color="#ffffff" loext:char-shading-value="0"/>
    </style:style>
    <style:style style:name="T18" style:family="text">
      <style:text-properties style:font-name="Google Sans Flex" fo:font-size="10.5pt" fo:letter-spacing="normal" fo:font-weight="normal" fo:background-color="#ffffff" loext:char-shading-value="0" loext:padding="0in" loext:border="none"/>
    </style:style>
    <style:style style:name="T19" style:family="text">
      <style:text-properties style:font-name="Google Sans Flex" fo:font-size="10.5pt" fo:letter-spacing="normal" fo:font-style="italic" fo:font-weight="normal" fo:background-color="#ffffff" loext:char-shading-value="0" loext:padding="0in" loext:border="none"/>
    </style:style>
    <style:style style:name="T20" style:family="text">
      <style:text-properties fo:color="#d93025" loext:opacity="100%" style:font-name="Google Sans Flex" fo:font-size="12pt" fo:letter-spacing="normal" fo:font-weight="normal" fo:background-color="#f0f4f9" loext:char-shading-value="0" loext:padding="0in" loext:border="none"/>
    </style:style>
    <style:style style:name="T21" style:family="text">
      <style:text-properties fo:color="#1967d2" loext:opacity="100%" style:font-name="Google Sans Flex" fo:font-size="12pt" fo:letter-spacing="normal" fo:font-weight="normal" fo:background-color="#f0f4f9" loext:char-shading-value="0" loext:padding="0in" loext:border="none"/>
    </style:style>
    <style:style style:name="T22" style:family="text">
      <style:text-properties fo:color="#188038" loext:opacity="100%" style:font-name="Google Sans Flex" fo:font-size="12pt" fo:letter-spacing="normal" fo:font-weight="normal" fo:background-color="#f0f4f9" loext:char-shading-value="0" loext:padding="0in" loext:border="none"/>
    </style:style>
    <style:style style:name="T23" style:family="text">
      <style:text-properties fo:color="#b55908" loext:opacity="100%" style:font-name="Google Sans Flex" fo:font-size="12pt" fo:letter-spacing="normal" fo:font-weight="normal" fo:background-color="#f0f4f9" loext:char-shading-value="0" loext:padding="0in" loext:border="none"/>
    </style:style>
    <style:style style:name="T24" style:family="text">
      <style:text-properties fo:color="#444746" loext:opacity="100%" style:font-name="Google Sans Flex" fo:font-size="9pt" fo:letter-spacing="normal" fo:font-weight="normal"/>
    </style:style>
    <style:style style:name="T25" style:family="text">
      <style:text-properties fo:color="#c9211e" loext:opacity="100%" style:font-name="Google Sans Flex" fo:font-size="20pt" fo:letter-spacing="normal" fo:font-weight="bold" fo:background-color="#f0f4f9" loext:char-shading-value="0" style:font-size-asian="20pt" style:font-weight-asian="bold" style:font-size-complex="20pt" style:font-weight-complex="bold" loext:padding="0in" loext:border="none"/>
    </style:style>
    <style:style style:name="T26" style:family="text">
      <style:text-properties fo:color="#c9211e" loext:opacity="100%" fo:font-size="20pt" officeooo:rsid="0011e7e3" style:font-size-asian="20pt" style:font-size-complex="20pt"/>
    </style:style>
    <style:style style:name="T27" style:family="text">
      <style:text-properties fo:color="#c9211e" loext:opacity="100%" fo:font-size="24pt" style:font-size-asian="24pt" style:font-size-complex="24pt"/>
    </style:style>
    <style:style style:name="T28" style:family="text">
      <style:text-properties officeooo:rsid="0011e7e3"/>
    </style:style>
    <style:style style:name="T29" style:family="text">
      <style:text-properties fo:letter-spacing="normal" fo:background-color="#ffffff" loext:char-shading-value="0" loext:padding="0in" loext:border="none"/>
    </style:style>
    <style:style style:name="T30" style:family="text">
      <style:text-properties fo:color="#8ab4f8" loext:opacity="100%" style:font-name="Google Sans Flex" fo:font-size="12pt" fo:letter-spacing="normal" fo:font-weight="normal" fo:background-color="#ffffff" loext:char-shading-value="0" loext:padding="0in" loext:border="none"/>
    </style:style>
    <style:style style:name="T31" style:family="text">
      <style:text-properties fo:color="#c58af9" loext:opacity="100%" style:font-name="Google Sans Flex" fo:font-size="12pt" fo:letter-spacing="normal" fo:font-weight="normal" fo:background-color="#ffffff" loext:char-shading-value="0" loext:padding="0in" loext:border="none"/>
    </style:style>
    <style:style style:name="T32" style:family="text">
      <style:text-properties fo:color="#81c995" loext:opacity="100%" style:font-name="Google Sans Flex" fo:font-size="12pt" fo:letter-spacing="normal" fo:font-weight="normal" fo:background-color="#ffffff" loext:char-shading-value="0" loext:padding="0in" loext:border="none"/>
    </style:style>
    <style:style style:name="T33" style:family="text">
      <style:text-properties fo:color="#fa903e" loext:opacity="100%" style:font-name="Google Sans Flex" fo:font-size="12pt" fo:letter-spacing="normal" fo:font-weight="normal" fo:background-color="#ffffff" loext:char-shading-value="0" loext:padding="0in" loext:border="none"/>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Absolutely. Here are the step-by-step instructions for using mkcert on Ubuntu, Linux Mint, or any other Debian-based distribution to create a trusted local certificate.</text:p>
      <text:p text:style-name="Preformatted_20_Text">Step 1: Install mkcert and Dependencies</text:p>
      <text:p text:style-name="Preformatted_20_Text">First, you need to install the mkcert tool itself and a required dependency, libnss3-tools. This dependency provides the certutil tool which mkcert uses to install the root CA into Firefox's trust store.</text:p>
      <text:p text:style-name="Preformatted_20_Text">Open your terminal and run the following commands:</text:p>
      <text:p text:style-name="Preformatted_20_Text">Shell Script</text:p>
      <text:p text:style-name="Preformatted_20_Text"># First, update your package list</text:p>
      <text:p text:style-name="Preformatted_20_Text">sudo apt update</text:p>
      <text:p text:style-name="Preformatted_20_Text"/>
      <text:p text:style-name="Preformatted_20_Text"># Then, install mkcert and the necessary library</text:p>
      <text:p text:style-name="Preformatted_20_Text">sudo apt install mkcert libnss3-tools</text:p>
      <text:p text:style-name="Preformatted_20_Text">Step 2: Create and Install Your Local Certificate Authority (CA)</text:p>
      <text:p text:style-name="Preformatted_20_Text">This is the magic step. You only need to do this once per machine. This command creates a new local "root" certificate and automatically installs it into your system and browser trust stores.</text:p>
      <text:p text:style-name="Preformatted_20_Text">Shell Script</text:p>
      <text:p text:style-name="Preformatted_20_Text">mkcert -install</text:p>
      <text:p text:style-name="Preformatted_20_Text">You should see a message confirming it created a new local CA. From this point on, any certificates you generate with mkcert will be automatically trusted by your browsers, curl, and other tools.</text:p>
      <text:p text:style-name="Preformatted_20_Text">Step 3: Generate a Certificate for Your Local Server</text:p>
      <text:p text:style-name="Preformatted_20_Text">Now you can generate a certificate for any local hostname or IP address you need. It's best practice to generate it for localhost, the loopback IP addresses, and any custom local hostnames you might use (e.g., myapp.test).</text:p>
      <text:p text:style-name="Preformatted_20_Text">Navigate to your project's root directory (or a config folder) and run:</text:p>
      <text:p text:style-name="Preformatted_20_Text">Shell Script</text:p>
      <text:p text:style-name="Preformatted_20_Text"># Generate a cert for localhost, its IPs, and a custom .test domain</text:p>
      <text:p text:style-name="Preformatted_20_Text">mkcert localhost 127.0.0.1 ::1 myapp.test</text:p>
      <text:p text:style-name="Preformatted_20_Text">This will create two files in your current directory:</text:p>
      <text:p text:style-name="Preformatted_20_Text">•</text:p>
      <text:p text:style-name="Preformatted_20_Text">localhost+3.pem: The certificate file.</text:p>
      <text:p text:style-name="Preformatted_20_Text">•</text:p>
      <text:p text:style-name="Preformatted_20_Text">localhost+3-key.pem: The private key file.</text:p>
      <text:p text:style-name="Preformatted_20_Text">Step 4: Configure Your Spring Boot Application</text:p>
      <text:p text:style-name="Preformatted_20_Text">Spring Boot's embedded Tomcat server prefers a PKCS12 keystore (.p12 or .pfx) rather than separate .pem files. You can easily convert the files you just generated using the openssl command.</text:p>
      <text:p text:style-name="Preformatted_20_Text">1.</text:p>
      <text:p text:style-name="Preformatted_20_Text">Convert PEM to PKCS12: Run this openssl command in the same directory where you created the .pem files. This will bundle your certificate and private key into a single keystore.p12 file.</text:p>
      <text:p text:style-name="Preformatted_20_Text">Shell Script</text:p>
      <text:p text:style-name="Preformatted_20_Text">openssl pkcs12 -export -in localhost+3.pem -inkey localhost+3-key.pem -out keystore.p12 -name tomcat -passout pass:your-secret-password</text:p>
      <text:p text:style-name="Preformatted_20_Text">◦</text:p>
      <text:p text:style-name="Preformatted_20_Text">Replace your-secret-password with a password of your choice.</text:p>
      <text:p text:style-name="Preformatted_20_Text">◦</text:p>
      <text:p text:style-name="Preformatted_20_Text">The -name tomcat gives the key an alias inside the keystore, which is good practice.</text:p>
      <text:p text:style-name="Preformatted_20_Text">2.</text:p>
      <text:p text:style-name="Preformatted_20_Text">Move the Keystore: Move the newly created keystore.p12 file into your project's src/main/resources directory. This allows Spring Boot to find it on the classpath.</text:p>
      <text:p text:style-name="Preformatted_20_Text">3.</text:p>
      <text:p text:style-name="Preformatted_20_Text">Update application.properties: Add the following properties to your myapp-mongo-server/src/main/resources/application.properties file to enable SSL.</text:p>
      <text:p text:style-name="Preformatted_20_Text">Properties</text:p>
      <text:p text:style-name="Preformatted_20_Text"># --- SSL Configuration ---</text:p>
      <text:p text:style-name="Preformatted_20_Text"># The port for HTTPS</text:p>
      <text:p text:style-name="Preformatted_20_Text">server.port=8443</text:p>
      <text:p text:style-name="Preformatted_20_Text"/>
      <text:p text:style-name="Preformatted_20_Text"><text:soft-page-break/># The format of the keystore</text:p>
      <text:p text:style-name="Preformatted_20_Text">server.ssl.key-store-type=PKCS12</text:p>
      <text:p text:style-name="Preformatted_20_Text"/>
      <text:p text:style-name="Preformatted_20_Text"># The path to the keystore (classpath means src/main/resources)</text:p>
      <text:p text:style-name="Preformatted_20_Text">server.ssl.key-store=classpath:keystore.p12</text:p>
      <text:p text:style-name="Preformatted_20_Text"/>
      <text:p text:style-name="Preformatted_20_Text"># The password you chose in the openssl command</text:p>
      <text:p text:style-name="Preformatted_20_Text">server.ssl.key-store-password=your-secret-password</text:p>
      <text:p text:style-name="Preformatted_20_Text"/>
      <text:p text:style-name="Preformatted_20_Text"># The alias you chose in the openssl command</text:p>
      <text:p text:style-name="Preformatted_20_Text">server.ssl.key-alias=tomcat</text:p>
      <text:p text:style-name="Preformatted_20_Text">Show full code block</text:p>
      <text:p text:style-name="Preformatted_20_Text">Summary &amp; Final Result</text:p>
      <text:p text:style-name="Preformatted_20_Text">1.</text:p>
      <text:p text:style-name="Preformatted_20_Text">Install: sudo apt install mkcert libnss3-tools</text:p>
      <text:p text:style-name="Preformatted_20_Text">2.</text:p>
      <text:p text:style-name="Preformatted_20_Text">Create CA: mkcert -install</text:p>
      <text:p text:style-name="Preformatted_20_Text">3.</text:p>
      <text:p text:style-name="Preformatted_20_Text">Generate Cert: mkcert localhost 127.0.0.1</text:p>
      <text:p text:style-name="Preformatted_20_Text">4.</text:p>
      <text:p text:style-name="Preformatted_20_Text">Convert to Keystore: openssl pkcs12 -export ...</text:p>
      <text:p text:style-name="Preformatted_20_Text">5.</text:p>
      <text:p text:style-name="Preformatted_20_Text">Configure Spring: Update application.properties with the SSL settings.</text:p>
      <text:p text:style-name="Preformatted_20_Text">Now, when you run your Spring Boot application, it will start on port 8443 and serve traffic over HTTPS. You can access https://localhost:8443 in your browser, and you will see a green lock icon with no security warning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tab/>✅ Elasticsearch security features have been automatically configured!</text:p>
      <text:p text:style-name="Preformatted_20_Text">✅ Authentication is enabled and cluster connections are encrypted.</text:p>
      <text:p text:style-name="Preformatted_20_Text"/>
      <text:p text:style-name="Preformatted_20_Text">ℹ️ <text:s/>Password for the elastic user (reset with `bin/elasticsearch-reset-password -u elastic`):</text:p>
      <text:p text:style-name="Preformatted_20_Text"><text:s text:c="2"/>fK5ic_g4bjzxMDPIxYZM</text:p>
      <text:p text:style-name="Preformatted_20_Text"/>
      <text:p text:style-name="Preformatted_20_Text">ℹ️ <text:s/>HTTP CA certificate SHA-256 fingerprint:</text:p>
      <text:p text:style-name="Preformatted_20_Text"><text:s text:c="2"/>26e81d8eec2f05a8faa963617ebbfb252cd26d85b3758e62d898907be3173d18</text:p>
      <text:p text:style-name="Preformatted_20_Text"/>
      <text:p text:style-name="Preformatted_20_Text">ℹ️ <text:s/>Configure Kibana to use this cluster:</text:p>
      <text:p text:style-name="Preformatted_20_Text">• Run Kibana and click the configuration link in the terminal when Kibana starts.</text:p>
      <text:p text:style-name="Preformatted_20_Text">• Copy the following enrollment token and paste it into Kibana in your browser (valid for the next 30 minutes):</text:p>
      <text:p text:style-name="Preformatted_20_Text"><text:s text:c="2"/>eyJ2ZXIiOiI4LjE0LjAiLCJhZHIiOlsiMTkyLjE2OC4xMDAuMjU6OTIwMCJdLCJmZ3IiOiIyNmU4MWQ4ZWVjMmYwNWE4ZmFhOTYzNjE3ZWJiZmIyNTJjZDI2ZDg1YjM3NThlNjJkODk4OTA3YmUzMTczZDE4Iiwia2V5IjoiWW5UR1Y1c0JLZjc4TlI1VjI3WmU6MjlyMkc3OHdnZmpZQUtFM25jZ1NGQSJ9</text:p>
      <text:p text:style-name="Preformatted_20_Text"/>
      <text:p text:style-name="Preformatted_20_Text">ℹ️ <text:s/>Configure other nodes to join this cluster:</text:p>
      <text:p text:style-name="Preformatted_20_Text">• On this node:</text:p>
      <text:p text:style-name="Preformatted_20_Text"><text:s text:c="2"/>⁃ Create an enrollment token with `bin/elasticsearch-create-enrollment-token -s node`.</text:p>
      <text:p text:style-name="Preformatted_20_Text"><text:s text:c="2"/>⁃ Uncomment the transport.host setting at the end of config/elasticsearch.yml.</text:p>
      <text:p text:style-name="Preformatted_20_Text"><text:s text:c="2"/>⁃ Restart Elasticsearch.</text:p>
      <text:p text:style-name="Preformatted_20_Text">• On other nodes:</text:p>
      <text:p text:style-name="Preformatted_20_Text"><text:s text:c="2"/>⁃ Start Elasticsearch with `bin/elasticsearch --enrollment-token &lt;token&gt;`, <text:soft-page-break/>using the enrollment token that you generated.</text:p>
      <text:p text:style-name="Preformatted_20_Text">━━━━━━━━━━━━━━━━━━━━━━━━━━━━━━━━━━━━━━━━━━━━━━━━━━━━━━━━━━━━━━━━━━━━━━━━━━━━━━━━</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46"><text:span text:style-name="T26">How to create a truststore and keystore:</text:span><text:span text:style-name="T28"><text:line-break/>https://www.elastic.co/blog/elasticsearch-security-configure-tls-ssl-pki-authentication</text:span></text:p>
      <text:p text:style-name="Preformatted_20_Text"/>
      <text:p text:style-name="Preformatted_20_Text"/>
      <text:p text:style-name="Preformatted_20_Text"/>
      <text:p text:style-name="Preformatted_20_Text"/>
      <text:p text:style-name="Preformatted_20_Text"/>
      <text:p text:style-name="Preformatted_20_Text"/>
      <text:p text:style-name="Text_20_body">This error occurs because <text:span text:style-name="T1">the client connecting to Elasticsearch (e.g., your Spring Boot app, Postman, or Curl) does not trust the Elasticsearch SSL certificate.</text:span></text:p>
      <text:p text:style-name="Text_20_body">By default, Elasticsearch 8.x generates a <text:span text:style-name="T1">self-signed certificate</text:span> on startup. Since this certificate is not signed by a public authority (like DigiCert or Let's Encrypt), clients will reject it as "Unknown" and terminate the connection for security reasons.</text:p>
      <text:p text:style-name="Text_20_body">Here are the three ways to fix this, depending on your environment.</text:p>
      <text:h text:style-name="Heading_20_3" text:outline-level="3">Option 1: The "Proper" Fix (Trust the Certificate)</text:h>
      <text:p text:style-name="Text_20_body"><text:span text:style-name="T1">Best for:</text:span> Production or "Production-like" local environments. You need to tell your client to trust the CA certificate that Elasticsearch generated.</text:p>
      <text:list text:style-name="L1">
        <text:list-item>
          <text:p text:style-name="P71"><text:span text:style-name="T1">Locate the Certificate:</text:span> Go to your Elasticsearch installation directory: <text:span text:style-name="Source_20_Text">$ES_HOME/config/certs/http_ca.crt</text:span></text:p>
        </text:list-item>
        <text:list-item>
          <text:p text:style-name="P73">Import into your Client:</text:p>
          <text:list>
            <text:list-item>
              <text:p text:style-name="P71"><text:span text:style-name="T1">Java/Spring Boot:</text:span> You must add this certificate to a Java Keystore (JKS or PKCS12) and configure your app to use it.</text:p>
              <text:p text:style-name="P72">Bash</text:p>
              <text:p text:style-name="P57"><text:span text:style-name="Source_20_Text">keytool -import -alias elasticsearch -file http_ca.crt -keystore truststore.p12 -storepass password</text:span></text:p>
              <text:p text:style-name="P71">Then in <text:span text:style-name="Source_20_Text">application.properties</text:span>:</text:p>
              <text:p text:style-name="P72">Properties</text:p>
              <text:p text:style-name="P56"><text:span text:style-name="Source_20_Text">spring.elasticsearch.rest.uris=https://localhost:9200</text:span></text:p>
              <text:p text:style-name="P56"><text:span text:style-name="Source_20_Text">spring.elasticsearch.rest.ssl.trust-store=classpath:truststore.p12</text:span></text:p>
              <text:p text:style-name="P57"><text:span text:style-name="Source_20_Text">spring.elasticsearch.rest.ssl.trust-store-password=password</text:span></text:p>
            </text:list-item>
            <text:list-item>
              <text:p text:style-name="P71"><text:span text:style-name="T1">Postman:</text:span> Go to Settings -&gt; Certificates -&gt; CA Certificates -&gt; Toggle "On" and upload <text:span text:style-name="Source_20_Text">http_ca.crt</text:span>.</text:p>
            </text:list-item>
          </text:list>
        </text:list-item>
      </text:list>
      <text:h text:style-name="Heading_20_3" text:outline-level="3"><text:soft-page-break/>Option 2: The "Quick Dev" Fix (Disable SSL Verification)</text:h>
      <text:p text:style-name="Text_20_body"><text:span text:style-name="T1">Best for:</text:span> Quick local prototyping where you don't want to deal with keystores. <text:span text:style-name="T1">Warning:</text:span> Do not use this in production.</text:p>
      <text:p text:style-name="Text_20_body">If you are using the Spring Data Elasticsearch client, you can configure it to trust the self-signed certificate automatically using a fingerprint or a "trust all" strategy.</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58">Certificates in JAVA</text:p>
      <text:p text:style-name="P55">In Java, handling certificates is a core part of the <text:span text:style-name="T1">Java Cryptography Architecture (JCA)</text:span>. Since Java is often used for enterprise servers and backend communication, it has a very specific way of storing and managing these files.</text:p>
      <text:section text:style-name="Sect1" text:name="model-response-message-contentr_452945f86078f120">
        <text:p text:style-name="Text_20_body">To understand certificates in Java, you need to know about two main concepts: <text:span text:style-name="T1">Truststores</text:span> and <text:span text:style-name="T1">Keystores</text:span>.</text:p>
        <text:p text:style-name="Horizontal_20_Line"/>
        <text:h text:style-name="Heading_20_3" text:outline-level="3">1. The Key Difference: Truststore vs. Keystore</text:h>
        <text:p text:style-name="Text_20_body">Java distinguishes between certificates you "trust" and certificates that "represent you."</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Contents">Feature</text:p>
              </table:table-cell>
              <table:table-cell table:style-name="Table4.A1" office:value-type="string">
                <text:p text:style-name="Table_20_Contents"><text:span text:style-name="T1">Truststore</text:span> (<text:span text:style-name="Source_20_Text">truststore.jks</text:span>)</text:p>
              </table:table-cell>
              <table:table-cell table:style-name="Table4.A1" office:value-type="string">
                <text:p text:style-name="Table_20_Contents"><text:span text:style-name="T1">Keystore</text:span> (<text:span text:style-name="Source_20_Text">keystore.jks</text:span>)</text:p>
              </table:table-cell>
            </table:table-row>
          </table:table-header-rows>
          <table:table-row>
            <table:table-cell table:style-name="Table4.A1" office:value-type="string">
              <text:p text:style-name="P51">Contents</text:p>
            </table:table-cell>
            <table:table-cell table:style-name="Table4.A1" office:value-type="string">
              <text:p text:style-name="Table_20_Contents">Public Certificates from <text:span text:style-name="T1">others</text:span> (CAs).</text:p>
            </table:table-cell>
            <table:table-cell table:style-name="Table4.A1" office:value-type="string">
              <text:p text:style-name="Table_20_Contents">Your <text:span text:style-name="T1">Private Key</text:span> and your certificate.</text:p>
            </table:table-cell>
          </table:table-row>
          <table:table-row>
            <table:table-cell table:style-name="Table4.A1" office:value-type="string">
              <text:p text:style-name="P51">Purpose</text:p>
            </table:table-cell>
            <table:table-cell table:style-name="Table4.A1" office:value-type="string">
              <text:p text:style-name="Table_20_Contents">To verify who you are talking to.</text:p>
            </table:table-cell>
            <table:table-cell table:style-name="Table4.A1" office:value-type="string">
              <text:p text:style-name="Table_20_Contents">To prove who you are to others.</text:p>
            </table:table-cell>
          </table:table-row>
          <table:table-row>
            <table:table-cell table:style-name="Table4.A1" office:value-type="string">
              <text:p text:style-name="P51">Analogy</text:p>
            </table:table-cell>
            <table:table-cell table:style-name="Table4.A1" office:value-type="string">
              <text:p text:style-name="Table_20_Contents">Your address book of trusted people.</text:p>
            </table:table-cell>
            <table:table-cell table:style-name="Table4.A1" office:value-type="string">
              <text:p text:style-name="Table_20_Contents">Your physical ID card/Passport.</text:p>
            </table:table-cell>
          </table:table-row>
          <table:table-row>
            <table:table-cell table:style-name="Table4.A1" office:value-type="string">
              <text:p text:style-name="P51">Java Property</text:p>
            </table:table-cell>
            <table:table-cell table:style-name="Table4.A1" office:value-type="string">
              <text:p text:style-name="Table_20_Contents"><text:span text:style-name="Source_20_Text">javax.net.ssl.trustStore</text:span></text:p>
            </table:table-cell>
            <table:table-cell table:style-name="Table4.A1" office:value-type="string">
              <text:p text:style-name="Table_20_Contents"><text:span text:style-name="Source_20_Text">javax.net.ssl.keyStore</text:span></text:p>
            </table:table-cell>
          </table:table-row>
        </table:table>
        <text:p text:style-name="P54">Export to Sheets</text:p>
        <text:p text:style-name="Horizontal_20_Line"/>
        <text:h text:style-name="Heading_20_3" text:outline-level="3"><text:soft-page-break/>2. The Standard Formats</text:h>
        <text:p text:style-name="Text_20_body">Java historically used its own proprietary format, but it has recently moved toward industry standards:</text:p>
        <text:list text:style-name="L2">
          <text:list-item>
            <text:p text:style-name="P74"><text:span text:style-name="T1">JKS (Java KeyStore):</text:span> The traditional Java-specific format. It is being phased out in favor of PKCS12.</text:p>
          </text:list-item>
          <text:list-item>
            <text:p text:style-name="P74"><text:span text:style-name="T1">PKCS12 (</text:span><text:span text:style-name="Source_20_Text"><text:span text:style-name="T1">.p12</text:span></text:span><text:span text:style-name="T1"> or </text:span><text:span text:style-name="Source_20_Text"><text:span text:style-name="T1">.pfx</text:span></text:span><text:span text:style-name="T1">):</text:span> The industry standard. Since Java 9, this is the <text:span text:style-name="T1">default</text:span> format for keystores. It is compatible with almost all programming languages and operating systems.</text:p>
          </text:list-item>
        </text:list>
        <text:p text:style-name="Horizontal_20_Line"/>
        <text:h text:style-name="Heading_20_3" text:outline-level="3">3. The Default Truststore (<text:span text:style-name="Source_20_Text">cacerts</text:span>)</text:h>
        <text:p text:style-name="Text_20_body">Java comes with a built-in "master list" of trusted authorities (like DigiCert, Verisign, etc.).</text:p>
        <text:list text:style-name="L3">
          <text:list-item>
            <text:p text:style-name="P75"><text:span text:style-name="T1">Location:</text:span> <text:span text:style-name="Source_20_Text">$JAVA_HOME/lib/security/cacerts</text:span></text:p>
          </text:list-item>
          <text:list-item>
            <text:p text:style-name="P75"><text:span text:style-name="T1">Default Password:</text:span> <text:span text:style-name="Source_20_Text">changeit</text:span></text:p>
          </text:list-item>
        </text:list>
        <text:p text:style-name="Text_20_body">If you are trying to connect to a website with a certificate signed by a famous provider, Java uses this file automatically. However, if you are using a <text:span text:style-name="T1">self-signed certificate</text:span> (common in internal company testing), you must manually import that certificate into a truststore, or Java will throw the infamous: <text:span text:style-name="Source_20_Text">javax.net.ssl.SSLHandshakeException: PKIX path building failed</text:span>.</text:p>
        <text:p text:style-name="Horizontal_20_Line"/>
        <text:h text:style-name="Heading_20_3" text:outline-level="3">4. Essential Tools: <text:span text:style-name="Source_20_Text">keytool</text:span></text:h>
        <text:p text:style-name="Text_20_body">Java provides a command-line utility called <text:span text:style-name="Source_20_Text">keytool</text:span> to manage these files. Here are the three most common commands you’ll use:</text:p>
        <text:p text:style-name="P52">A. To view what is inside a keystore:</text:p>
        <text:p text:style-name="P5">Bash</text:p>
        <text:p text:style-name="P47"><text:span text:style-name="Source_20_Text">keytool -list -v -keystore my-keystore.p12</text:span></text:p>
        <text:p text:style-name="P52">B. To import a certificate (adding to your trust):</text:p>
        <text:p text:style-name="P5">Bash</text:p>
        <text:p text:style-name="P47"><text:span text:style-name="Source_20_Text">keytool -importcert -file server-ca.crt -keystore my-truststore.jks -alias "server-trust"</text:span></text:p>
        <text:p text:style-name="P52">C. To generate a new private key and certificate:</text:p>
        <text:p text:style-name="P5">Bash</text:p>
        <text:p text:style-name="P47"><text:span text:style-name="Source_20_Text">keytool -genkeypair -alias my-app -keyalg RSA -keysize 2048 -keystore keystore.p12</text:span></text:p>
        <text:p text:style-name="Horizontal_20_Line"/>
        <text:h text:style-name="Heading_20_3" text:outline-level="3"><text:soft-page-break/>5. How Java uses them in Code</text:h>
        <text:p text:style-name="Text_20_body">When you write a Java application (like a Spring Boot service), you usually point the JVM to these files using system properties at startup:</text:p>
        <text:p text:style-name="P5">Bash</text:p>
        <text:p text:style-name="Preformatted_20_Text"><text:span text:style-name="Source_20_Text">java -Djavax.net.ssl.keyStore=my-keystore.p12 \</text:span></text:p>
        <text:p text:style-name="Preformatted_20_Text"><text:span text:style-name="Source_20_Text"><text:s text:c="5"/>-Djavax.net.ssl.keyStorePassword=password \</text:span></text:p>
        <text:p text:style-name="Preformatted_20_Text"><text:span text:style-name="Source_20_Text"><text:s text:c="5"/>-Djavax.net.ssl.trustStore=my-truststore.jks \</text:span></text:p>
        <text:p text:style-name="Preformatted_20_Text"><text:span text:style-name="Source_20_Text"><text:s text:c="5"/>-Djavax.net.ssl.trustStorePassword=password \</text:span></text:p>
        <text:p text:style-name="P47"><text:span text:style-name="Source_20_Text"><text:s text:c="5"/>-jar my-app.jar</text:span></text:p>
        <text:p text:style-name="Horizontal_20_Line"/>
        <text:h text:style-name="Heading_20_3" text:outline-level="3">Summary Checklist</text:h>
        <text:list text:style-name="L4">
          <text:list-item>
            <text:p text:style-name="P76"><text:span text:style-name="T1">Talking to a website?</text:span> You need their certificate in your <text:span text:style-name="T1">Truststore</text:span>.</text:p>
          </text:list-item>
          <text:list-item>
            <text:p text:style-name="P76"><text:span text:style-name="T1">Running a server that others connect to?</text:span> You need your private key and certificate in your <text:span text:style-name="T1">Keystore</text:span>.</text:p>
          </text:list-item>
          <text:list-item>
            <text:p text:style-name="P76"><text:span text:style-name="T1">Using Java 9 or higher?</text:span> Stick to <text:span text:style-name="T1">PKCS12</text:span> format.</text:p>
          </text:list-item>
        </text:list>
        <text:p text:style-name="P52">Would you like me to show you the specific Java code to load a KeyStore programmatically without using command-line arguments?</text:p>
        <text:p text:style-name="P52"/>
        <text:p text:style-name="P52"/>
        <text:p text:style-name="P52"/>
        <text:p text:style-name="P48">is there any tool which would accept .p12 file format for truststore?</text:p>
        <text:section text:style-name="Sect1" text:name="model-response-message-contentr_f502af7f26618511">
          <text:p text:style-name="P36"><text:span text:style-name="T11">Yes, absolutely. Since Java 9, the </text:span><text:span text:style-name="T13">PKCS12</text:span><text:span text:style-name="T11"> format (</text:span><text:span text:style-name="Source_20_Text"><text:span text:style-name="T17">.p12</text:span></text:span><text:span text:style-name="T11"> or </text:span><text:span text:style-name="Source_20_Text"><text:span text:style-name="T17">.pfx</text:span></text:span><text:span text:style-name="T11">) is the industry standard and is fully supported for both Keystores and Truststores. You no longer need to use the old </text:span><text:span text:style-name="Source_20_Text"><text:span text:style-name="T17">.jks</text:span></text:span><text:span text:style-name="T11"> format.</text:span></text:p>
          <text:p text:style-name="P36"><text:span text:style-name="T12">Here are the tools you can use to manage or accept a </text:span><text:span text:style-name="Source_20_Text"><text:span text:style-name="T18">.p12</text:span></text:span><text:span text:style-name="T12"> file as a truststore:</text:span></text:p>
          <text:h text:style-name="P23" text:outline-level="3">1. KeyStore Explorer (GUI - Recommended)</text:h>
          <text:p text:style-name="P37"><text:span text:style-name="T12">This is the most popular graphical tool for managing Java certificates. It is an open-source replacement for the command-line </text:span><text:span text:style-name="Source_20_Text"><text:span text:style-name="T18">keytool</text:span></text:span><text:span text:style-name="T12">.</text:span></text:p>
          <text:list text:style-name="L5">
            <text:list-item>
              <text:p text:style-name="P77"><text:span text:style-name="T14">Why it's great:</text:span><text:span text:style-name="T12"> You can literally drag and drop your </text:span><text:span text:style-name="Source_20_Text"><text:span text:style-name="T18">.p12</text:span></text:span><text:span text:style-name="T12"> file, view the certificates inside, and even convert between JKS and PKCS12 with a single click.</text:span></text:p>
            </text:list-item>
            <text:list-item>
              <text:p text:style-name="P77"><text:span text:style-name="T14">Usage:</text:span><text:span text:style-name="T12"> Open the app → </text:span><text:span text:style-name="Source_20_Text"><text:span text:style-name="T18">Open an existing KeyStore</text:span></text:span><text:span text:style-name="T12"> → Select your </text:span><text:span text:style-name="Source_20_Text"><text:span text:style-name="T18">.p12</text:span></text:span><text:span text:style-name="T12"> file.</text:span></text:p>
            </text:list-item>
          </text:list>
          <text:h text:style-name="P34" text:outline-level="3"><text:soft-page-break/><text:span text:style-name="T14">2. Java </text:span><text:span text:style-name="Source_20_Text"><text:span text:style-name="T18">keytool</text:span></text:span><text:span text:style-name="T14"> (Command Line)</text:span></text:h>
          <text:p text:style-name="P37"><text:span text:style-name="T12">The standard tool that comes with every JDK/JRE fully supports </text:span><text:span text:style-name="Source_20_Text"><text:span text:style-name="T18">.p12</text:span></text:span><text:span text:style-name="T12">. When using it for a truststore, you just need to specify the </text:span><text:span text:style-name="Source_20_Text"><text:span text:style-name="T18">storetype</text:span></text:span><text:span text:style-name="T12">.</text:span></text:p>
          <text:list text:style-name="L6">
            <text:list-item>
              <text:p text:style-name="P91">To view your truststore:</text:p>
              <text:p text:style-name="P105">Bash</text:p>
              <text:p text:style-name="P59"><text:span text:style-name="Source_20_Text"><text:span text:style-name="T12">keytool -list -v -keystore truststore.p12 -storetype PKCS12</text:span></text:span></text:p>
            </text:list-item>
            <text:list-item>
              <text:p text:style-name="P91">To import a new CA cert into it:</text:p>
              <text:p text:style-name="P105">Bash</text:p>
              <text:p text:style-name="P59"><text:span text:style-name="Source_20_Text"><text:span text:style-name="T12">keytool -importcert -</text:span></text:span><text:span text:style-name="Source_20_Text"><text:span text:style-name="T30">alias</text:span></text:span><text:span text:style-name="Source_20_Text"><text:span text:style-name="T12"> my-ca -file ca.crt -keystore truststore.p12 -storetype PKCS12</text:span></text:span></text:p>
            </text:list-item>
          </text:list>
          <text:h text:style-name="P23" text:outline-level="3">3. OpenSSL</text:h>
          <text:p text:style-name="P37"><text:span text:style-name="T12">If you prefer non-Java tools, OpenSSL is the "gold standard" for creating and modifying </text:span><text:span text:style-name="Source_20_Text"><text:span text:style-name="T18">.p12</text:span></text:span><text:span text:style-name="T12"> files.</text:span></text:p>
          <text:list text:style-name="L7">
            <text:list-item>
              <text:p text:style-name="P92">To create a truststore-style .p12 (no private key):</text:p>
              <text:p text:style-name="P106">Bash</text:p>
              <text:p text:style-name="P60"><text:span text:style-name="Source_20_Text"><text:span text:style-name="T12">openssl pkcs12 -</text:span></text:span><text:span text:style-name="Source_20_Text"><text:span text:style-name="T30">export</text:span></text:span><text:span text:style-name="Source_20_Text"><text:span text:style-name="T12"> -nokeys -</text:span></text:span><text:span text:style-name="Source_20_Text"><text:span text:style-name="T31">in</text:span></text:span><text:span text:style-name="Source_20_Text"><text:span text:style-name="T12"> ca.crt -out truststore.p12</text:span></text:span></text:p>
            </text:list-item>
          </text:list>
          <text:p text:style-name="P42"/>
          <text:h text:style-name="P23" text:outline-level="3">How to tell Java to use the .p12 as a Truststore</text:h>
          <text:p text:style-name="P36"><text:span text:style-name="T12">Even if you have the file, you must tell the Java Virtual Machine (JVM) to treat it as a PKCS12 file instead of the default JKS. You do this by setting the </text:span><text:span text:style-name="Source_20_Text"><text:span text:style-name="T18">trustStoreType</text:span></text:span><text:span text:style-name="T12"> property.</text:span></text:p>
          <text:h text:style-name="P24" text:outline-level="4">Option A: Command Line Arguments</text:h>
          <text:p text:style-name="P27">When starting your application, add these flags:</text:p>
          <text:p text:style-name="P32">Bash</text:p>
          <text:p text:style-name="P22"><text:soft-page-break/><text:span text:style-name="Source_20_Text"><text:span text:style-name="T12">-Djavax.net.ssl.trustStore=truststore.p12 \</text:span></text:span></text:p>
          <text:p text:style-name="P21"><text:span text:style-name="Source_20_Text"><text:span text:style-name="T12">-Djavax.net.ssl.trustStorePassword=your_password \</text:span></text:span></text:p>
          <text:p text:style-name="P21"><text:span text:style-name="Source_20_Text"><text:span text:style-name="T12">-Djavax.net.ssl.trustStoreType=PKCS12</text:span></text:span></text:p>
          <text:h text:style-name="P33" text:outline-level="4"><text:span text:style-name="T14">Option B: Spring Boot (</text:span><text:span text:style-name="Source_20_Text"><text:span text:style-name="T18">application.properties</text:span></text:span><text:span text:style-name="T14">)</text:span></text:h>
          <text:p text:style-name="P27">If you are using Spring Boot, it’s even easier:</text:p>
          <text:p text:style-name="P32">Properties</text:p>
          <text:p text:style-name="P22"><text:span text:style-name="Source_20_Text"><text:span text:style-name="T30">server.ssl.trust-store</text:span></text:span><text:span text:style-name="Source_20_Text"><text:span text:style-name="T12">=</text:span></text:span><text:span text:style-name="Source_20_Text"><text:span text:style-name="T32">classpath:truststore.p12</text:span></text:span></text:p>
          <text:p text:style-name="P22"><text:span text:style-name="Source_20_Text"><text:span text:style-name="T30">server.ssl.trust-store-password</text:span></text:span><text:span text:style-name="Source_20_Text"><text:span text:style-name="T12">=</text:span></text:span><text:span text:style-name="Source_20_Text"><text:span text:style-name="T32">your_password</text:span></text:span></text:p>
          <text:p text:style-name="P22"><text:span text:style-name="Source_20_Text"><text:span text:style-name="T30">server.ssl.trust-store-type</text:span></text:span><text:span text:style-name="Source_20_Text"><text:span text:style-name="T12">=</text:span></text:span><text:span text:style-name="Source_20_Text"><text:span text:style-name="T32">PKCS12</text:span></text:span></text:p>
          <text:h text:style-name="P23" text:outline-level="3">Important Tip</text:h>
          <text:p text:style-name="P36"><text:span text:style-name="T12">If you use a </text:span><text:span text:style-name="Source_20_Text"><text:span text:style-name="T18">.p12</text:span></text:span><text:span text:style-name="T12"> file as a truststore, make sure it contains </text:span><text:span text:style-name="T14">Trusted Certificate entries</text:span><text:span text:style-name="T12"> and not just private keys. Some tools, by default, expect a </text:span><text:span text:style-name="Source_20_Text"><text:span text:style-name="T18">.p12</text:span></text:span><text:span text:style-name="T12"> to be a "Keystore" (Identity). If Java complains that the truststore is empty, use </text:span><text:span text:style-name="Source_20_Text"><text:span text:style-name="T18">keytool -list</text:span></text:span><text:span text:style-name="T12"> to verify the entries are marked as </text:span><text:span text:style-name="Source_20_Text"><text:span text:style-name="T18">trustedCertEntry</text:span></text:span><text:span text:style-name="T12">.</text:span></text:p>
          <text:p text:style-name="P36"><text:span text:style-name="T14">Would you like the commands to convert an existing </text:span><text:span text:style-name="Source_20_Text"><text:span text:style-name="T18">.jks</text:span></text:span><text:span text:style-name="T14"> truststore into a modern </text:span><text:span text:style-name="Source_20_Text"><text:span text:style-name="T18">.p12</text:span></text:span><text:span text:style-name="T14"> file?</text:span></text:p>
        </text:section>
        <text:p text:style-name="P52"/>
        <text:p text:style-name="P53"><text:span text:style-name="T27">To convert an existing Java KeyStore (</text:span><text:span text:style-name="Source_20_Text"><text:span text:style-name="T27">.jks</text:span></text:span><text:span text:style-name="T27">) to the industry-standard PKCS12 (</text:span><text:span text:style-name="Source_20_Text"><text:span text:style-name="T27">.p12</text:span></text:span><text:span text:style-name="T27">)</text:span> format, you use the <text:span text:style-name="Source_20_Text">keytool</text:span> utility included with your JDK.</text:p>
        <text:p text:style-name="Text_20_body">The process is essentially an "import" of the entire old store into a new one.</text:p>
        <text:p text:style-name="Horizontal_20_Line"/>
        <text:h text:style-name="Heading_20_3" text:outline-level="3">1. The Conversion Command</text:h>
        <text:p text:style-name="Text_20_body">Run the following command in your terminal. This works for both Keystores and Truststores.</text:p>
        <text:p text:style-name="P5">Bash</text:p>
        <text:p text:style-name="Preformatted_20_Text"><text:span text:style-name="Source_20_Text">keytool -importkeystore \</text:span></text:p>
        <text:p text:style-name="Preformatted_20_Text"><text:span text:style-name="Source_20_Text"><text:s text:c="4"/>-srckeystore old-truststore.jks \</text:span></text:p>
        <text:p text:style-name="Preformatted_20_Text"><text:span text:style-name="Source_20_Text"><text:s text:c="4"/>-destkeystore new-truststore.p12 \</text:span></text:p>
        <text:p text:style-name="Preformatted_20_Text"><text:soft-page-break/><text:span text:style-name="Source_20_Text"><text:s text:c="4"/>-srcstoretype JKS \</text:span></text:p>
        <text:p text:style-name="P47"><text:span text:style-name="Source_20_Text"><text:s text:c="4"/>-deststoretype PKCS12</text:span></text:p>
        <text:p text:style-name="P52">What the flags mean:</text:p>
        <text:list text:style-name="L8">
          <text:list-item>
            <text:p text:style-name="P114"><text:span text:style-name="Source_20_Text">-importkeystore</text:span>: The main command to move entries between stores.</text:p>
          </text:list-item>
          <text:list-item>
            <text:p text:style-name="P114"><text:span text:style-name="Source_20_Text">-srckeystore</text:span>: Your existing JKS file.</text:p>
          </text:list-item>
          <text:list-item>
            <text:p text:style-name="P114"><text:span text:style-name="Source_20_Text">-destkeystore</text:span>: The name of the new file you want to create.</text:p>
          </text:list-item>
          <text:list-item>
            <text:p text:style-name="P114"><text:span text:style-name="Source_20_Text">-srcstoretype JKS</text:span>: Tells keytool the source is the old Java format.</text:p>
          </text:list-item>
          <text:list-item>
            <text:p text:style-name="P114"><text:span text:style-name="Source_20_Text">-deststoretype PKCS12</text:span>: Tells keytool to create the new standard format.</text:p>
          </text:list-item>
        </text:list>
        <text:p text:style-name="Quotations"><text:span text:style-name="T1">Note:</text:span> You will be prompted for the destination password (set a new one) and the source password (the old one, default is often <text:span text:style-name="Source_20_Text">changeit</text:span>).</text:p>
        <text:p text:style-name="Horizontal_20_Line"/>
        <text:h text:style-name="Heading_20_3" text:outline-level="3">2. Verify the Conversion</text:h>
        <text:p text:style-name="Text_20_body">Once the file is created, you should verify that your certificates (and/or keys) moved over correctly.</text:p>
        <text:p text:style-name="P5">Bash</text:p>
        <text:p text:style-name="P47"><text:span text:style-name="Source_20_Text">keytool -list -v -keystore new-truststore.p12 -storetype PKCS12</text:span></text:p>
        <text:p text:style-name="Text_20_body">Check the output for:</text:p>
        <text:list text:style-name="L9">
          <text:list-item>
            <text:p text:style-name="P115"><text:span text:style-name="T1">Keystore type:</text:span> Should say <text:span text:style-name="Source_20_Text">PKCS12</text:span>.</text:p>
          </text:list-item>
          <text:list-item>
            <text:p text:style-name="P115"><text:span text:style-name="T1">Entry type:</text:span> If it's a truststore, you should see <text:span text:style-name="Source_20_Text">trustedCertEntry</text:span>. If it's a keystore, you'll see <text:span text:style-name="Source_20_Text">PrivateKeyEntry</text:span>.</text:p>
          </text:list-item>
        </text:list>
        <text:p text:style-name="Horizontal_20_Line"/>
        <text:h text:style-name="Heading_20_3" text:outline-level="3">3. Converting via OpenSSL (Alternative)</text:h>
        <text:p text:style-name="Text_20_body">If you already have your certificates as raw files (like <text:span text:style-name="Source_20_Text">server.crt</text:span> and <text:span text:style-name="Source_20_Text">server.key</text:span>) and want to skip the JKS step entirely to go straight to <text:span text:style-name="Source_20_Text">.p12</text:span>:</text:p>
        <text:p text:style-name="P52">To create a Keystore (Certificate + Private Key):</text:p>
        <text:p text:style-name="P5">Bash</text:p>
        <text:p text:style-name="P47"><text:span text:style-name="Source_20_Text">openssl pkcs12 -export -out keystore.p12 -inkey server.key -in server.crt</text:span></text:p>
        <text:p text:style-name="P52">To create a Truststore (CA Certificate only):</text:p>
        <text:p text:style-name="P5">Bash</text:p>
        <text:p text:style-name="P47"><text:span text:style-name="Source_20_Text">openssl pkcs12 -export -nokeys -out truststore.p12 -in ca.crt</text:span></text:p>
        <text:p text:style-name="Horizontal_20_Line"/>
        <text:h text:style-name="Heading_20_3" text:outline-level="3"><text:soft-page-break/>Common Pitfalls</text:h>
        <text:list text:style-name="L10">
          <text:list-item>
            <text:p text:style-name="P116"><text:span text:style-name="T1">Alias Names:</text:span> The "Alias" (the nickname for the certificate) stays the same during conversion. If your Java code looks for a specific alias, ensure it matches.</text:p>
          </text:list-item>
          <text:list-item>
            <text:p text:style-name="P116"><text:span text:style-name="T1">File Permissions:</text:span> If you are moving this <text:span text:style-name="Source_20_Text">.p12</text:span> file to a Linux server, ensure the Java process has read permissions for the file.</text:p>
          </text:list-item>
          <text:list-item>
            <text:p text:style-name="P116"><text:span text:style-name="T1">Password Requirements:</text:span> Some older tools struggle if the Keystore password and the Private Key password inside it are different. PKCS12 generally prefers them to be the same.</text:p>
          </text:list-item>
        </text:list>
        <text:p text:style-name="Text_20_body"><text:span text:style-name="T1">Would you like to see how to configure a Spring Boot or Tomcat server to use this new </text:span><text:span text:style-name="Source_20_Text"><text:span text:style-name="T1">.p12</text:span></text:span><text:span text:style-name="T1"> file instead of the old JKS?</text:span></text:p>
        <text:p text:style-name="P52"/>
        <text:p text:style-name="P52">To use your new <text:span text:style-name="Source_20_Text">.p12</text:span> file in a Java application, you need to update your configuration to point to the new file path and, crucially, change the Store Type to <text:span text:style-name="Source_20_Text">PKCS12</text:span>.</text:p>
        <text:section text:style-name="Sect1" text:name="model-response-message-contentr_13a3aa37cf610368">
          <text:p text:style-name="Text_20_body">Here is how you do it for the two most common scenarios.</text:p>
          <text:p text:style-name="Horizontal_20_Line"/>
          <text:h text:style-name="Heading_20_3" text:outline-level="3">1. Spring Boot (<text:span text:style-name="Source_20_Text">application.properties</text:span>)</text:h>
          <text:p text:style-name="Text_20_body">Spring Boot makes this very straightforward. You simply define the paths and types in your properties file.</text:p>
          <text:p text:style-name="P52">For the Keystore (Your Identity):</text:p>
          <text:p text:style-name="P5">Properties</text:p>
          <text:p text:style-name="Preformatted_20_Text"><text:span text:style-name="Source_20_Text">server.ssl.key-store=path/to/keystore.p12</text:span></text:p>
          <text:p text:style-name="Preformatted_20_Text"><text:span text:style-name="Source_20_Text">server.ssl.key-store-password=your_password</text:span></text:p>
          <text:p text:style-name="Preformatted_20_Text"><text:span text:style-name="Source_20_Text">server.ssl.key-store-type=PKCS12</text:span></text:p>
          <text:p text:style-name="P47"><text:span text:style-name="Source_20_Text">server.ssl.key-alias=my-app-alias</text:span></text:p>
          <text:p text:style-name="P52">For the Truststore (Who you trust):</text:p>
          <text:p text:style-name="P5">Properties</text:p>
          <text:p text:style-name="Preformatted_20_Text"><text:span text:style-name="Source_20_Text">server.ssl.trust-store=path/to/truststore.p12</text:span></text:p>
          <text:p text:style-name="Preformatted_20_Text"><text:span text:style-name="Source_20_Text">server.ssl.trust-store-password=your_password</text:span></text:p>
          <text:p text:style-name="P47"><text:span text:style-name="Source_20_Text">server.ssl.trust-store-type=PKCS12</text:span></text:p>
          <text:p text:style-name="Horizontal_20_Line"/>
          <text:h text:style-name="Heading_20_3" text:outline-level="3">2. Standalone Java / Tomcat (JVM Arguments)</text:h>
          <text:p text:style-name="Text_20_body">If you are running a standard Java app or a server like Tomcat/Wildfly, you pass these settings as "System Properties" when you launch the JAR or script.</text:p>
          <text:p text:style-name="P5">Bash</text:p>
          <text:p text:style-name="Preformatted_20_Text"><text:span text:style-name="Source_20_Text">java -Djavax.net.ssl.keyStore=keystore.p12 \</text:span></text:p>
          <text:p text:style-name="Preformatted_20_Text"><text:span text:style-name="Source_20_Text"><text:s text:c="5"/>-Djavax.net.ssl.keyStorePassword=password \</text:span></text:p>
          <text:p text:style-name="Preformatted_20_Text"><text:span text:style-name="Source_20_Text"><text:s text:c="5"/>-Djavax.net.ssl.keyStoreType=PKCS12 \</text:span></text:p>
          <text:p text:style-name="Preformatted_20_Text"><text:span text:style-name="Source_20_Text"><text:s text:c="5"/>-Djavax.net.ssl.trustStore=truststore.p12 \</text:span></text:p>
          <text:p text:style-name="Preformatted_20_Text"><text:span text:style-name="Source_20_Text"><text:s text:c="5"/>-Djavax.net.ssl.trustStorePassword=password \</text:span></text:p>
          <text:p text:style-name="Preformatted_20_Text"><text:soft-page-break/><text:span text:style-name="Source_20_Text"><text:s text:c="5"/>-Djavax.net.ssl.trustStoreType=PKCS12 \</text:span></text:p>
          <text:p text:style-name="P47"><text:span text:style-name="Source_20_Text"><text:s text:c="5"/>-jar your-app.jar</text:span></text:p>
          <text:p text:style-name="Horizontal_20_Line"/>
          <text:h text:style-name="Heading_20_3" text:outline-level="3">3. Loading via Code (Advanced)</text:h>
          <text:p text:style-name="Text_20_body">If you are writing a custom HTTP client (like Apache HttpClient or OkHttp) and need to load the <text:span text:style-name="Source_20_Text">.p12</text:span> programmatically:</text:p>
          <text:p text:style-name="P5">Java</text:p>
          <text:p text:style-name="Preformatted_20_Text"><text:span text:style-name="Source_20_Text">import java.security.KeyStore;</text:span></text:p>
          <text:p text:style-name="Preformatted_20_Text"><text:span text:style-name="Source_20_Text">import java.io.FileInputStream;</text:span></text:p>
          <text:p text:style-name="Preformatted_20_Text"/>
          <text:p text:style-name="Preformatted_20_Text"><text:span text:style-name="Source_20_Text">// Create an instance of a PKCS12 KeyStore</text:span></text:p>
          <text:p text:style-name="Preformatted_20_Text"><text:span text:style-name="Source_20_Text">KeyStore trustStore = KeyStore.getInstance("PKCS12");</text:span></text:p>
          <text:p text:style-name="Preformatted_20_Text"/>
          <text:p text:style-name="Preformatted_20_Text"><text:span text:style-name="Source_20_Text">// Load the file</text:span></text:p>
          <text:p text:style-name="Preformatted_20_Text"><text:span text:style-name="Source_20_Text">try (FileInputStream instream = new FileInputStream("truststore.p12")) {</text:span></text:p>
          <text:p text:style-name="Preformatted_20_Text"><text:span text:style-name="Source_20_Text"><text:s text:c="4"/>trustStore.load(instream, "password".toCharArray());</text:span></text:p>
          <text:p text:style-name="Preformatted_20_Text"><text:span text:style-name="Source_20_Text">}</text:span></text:p>
          <text:p text:style-name="Preformatted_20_Text"/>
          <text:p text:style-name="P47"><text:span text:style-name="Source_20_Text">// Now you can use this trustStore to initialize an SSLContext</text:span></text:p>
          <text:p text:style-name="Horizontal_20_Line"/>
          <text:h text:style-name="Heading_20_3" text:outline-level="3">Pro-Tip: The "Certificate Chain"</text:h>
          <text:p text:style-name="Text_20_body">When moving to <text:span text:style-name="Source_20_Text">.p12</text:span>, especially for a <text:span text:style-name="T1">Keystore</text:span>, ensure your <text:span text:style-name="Source_20_Text">.p12</text:span> file contains the <text:span text:style-name="T1">full chain</text:span>.</text:p>
          <text:list text:style-name="L11">
            <text:list-item>
              <text:p text:style-name="P117"><text:span text:style-name="T1">Incomplete:</text:span> Just your <text:span text:style-name="Source_20_Text">server.crt</text:span>.</text:p>
            </text:list-item>
            <text:list-item>
              <text:p text:style-name="P117"><text:span text:style-name="T1">Complete:</text:span> Your <text:span text:style-name="Source_20_Text">server.crt</text:span> + <text:span text:style-name="Source_20_Text">intermediate.crt</text:span> + <text:span text:style-name="Source_20_Text">root.crt</text:span>.</text:p>
            </text:list-item>
          </text:list>
          <text:p text:style-name="Text_20_body">If you only include the leaf certificate, some clients (like mobile apps or older browsers) might not trust the connection because they can't "trace the path" back to the Root CA.</text:p>
          <text:p text:style-name="Text_20_body"><text:span text:style-name="T1">Would you like to know the command to bundle your certificate and its intermediates into a single </text:span><text:span text:style-name="Source_20_Text"><text:span text:style-name="T1">.p12</text:span></text:span><text:span text:style-name="T1"> file using OpenSSL?</text:span></text:p>
        </text:section>
        <text:p text:style-name="P52"/>
        <text:p text:style-name="P52"/>
        <text:p text:style-name="P52"><text:span text:style-name="T4">To connect a Java application to Elasticsearch using the </text:span><text:span text:style-name="Source_20_Text"><text:span text:style-name="T4">http_ca.crt</text:span></text:span><text:span text:style-name="T4">, you have two main paths: the Configuration approach (Standard JVM behavior) or the Code approach (Programmatic/Dynamic).</text:span></text:p>
        <text:p text:style-name="Horizontal_20_Line"/>
        <text:h text:style-name="P7" text:outline-level="3">1. The Configuration Approach (No code changes)</text:h>
        <text:p text:style-name="P12"><text:span text:style-name="T4">This is the cleanest method because it keeps security credentials out of your source code. You convert the </text:span><text:span text:style-name="Source_20_Text"><text:span text:style-name="T4">.crt</text:span></text:span><text:span text:style-name="T4"> to a </text:span><text:span text:style-name="Source_20_Text"><text:span text:style-name="T4">.p12</text:span></text:span><text:span text:style-name="T4"> truststore and tell Java where it is.</text:span></text:p>
        <text:p text:style-name="P17">Step 1: Create the Truststore</text:p>
        <text:p text:style-name="P15"><text:soft-page-break/>Bash</text:p>
        <text:p text:style-name="P10"><text:span text:style-name="Source_20_Text"><text:span text:style-name="T4">keytool -importcert -keystore es-truststore.p12 -storetype PKCS12 -file http_ca.crt -alias elastic-ca -storepass mypassword</text:span></text:span></text:p>
        <text:p text:style-name="P16">Step 2: Configuration (System Properties)</text:p>
        <text:p text:style-name="P16">Add these flags to your application startup command:</text:p>
        <text:p text:style-name="P15">Bash</text:p>
        <text:p text:style-name="P10"><text:span text:style-name="Source_20_Text"><text:span text:style-name="T4">java -Djavax.net.ssl.trustStore=es-truststore.p12 \</text:span></text:span></text:p>
        <text:p text:style-name="P13"><text:span text:style-name="Source_20_Text"><text:s text:c="5"/></text:span><text:span text:style-name="Source_20_Text"><text:span text:style-name="T4">-Djavax.net.ssl.trustStorePassword=mypassword \</text:span></text:span></text:p>
        <text:p text:style-name="P13"><text:span text:style-name="Source_20_Text"><text:s text:c="5"/></text:span><text:span text:style-name="Source_20_Text"><text:span text:style-name="T4">-Djavax.net.ssl.trustStoreType=PKCS12 \</text:span></text:span></text:p>
        <text:p text:style-name="P13"><text:span text:style-name="Source_20_Text"><text:s text:c="5"/></text:span><text:span text:style-name="Source_20_Text"><text:span text:style-name="T4">-jar your-es-app.jar</text:span></text:span></text:p>
        <text:p text:style-name="Horizontal_20_Line"/>
        <text:h text:style-name="P7" text:outline-level="3">2. The Code Approach (Spring Boot / Java Client)</text:h>
        <text:p text:style-name="P12"><text:span text:style-name="T4">If you are using the official </text:span><text:span text:style-name="T6">Elasticsearch Java Low-Level or API Client</text:span><text:span text:style-name="T4">, you can load the </text:span><text:span text:style-name="Source_20_Text"><text:span text:style-name="T4">.crt</text:span></text:span><text:span text:style-name="T4"> file directly in your code. This is useful if you don't want to manage a separate KeyStore file.</text:span></text:p>
        <text:h text:style-name="P8" text:outline-level="4">A. Official Elasticsearch Java Client</text:h>
        <text:p text:style-name="P12"><text:span text:style-name="T4">This snippet shows how to build the </text:span><text:span text:style-name="Source_20_Text"><text:span text:style-name="T4">SSLContext</text:span></text:span><text:span text:style-name="T4"> directly from the certificate bytes.</text:span></text:p>
        <text:p text:style-name="P15">Java</text:p>
        <text:p text:style-name="P10"><text:span text:style-name="Source_20_Text"><text:span text:style-name="T4">import co.elastic.clients.elasticsearch.ElasticsearchClient;</text:span></text:span></text:p>
        <text:p text:style-name="P10"><text:span text:style-name="Source_20_Text"><text:span text:style-name="T4">import co.elastic.clients.json.jackson.JacksonJsonpMapper;</text:span></text:span></text:p>
        <text:p text:style-name="P10"><text:span text:style-name="Source_20_Text"><text:span text:style-name="T4">import co.elastic.clients.transport.rest_client.RestClientTransport;</text:span></text:span></text:p>
        <text:p text:style-name="P10"><text:span text:style-name="Source_20_Text"><text:span text:style-name="T4">import org.apache.http.HttpHost;</text:span></text:span></text:p>
        <text:p text:style-name="P10"><text:span text:style-name="Source_20_Text"><text:span text:style-name="T4">import org.apache.http.ssl.SSLContexts;</text:span></text:span></text:p>
        <text:p text:style-name="P10"><text:span text:style-name="Source_20_Text"><text:span text:style-name="T4">import org.elasticsearch.client.RestClient;</text:span></text:span></text:p>
        <text:p text:style-name="P13"/>
        <text:p text:style-name="P10"><text:span text:style-name="Source_20_Text"><text:span text:style-name="T4">import javax.net.ssl.SSLContext;</text:span></text:span></text:p>
        <text:p text:style-name="P10"><text:span text:style-name="Source_20_Text"><text:span text:style-name="T4">import java.nio.file.Files;</text:span></text:span></text:p>
        <text:p text:style-name="P10"><text:span text:style-name="Source_20_Text"><text:span text:style-name="T4">import java.nio.file.Path;</text:span></text:span></text:p>
        <text:p text:style-name="P10"><text:span text:style-name="Source_20_Text"><text:span text:style-name="T4">import java.nio.file.Paths;</text:span></text:span></text:p>
        <text:p text:style-name="P10"><text:span text:style-name="Source_20_Text"><text:span text:style-name="T4">import java.security.cert.CertificateFactory;</text:span></text:span></text:p>
        <text:p text:style-name="P10"><text:span text:style-name="Source_20_Text"><text:span text:style-name="T4">import java.security.cert.X509Certificate;</text:span></text:span></text:p>
        <text:p text:style-name="P10"><text:span text:style-name="Source_20_Text"><text:span text:style-name="T4">import java.io.InputStream;</text:span></text:span></text:p>
        <text:p text:style-name="P10"><text:span text:style-name="Source_20_Text"><text:span text:style-name="T4">import java.security.KeyStore;</text:span></text:span></text:p>
        <text:p text:style-name="P13"/>
        <text:p text:style-name="P10"><text:span text:style-name="Source_20_Text"><text:span text:style-name="T4">public class EsClientProvider {</text:span></text:span></text:p>
        <text:p text:style-name="P10"><text:span text:style-name="Source_20_Text"><text:s text:c="4"/></text:span><text:span text:style-name="Source_20_Text"><text:span text:style-name="T4">public ElasticsearchClient createClient() throws Exception {</text:span></text:span></text:p>
        <text:p text:style-name="P10"><text:span text:style-name="Source_20_Text"><text:s text:c="8"/></text:span><text:span text:style-name="Source_20_Text"><text:span text:style-name="T4">// 1. Load the http_ca.crt file</text:span></text:span></text:p>
        <text:p text:style-name="P10"><text:span text:style-name="Source_20_Text"><text:s text:c="8"/></text:span><text:span text:style-name="Source_20_Text"><text:span text:style-name="T4">Path caCertificatePath = Paths.get("path/to/http_ca.crt");</text:span></text:span></text:p>
        <text:p text:style-name="P10"><text:span text:style-name="Source_20_Text"><text:s text:c="8"/></text:span><text:span text:style-name="Source_20_Text"><text:span text:style-name="T4">CertificateFactory factory = CertificateFactory.getInstance("X.509");</text:span></text:span></text:p>
        <text:p text:style-name="P13"><text:span text:style-name="Source_20_Text"><text:s text:c="8"/></text:span><text:span text:style-name="Source_20_Text"><text:span text:style-name="T4">X509Certificate trustedCa;</text:span></text:span></text:p>
        <text:p text:style-name="P10"><text:soft-page-break/><text:span text:style-name="Source_20_Text"><text:s text:c="8"/></text:span><text:span text:style-name="Source_20_Text"><text:span text:style-name="T4">try (InputStream is = Files.newInputStream(caCertificatePath)) {</text:span></text:span></text:p>
        <text:p text:style-name="P13"><text:span text:style-name="Source_20_Text"><text:s text:c="12"/></text:span><text:span text:style-name="Source_20_Text"><text:span text:style-name="T4">trustedCa = (X509Certificate) factory.generateCertificate(is);</text:span></text:span></text:p>
        <text:p text:style-name="P13"><text:span text:style-name="Source_20_Text"><text:s text:c="8"/></text:span><text:span text:style-name="Source_20_Text"><text:span text:style-name="T4">}</text:span></text:span></text:p>
        <text:p text:style-name="P13"/>
        <text:p text:style-name="P10"><text:span text:style-name="Source_20_Text"><text:s text:c="8"/></text:span><text:span text:style-name="Source_20_Text"><text:span text:style-name="T4">// 2. Put it into a temporary in-memory KeyStore</text:span></text:span></text:p>
        <text:p text:style-name="P10"><text:span text:style-name="Source_20_Text"><text:s text:c="8"/></text:span><text:span text:style-name="Source_20_Text"><text:span text:style-name="T4">KeyStore trustStore = KeyStore.getInstance("pkcs12");</text:span></text:span></text:p>
        <text:p text:style-name="P10"><text:span text:style-name="Source_20_Text"><text:s text:c="8"/></text:span><text:span text:style-name="Source_20_Text"><text:span text:style-name="T4">trustStore.load(null, null);</text:span></text:span></text:p>
        <text:p text:style-name="P10"><text:span text:style-name="Source_20_Text"><text:s text:c="8"/></text:span><text:span text:style-name="Source_20_Text"><text:span text:style-name="T4">trustStore.setCertificateEntry("ca", trustedCa);</text:span></text:span></text:p>
        <text:p text:style-name="P13"/>
        <text:p text:style-name="P10"><text:span text:style-name="Source_20_Text"><text:s text:c="8"/></text:span><text:span text:style-name="Source_20_Text"><text:span text:style-name="T4">// 3. Create the SSLContext</text:span></text:span></text:p>
        <text:p text:style-name="P13"><text:span text:style-name="Source_20_Text"><text:s text:c="8"/></text:span><text:span text:style-name="Source_20_Text"><text:span text:style-name="T4">SSLContext sslContext = SSLContexts.custom()</text:span></text:span></text:p>
        <text:p text:style-name="P10"><text:span text:style-name="Source_20_Text"><text:s text:c="12"/></text:span><text:span text:style-name="Source_20_Text"><text:span text:style-name="T4">.loadTrustMaterial(trustStore, null)</text:span></text:span></text:p>
        <text:p text:style-name="P13"><text:span text:style-name="Source_20_Text"><text:s text:c="12"/></text:span><text:span text:style-name="Source_20_Text"><text:span text:style-name="T4">.build();</text:span></text:span></text:p>
        <text:p text:style-name="P13"/>
        <text:p text:style-name="P10"><text:span text:style-name="Source_20_Text"><text:s text:c="8"/></text:span><text:span text:style-name="Source_20_Text"><text:span text:style-name="T4">// 4. Create the RestClient</text:span></text:span></text:p>
        <text:p text:style-name="P10"><text:span text:style-name="Source_20_Text"><text:s text:c="8"/></text:span><text:span text:style-name="Source_20_Text"><text:span text:style-name="T4">RestClient restClient = RestClient.builder(new HttpHost("localhost", 9200, "https"))</text:span></text:span></text:p>
        <text:p text:style-name="P13"><text:span text:style-name="Source_20_Text"><text:s text:c="12"/></text:span><text:span text:style-name="Source_20_Text"><text:span text:style-name="T4">.setHttpClientConfigCallback(hc -&gt; hc.setSSLContext(sslContext))</text:span></text:span></text:p>
        <text:p text:style-name="P13"><text:span text:style-name="Source_20_Text"><text:s text:c="12"/></text:span><text:span text:style-name="Source_20_Text"><text:span text:style-name="T4">.build();</text:span></text:span></text:p>
        <text:p text:style-name="P13"/>
        <text:p text:style-name="P10"><text:span text:style-name="Source_20_Text"><text:s text:c="8"/></text:span><text:span text:style-name="Source_20_Text"><text:span text:style-name="T4">// 5. Create the API Client</text:span></text:span></text:p>
        <text:p text:style-name="P10"><text:span text:style-name="Source_20_Text"><text:s text:c="8"/></text:span><text:span text:style-name="Source_20_Text"><text:span text:style-name="T4">RestClientTransport transport = new RestClientTransport(restClient, new JacksonJsonpMapper());</text:span></text:span></text:p>
        <text:p text:style-name="P10"><text:span text:style-name="Source_20_Text"><text:s text:c="8"/></text:span><text:span text:style-name="Source_20_Text"><text:span text:style-name="T4">return new ElasticsearchClient(transport);</text:span></text:span></text:p>
        <text:p text:style-name="P13"><text:span text:style-name="Source_20_Text"><text:s text:c="4"/></text:span><text:span text:style-name="Source_20_Text"><text:span text:style-name="T4">}</text:span></text:span></text:p>
        <text:p text:style-name="P13"><text:span text:style-name="Source_20_Text"><text:span text:style-name="T4">}</text:span></text:span></text:p>
        <text:p text:style-name="Horizontal_20_Line"/>
        <text:h text:style-name="P7" text:outline-level="3">3. Which one should you use?</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11"><text:span text:style-name="Strong_20_Emphasis"><text:span text:style-name="T4">Method</text:span></text:span></text:p>
              </table:table-cell>
              <table:table-cell table:style-name="Table5.A1" office:value-type="string">
                <text:p text:style-name="P11"><text:span text:style-name="Strong_20_Emphasis"><text:span text:style-name="T4">Best For...</text:span></text:span></text:p>
              </table:table-cell>
              <table:table-cell table:style-name="Table5.A1" office:value-type="string">
                <text:p text:style-name="P11"><text:span text:style-name="Strong_20_Emphasis"><text:span text:style-name="T4">Pros</text:span></text:span></text:p>
              </table:table-cell>
              <table:table-cell table:style-name="Table5.A1" office:value-type="string">
                <text:p text:style-name="P11"><text:span text:style-name="Strong_20_Emphasis"><text:span text:style-name="T4">Cons</text:span></text:span></text:p>
              </table:table-cell>
            </table:table-row>
          </table:table-header-rows>
          <table:table-row>
            <table:table-cell table:style-name="Table5.A1" office:value-type="string">
              <text:p text:style-name="P18">System Properties</text:p>
            </table:table-cell>
            <table:table-cell table:style-name="Table5.A1" office:value-type="string">
              <text:p text:style-name="P14">Production Environments</text:p>
            </table:table-cell>
            <table:table-cell table:style-name="Table5.A1" office:value-type="string">
              <text:p text:style-name="P14">No code changes required; easy to rotate certs.</text:p>
            </table:table-cell>
            <table:table-cell table:style-name="Table5.A1" office:value-type="string">
              <text:p text:style-name="P14">Affects the entire JVM (all connections).</text:p>
            </table:table-cell>
          </table:table-row>
          <table:table-row>
            <table:table-cell table:style-name="Table5.A1" office:value-type="string">
              <text:p text:style-name="P18">Programmatic</text:p>
            </table:table-cell>
            <table:table-cell table:style-name="Table5.A1" office:value-type="string">
              <text:p text:style-name="P14">Microservices / CLI tools</text:p>
            </table:table-cell>
            <table:table-cell table:style-name="Table5.A1" office:value-type="string">
              <text:p text:style-name="P14">Very portable; only affects the ES connection.</text:p>
            </table:table-cell>
            <table:table-cell table:style-name="Table5.A1" office:value-type="string">
              <text:p text:style-name="P14">Harder to maintain; requires code recompilation if logic changes.</text:p>
            </table:table-cell>
          </table:table-row>
        </table:table>
        <text:h text:style-name="P7" text:outline-level="3">Common Error Note</text:h>
        <text:p text:style-name="P12"><text:span text:style-name="T4">If you use the </text:span><text:span text:style-name="T6">Code Approach</text:span><text:span text:style-name="T4">, make sure your Elasticsearch URL starts with </text:span><text:span text:style-name="Source_20_Text"><text:span text:style-name="T6">https://</text:span></text:span><text:span text:style-name="T4">. If you use </text:span><text:span text:style-name="Source_20_Text"><text:span text:style-name="T4">http://</text:span></text:span><text:span text:style-name="T4">, Java will ignore your SSL configuration entirely and the connection will fail because Elasticsearch expects encryption.</text:span></text:p>
        <text:p text:style-name="P12"><text:span text:style-name="T6">Would you like me to show you how to verify if your </text:span><text:span text:style-name="Source_20_Text"><text:span text:style-name="T6">http_ca.crt</text:span></text:span><text:span text:style-name="T6"> is actually the one that signed your server's certificate using OpenSSL?</text:span></text:p>
        <text:p text:style-name="P52"><text:soft-page-break/></text:p>
        <text:p text:style-name="P52"/>
        <text:p text:style-name="P52"/>
        <text:p text:style-name="P52"/>
        <text:p text:style-name="P52"/>
      </text:section>
      <text:p text:style-name="P55">In a Spring Boot environment, the most "Spring-like" way to handle this is by creating a <text:span text:style-name="T1">Bean</text:span> for the <text:span text:style-name="Source_20_Text">ElasticsearchClient</text:span>. This allows you to centralize the security logic and inject the client wherever you need it (e.g., in your Services or Controllers).</text:p>
      <text:p text:style-name="Text_20_body">Here is the configuration and the code to use the <text:span text:style-name="Source_20_Text">http_ca.crt</text:span> file.</text:p>
      <text:h text:style-name="Heading_20_3" text:outline-level="3">1. Configuration (<text:span text:style-name="Source_20_Text">application.properties</text:span>)</text:h>
      <text:p text:style-name="Text_20_body">First, define the path to your CA certificate and the Elasticsearch credentials. This keeps your code clean and environment-independent.</text:p>
      <text:p text:style-name="P5">Properties</text:p>
      <text:p text:style-name="Preformatted_20_Text"><text:span text:style-name="Source_20_Text"># Custom properties for our bean</text:span></text:p>
      <text:p text:style-name="Preformatted_20_Text"><text:span text:style-name="Source_20_Text">elasticsearch.host=localhost</text:span></text:p>
      <text:p text:style-name="Preformatted_20_Text"><text:span text:style-name="Source_20_Text">elasticsearch.port=9200</text:span></text:p>
      <text:p text:style-name="Preformatted_20_Text"><text:span text:style-name="Source_20_Text">elasticsearch.username=elastic</text:span></text:p>
      <text:p text:style-name="Preformatted_20_Text"><text:span text:style-name="Source_20_Text">elasticsearch.password=your_password</text:span></text:p>
      <text:p text:style-name="P47"><text:span text:style-name="Source_20_Text">elasticsearch.ca-path=classpath:http_ca.crt</text:span></text:p>
      <text:p text:style-name="Horizontal_20_Line"/>
      <text:h text:style-name="Heading_20_3" text:outline-level="3">2. The Configuration Bean</text:h>
      <text:p text:style-name="Text_20_body">This class loads the certificate, creates an in-memory Truststore, and initializes the high-level <text:span text:style-name="Source_20_Text">ElasticsearchClient</text:span>.</text:p>
      <text:p text:style-name="P5">Java</text:p>
      <text:p text:style-name="Preformatted_20_Text"><text:span text:style-name="Source_20_Text">import co.elastic.clients.elasticsearch.ElasticsearchClient;</text:span></text:p>
      <text:p text:style-name="Preformatted_20_Text"><text:span text:style-name="Source_20_Text">import co.elastic.clients.json.jackson.JacksonJsonpMapper;</text:span></text:p>
      <text:p text:style-name="Preformatted_20_Text"><text:span text:style-name="Source_20_Text">import co.elastic.clients.transport.rest_client.RestClientTransport;</text:span></text:p>
      <text:p text:style-name="Preformatted_20_Text"><text:span text:style-name="Source_20_Text">import org.apache.http.HttpHost;</text:span></text:p>
      <text:p text:style-name="Preformatted_20_Text"><text:span text:style-name="Source_20_Text">import org.apache.http.auth.AuthScope;</text:span></text:p>
      <text:p text:style-name="Preformatted_20_Text"><text:span text:style-name="Source_20_Text">import org.apache.http.auth.UsernamePasswordCredentials;</text:span></text:p>
      <text:p text:style-name="Preformatted_20_Text"><text:span text:style-name="Source_20_Text">import org.apache.http.impl.client.BasicCredentialsProvider;</text:span></text:p>
      <text:p text:style-name="Preformatted_20_Text"><text:span text:style-name="Source_20_Text">import org.apache.http.ssl.SSLContexts;</text:span></text:p>
      <text:p text:style-name="Preformatted_20_Text"><text:span text:style-name="Source_20_Text">import org.elasticsearch.client.RestClient;</text:span></text:p>
      <text:p text:style-name="Preformatted_20_Text"><text:span text:style-name="Source_20_Text">import org.springframework.beans.factory.annotation.Value;</text:span></text:p>
      <text:p text:style-name="Preformatted_20_Text"><text:span text:style-name="Source_20_Text">import org.springframework.context.annotation.Bean;</text:span></text:p>
      <text:p text:style-name="Preformatted_20_Text"><text:span text:style-name="Source_20_Text">import org.springframework.context.annotation.Configuration;</text:span></text:p>
      <text:p text:style-name="Preformatted_20_Text"><text:span text:style-name="Source_20_Text">import org.springframework.core.io.Resource;</text:span></text:p>
      <text:p text:style-name="Preformatted_20_Text"/>
      <text:p text:style-name="Preformatted_20_Text"><text:span text:style-name="Source_20_Text">import javax.net.ssl.SSLContext;</text:span></text:p>
      <text:p text:style-name="Preformatted_20_Text"><text:span text:style-name="Source_20_Text">import java.io.InputStream;</text:span></text:p>
      <text:p text:style-name="Preformatted_20_Text"><text:span text:style-name="Source_20_Text">import java.security.KeyStore;</text:span></text:p>
      <text:p text:style-name="Preformatted_20_Text"><text:span text:style-name="Source_20_Text">import java.security.cert.CertificateFactory;</text:span></text:p>
      <text:p text:style-name="Preformatted_20_Text"><text:span text:style-name="Source_20_Text">import java.security.cert.X509Certificate;</text:span></text:p>
      <text:p text:style-name="Preformatted_20_Text"/>
      <text:p text:style-name="Preformatted_20_Text"><text:span text:style-name="Source_20_Text">@Configuration</text:span></text:p>
      <text:p text:style-name="Preformatted_20_Text"><text:soft-page-break/><text:span text:style-name="Source_20_Text">public class ElasticClientConfig {</text:span></text:p>
      <text:p text:style-name="Preformatted_20_Text"/>
      <text:p text:style-name="Preformatted_20_Text"><text:span text:style-name="Source_20_Text"><text:s text:c="4"/>@Value("${elasticsearch.host}") private String host;</text:span></text:p>
      <text:p text:style-name="Preformatted_20_Text"><text:span text:style-name="Source_20_Text"><text:s text:c="4"/>@Value("${elasticsearch.port}") private int port;</text:span></text:p>
      <text:p text:style-name="Preformatted_20_Text"><text:span text:style-name="Source_20_Text"><text:s text:c="4"/>@Value("${elasticsearch.username}") private String username;</text:span></text:p>
      <text:p text:style-name="Preformatted_20_Text"><text:span text:style-name="Source_20_Text"><text:s text:c="4"/>@Value("${elasticsearch.password}") private String password;</text:span></text:p>
      <text:p text:style-name="Preformatted_20_Text"><text:span text:style-name="Source_20_Text"><text:s text:c="4"/>@Value("${elasticsearch.ca-path}") private Resource caCertificate;</text:span></text:p>
      <text:p text:style-name="Preformatted_20_Text"/>
      <text:p text:style-name="Preformatted_20_Text"><text:span text:style-name="Source_20_Text"><text:s text:c="4"/>@Bean</text:span></text:p>
      <text:p text:style-name="Preformatted_20_Text"><text:span text:style-name="Source_20_Text"><text:s text:c="4"/>public ElasticsearchClient elasticsearchClient() throws Exception {</text:span></text:p>
      <text:p text:style-name="Preformatted_20_Text"><text:span text:style-name="Source_20_Text"><text:s text:c="8"/>// 1. Load CA Certificate from resources</text:span></text:p>
      <text:p text:style-name="Preformatted_20_Text"><text:span text:style-name="Source_20_Text"><text:s text:c="8"/>CertificateFactory factory = CertificateFactory.getInstance("X.509");</text:span></text:p>
      <text:p text:style-name="Preformatted_20_Text"><text:span text:style-name="Source_20_Text"><text:s text:c="8"/>X509Certificate trustedCa;</text:span></text:p>
      <text:p text:style-name="Preformatted_20_Text"><text:span text:style-name="Source_20_Text"><text:s text:c="8"/>try (InputStream is = caCertificate.getInputStream()) {</text:span></text:p>
      <text:p text:style-name="Preformatted_20_Text"><text:span text:style-name="Source_20_Text"><text:s text:c="12"/>trustedCa = (X509Certificate) factory.generateCertificate(is);</text:span></text:p>
      <text:p text:style-name="Preformatted_20_Text"><text:span text:style-name="Source_20_Text"><text:s text:c="8"/>}</text:span></text:p>
      <text:p text:style-name="Preformatted_20_Text"/>
      <text:p text:style-name="Preformatted_20_Text"><text:span text:style-name="Source_20_Text"><text:s text:c="8"/>// 2. Create an in-memory Truststore</text:span></text:p>
      <text:p text:style-name="Preformatted_20_Text"><text:span text:style-name="Source_20_Text"><text:s text:c="8"/>KeyStore trustStore = KeyStore.getInstance("pkcs12");</text:span></text:p>
      <text:p text:style-name="Preformatted_20_Text"><text:span text:style-name="Source_20_Text"><text:s text:c="8"/>trustStore.load(null, null);</text:span></text:p>
      <text:p text:style-name="Preformatted_20_Text"><text:span text:style-name="Source_20_Text"><text:s text:c="8"/>trustStore.setCertificateEntry("ca", trustedCa);</text:span></text:p>
      <text:p text:style-name="Preformatted_20_Text"/>
      <text:p text:style-name="Preformatted_20_Text"><text:span text:style-name="Source_20_Text"><text:s text:c="8"/>// 3. Set up SSL Context</text:span></text:p>
      <text:p text:style-name="Preformatted_20_Text"><text:span text:style-name="Source_20_Text"><text:s text:c="8"/>SSLContext sslContext = SSLContexts.custom()</text:span></text:p>
      <text:p text:style-name="Preformatted_20_Text"><text:span text:style-name="Source_20_Text"><text:s text:c="16"/>.loadTrustMaterial(trustStore, null)</text:span></text:p>
      <text:p text:style-name="Preformatted_20_Text"><text:span text:style-name="Source_20_Text"><text:s text:c="16"/>.build();</text:span></text:p>
      <text:p text:style-name="Preformatted_20_Text"/>
      <text:p text:style-name="Preformatted_20_Text"><text:span text:style-name="Source_20_Text"><text:s text:c="8"/>// 4. Set up Credentials Provider</text:span></text:p>
      <text:p text:style-name="Preformatted_20_Text"><text:span text:style-name="Source_20_Text"><text:s text:c="8"/>BasicCredentialsProvider credsProv = new BasicCredentialsProvider();</text:span></text:p>
      <text:p text:style-name="Preformatted_20_Text"><text:span text:style-name="Source_20_Text"><text:s text:c="8"/>credsProv.setCredentials(AuthScope.ANY, new UsernamePasswordCredentials(username, password));</text:span></text:p>
      <text:p text:style-name="Preformatted_20_Text"/>
      <text:p text:style-name="Preformatted_20_Text"><text:span text:style-name="Source_20_Text"><text:s text:c="8"/>// 5. Build the Low-Level RestClient</text:span></text:p>
      <text:p text:style-name="Preformatted_20_Text"><text:span text:style-name="Source_20_Text"><text:s text:c="8"/>RestClient restClient = RestClient.builder(new HttpHost(host, port, "https"))</text:span></text:p>
      <text:p text:style-name="Preformatted_20_Text"><text:span text:style-name="Source_20_Text"><text:s text:c="16"/>.setHttpClientConfigCallback(hc -&gt; hc</text:span></text:p>
      <text:p text:style-name="Preformatted_20_Text"><text:span text:style-name="Source_20_Text"><text:s text:c="24"/>.setSSLContext(sslContext)</text:span></text:p>
      <text:p text:style-name="Preformatted_20_Text"><text:span text:style-name="Source_20_Text"><text:s text:c="24"/>.setDefaultCredentialsProvider(credsProv))</text:span></text:p>
      <text:p text:style-name="Preformatted_20_Text"><text:span text:style-name="Source_20_Text"><text:s text:c="16"/>.build();</text:span></text:p>
      <text:p text:style-name="Preformatted_20_Text"/>
      <text:p text:style-name="Preformatted_20_Text"><text:span text:style-name="Source_20_Text"><text:s text:c="8"/>// 6. Return the High-Level API Client</text:span></text:p>
      <text:p text:style-name="Preformatted_20_Text"><text:span text:style-name="Source_20_Text"><text:s text:c="8"/>return new ElasticsearchClient(new RestClientTransport(restClient, new JacksonJsonpMapper()));</text:span></text:p>
      <text:p text:style-name="Preformatted_20_Text"><text:span text:style-name="Source_20_Text"><text:s text:c="4"/>}</text:span></text:p>
      <text:p text:style-name="P47"><text:span text:style-name="Source_20_Text">}</text:span></text:p>
      <text:p text:style-name="Horizontal_20_Line"/>
      <text:h text:style-name="Heading_20_3" text:outline-level="3">3. Using the Client in your Service</text:h>
      <text:p text:style-name="Text_20_body">Now that the Bean is defined, you can simply <text:span text:style-name="Source_20_Text">@Autowire</text:span> it anywhere in your app to perform searches.</text:p>
      <text:p text:style-name="P5">Java</text:p>
      <text:p text:style-name="Preformatted_20_Text"><text:span text:style-name="Source_20_Text">import co.elastic.clients.elasticsearch.ElasticsearchClient;</text:span></text:p>
      <text:p text:style-name="Preformatted_20_Text"><text:span text:style-name="Source_20_Text">import co.elastic.clients.elasticsearch.core.InfoResponse;</text:span></text:p>
      <text:p text:style-name="Preformatted_20_Text"><text:span text:style-name="Source_20_Text">import org.springframework.stereotype.Service;</text:span></text:p>
      <text:p text:style-name="Preformatted_20_Text"/>
      <text:p text:style-name="Preformatted_20_Text"><text:span text:style-name="Source_20_Text">@Service</text:span></text:p>
      <text:p text:style-name="Preformatted_20_Text"><text:span text:style-name="Source_20_Text">public class MySearchService {</text:span></text:p>
      <text:p text:style-name="Preformatted_20_Text"/>
      <text:p text:style-name="Preformatted_20_Text"><text:soft-page-break/><text:span text:style-name="Source_20_Text"><text:s text:c="4"/>private final ElasticsearchClient client;</text:span></text:p>
      <text:p text:style-name="Preformatted_20_Text"/>
      <text:p text:style-name="Preformatted_20_Text"><text:span text:style-name="Source_20_Text"><text:s text:c="4"/>// The client is automatically injected by Spring</text:span></text:p>
      <text:p text:style-name="Preformatted_20_Text"><text:span text:style-name="Source_20_Text"><text:s text:c="4"/>public MySearchService(ElasticsearchClient client) {</text:span></text:p>
      <text:p text:style-name="Preformatted_20_Text"><text:span text:style-name="Source_20_Text"><text:s text:c="8"/>this.client = client;</text:span></text:p>
      <text:p text:style-name="Preformatted_20_Text"><text:span text:style-name="Source_20_Text"><text:s text:c="4"/>}</text:span></text:p>
      <text:p text:style-name="Preformatted_20_Text"/>
      <text:p text:style-name="Preformatted_20_Text"><text:span text:style-name="Source_20_Text"><text:s text:c="4"/>public void checkConnection() throws Exception {</text:span></text:p>
      <text:p text:style-name="Preformatted_20_Text"><text:span text:style-name="Source_20_Text"><text:s text:c="8"/>InfoResponse info = client.info();</text:span></text:p>
      <text:p text:style-name="Preformatted_20_Text"><text:span text:style-name="Source_20_Text"><text:s text:c="8"/>System.out.println("Connected to cluster: " + info.clusterName());</text:span></text:p>
      <text:p text:style-name="Preformatted_20_Text"><text:span text:style-name="Source_20_Text"><text:s text:c="4"/>}</text:span></text:p>
      <text:p text:style-name="P47"><text:span text:style-name="Source_20_Text">}</text:span></text:p>
      <text:p text:style-name="Horizontal_20_Line"/>
      <text:h text:style-name="Heading_20_3" text:outline-level="3">Why this approach is better:</text:h>
      <text:list text:style-name="L12">
        <text:list-item>
          <text:p text:style-name="P118"><text:span text:style-name="T1">No </text:span><text:span text:style-name="Source_20_Text"><text:span text:style-name="T1">keytool</text:span></text:span><text:span text:style-name="T1"> needed:</text:span> You don't have to pre-convert the <text:span text:style-name="Source_20_Text">.crt</text:span> to a <text:span text:style-name="Source_20_Text">.p12</text:span> file on the command line; the code does it in memory at startup.</text:p>
        </text:list-item>
        <text:list-item>
          <text:p text:style-name="P118"><text:span text:style-name="T1">Classpath Loading:</text:span> By using <text:span text:style-name="Source_20_Text">classpath:http_ca.crt</text:span>, you can include the certificate inside your JAR file, making deployment to Docker or Kubernetes much easier.</text:p>
        </text:list-item>
        <text:list-item>
          <text:p text:style-name="P118"><text:span text:style-name="T1">Encapsulation:</text:span> The SSL and credential logic is hidden away in the <text:span text:style-name="Source_20_Text">@Configuration</text:span> class, so your business logic stays clean.</text:p>
        </text:list-item>
      </text:list>
      <text:p text:style-name="P52">Would you like to know how to set this up for a Production environment where you might need to rotate (change) these certificates without rebuilding the code?</text:p>
      <text:p text:style-name="P49">how to create a new .crt file in elasticsearch?</text:p>
      <text:section text:style-name="Sect1" text:name="model-response-message-contentr_7fdd33d76802813c">
        <text:p text:style-name="P36"><text:span text:style-name="T9">In Elasticsearch, you don't typically create a </text:span><text:span text:style-name="Source_20_Text"><text:span text:style-name="T16">.crt</text:span></text:span><text:span text:style-name="T9"> file manually using a text editor. Instead, you use the built-in </text:span><text:span text:style-name="Source_20_Text"><text:span text:style-name="T16">elasticsearch-certutil</text:span></text:span><text:span text:style-name="T9"> tool.</text:span></text:p>
        <text:p text:style-name="P27">Depending on your goal, there are two common scenarios: creating a new <text:span text:style-name="T1">Certificate Authority (CA)</text:span> or creating a <text:span text:style-name="T1">Client/Node certificate</text:span> signed by an existing CA.</text:p>
        <text:p text:style-name="P42"/>
        <text:h text:style-name="P34" text:outline-level="3"><text:span text:style-name="T14">Scenario A: Creating a brand new CA (</text:span><text:span text:style-name="Source_20_Text"><text:span text:style-name="T18">elastic-stack-ca.p12</text:span></text:span><text:span text:style-name="T14">)</text:span></text:h>
        <text:p text:style-name="P37"><text:span text:style-name="T12">If you lost your old </text:span><text:span text:style-name="Source_20_Text"><text:span text:style-name="T18">http_ca.crt</text:span></text:span><text:span text:style-name="T12"> or want to start fresh, you first generate a new CA.</text:span></text:p>
        <text:list text:style-name="L13">
          <text:list-item>
            <text:p text:style-name="P93">Run the certutil tool:</text:p>
            <text:p text:style-name="P107">Bash</text:p>
            <text:p text:style-name="P61"><text:span text:style-name="Source_20_Text"><text:span text:style-name="T12">bin/elasticsearch-certutil ca</text:span></text:span></text:p>
          </text:list-item>
          <text:list-item>
            <text:p text:style-name="P78"><text:span text:style-name="T14">Follow the prompts:</text:span><text:span text:style-name="T12"> It will ask for a filename (default is </text:span><text:span text:style-name="Source_20_Text"><text:span text:style-name="T18">elastic-stack-ca.p12</text:span></text:span><text:span text:style-name="T12">) and a password.</text:span></text:p>
          </text:list-item>
          <text:list-item>
            <text:p text:style-name="P78"><text:span text:style-name="T14">Extract the .crt:</text:span><text:span text:style-name="T12"> Since the tool outputs a </text:span><text:span text:style-name="Source_20_Text"><text:span text:style-name="T18">.p12</text:span></text:span><text:span text:style-name="T12"> file, you use </text:span><text:span text:style-name="Source_20_Text"><text:span text:style-name="T18">openssl</text:span></text:span><text:span text:style-name="T12"> to get the readable </text:span><text:span text:style-name="Source_20_Text"><text:span text:style-name="T18">.crt</text:span></text:span><text:span text:style-name="T12"> file for your clients:</text:span></text:p>
            <text:p text:style-name="P107">Bash</text:p>
            <text:p text:style-name="P61"><text:span text:style-name="Source_20_Text"><text:span text:style-name="T12">openssl pkcs12 -</text:span></text:span><text:span text:style-name="Source_20_Text"><text:span text:style-name="T31">in</text:span></text:span><text:span text:style-name="Source_20_Text"><text:span text:style-name="T12"> elastic-stack-ca.p12 -out new_http_ca.crt -nokeys</text:span></text:span></text:p>
          </text:list-item>
        </text:list>
        <text:p text:style-name="P42"/>
        <text:h text:style-name="P23" text:outline-level="3">Scenario B: Creating a certificate for a specific Node/User</text:h>
        <text:p text:style-name="P26">If you already have a CA and just need a new certificate for a new server or a specific application:</text:p>
        <text:list text:style-name="L14">
          <text:list-item>
            <text:p text:style-name="P94">Generate the certificate:</text:p>
            <text:p text:style-name="P108"><text:soft-page-break/>Bash</text:p>
            <text:p text:style-name="P62"><text:span text:style-name="Source_20_Text"><text:span text:style-name="T12">bin/elasticsearch-certutil cert --ca elastic-stack-ca.p12 --name my-new-node</text:span></text:span></text:p>
            <text:list>
              <text:list-item>
                <text:p text:style-name="P79"><text:span text:style-name="Source_20_Text"><text:span text:style-name="T18">--ca</text:span></text:span><text:span text:style-name="T12">: Points to your existing CA file.</text:span></text:p>
              </text:list-item>
              <text:list-item>
                <text:p text:style-name="P79"><text:span text:style-name="Source_20_Text"><text:span text:style-name="T18">--name</text:span></text:span><text:span text:style-name="T12">: The name for the new certificate.</text:span></text:p>
              </text:list-item>
            </text:list>
          </text:list-item>
          <text:list-item>
            <text:p text:style-name="P79"><text:span text:style-name="T14">Output:</text:span><text:span text:style-name="T12"> This creates </text:span><text:span text:style-name="Source_20_Text"><text:span text:style-name="T18">my-new-node.p12</text:span></text:span><text:span text:style-name="T12">.</text:span></text:p>
          </text:list-item>
          <text:list-item>
            <text:p text:style-name="P94">Convert to .crt (if needed):</text:p>
            <text:p text:style-name="P108">Bash</text:p>
            <text:p text:style-name="P62"><text:span text:style-name="Source_20_Text"><text:span text:style-name="T12">openssl pkcs12 -</text:span></text:span><text:span text:style-name="Source_20_Text"><text:span text:style-name="T31">in</text:span></text:span><text:span text:style-name="Source_20_Text"><text:span text:style-name="T12"> my-new-node.p12 -clcerts -nokeys -out my-new-node.crt</text:span></text:span></text:p>
          </text:list-item>
        </text:list>
        <text:p text:style-name="P42"/>
        <text:h text:style-name="P23" text:outline-level="3">Scenario C: Generating a CSR (Certificate Signing Request)</text:h>
        <text:p text:style-name="P26">If you are in a corporate environment and need a "real" authority (like DigiCert or your company’s IT department) to sign your certificate:</text:p>
        <text:list text:style-name="L15">
          <text:list-item>
            <text:p text:style-name="P95">Generate the CSR:</text:p>
            <text:p text:style-name="P109">Bash</text:p>
            <text:p text:style-name="P63"><text:span text:style-name="Source_20_Text"><text:span text:style-name="T12">bin/elasticsearch-certutil csr -name my-node --dns mynode.example.com</text:span></text:span></text:p>
          </text:list-item>
          <text:list-item>
            <text:p text:style-name="P80"><text:span text:style-name="T14">Process:</text:span><text:span text:style-name="T12"> This produces a </text:span><text:span text:style-name="Source_20_Text"><text:span text:style-name="T18">.zip</text:span></text:span><text:span text:style-name="T12"> containing a </text:span><text:span text:style-name="Source_20_Text"><text:span text:style-name="T18">csr.csr</text:span></text:span><text:span text:style-name="T12"> and a </text:span><text:span text:style-name="Source_20_Text"><text:span text:style-name="T18">private.key</text:span></text:span><text:span text:style-name="T12">.</text:span></text:p>
          </text:list-item>
          <text:list-item>
            <text:p text:style-name="P80"><text:span text:style-name="T14">The Result:</text:span><text:span text:style-name="T12"> You send the </text:span><text:span text:style-name="Source_20_Text"><text:span text:style-name="T18">.csr</text:span></text:span><text:span text:style-name="T12"> to your IT team, and they will send you back a finished </text:span><text:span text:style-name="Source_20_Text"><text:span text:style-name="T18">.crt</text:span></text:span><text:span text:style-name="T12"> file.</text:span></text:p>
          </text:list-item>
        </text:list>
        <text:p text:style-name="P42"/>
        <text:h text:style-name="P23" text:outline-level="3">Important: Where to put the files?</text:h>
        <text:p text:style-name="P36"><text:span text:style-name="T12">Once you have created your new </text:span><text:span text:style-name="Source_20_Text"><text:span text:style-name="T18">.crt</text:span></text:span><text:span text:style-name="T12"> (and its corresponding </text:span><text:span text:style-name="Source_20_Text"><text:span text:style-name="T18">.key</text:span></text:span><text:span text:style-name="T12"> or </text:span><text:span text:style-name="Source_20_Text"><text:span text:style-name="T18">.p12</text:span></text:span><text:span text:style-name="T12">), you must update your </text:span><text:span text:style-name="Source_20_Text"><text:span text:style-name="T18">elasticsearch.yml</text:span></text:span><text:span text:style-name="T12"> so the server actually uses them.</text:span></text:p>
        <text:p text:style-name="P36"><text:span text:style-name="T14">Example </text:span><text:span text:style-name="Source_20_Text"><text:span text:style-name="T18">elasticsearch.yml</text:span></text:span><text:span text:style-name="T14"> snippet:</text:span></text:p>
        <text:p text:style-name="P32"><text:soft-page-break/>YAML</text:p>
        <text:p text:style-name="P50"><text:span text:style-name="Source_20_Text"><text:span text:style-name="T12">xpack.security.http.ssl:</text:span></text:span></text:p>
        <text:p text:style-name="P22"><text:span text:style-name="Source_20_Text"><text:span text:style-name="T29"><text:s text:c="2"/></text:span></text:span><text:span text:style-name="Source_20_Text"><text:span text:style-name="T33">enabled:</text:span></text:span><text:span text:style-name="Source_20_Text"><text:span text:style-name="T12"> </text:span></text:span><text:span text:style-name="Source_20_Text"><text:span text:style-name="T33">true</text:span></text:span></text:p>
        <text:p text:style-name="P22"><text:span text:style-name="Source_20_Text"><text:span text:style-name="T29"><text:s text:c="2"/></text:span></text:span><text:span text:style-name="Source_20_Text"><text:span text:style-name="T33">keystore.path:</text:span></text:span><text:span text:style-name="Source_20_Text"><text:span text:style-name="T12"> </text:span></text:span><text:span text:style-name="Source_20_Text"><text:span text:style-name="T32">certs/http.p12</text:span></text:span></text:p>
        <text:p text:style-name="P22"><text:span text:style-name="Source_20_Text"><text:span text:style-name="T29"><text:s text:c="2"/></text:span></text:span><text:span text:style-name="Source_20_Text"><text:span text:style-name="T33">truststore.path:</text:span></text:span><text:span text:style-name="Source_20_Text"><text:span text:style-name="T12"> </text:span></text:span><text:span text:style-name="Source_20_Text"><text:span text:style-name="T32">certs/http.p12</text:span></text:span></text:p>
        <text:h text:style-name="P23" text:outline-level="3">Summary of Tools</text:h>
        <text:list text:style-name="L16">
          <text:list-item>
            <text:p text:style-name="P81"><text:span text:style-name="Source_20_Text"><text:span text:style-name="T18">elasticsearch-certutil</text:span></text:span><text:span text:style-name="T12">: The "Easy Button" provided by Elastic. It handles the math and formatting for you.</text:span></text:p>
          </text:list-item>
          <text:list-item>
            <text:p text:style-name="P81"><text:span text:style-name="Source_20_Text"><text:span text:style-name="T18">openssl</text:span></text:span><text:span text:style-name="T12">: The "Swiss Army Knife." Use this to convert files, extract certificates from </text:span><text:span text:style-name="Source_20_Text"><text:span text:style-name="T18">.p12</text:span></text:span><text:span text:style-name="T12"> bundles, or view certificate expiration dates.</text:span></text:p>
          </text:list-item>
        </text:list>
        <text:p text:style-name="P36"><text:span text:style-name="T14">Would you like the specific </text:span><text:span text:style-name="Source_20_Text"><text:span text:style-name="T18">openssl</text:span></text:span><text:span text:style-name="T14"> command to check the expiration date of your current </text:span><text:span text:style-name="Source_20_Text"><text:span text:style-name="T18">http_ca.crt</text:span></text:span><text:span text:style-name="T14"> to see if it actually needs replacing?</text:span></text:p>
      </text:section>
      <text:p text:style-name="P40"/>
      <text:p text:style-name="P40"/>
      <text:p text:style-name="P40"/>
      <text:p text:style-name="P40"/>
      <text:p text:style-name="P40"/>
      <text:p text:style-name="P40"/>
      <text:p text:style-name="P40"/>
      <text:p text:style-name="P40"/>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how to mount a harddrive nvme0n1p2 into mnt/disc1?</text:p>
      <text:section text:style-name="Sect1" text:name="model-response-message-contentr_665eea4bc59e74f2">
        <text:p text:style-name="P36"><text:span text:style-name="T9">To mount the partition </text:span><text:span text:style-name="Source_20_Text"><text:span text:style-name="T16">/dev/nvme0n1p2</text:span></text:span><text:span text:style-name="T9"> to the directory </text:span><text:span text:style-name="Source_20_Text"><text:span text:style-name="T16">/mnt/disc1</text:span></text:span><text:span text:style-name="T9">, follow these steps.</text:span></text:p>
        <text:h text:style-name="P23" text:outline-level="3">1. The Quick Command (Temporary Mount)</text:h>
        <text:p text:style-name="P26">This will mount the drive until you restart the computer.</text:p>
        <text:list text:style-name="L17">
          <text:list-item>
            <text:p text:style-name="P99"><text:span text:style-name="T1">Create the mount point</text:span> (the folder where the files will appear):</text:p>
            <text:p text:style-name="P110">Bash</text:p>
            <text:p text:style-name="P64"><text:span text:style-name="Source_20_Text"><text:span text:style-name="T10">sudo mkdir -p /mnt/disc1</text:span></text:span></text:p>
          </text:list-item>
          <text:list-item>
            <text:p text:style-name="P96">Mount the drive:</text:p>
            <text:p text:style-name="P110">Bash</text:p>
            <text:p text:style-name="P64"><text:span text:style-name="Source_20_Text"><text:span text:style-name="T10">sudo mount /dev/nvme0n1p2 /mnt/disc1</text:span></text:span></text:p>
          </text:list-item>
          <text:list-item>
            <text:p text:style-name="P96">Verify it worked:</text:p>
            <text:p text:style-name="P110">Bash</text:p>
            <text:p text:style-name="P64"><text:soft-page-break/><text:span text:style-name="Source_20_Text"><text:span text:style-name="T10">df -h | grep nvme0n1p2</text:span></text:span></text:p>
          </text:list-item>
        </text:list>
        <text:p text:style-name="P19"/>
        <text:h text:style-name="P23" text:outline-level="3">2. How to Make it Permanent (Auto-mount on Boot)</text:h>
        <text:p text:style-name="P36"><text:span text:style-name="T12">If you want this drive to mount automatically every time you start the computer, you must add it to the </text:span><text:span text:style-name="Source_20_Text"><text:span text:style-name="T18">/etc/fstab</text:span></text:span><text:span text:style-name="T12"> file.</text:span></text:p>
        <text:p text:style-name="P36"><text:span text:style-name="T14">Step 1: Find the UUID</text:span><text:span text:style-name="T12"> It is safer to use the UUID (Universally Unique Identifier) than the device name, because names like </text:span><text:span text:style-name="Source_20_Text"><text:span text:style-name="T18">nvme0n1p2</text:span></text:span><text:span text:style-name="T12"> can sometimes change if you add other drives.</text:span></text:p>
        <text:p text:style-name="P32">Bash</text:p>
        <text:p text:style-name="P22"><text:span text:style-name="Source_20_Text"><text:span text:style-name="T10">sudo blkid /dev/nvme0n1p2</text:span></text:span></text:p>
        <text:p text:style-name="P36"><text:span text:style-name="T15">Copy the string inside the quotes after </text:span><text:span text:style-name="Source_20_Text"><text:span text:style-name="T19">UUID=</text:span></text:span><text:span text:style-name="T15"> (e.g., </text:span><text:span text:style-name="Source_20_Text"><text:span text:style-name="T19">a1b2c3d4-e5f6...</text:span></text:span><text:span text:style-name="T15">).</text:span></text:p>
        <text:p text:style-name="P27"><text:span text:style-name="T1">Step 2: Edit the fstab file</text:span> Open the file in a text editor (like nano):</text:p>
        <text:p text:style-name="P32">Bash</text:p>
        <text:p text:style-name="P22"><text:span text:style-name="Source_20_Text"><text:span text:style-name="T10">sudo nano /etc/fstab</text:span></text:span></text:p>
        <text:p text:style-name="P36"><text:span text:style-name="T14">Step 3: Add the line</text:span><text:span text:style-name="T12"> Go to the bottom of the file and add a new line. Replace </text:span><text:span text:style-name="Source_20_Text"><text:span text:style-name="T18">YOUR_UUID_HERE</text:span></text:span><text:span text:style-name="T12"> with the UUID you copied.</text:span></text:p>
        <text:p text:style-name="P29">If the drive is Linux (ext4):</text:p>
        <text:p text:style-name="P32">Plaintext</text:p>
        <text:p text:style-name="P22"><text:span text:style-name="Source_20_Text"><text:span text:style-name="T10">UUID=YOUR_UUID_HERE <text:s/>/mnt/disc1 <text:s/>ext4 <text:s/>defaults <text:s/>0 <text:s/>2</text:span></text:span></text:p>
        <text:p text:style-name="P29">If the drive is Windows (NTFS):</text:p>
        <text:p text:style-name="P32">Plaintext</text:p>
        <text:p text:style-name="P22"><text:span text:style-name="Source_20_Text"><text:span text:style-name="T10">UUID=YOUR_UUID_HERE <text:s/>/mnt/disc1 <text:s/>ntfs-3g <text:s/>defaults,uid=1000,gid=1000 <text:s/>0 <text:s/>0</text:span></text:span></text:p>
        <text:p text:style-name="P27"><text:span text:style-name="T1">Step 4: Test</text:span> Save the file (Ctrl+O, Enter) and exit (Ctrl+X). Then run this command to verify there are no errors ( <text:span text:style-name="T1">Critical Step</text:span>: if there are errors, your PC might not boot):</text:p>
        <text:p text:style-name="P32"><text:soft-page-break/>Bash</text:p>
        <text:p text:style-name="P22"><text:span text:style-name="Source_20_Text"><text:span text:style-name="T10">sudo mount -a</text:span></text:span></text:p>
        <text:p text:style-name="P27">If that command produces no output, you are safe!</text:p>
        <text:h text:style-name="P23" text:outline-level="3">3. Troubleshooting Permissions</text:h>
        <text:p text:style-name="P27">After mounting, if you cannot write files to the drive:</text:p>
        <text:p text:style-name="P32">Bash</text:p>
        <text:p text:style-name="P22"><text:span text:style-name="Source_20_Text"><text:span text:style-name="T10">sudo chown -R </text:span></text:span><text:span text:style-name="Source_20_Text"><text:span text:style-name="T20">$USER</text:span></text:span><text:span text:style-name="Source_20_Text"><text:span text:style-name="T10">:</text:span></text:span><text:span text:style-name="Source_20_Text"><text:span text:style-name="T20">$USER</text:span></text:span><text:span text:style-name="Source_20_Text"><text:span text:style-name="T10"> /mnt/disc1</text:span></text:span></text:p>
        <text:p text:style-name="P27"><text:span text:style-name="T2">(This changes ownership of the mount folder to your current user)</text:span>.</text:p>
      </text:section>
      <text:p text:style-name="P1">make a Spring MVC page(s) which searches through the filepaths in elasticsearch films index and return a list of found files descending by query score. There I want one textfield with autocompletion which would show up after 3 characters entered into the textfield above. Then I want to display file path and size of an indexed file.</text:p>
      <text:p text:style-name="P1"/>
      <text:p text:style-name="P1"/>
      <text:p text:style-name="P1"/>
      <text:p text:style-name="P2">Here is a complete, simplified example using <text:span text:style-name="T1">Spring Boot 3</text:span>, <text:span text:style-name="T1">Spring Data Elasticsearch</text:span>, and <text:span text:style-name="T1">Thymeleaf</text:span>.</text:p>
      <text:p text:style-name="Text_20_body">This solution implementsa "Live Search" (Autocomplete) pattern: as the user types (after 3 characters), the application queries Elasticsearch and updates the results table dynamically using JavaScript.</text:p>
      <text:p text:style-name="Text_20_body">Would you like to add specific file extensions filters (e.g., only search <text:span text:style-name="Source_20_Text">.mp4</text:span> or <text:span text:style-name="Source_20_Text">.mkv</text:span>) to this search?</text:p>
      <text:p text:style-name="P2"><text:span text:style-name="T4">Full-text search is the core capability of Elasticsearch.</text:span><text:span text:style-name="T7">1</text:span><text:span text:style-name="T4"> Unlike a standard database query (which usually checks for exact matches like </text:span><text:span text:style-name="Source_20_Text"><text:span text:style-name="T4">status="active"</text:span></text:span><text:span text:style-name="T4">), full-text search is designed to handle natural language—dealing with typos, synonyms, stemming (e.g., "running" vs. "run"), and relevance scoring.</text:span></text:p>
      <text:p text:style-name="P15">Here is a guide to how it works and how to implement it.</text:p>
      <text:p text:style-name="Horizontal_20_Line"/>
      <text:h text:style-name="P7" text:outline-level="3">1. The "Secret Sauce": The Inverted Index</text:h>
      <text:p text:style-name="P15">To understand how Elasticsearch performs full-text search so quickly, you must <text:soft-page-break/>understand the <text:span text:style-name="T1">Inverted Index</text:span>.</text:p>
      <text:p text:style-name="P15">In a traditional database, if you search for a word, the database has to scan every row to see if that word exists. Elasticsearch flips this. It creates a list of every unique word that appears in any document, and for each word, it lists all the documents in which it appears.</text:p>
      <text:list text:style-name="L18">
        <text:list-item>
          <text:p text:style-name="P119"><text:span text:style-name="T1">Document 1:</text:span> "The quick brown fox"<text:span text:style-name="T3">2</text:span></text:p>
        </text:list-item>
        <text:list-item>
          <text:p text:style-name="P119"><text:span text:style-name="T1">Document 2:</text:span> "The quick blue fox"</text:p>
        </text:list-item>
      </text:list>
      <text:p text:style-name="P15">The index looks like this:</text:p>
      <table:table table:name="Table1" table:style-name="Table1">
        <table:table-column table:style-name="Table1.A"/>
        <table:table-column table:style-name="Table1.B"/>
        <table:table-header-rows>
          <table:table-row>
            <table:table-cell table:style-name="Table1.A1" office:value-type="string">
              <text:p text:style-name="P11"><text:span text:style-name="Strong_20_Emphasis"><text:span text:style-name="T4">Term</text:span></text:span></text:p>
            </table:table-cell>
            <table:table-cell table:style-name="Table1.A1" office:value-type="string">
              <text:p text:style-name="P11"><text:span text:style-name="Strong_20_Emphasis"><text:span text:style-name="T4">Doc IDs</text:span></text:span></text:p>
            </table:table-cell>
          </table:table-row>
        </table:table-header-rows>
        <table:table-row>
          <table:table-cell table:style-name="Table1.A1" office:value-type="string">
            <text:p text:style-name="P14">brown</text:p>
          </table:table-cell>
          <table:table-cell table:style-name="Table1.A1" office:value-type="string">
            <text:p text:style-name="P14">[1]</text:p>
          </table:table-cell>
        </table:table-row>
        <table:table-row>
          <table:table-cell table:style-name="Table1.A1" office:value-type="string">
            <text:p text:style-name="P14">blue</text:p>
          </table:table-cell>
          <table:table-cell table:style-name="Table1.A1" office:value-type="string">
            <text:p text:style-name="P14">[2]</text:p>
          </table:table-cell>
        </table:table-row>
        <table:table-row>
          <table:table-cell table:style-name="Table1.A1" office:value-type="string">
            <text:p text:style-name="P14">fox</text:p>
          </table:table-cell>
          <table:table-cell table:style-name="Table1.A1" office:value-type="string">
            <text:p text:style-name="P14">[1, 2]</text:p>
          </table:table-cell>
        </table:table-row>
        <table:table-row>
          <table:table-cell table:style-name="Table1.A1" office:value-type="string">
            <text:p text:style-name="P14">quick</text:p>
          </table:table-cell>
          <table:table-cell table:style-name="Table1.A1" office:value-type="string">
            <text:p text:style-name="P14">[1, 2]</text:p>
          </table:table-cell>
        </table:table-row>
      </table:table>
      <text:p text:style-name="P15">When you search for "quick fox", Elasticsearch sees that both terms are in Doc 1 and Doc 2, and returns the results instantly without scanning the actual text.</text:p>
      <text:p text:style-name="Horizontal_20_Line"/>
      <text:h text:style-name="P7" text:outline-level="3">2. The Analysis Process (Analyzers)</text:h>
      <text:p text:style-name="P15">Before text is added to the inverted index, it goes through an <text:span text:style-name="T1">Analyzer</text:span>.<text:span text:style-name="T3">3</text:span> This process breaks text down so it can be searched effectively.</text:p>
      <text:p text:style-name="P15">The standard analyzer performs three main steps:<text:span text:style-name="T3">4</text:span></text:p>
      <text:list text:style-name="L19">
        <text:list-item>
          <text:p text:style-name="P120"><text:span text:style-name="T1">Character Filtering:</text:span> Strips HTML or converts specialized characters.<text:span text:style-name="T3">5</text:span></text:p>
        </text:list-item>
        <text:list-item>
          <text:p text:style-name="P120"><text:span text:style-name="T1">Tokenization:</text:span> Splits the string into individual words (tokens) based on whitespace or punctuation.<text:span text:style-name="T3">6</text:span></text:p>
        </text:list-item>
        <text:list-item>
          <text:p text:style-name="P124">Token Filtering:</text:p>
          <text:list>
            <text:list-item>
              <text:p text:style-name="P120"><text:span text:style-name="T1">Lowercasing:</text:span> Makes "Apple" match "apple".</text:p>
            </text:list-item>
            <text:list-item>
              <text:p text:style-name="P120"><text:span text:style-name="T1">Stop words:</text:span> Removes common words like "the", "and", "is".<text:span text:style-name="T3">7</text:span></text:p>
            </text:list-item>
            <text:list-item>
              <text:p text:style-name="P120"><text:span text:style-name="T1">Stemming:</text:span> Reduces words to their root (e.g., "jumping" $\rightarrow$ "jump").</text:p>
            </text:list-item>
          </text:list>
        </text:list-item>
      </text:list>
      <text:p text:style-name="Horizontal_20_Line"/>
      <text:h text:style-name="P7" text:outline-level="3"><text:soft-page-break/>3. Essential Full-Text Queries</text:h>
      <text:p text:style-name="P15">Here are the most common query types used for full-text search in the Elasticsearch DSL (Domain Specific Language).</text:p>
      <text:h text:style-name="P9" text:outline-level="4"><text:span text:style-name="T8">The </text:span><text:span text:style-name="Source_20_Text"><text:span text:style-name="T4">match</text:span></text:span><text:span text:style-name="T8"> Query (The Standard)</text:span></text:h>
      <text:p text:style-name="P15">This is the go-to query for full-text search. It applies the same analyzer to the search term as was applied to the field when it was indexed.</text:p>
      <text:p text:style-name="P15">JSON</text:p>
      <text:p text:style-name="P10"><text:span text:style-name="Source_20_Text"><text:span text:style-name="T4">GET /_search</text:span></text:span></text:p>
      <text:p text:style-name="P13"><text:span text:style-name="Source_20_Text"><text:span text:style-name="T4">{</text:span></text:span></text:p>
      <text:p text:style-name="P10"><text:span text:style-name="Source_20_Text"><text:s text:c="2"/></text:span><text:span text:style-name="Source_20_Text"><text:span text:style-name="T4">"query": {</text:span></text:span></text:p>
      <text:p text:style-name="P10"><text:span text:style-name="Source_20_Text"><text:s text:c="4"/></text:span><text:span text:style-name="Source_20_Text"><text:span text:style-name="T4">"match": {</text:span></text:span></text:p>
      <text:p text:style-name="P10"><text:span text:style-name="Source_20_Text"><text:s text:c="6"/></text:span><text:span text:style-name="Source_20_Text"><text:span text:style-name="T4">"description": "quick brown fox"</text:span></text:span></text:p>
      <text:p text:style-name="P13"><text:span text:style-name="Source_20_Text"><text:s text:c="4"/></text:span><text:span text:style-name="Source_20_Text"><text:span text:style-name="T4">}</text:span></text:span></text:p>
      <text:p text:style-name="P13"><text:span text:style-name="Source_20_Text"><text:s text:c="2"/></text:span><text:span text:style-name="Source_20_Text"><text:span text:style-name="T4">}</text:span></text:span></text:p>
      <text:p text:style-name="P13"><text:span text:style-name="Source_20_Text"><text:span text:style-name="T4">}</text:span></text:span></text:p>
      <text:list text:style-name="L20">
        <text:list-item>
          <text:p text:style-name="P121"><text:span text:style-name="T1">Behavior:</text:span> It splits the search string into "quick", "brown", and "fox". It finds documents containing <text:span text:style-name="T2">any</text:span> of these words (OR logic by default).</text:p>
        </text:list-item>
      </text:list>
      <text:h text:style-name="P9" text:outline-level="4"><text:span text:style-name="T8">The </text:span><text:span text:style-name="Source_20_Text"><text:span text:style-name="T4">match_phrase</text:span></text:span><text:span text:style-name="T8"> Query (Exact Sequence)</text:span></text:h>
      <text:p text:style-name="P15">Use this when the order of words matters.</text:p>
      <text:p text:style-name="P15">JSON</text:p>
      <text:p text:style-name="P10"><text:span text:style-name="Source_20_Text"><text:span text:style-name="T4">GET /_search</text:span></text:span></text:p>
      <text:p text:style-name="P13"><text:span text:style-name="Source_20_Text"><text:span text:style-name="T4">{</text:span></text:span></text:p>
      <text:p text:style-name="P10"><text:span text:style-name="Source_20_Text"><text:s text:c="2"/></text:span><text:span text:style-name="Source_20_Text"><text:span text:style-name="T4">"query": {</text:span></text:span></text:p>
      <text:p text:style-name="P10"><text:span text:style-name="Source_20_Text"><text:s text:c="4"/></text:span><text:span text:style-name="Source_20_Text"><text:span text:style-name="T4">"match_phrase": {</text:span></text:span></text:p>
      <text:p text:style-name="P10"><text:span text:style-name="Source_20_Text"><text:s text:c="6"/></text:span><text:span text:style-name="Source_20_Text"><text:span text:style-name="T4">"description": "brown fox"</text:span></text:span></text:p>
      <text:p text:style-name="P13"><text:span text:style-name="Source_20_Text"><text:s text:c="4"/></text:span><text:span text:style-name="Source_20_Text"><text:span text:style-name="T4">}</text:span></text:span></text:p>
      <text:p text:style-name="P13"><text:span text:style-name="Source_20_Text"><text:s text:c="2"/></text:span><text:span text:style-name="Source_20_Text"><text:span text:style-name="T4">}</text:span></text:span></text:p>
      <text:p text:style-name="P13"><text:span text:style-name="Source_20_Text"><text:span text:style-name="T4">}</text:span></text:span></text:p>
      <text:list text:style-name="L21">
        <text:list-item>
          <text:p text:style-name="P122"><text:span text:style-name="T1">Behavior:</text:span> It looks for the exact phrase "brown fox" with the terms appearing in that specific order.<text:span text:style-name="T3">8</text:span></text:p>
        </text:list-item>
      </text:list>
      <text:h text:style-name="P9" text:outline-level="4"><text:span text:style-name="T8">The </text:span><text:span text:style-name="Source_20_Text"><text:span text:style-name="T4">multi_match</text:span></text:span><text:span text:style-name="T8"> Query (Cross-Field)</text:span></text:h>
      <text:p text:style-name="P15">Use this to search for a keyword across multiple fields (e.g., Title <text:span text:style-name="T2">and</text:span> Body).</text:p>
      <text:p text:style-name="P15">JSON</text:p>
      <text:p text:style-name="P10"><text:span text:style-name="Source_20_Text"><text:span text:style-name="T4">GET /_search</text:span></text:span></text:p>
      <text:p text:style-name="P13"><text:span text:style-name="Source_20_Text"><text:span text:style-name="T4">{</text:span></text:span></text:p>
      <text:p text:style-name="P10"><text:span text:style-name="Source_20_Text"><text:s text:c="2"/></text:span><text:span text:style-name="Source_20_Text"><text:span text:style-name="T4">"query": {</text:span></text:span></text:p>
      <text:p text:style-name="P10"><text:span text:style-name="Source_20_Text"><text:s text:c="4"/></text:span><text:span text:style-name="Source_20_Text"><text:span text:style-name="T4">"multi_match": {</text:span></text:span></text:p>
      <text:p text:style-name="P10"><text:soft-page-break/><text:span text:style-name="Source_20_Text"><text:s text:c="6"/></text:span><text:span text:style-name="Source_20_Text"><text:span text:style-name="T4">"query": "guide",</text:span></text:span></text:p>
      <text:p text:style-name="P10"><text:span text:style-name="Source_20_Text"><text:s text:c="6"/></text:span><text:span text:style-name="Source_20_Text"><text:span text:style-name="T4">"fields": ["title", "summary"]</text:span></text:span></text:p>
      <text:p text:style-name="P13"><text:span text:style-name="Source_20_Text"><text:s text:c="4"/></text:span><text:span text:style-name="Source_20_Text"><text:span text:style-name="T4">}</text:span></text:span></text:p>
      <text:p text:style-name="P13"><text:span text:style-name="Source_20_Text"><text:s text:c="2"/></text:span><text:span text:style-name="Source_20_Text"><text:span text:style-name="T4">}</text:span></text:span></text:p>
      <text:p text:style-name="P13"><text:span text:style-name="Source_20_Text"><text:span text:style-name="T4">}</text:span></text:span></text:p>
      <text:p text:style-name="Horizontal_20_Line"/>
      <text:h text:style-name="P7" text:outline-level="3">4. Relevance Scoring (BM25)</text:h>
      <text:p text:style-name="P12"><text:span text:style-name="T4">Elasticsearch sorts results by </text:span><text:span text:style-name="T6">Relevance Score (</text:span><text:span text:style-name="Source_20_Text"><text:span text:style-name="T6">_score</text:span></text:span><text:span text:style-name="T6">)</text:span><text:span text:style-name="T4">.</text:span><text:span text:style-name="T5">9</text:span><text:span text:style-name="T4"> It uses an algorithm called </text:span><text:span text:style-name="T6">Okapi BM25</text:span><text:span text:style-name="T4"> (a variation of TF/IDF).</text:span><text:span text:style-name="T5">10</text:span></text:p>
      <text:p text:style-name="P15">+1</text:p>
      <text:list text:style-name="L22">
        <text:list-item>
          <text:p text:style-name="P123"><text:span text:style-name="T1">TF (Term Frequency):</text:span> How often does the term appear in this document? (More is better).</text:p>
        </text:list-item>
        <text:list-item>
          <text:p text:style-name="P123"><text:span text:style-name="T1">IDF (Inverse Document Frequency):</text:span> How often does the term appear in <text:span text:style-name="T2">all</text:span> documents? (If a word like "the" is everywhere, it is less important. If a word like "Elasticsearch" is rare, it is very important).</text:p>
        </text:list-item>
        <text:list-item>
          <text:p text:style-name="P123"><text:span text:style-name="T1">Field Length:</text:span> Matches in shorter fields (like a Title) are usually deemed more relevant than matches in long fields (like a Body).</text:p>
        </text:list-item>
      </text:list>
      <text:p text:style-name="Horizontal_20_Line"/>
      <text:h text:style-name="P7" text:outline-level="3">5. Example Workflow</text:h>
      <text:p text:style-name="P15">Here is how you would set up an index and search it.</text:p>
      <text:p text:style-name="P16">Step 1: Create Index with Mapping</text:p>
      <text:p text:style-name="P16">We explicitly define the content field as text so it is analyzed.</text:p>
      <text:p text:style-name="P15">JSON</text:p>
      <text:p text:style-name="P10"><text:span text:style-name="Source_20_Text"><text:span text:style-name="T4">PUT /blog_posts</text:span></text:span></text:p>
      <text:p text:style-name="P13"><text:span text:style-name="Source_20_Text"><text:span text:style-name="T4">{</text:span></text:span></text:p>
      <text:p text:style-name="P10"><text:span text:style-name="Source_20_Text"><text:s text:c="2"/></text:span><text:span text:style-name="Source_20_Text"><text:span text:style-name="T4">"mappings": {</text:span></text:span></text:p>
      <text:p text:style-name="P10"><text:span text:style-name="Source_20_Text"><text:s text:c="4"/></text:span><text:span text:style-name="Source_20_Text"><text:span text:style-name="T4">"properties": {</text:span></text:span></text:p>
      <text:p text:style-name="P10"><text:span text:style-name="Source_20_Text"><text:s text:c="6"/></text:span><text:span text:style-name="Source_20_Text"><text:span text:style-name="T4">"title": { "type": "text" },</text:span></text:span></text:p>
      <text:p text:style-name="P10"><text:span text:style-name="Source_20_Text"><text:s text:c="6"/></text:span><text:span text:style-name="Source_20_Text"><text:span text:style-name="T4">"content": { "type": "text" }</text:span></text:span></text:p>
      <text:p text:style-name="P13"><text:span text:style-name="Source_20_Text"><text:s text:c="4"/></text:span><text:span text:style-name="Source_20_Text"><text:span text:style-name="T4">}</text:span></text:span></text:p>
      <text:p text:style-name="P13"><text:span text:style-name="Source_20_Text"><text:s text:c="2"/></text:span><text:span text:style-name="Source_20_Text"><text:span text:style-name="T4">}</text:span></text:span></text:p>
      <text:p text:style-name="P13"><text:span text:style-name="Source_20_Text"><text:span text:style-name="T4">}</text:span></text:span></text:p>
      <text:p text:style-name="P17">Step 2: Index a Document</text:p>
      <text:p text:style-name="P15">JSON</text:p>
      <text:p text:style-name="P10"><text:span text:style-name="Source_20_Text"><text:span text:style-name="T4">POST /blog_posts/_doc/1</text:span></text:span></text:p>
      <text:p text:style-name="P13"><text:span text:style-name="Source_20_Text"><text:span text:style-name="T4">{</text:span></text:span></text:p>
      <text:p text:style-name="P10"><text:soft-page-break/><text:span text:style-name="Source_20_Text"><text:s text:c="2"/></text:span><text:span text:style-name="Source_20_Text"><text:span text:style-name="T4">"title": "Introduction to Search",</text:span></text:span></text:p>
      <text:p text:style-name="P10"><text:span text:style-name="Source_20_Text"><text:s text:c="2"/></text:span><text:span text:style-name="Source_20_Text"><text:span text:style-name="T4">"content": "Full-text search is powerful and fast."</text:span></text:span></text:p>
      <text:p text:style-name="P13"><text:span text:style-name="Source_20_Text"><text:span text:style-name="T4">}</text:span></text:span></text:p>
      <text:p text:style-name="P17">Step 3: Search</text:p>
      <text:p text:style-name="P15">JSON</text:p>
      <text:p text:style-name="P10"><text:span text:style-name="Source_20_Text"><text:span text:style-name="T4">GET /blog_posts/_search</text:span></text:span></text:p>
      <text:p text:style-name="P13"><text:span text:style-name="Source_20_Text"><text:span text:style-name="T4">{</text:span></text:span></text:p>
      <text:p text:style-name="P10"><text:span text:style-name="Source_20_Text"><text:s text:c="2"/></text:span><text:span text:style-name="Source_20_Text"><text:span text:style-name="T4">"query": {</text:span></text:span></text:p>
      <text:p text:style-name="P10"><text:span text:style-name="Source_20_Text"><text:s text:c="4"/></text:span><text:span text:style-name="Source_20_Text"><text:span text:style-name="T4">"match": {</text:span></text:span></text:p>
      <text:p text:style-name="P10"><text:span text:style-name="Source_20_Text"><text:s text:c="6"/></text:span><text:span text:style-name="Source_20_Text"><text:span text:style-name="T4">"content": "powerful search"</text:span></text:span></text:p>
      <text:p text:style-name="P13"><text:span text:style-name="Source_20_Text"><text:s text:c="4"/></text:span><text:span text:style-name="Source_20_Text"><text:span text:style-name="T4">}</text:span></text:span></text:p>
      <text:p text:style-name="P13"><text:span text:style-name="Source_20_Text"><text:s text:c="2"/></text:span><text:span text:style-name="Source_20_Text"><text:span text:style-name="T4">}</text:span></text:span></text:p>
      <text:p text:style-name="P13"><text:span text:style-name="Source_20_Text"><text:span text:style-name="T4">}</text:span></text:span></text:p>
      <text:h text:style-name="P7" text:outline-level="3">Next Step</text:h>
      <text:p text:style-name="P15">Would you like me to help you write a query for a specific dataset you are working with, or explain how to handle <text:span text:style-name="T1">fuzzy matching</text:span> for typos?</text:p>
      <text:p text:style-name="P4">what is a relationship between application properties and environment variables in spring?</text:p>
      <text:section text:style-name="Sect1" text:name="model-response-message-contentr_82893cbe758bc088">
        <text:p text:style-name="P36"><text:span text:style-name="T9">In Spring Boot, application properties (</text:span><text:span text:style-name="Source_20_Text"><text:span text:style-name="T16">application.properties</text:span></text:span><text:span text:style-name="T9"> or </text:span><text:span text:style-name="Source_20_Text"><text:span text:style-name="T16">.yml</text:span></text:span><text:span text:style-name="T9">) and environment variables are both sources for the same configuration system, but they serve different roles in the lifecycle of your application.</text:span></text:p>
        <text:p text:style-name="P27">The relationship is defined by two key rules: <text:span text:style-name="T1">Precedence</text:span> (who wins) and <text:span text:style-name="T1">Relaxed Binding</text:span> (how names match).</text:p>
        <text:h text:style-name="P23" text:outline-level="3">1. Precedence: Environment Variables Win</text:h>
        <text:p text:style-name="P36"><text:span text:style-name="T12">Spring Boot loads configuration from many sources and merges them. If the same key is defined in both your </text:span><text:span text:style-name="Source_20_Text"><text:span text:style-name="T18">application.properties</text:span></text:span><text:span text:style-name="T12"> file and as an Environment Variable, </text:span><text:span text:style-name="T14">the Environment Variable will override the file</text:span><text:span text:style-name="T12">.</text:span></text:p>
        <text:p text:style-name="P27">This allows you to define default values in your code (the file) and overwrite them in specific environments (like Production) without touching the build artifact.</text:p>
        <text:p text:style-name="P25">The Hierarchy (Simplified):</text:p>
        <text:list text:style-name="L23">
          <text:list-item>
            <text:p text:style-name="P100">Command Line Arguments (Highest Priority)</text:p>
          </text:list-item>
          <text:list-item>
            <text:p text:style-name="P100"><text:soft-page-break/><text:span text:style-name="T1">OS Environment Variables</text:span> (Overrides files)</text:p>
          </text:list-item>
          <text:list-item>
            <text:p text:style-name="P82"><text:span text:style-name="Source_20_Text"><text:span text:style-name="T18">application.properties</text:span></text:span><text:span text:style-name="T14"> / </text:span><text:span text:style-name="Source_20_Text"><text:span text:style-name="T18">application.yml</text:span></text:span><text:span text:style-name="T12"> (Lowest Priority of the main group)</text:span></text:p>
          </text:list-item>
        </text:list>
        <text:h text:style-name="P23" text:outline-level="3">2. Relaxed Binding: How Names Map</text:h>
        <text:p text:style-name="P36"><text:span text:style-name="T12">Operating systems usually require environment variables to be </text:span><text:span text:style-name="Source_20_Text"><text:span text:style-name="T18">UPPER_CASE</text:span></text:span><text:span text:style-name="T12"> with underscores, while Java properties are typically </text:span><text:span text:style-name="Source_20_Text"><text:span text:style-name="T18">lower.case</text:span></text:span><text:span text:style-name="T12"> with dots. Spring Boot automatically maps between these two formats.</text:span></text:p>
        <text:p text:style-name="P27">You do not need to write code to "read" the environment variable; you simply use the standard property name in your code, and Spring looks for the matching environment variable automatically.</text:p>
        <table:table table:name="Table2" table:style-name="Table2">
          <table:table-column table:style-name="Table2.A"/>
          <table:table-column table:style-name="Table2.B"/>
          <table:table-header-rows>
            <table:table-row>
              <table:table-cell table:style-name="Table2.A1" office:value-type="string">
                <text:p text:style-name="P30">Property Name (Java/File)</text:p>
              </table:table-cell>
              <table:table-cell table:style-name="Table2.A1" office:value-type="string">
                <text:p text:style-name="P30">Matching Environment Variable</text:p>
              </table:table-cell>
            </table:table-row>
          </table:table-header-rows>
          <table:table-row>
            <table:table-cell table:style-name="Table2.A1" office:value-type="string">
              <text:p text:style-name="P35"><text:span text:style-name="Source_20_Text"><text:span text:style-name="T16">server.port</text:span></text:span></text:p>
            </table:table-cell>
            <table:table-cell table:style-name="Table2.A1" office:value-type="string">
              <text:p text:style-name="P35"><text:span text:style-name="Source_20_Text"><text:span text:style-name="T16">SERVER_PORT</text:span></text:span></text:p>
            </table:table-cell>
          </table:table-row>
          <table:table-row>
            <table:table-cell table:style-name="Table2.A1" office:value-type="string">
              <text:p text:style-name="P35"><text:span text:style-name="Source_20_Text"><text:span text:style-name="T16">spring.datasource.url</text:span></text:span></text:p>
            </table:table-cell>
            <table:table-cell table:style-name="Table2.A1" office:value-type="string">
              <text:p text:style-name="P35"><text:span text:style-name="Source_20_Text"><text:span text:style-name="T16">SPRING_DATASOURCE_URL</text:span></text:span></text:p>
            </table:table-cell>
          </table:table-row>
          <table:table-row>
            <table:table-cell table:style-name="Table2.A1" office:value-type="string">
              <text:p text:style-name="P35"><text:span text:style-name="Source_20_Text"><text:span text:style-name="T16">my.custom-property.enabled</text:span></text:span></text:p>
            </table:table-cell>
            <table:table-cell table:style-name="Table2.A1" office:value-type="string">
              <text:p text:style-name="P35"><text:span text:style-name="Source_20_Text"><text:span text:style-name="T16">MY_CUSTOMPROPERTY_ENABLED</text:span></text:span></text:p>
            </table:table-cell>
          </table:table-row>
        </table:table>
        <text:p text:style-name="P25">Key Translation Rules:</text:p>
        <text:list text:style-name="L24">
          <text:list-item>
            <text:p text:style-name="P83"><text:span text:style-name="T14">Dots (</text:span><text:span text:style-name="Source_20_Text"><text:span text:style-name="T18">.</text:span></text:span><text:span text:style-name="T14">)</text:span><text:span text:style-name="T12"> in properties become </text:span><text:span text:style-name="T14">underscores (</text:span><text:span text:style-name="Source_20_Text"><text:span text:style-name="T18">_</text:span></text:span><text:span text:style-name="T14">)</text:span><text:span text:style-name="T12">.</text:span></text:p>
          </text:list-item>
          <text:list-item>
            <text:p text:style-name="P83"><text:span text:style-name="T14">Dashes (</text:span><text:span text:style-name="Source_20_Text"><text:span text:style-name="T18">-</text:span></text:span><text:span text:style-name="T14">)</text:span><text:span text:style-name="T12"> are removed (or become underscores in some loose binding contexts).</text:span></text:p>
          </text:list-item>
          <text:list-item>
            <text:p text:style-name="P101"><text:span text:style-name="T1">Case</text:span> is converted to Uppercase.</text:p>
          </text:list-item>
        </text:list>
        <text:h text:style-name="P23" text:outline-level="3">3. Practical Example</text:h>
        <text:p text:style-name="P36"><text:span text:style-name="T12">Imagine you have this configuration in your </text:span><text:span text:style-name="Source_20_Text"><text:span text:style-name="T18">application.properties</text:span></text:span><text:span text:style-name="T12">:</text:span></text:p>
        <text:p text:style-name="P32">Properties</text:p>
        <text:p text:style-name="P38"><text:span text:style-name="Source_20_Text"><text:span text:style-name="T10"># Default connection for local development</text:span></text:span></text:p>
        <text:p text:style-name="P22"><text:span text:style-name="Source_20_Text"><text:span text:style-name="T21">database.url</text:span></text:span><text:span text:style-name="Source_20_Text"><text:span text:style-name="T10">=</text:span></text:span><text:span text:style-name="Source_20_Text"><text:span text:style-name="T22">jdbc:mysql://localhost/dev_db</text:span></text:span></text:p>
        <text:p text:style-name="P22"><text:span text:style-name="Source_20_Text"><text:span text:style-name="T21">database.password</text:span></text:span><text:span text:style-name="Source_20_Text"><text:span text:style-name="T10">=</text:span></text:span><text:span text:style-name="Source_20_Text"><text:span text:style-name="T22">dev_pass</text:span></text:span></text:p>
        <text:p text:style-name="P36"><text:span text:style-name="T12">If you deploy this to a server and set the following Environment Variable: </text:span><text:span text:style-name="Source_20_Text"><text:span text:style-name="T18">export DATABASE_PASSWORD=super_secret_prod_pass</text:span></text:span></text:p>
        <text:p text:style-name="P26">Spring will result in:</text:p>
        <text:list text:style-name="L25">
          <text:list-item>
            <text:p text:style-name="P84"><text:soft-page-break/><text:span text:style-name="Source_20_Text"><text:span text:style-name="T18">database.url</text:span></text:span><text:span text:style-name="T12">: </text:span><text:span text:style-name="Source_20_Text"><text:span text:style-name="T18">jdbc:mysql://localhost/dev_db</text:span></text:span><text:span text:style-name="T12"> (Read from file)</text:span></text:p>
          </text:list-item>
          <text:list-item>
            <text:p text:style-name="P84"><text:span text:style-name="Source_20_Text"><text:span text:style-name="T18">database.password</text:span></text:span><text:span text:style-name="T12">: </text:span><text:span text:style-name="Source_20_Text"><text:span text:style-name="T18">super_secret_prod_pass</text:span></text:span><text:span text:style-name="T12"> (Read from Env Var; overrides file)</text:span></text:p>
          </text:list-item>
        </text:list>
        <text:h text:style-name="P23" text:outline-level="3">Summary Tabl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0">Feature</text:p>
              </table:table-cell>
              <table:table-cell table:style-name="Table3.A1" office:value-type="string">
                <text:p text:style-name="P30">Application Properties</text:p>
              </table:table-cell>
              <table:table-cell table:style-name="Table3.A1" office:value-type="string">
                <text:p text:style-name="P30">Environment Variables</text:p>
              </table:table-cell>
            </table:table-row>
          </table:table-header-rows>
          <table:table-row>
            <table:table-cell table:style-name="Table3.A1" office:value-type="string">
              <text:p text:style-name="P31">Primary Use</text:p>
            </table:table-cell>
            <table:table-cell table:style-name="Table3.A1" office:value-type="string">
              <text:p text:style-name="P30">Defaults, structural config, local dev settings.</text:p>
            </table:table-cell>
            <table:table-cell table:style-name="Table3.A1" office:value-type="string">
              <text:p text:style-name="P30">Secrets (passwords), host-specific config (URLs), cloud settings.</text:p>
            </table:table-cell>
          </table:table-row>
          <table:table-row>
            <table:table-cell table:style-name="Table3.A1" office:value-type="string">
              <text:p text:style-name="P31">Scope</text:p>
            </table:table-cell>
            <table:table-cell table:style-name="Table3.A1" office:value-type="string">
              <text:p text:style-name="P30">Packaged inside the JAR (usually).</text:p>
            </table:table-cell>
            <table:table-cell table:style-name="Table3.A1" office:value-type="string">
              <text:p text:style-name="P30">External to the JAR (part of the OS/Container).</text:p>
            </table:table-cell>
          </table:table-row>
          <table:table-row>
            <table:table-cell table:style-name="Table3.A1" office:value-type="string">
              <text:p text:style-name="P31">Visibility</text:p>
            </table:table-cell>
            <table:table-cell table:style-name="Table3.A1" office:value-type="string">
              <text:p text:style-name="P30">Visible in Git (if committed).</text:p>
            </table:table-cell>
            <table:table-cell table:style-name="Table3.A1" office:value-type="string">
              <text:p text:style-name="P30">Hidden from source control.</text:p>
            </table:table-cell>
          </table:table-row>
          <table:table-row>
            <table:table-cell table:style-name="Table3.A1" office:value-type="string">
              <text:p text:style-name="P31">Format</text:p>
            </table:table-cell>
            <table:table-cell table:style-name="Table3.A1" office:value-type="string">
              <text:p text:style-name="P35"><text:span text:style-name="Source_20_Text"><text:span text:style-name="T16">my.property.name</text:span></text:span></text:p>
            </table:table-cell>
            <table:table-cell table:style-name="Table3.A1" office:value-type="string">
              <text:p text:style-name="P35"><text:span text:style-name="Source_20_Text"><text:span text:style-name="T16">MY_PROPERTY_NAME</text:span></text:span></text:p>
            </table:table-cell>
          </table:table-row>
        </table:table>
        <text:p text:style-name="P41"/>
      </text:section>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section text:style-name="Sect2" text:name="chat-history">
        <text:section text:style-name="Sect2" text:name="a8f67f74f89cd4b8">
          <text:p text:style-name="P6"/>
          <text:section text:style-name="Sect2" text:name="user-query-content-4">
            <text:p text:style-name="P39">how to specify environment variable in command line?</text:p>
          </text:section>
          <text:section text:style-name="Sect1" text:name="model-response-message-contentr_a8f67f74f89cd4b8">
            <text:p text:style-name="P28">Specifying environment variables in the command line depends on your operating system and how long you need the variable to persist (just for one command, for the whole terminal session, or permanently).</text:p>
            <text:p text:style-name="P27">Given your previous questions, I have included a section specifically for <text:span text:style-name="T1">Java/Spring Boot</text:span> at the end.</text:p>
            <text:h text:style-name="P23" text:outline-level="3"><text:soft-page-break/>1. Linux &amp; macOS (Bash, Zsh)</text:h>
            <text:h text:style-name="P24" text:outline-level="4">A. For a single command (Most Common)</text:h>
            <text:p text:style-name="P27">This sets the variable only for the specific program you are running immediately after. It does not affect your current shell session.</text:p>
            <text:p text:style-name="P32">Bash</text:p>
            <text:p text:style-name="P38"><text:span text:style-name="Source_20_Text"><text:span text:style-name="T10"># Syntax: KEY=value command</text:span></text:span></text:p>
            <text:p text:style-name="P21"><text:span text:style-name="Source_20_Text"><text:span text:style-name="T10">SERVER_PORT=8080 java -jar my-app.jar</text:span></text:span></text:p>
            <text:h text:style-name="P24" text:outline-level="4">B. For the current terminal session</text:h>
            <text:p text:style-name="P27">This sets the variable for as long as that specific terminal window is open.</text:p>
            <text:p text:style-name="P32">Bash</text:p>
            <text:p text:style-name="P22"><text:span text:style-name="Source_20_Text"><text:span text:style-name="T21">export</text:span></text:span><text:span text:style-name="Source_20_Text"><text:span text:style-name="T10"> SERVER_PORT=8080</text:span></text:span></text:p>
            <text:p text:style-name="P21"><text:span text:style-name="Source_20_Text"><text:span text:style-name="T10">java -jar my-app.jar</text:span></text:span></text:p>
            <text:h text:style-name="P23" text:outline-level="3">2. Windows</text:h>
            <text:h text:style-name="P24" text:outline-level="4">A. Command Prompt (cmd.exe)</text:h>
            <text:list text:style-name="L26">
              <text:list-item>
                <text:p text:style-name="P97">Session only:</text:p>
                <text:p text:style-name="P111">DOS</text:p>
                <text:p text:style-name="P65"><text:span text:style-name="Source_20_Text"><text:span text:style-name="T21">set</text:span></text:span><text:span text:style-name="Source_20_Text"><text:span text:style-name="T10"> SERVER_PORT=</text:span></text:span><text:span text:style-name="Source_20_Text"><text:span text:style-name="T23">8080</text:span></text:span></text:p>
                <text:p text:style-name="P66"><text:span text:style-name="Source_20_Text"><text:span text:style-name="T10">java -jar my-app.jar</text:span></text:span></text:p>
                <text:p text:style-name="P85"><text:span text:style-name="T15">Note: If you want to do it in one line like Linux, use </text:span><text:span text:style-name="Source_20_Text"><text:span text:style-name="T19">&amp;&amp;</text:span></text:span><text:span text:style-name="T15">:</text:span><text:span text:style-name="T12"> </text:span><text:span text:style-name="Source_20_Text"><text:span text:style-name="T18">set SERVER_PORT=8080 &amp;&amp; java -jar my-app.jar</text:span></text:span></text:p>
              </text:list-item>
              <text:list-item>
                <text:p text:style-name="P97">Permanent (User level):</text:p>
                <text:p text:style-name="P111"><text:soft-page-break/>DOS</text:p>
                <text:p text:style-name="P65"><text:span text:style-name="Source_20_Text"><text:span text:style-name="T10">setx SERVER_PORT </text:span></text:span><text:span text:style-name="Source_20_Text"><text:span text:style-name="T23">8080</text:span></text:span></text:p>
                <text:p text:style-name="P104">(Requires opening a new terminal window to take effect).</text:p>
              </text:list-item>
            </text:list>
            <text:h text:style-name="P24" text:outline-level="4">B. PowerShell</text:h>
            <text:p text:style-name="P37"><text:span text:style-name="T12">PowerShell uses the </text:span><text:span text:style-name="Source_20_Text"><text:span text:style-name="T18">$env:</text:span></text:span><text:span text:style-name="T12"> prefix.</text:span></text:p>
            <text:list text:style-name="L27">
              <text:list-item>
                <text:p text:style-name="P98">Session only:</text:p>
                <text:p text:style-name="P112">PowerShell</text:p>
                <text:p text:style-name="P67"><text:span text:style-name="Source_20_Text"><text:span text:style-name="T20">$env:SERVER_PORT</text:span></text:span><text:span text:style-name="Source_20_Text"><text:span text:style-name="T10"> = </text:span></text:span><text:span text:style-name="Source_20_Text"><text:span text:style-name="T22">"8080"</text:span></text:span></text:p>
                <text:p text:style-name="P67"><text:span text:style-name="Source_20_Text"><text:span text:style-name="T10">java </text:span></text:span><text:span text:style-name="Source_20_Text"><text:span text:style-name="T23">-jar</text:span></text:span><text:span text:style-name="Source_20_Text"><text:span text:style-name="T10"> my</text:span></text:span><text:span text:style-name="Source_20_Text"><text:span text:style-name="T23">-app</text:span></text:span><text:span text:style-name="Source_20_Text"><text:span text:style-name="T10">.jar</text:span></text:span></text:p>
                <text:p text:style-name="P86"><text:span text:style-name="T15">One-line version:</text:span><text:span text:style-name="T12"> </text:span><text:span text:style-name="Source_20_Text"><text:span text:style-name="T18">$env:SERVER_PORT="8080"; java -jar my-app.jar</text:span></text:span></text:p>
              </text:list-item>
            </text:list>
            <text:p text:style-name="P20"/>
            <text:h text:style-name="P23" text:outline-level="3">3. Java / Spring Boot Specifics</text:h>
            <text:p text:style-name="P27">Since you are working with Spring, it is important to know the difference between an <text:span text:style-name="T1">OS Environment Variable</text:span> and a <text:span text:style-name="T1">Java System Property</text:span> or <text:span text:style-name="T1">Spring Argument</text:span>. They achieve similar results but are set differently in the command line.</text:p>
            <text:h text:style-name="P24" text:outline-level="4">Option 1: The OS Environment Variable (As shown above)</text:h>
            <text:p text:style-name="P27">Spring automatically detects these.</text:p>
            <text:p text:style-name="P32">Bash</text:p>
            <text:p text:style-name="P38"><text:span text:style-name="Source_20_Text"><text:span text:style-name="T10"># Linux/Mac</text:span></text:span></text:p>
            <text:p text:style-name="P21"><text:span text:style-name="Source_20_Text"><text:span text:style-name="T10">SERVER_PORT=9090 java -jar app.jar</text:span></text:span></text:p>
            <text:h text:style-name="P33" text:outline-level="4"><text:span text:style-name="T14">Option 2: Java System Properties (</text:span><text:span text:style-name="Source_20_Text"><text:span text:style-name="T18">-D</text:span></text:span><text:span text:style-name="T14">)</text:span></text:h>
            <text:p text:style-name="P26">These are <text:span text:style-name="T1">not</text:span> OS environment variables; they are specific to the JVM. However, <text:soft-page-break/>Spring Boot treats them with higher priority than OS variables.</text:p>
            <text:list text:style-name="L28">
              <text:list-item>
                <text:p text:style-name="P87"><text:span text:style-name="T14">Syntax:</text:span><text:span text:style-name="T12"> </text:span><text:span text:style-name="Source_20_Text"><text:span text:style-name="T18">-Dproperty.name=value</text:span></text:span></text:p>
              </text:list-item>
              <text:list-item>
                <text:p text:style-name="P87"><text:span text:style-name="T14">Placement:</text:span><text:span text:style-name="T12"> Must be </text:span><text:span text:style-name="T14">before</text:span><text:span text:style-name="T12"> </text:span><text:span text:style-name="Source_20_Text"><text:span text:style-name="T18">-jar</text:span></text:span><text:span text:style-name="T12">.</text:span></text:p>
              </text:list-item>
            </text:list>
            <text:p text:style-name="P32">Bash</text:p>
            <text:p text:style-name="P22"><text:span text:style-name="Source_20_Text"><text:span text:style-name="T10">java -Dserver.port=9090 -jar app.jar</text:span></text:span></text:p>
            <text:h text:style-name="P24" text:outline-level="4">Option 3: Spring Boot Command Line Arguments</text:h>
            <text:p text:style-name="P26">These are specific to Spring Boot and have the <text:span text:style-name="T1">highest priority</text:span> (they override everything else).</text:p>
            <text:list text:style-name="L29">
              <text:list-item>
                <text:p text:style-name="P88"><text:span text:style-name="T14">Syntax:</text:span><text:span text:style-name="T12"> </text:span><text:span text:style-name="Source_20_Text"><text:span text:style-name="T18">--property.name=value</text:span></text:span></text:p>
              </text:list-item>
              <text:list-item>
                <text:p text:style-name="P102"><text:span text:style-name="T1">Placement:</text:span> Must be <text:span text:style-name="T1">after</text:span> the jar name.</text:p>
              </text:list-item>
            </text:list>
            <text:p text:style-name="P32">Bash</text:p>
            <text:p text:style-name="P22"><text:span text:style-name="Source_20_Text"><text:span text:style-name="T10">java -jar app.jar --server.port=9090</text:span></text:span></text:p>
            <text:h text:style-name="P23" text:outline-level="3">Summary of Spring Precedence</text:h>
            <text:p text:style-name="P26">If you set the port in all three places, here is who wins:</text:p>
            <text:list text:style-name="L30">
              <text:list-item>
                <text:p text:style-name="P89"><text:span text:style-name="Source_20_Text"><text:span text:style-name="T18">java -jar app.jar --server.port=9090</text:span></text:span><text:span text:style-name="T12"> (</text:span><text:span text:style-name="T14">Winner</text:span><text:span text:style-name="T12">)</text:span></text:p>
              </text:list-item>
              <text:list-item>
                <text:p text:style-name="P89"><text:span text:style-name="Source_20_Text"><text:span text:style-name="T18">java -Dserver.port=8080 -jar app.jar</text:span></text:span><text:span text:style-name="T12"> (2nd place)</text:span></text:p>
              </text:list-item>
              <text:list-item>
                <text:p text:style-name="P89"><text:span text:style-name="Source_20_Text"><text:span text:style-name="T18">SERVER_PORT=7070 java -jar app.jar</text:span></text:span><text:span text:style-name="T12"> (3rd place)</text:span></text:p>
              </text:list-item>
            </text:list>
          </text:section>
        </text:section>
      </text:section>
      <text:p text:style-name="P43"/>
      <text:p text:style-name="P44"><draw:frame draw:style-name="fr1" draw:name="Frame1" text:anchor-type="char" svg:x="0in" svg:width="0.0161in" draw:z-index="0"><draw:text-box fo:min-height="0.0161in"><text:p text:style-name="P5">Opens in a new window</text:p></draw:text-box></draw:frame><text:span text:style-name="T24">Gemini isn’t human. It can make mistakes, including about people, so double-check it. </text:span><text:a xlink:type="simple" xlink:href="https://support.google.com/gemini?p=privacy_notice" office:target-frame-name="_blank" xlink:show="new" text:style-name="Internet_20_link" text:visited-style-name="Visited_20_Internet_20_Link">Your privacy &amp; Gemini</text:a></text:p>
      <text:p text:style-name="P1"/>
      <text:p text:style-name="P1"/>
      <text:p text:style-name="P1"/>
      <text:p text:style-name="P1"/>
      <text:p text:style-name="P1"/>
      <text:p text:style-name="P1"/>
      <text:p text:style-name="P3"><text:bookmark text:name="chat-history"/></text:p>
      <text:section text:style-name="Sect2" text:name="Section1">
        <text:section text:style-name="Sect2" text:name="478b1e7b3497957e">
          <text:p text:style-name="P6"><text:soft-page-break/></text:p>
          <text:section text:style-name="Sect2" text:name="user-query-content-5">
            <text:p text:style-name="P39">how to mount concreete subdirectory when mounting filesystem?</text:p>
          </text:section>
          <text:section text:style-name="Sect1" text:name="model-response-message-contentr_478b1e7b3497957e">
            <text:p text:style-name="P28">You cannot directly mount a specific subdirectory of a standard filesystem (like ext4 or NTFS) from the raw disk partition in one step. You must generally mount the drive first, and then link the subdirectory to your desired location.</text:p>
            <text:p text:style-name="P27">However, there are three ways to achieve this result depending on your specific needs.</text:p>
            <text:h text:style-name="P23" text:outline-level="3">1. The Standard "Bind Mount" Method (Recommended)</text:h>
            <text:p text:style-name="P27">This is the standard Linux way to do it. You mount the actual drive to a hidden or temporary folder, and then "bind" the specific subdirectory to the place you actually want it.</text:p>
            <text:p text:style-name="P37"><text:span text:style-name="T14">The Goal:</text:span><text:span text:style-name="T12"> Mount the folder </text:span><text:span text:style-name="Source_20_Text"><text:span text:style-name="T18">/data/images</text:span></text:span><text:span text:style-name="T12"> (which is inside partition </text:span><text:span text:style-name="Source_20_Text"><text:span text:style-name="T18">/dev/sdb1</text:span></text:span><text:span text:style-name="T12">) to </text:span><text:span text:style-name="Source_20_Text"><text:span text:style-name="T18">/mnt/images</text:span></text:span><text:span text:style-name="T12">.</text:span></text:p>
            <text:list text:style-name="L31">
              <text:list-item>
                <text:p text:style-name="P90"><text:span text:style-name="T14">Mount the main drive</text:span><text:span text:style-name="T12"> (e.g., to a temporary folder or </text:span><text:span text:style-name="Source_20_Text"><text:span text:style-name="T18">/mnt/disk_root</text:span></text:span><text:span text:style-name="T12">):</text:span></text:p>
                <text:p text:style-name="P113">Bash</text:p>
                <text:p text:style-name="P68"><text:span text:style-name="Source_20_Text"><text:span text:style-name="T10">sudo mkdir -p /mnt/disk_root</text:span></text:span></text:p>
                <text:p text:style-name="P69"><text:span text:style-name="Source_20_Text"><text:span text:style-name="T10">sudo mount /dev/sdb1 /mnt/disk_root</text:span></text:span></text:p>
              </text:list-item>
              <text:list-item>
                <text:p text:style-name="P103"><text:span text:style-name="T1">Bind mount the specific subdirectory</text:span> to your target:</text:p>
                <text:p text:style-name="P113">Bash</text:p>
                <text:p text:style-name="P68"><text:span text:style-name="Source_20_Text"><text:span text:style-name="T10">sudo mkdir -p /mnt/images</text:span></text:span></text:p>
                <text:p text:style-name="P70"><text:span text:style-name="Source_20_Text"><text:span text:style-name="T10"># Syntax: mount --bind &lt;source_subdir&gt; &lt;target_dir&gt;</text:span></text:span></text:p>
                <text:p text:style-name="P68"><text:span text:style-name="Source_20_Text"><text:span text:style-name="T10">sudo mount --</text:span></text:span><text:span text:style-name="Source_20_Text"><text:span text:style-name="T21">bind</text:span></text:span><text:span text:style-name="Source_20_Text"><text:span text:style-name="T10"> /mnt/disk_root/data/images /mnt/images</text:span></text:span></text:p>
                <text:p text:style-name="P90"><text:span text:style-name="T15">Now </text:span><text:span text:style-name="Source_20_Text"><text:span text:style-name="T19">/mnt/images</text:span></text:span><text:span text:style-name="T15"> contains only the contents of that specific subdirectory.</text:span></text:p>
              </text:list-item>
            </text:list>
            <text:h text:style-name="P24" text:outline-level="4"><text:soft-page-break/>Making it Permanent (fstab)</text:h>
            <text:p text:style-name="P36"><text:span text:style-name="T12">To make this persist after reboot, add </text:span><text:span text:style-name="T14">two</text:span><text:span text:style-name="T12"> lines to your </text:span><text:span text:style-name="Source_20_Text"><text:span text:style-name="T18">/etc/fstab</text:span></text:span><text:span text:style-name="T12">. One to mount the drive, one to bind the folder.</text:span></text:p>
            <text:p text:style-name="P32">Plaintext</text:p>
            <text:p text:style-name="P22"><text:span text:style-name="Source_20_Text"><text:span text:style-name="T10"># 1. Mount the physical drive first</text:span></text:span></text:p>
            <text:p text:style-name="P21"><text:span text:style-name="Source_20_Text"><text:span text:style-name="T10">UUID=xxxx-xxxx <text:s/>/mnt/disk_root <text:s/>ext4 <text:s/>defaults <text:s/>0 <text:s/>2</text:span></text:span></text:p>
            <text:p text:style-name="P21"/>
            <text:p text:style-name="P21"><text:span text:style-name="Source_20_Text"><text:span text:style-name="T10"># 2. Bind mount the subdirectory</text:span></text:span></text:p>
            <text:p text:style-name="P21"><text:span text:style-name="Source_20_Text"><text:span text:style-name="T10">/mnt/disk_root/data/images <text:s/>/mnt/images <text:s/>none <text:s/>bind <text:s/>0 <text:s/>0</text:span></text:span></text:p>
            <text:p text:style-name="P20"/>
            <text:h text:style-name="P23" text:outline-level="3">2. The BTRFS Method (If you use Btrfs)</text:h>
            <text:p text:style-name="P27">If your disk is formatted as <text:span text:style-name="T1">Btrfs</text:span>, you <text:span text:style-name="T1">can</text:span> mount a specific subvolume directly without mounting the root, which is a unique feature of this filesystem.</text:p>
            <text:p text:style-name="P32">Bash</text:p>
            <text:p text:style-name="P38"><text:span text:style-name="Source_20_Text"><text:span text:style-name="T10"># Mount subvolume named '@home'</text:span></text:span></text:p>
            <text:p text:style-name="P21"><text:span text:style-name="Source_20_Text"><text:span text:style-name="T10">sudo mount -o subvol=@home /dev/sdb1 /mnt/home</text:span></text:span></text:p>
            <text:p text:style-name="P29">(Note: This only works if you created that directory as a "subvolume" when setting up the disk, not just a regular folder).</text:p>
            <text:p text:style-name="P20"/>
            <text:h text:style-name="P23" text:outline-level="3">3. The Network Method (NFS)</text:h>
            <text:p text:style-name="P27">If you are mounting a network drive (NFS), you can mount a subdirectory directly if the server exports it or if the server supports mounting subdirectories.</text:p>
            <text:p text:style-name="P32">Bash</text:p>
            <text:p text:style-name="P38"><text:span text:style-name="Source_20_Text"><text:span text:style-name="T10"># Mount specific remote folder</text:span></text:span></text:p>
            <text:p text:style-name="P21"><text:soft-page-break/><text:span text:style-name="Source_20_Text"><text:span text:style-name="T25">sudo mount server_ip:/shared_folder/sub_folder /mnt/local_target</text:span></text:span></text:p>
          </text:section>
        </text:section>
      </text:section>
      <text:p text:style-name="P4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hat's an excellent question that touches on a common point of confusion for developers.</text:p>
      <text:p text:style-name="P1">The short answer is: No, you cannot get a Let's Encrypt certificate for localhost or for a private IP address.</text:p>
      <text:p text:style-name="P1">The Reason: Domain Validation</text:p>
      <text:p text:style-name="P1">Let's Encrypt's entire system is built on the principle of proving you own the domain you are requesting a certificate for. It does this automatically using a process called the ACME protocol. The most common methods are:</text:p>
      <text:p text:style-name="P1">1.</text:p>
      <text:p text:style-name="P1">HTTP-01 Challenge: Let's Encrypt's servers attempt to connect to your server from the public internet and retrieve a specific file from a hidden directory (.well-known/acme-challenge/).</text:p>
      <text:p text:style-name="P1">2.</text:p>
      <text:p text:style-name="P1">DNS-01 Challenge: You are asked to create a specific TXT record in your domain's public DNS settings, which Let's Encrypt's servers then verify.</text:p>
      <text:p text:style-name="P1">Both of these methods fail for local development environments:</text:p>
      <text:p text:style-name="P1">•</text:p>
      <text:p text:style-name="P1">localhost and Private IPs (e.g., 192.168.x.x) are not reachable from the public internet. Let's Encrypt's servers have no way to connect to your machine to perform the validation.</text:p>
      <text:p text:style-name="P1">•</text:p>
      <text:p text:style-name="P1">localhost is not a public domain you can register. It's a special-use hostname that every computer resolves to itself.</text:p>
      <text:p text:style-name="P1">The proxy server doesn't change this, as it's still inside your private network. The fundamental requirement is public accessibility.</text:p>
      <text:p text:style-name="P1">The Solution: What Developers Do Instead</text:p>
      <text:p text:style-name="P1">For local development, the standard and recommended practice is to use a self-signed certificate. This is a certificate that you generate and "sign" yourself, rather than having it signed by a trusted public Certificate Authority (CA) like Let's Encrypt.</text:p>
      <text:p text:style-name="P1">Here are the two best ways to do this:</text:p>
      <text:p text:style-name="P1">1. The Easy Way: Use mkcert (Highly Recommended)</text:p>
      <text:p text:style-name="P1">mkcert is a fantastic open-source tool designed specifically for this purpose. It makes creating and, more importantly, trusting local certificates incredibly simple.</text:p>
      <text:p text:style-name="P1">How it works:</text:p>
      <text:p text:style-name="P1">1.</text:p>
      <text:p text:style-name="P1">mkcert creates your own private, local "Certificate Authority".</text:p>
      <text:p text:style-name="P1">2.</text:p>
      <text:p text:style-name="P1">It automatically installs this local CA into your system's and browsers' trust stores. This is the magic step that prevents browser privacy warnings.</text:p>
      <text:p text:style-name="P1">3.</text:p>
      <text:p text:style-name="P1">You can then generate certificates for any local domains you want, which your browser will automatically trust.</text:p>
      <text:p text:style-name="P1">Example Usage:</text:p>
      <text:p text:style-name="P1">Shell Script</text:p>
      <text:p text:style-name="P1"><text:soft-page-break/># 1. Install mkcert (on macOS with Homebrew, for example)</text:p>
      <text:p text:style-name="P1">brew install mkcert</text:p>
      <text:p text:style-name="P1"/>
      <text:p text:style-name="P1"># 2. Create and install your local CA (only needs to be done once)</text:p>
      <text:p text:style-name="P1">mkcert -install</text:p>
      <text:p text:style-name="P1"/>
      <text:p text:style-name="P1"># 3. Generate a certificate for your local addresses</text:p>
      <text:p text:style-name="P1"># You can list as many hostnames and IPs as you need.</text:p>
      <text:p text:style-name="P1">mkcert localhost 127.0.0.1 ::1 my-local-app.test</text:p>
      <text:p text:style-name="P1"/>
      <text:p text:style-name="P1"># This will create two files:</text:p>
      <text:p text:style-name="P1"># - localhost+2.pem (the certificate)</text:p>
      <text:p text:style-name="P1"># - localhost+2-key.pem (the private key)</text:p>
      <text:p text:style-name="P1">You would then configure your local server (Tomcat, Nginx, etc.) to use these two files for its HTTPS configuration.</text:p>
      <text:p text:style-name="P1">2. The Manual Way: Use openssl</text:p>
      <text:p text:style-name="P1">You can use the openssl command-line tool to generate a self-signed certificate. This is more complex and has a major downside.</text:p>
      <text:p text:style-name="P1">Downside: Browsers will not trust this certificate by default. You will see a "Your connection is not private" warning (e.g., NET::ERR_CERT_AUTHORITY_INVALID) every time you visit the site, which you must manually click through. You can manually import the certificate into your OS/browser trust store, but it's a tedious process that mkcert automates.</text:p>
      <text:p text:style-name="P1">Example Command:</text:p>
      <text:p text:style-name="P1">Shell Script</text:p>
      <text:p text:style-name="P1">openssl req -x509 -newkey rsa:2048 -nodes \</text:p>
      <text:p text:style-name="P1"><text:s text:c="2"/>-keyout localhost.key -out localhost.crt \</text:p>
      <text:p text:style-name="P1"><text:s text:c="2"/>-subj "/C=US/ST=California/L=San Francisco/O=MyDev/CN=localhost" \</text:p>
      <text:p text:style-name="P1"><text:s text:c="2"/>-days 365</text:p>
      <text:p text:style-name="P1">Summary</text:p>
      <text:p text:style-name="P1">Method</text:p>
      <text:p text:style-name="P1">Use Case</text:p>
      <text:p text:style-name="P1">Browser Trust</text:p>
      <text:p text:style-name="P1">Setup</text:p>
      <text:p text:style-name="P1">Recommendation</text:p>
      <text:p text:style-name="P1">Let's Encrypt</text:p>
      <text:p text:style-name="P1">Publicly accessible websites with a registered domain name.</text:p>
      <text:p text:style-name="P1">Yes (Trusted by all browsers)</text:p>
      <text:p text:style-name="P1">Automated with tools like Certbot.</text:p>
      <text:p text:style-name="P1">The standard for production.</text:p>
      <text:p text:style-name="P1">mkcert</text:p>
      <text:p text:style-name="P1">Local development (localhost, local IPs, .test domains).</text:p>
      <text:p text:style-name="P1">Yes (After one-time mkcert -install)</text:p>
      <text:p text:style-name="P1">Very easy.</text:p>
      <text:p text:style-name="P1"><text:soft-page-break/>The best practice for local HTTPS.</text:p>
      <text:p text:style-name="P1">Self-Signed (openssl)</text:p>
      <text:p text:style-name="P1">Local development where browser warnings are acceptable.</text:p>
      <text:p text:style-name="P1">No (Requires manual bypass or trust installation)</text:p>
      <text:p text:style-name="P1">Moderately complex.</text:p>
      <text:p text:style-name="P1">Use only if you cannot install mkcer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Absolutely. Here are the step-by-step instructions for using mkcert on Ubuntu, Linux Mint, or any other Debian-based distribution to create a trusted local certificate.</text:p>
      <text:p text:style-name="P1">Step 1: Install mkcert and Dependencies</text:p>
      <text:p text:style-name="P1">First, you need to install the mkcert tool itself and a required dependency, libnss3-tools. This dependency provides the certutil tool which mkcert uses to install the root CA into Firefox's trust store.</text:p>
      <text:p text:style-name="P1">Open your terminal and run the following commands:</text:p>
      <text:p text:style-name="P1">Shell Script</text:p>
      <text:p text:style-name="P1"># First, update your package list</text:p>
      <text:p text:style-name="P1">sudo apt update</text:p>
      <text:p text:style-name="P1"/>
      <text:p text:style-name="P1"># Then, install mkcert and the necessary library</text:p>
      <text:p text:style-name="P1">sudo apt install mkcert libnss3-tools</text:p>
      <text:p text:style-name="P1">Step 2: Create and Install Your Local Certificate Authority (CA)</text:p>
      <text:p text:style-name="P1">This is the magic step. You only need to do this once per machine. This command creates a new local "root" certificate and automatically installs it into your system and browser trust stores.</text:p>
      <text:p text:style-name="P1">Shell Script</text:p>
      <text:p text:style-name="P1">mkcert -install</text:p>
      <text:p text:style-name="P1">You should see a message confirming it created a new local CA. From this point on, any certificates you generate with mkcert will be automatically trusted by your browsers, curl, and other tools.</text:p>
      <text:p text:style-name="P1">Step 3: Generate a Certificate for Your Local Server</text:p>
      <text:p text:style-name="P1">Now you can generate a certificate for any local hostname or IP address you need. It's best practice to generate it for localhost, the loopback IP addresses, and any custom local hostnames you might use (e.g., myapp.test).</text:p>
      <text:p text:style-name="P1">Navigate to your project's root directory (or a config folder) and run:</text:p>
      <text:p text:style-name="P1">Shell Script</text:p>
      <text:p text:style-name="P1"># Generate a cert for localhost, its IPs, and a custom .test domain</text:p>
      <text:p text:style-name="P1">mkcert localhost 127.0.0.1 ::1 myapp.test</text:p>
      <text:p text:style-name="P1">This will create two files in your current directory:</text:p>
      <text:p text:style-name="P1">•</text:p>
      <text:p text:style-name="P1">localhost+3.pem: The certificate file.</text:p>
      <text:p text:style-name="P1">•</text:p>
      <text:p text:style-name="P1">localhost+3-key.pem: The private key file.</text:p>
      <text:p text:style-name="P1">Step 4: Configure Your Spring Boot Application</text:p>
      <text:p text:style-name="P1">Spring Boot's embedded Tomcat server prefers a PKCS12 keystore (.p12 or .pfx) rather than separate .pem files. You can easily convert the files you just generated using the openssl command.</text:p>
      <text:p text:style-name="P1">1.</text:p>
      <text:p text:style-name="P1">Convert PEM to PKCS12: Run this openssl command in the same directory where you created the .pem files. This will bundle your certificate and private key into a single keystore.p12 file.</text:p>
      <text:p text:style-name="P1"><text:soft-page-break/>Shell Script</text:p>
      <text:p text:style-name="P1">openssl pkcs12 -export -in localhost+3.pem -inkey localhost+3-key.pem -out keystore.p12 -name tomcat -passout pass:your-secret-password</text:p>
      <text:p text:style-name="P1">◦</text:p>
      <text:p text:style-name="P1">Replace your-secret-password with a password of your choice.</text:p>
      <text:p text:style-name="P1">◦</text:p>
      <text:p text:style-name="P1">The -name tomcat gives the key an alias inside the keystore, which is good practice.</text:p>
      <text:p text:style-name="P1">2.</text:p>
      <text:p text:style-name="P1">Move the Keystore: Move the newly created keystore.p12 file into your project's src/main/resources directory. This allows Spring Boot to find it on the classpath.</text:p>
      <text:p text:style-name="P1">3.</text:p>
      <text:p text:style-name="P1">Update application.properties: Add the following properties to your myapp-mongo-server/src/main/resources/application.properties file to enable SSL.</text:p>
      <text:p text:style-name="P1">Properties</text:p>
      <text:p text:style-name="P1"># --- SSL Configuration ---</text:p>
      <text:p text:style-name="P1"># The port for HTTPS</text:p>
      <text:p text:style-name="P1">server.port=8443</text:p>
      <text:p text:style-name="P1"/>
      <text:p text:style-name="P1"># The format of the keystore</text:p>
      <text:p text:style-name="P1">server.ssl.key-store-type=PKCS12</text:p>
      <text:p text:style-name="P1"/>
      <text:p text:style-name="P1"># The path to the keystore (classpath means src/main/resources)</text:p>
      <text:p text:style-name="P1">server.ssl.key-store=classpath:keystore.p12</text:p>
      <text:p text:style-name="P1"/>
      <text:p text:style-name="P1"># The password you chose in the openssl command</text:p>
      <text:p text:style-name="P1">server.ssl.key-store-password=your-secret-password</text:p>
      <text:p text:style-name="P1"/>
      <text:p text:style-name="P1"># The alias you chose in the openssl command</text:p>
      <text:p text:style-name="P1">server.ssl.key-alias=tomcat</text:p>
      <text:p text:style-name="P1">Show full code block</text:p>
      <text:p text:style-name="P1">Summary &amp; Final Result</text:p>
      <text:p text:style-name="P1">1.</text:p>
      <text:p text:style-name="P1">Install: sudo apt install mkcert libnss3-tools</text:p>
      <text:p text:style-name="P1">2.</text:p>
      <text:p text:style-name="P1">Create CA: mkcert -install</text:p>
      <text:p text:style-name="P1">3.</text:p>
      <text:p text:style-name="P1">Generate Cert: mkcert localhost 127.0.0.1</text:p>
      <text:p text:style-name="P1">4.</text:p>
      <text:p text:style-name="P1">Convert to Keystore: openssl pkcs12 -export ...</text:p>
      <text:p text:style-name="P1">5.</text:p>
      <text:p text:style-name="P1">Configure Spring: Update application.properties with the SSL settings.</text:p>
      <text:p text:style-name="P1">Now, when you run your Spring Boot application, it will start on port 8443 and serve traffic over HTTPS. You can access https://localhost:8443 in your browser, and you will see a green lock icon with no security warning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sans-serif"/>
    <style:font-face style:name="Google Sans Flex" svg:font-family="'Google Sans Flex', 'Google Sans', 'Helvetica Neue',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1-25T03:26:40.602432118</dc:date>
    <meta:editing-duration>P1DT22H21M57S</meta:editing-duration>
    <meta:editing-cycles>26</meta:editing-cycles>
    <meta:generator>LibreOffice/24.2.7.2$Linux_X86_64 LibreOffice_project/420$Build-2</meta:generator>
    <meta:document-statistic meta:table-count="5" meta:image-count="0" meta:object-count="0" meta:page-count="39" meta:paragraph-count="903" meta:word-count="7029" meta:character-count="49266" meta:non-whitespace-character-count="42462"/>
  </office:meta>
</office:document-meta>
</file>