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Liberation Mono', 'DejaVu Sans Mono', 'Courier New', monospace"/>
    <style:font-face style:name="system-ui" svg:font-family="system-ui, Ubuntu, 'Droid Sans', sans-serif"/>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616161" loext:opacity="100%" style:font-name="system-ui" fo:font-size="9.75pt"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16161" loext:opacity="100%" style:font-name="system-ui" fo:font-size="9.75pt" fo:letter-spacing="normal" fo:font-style="normal" fo:font-weight="normal"/>
    </style:style>
    <style:style style:name="P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4" style:family="paragraph" style:parent-style-name="Text_20_body" style:list-style-name="L1">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5" style:family="paragraph" style:parent-style-name="Text_20_body" style:list-style-name="L1">
      <style:paragraph-properties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7" style:family="paragraph" style:parent-style-name="Text_20_body" style:list-style-name="L2">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8" style:family="paragraph" style:parent-style-name="Text_20_body" style:list-style-name="L2">
      <style:paragraph-properties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9"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0" style:family="paragraph" style:parent-style-name="Text_20_body" style:list-style-name="L6">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1"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2" style:family="paragraph" style:parent-style-name="Text_20_body" style:list-style-name="L8">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3"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4" style:family="paragraph" style:parent-style-name="Text_20_body" style:list-style-name="L9">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5"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6" style:family="paragraph" style:parent-style-name="Text_20_body" style:list-style-name="L10">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7"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8" style:family="paragraph" style:parent-style-name="Text_20_body" style:list-style-name="L11">
      <style:paragraph-properties fo:margin-top="0in" fo:margin-bottom="0in" style:contextual-spacing="false" fo:orphans="2" fo:widows="2" fo:text-indent="0in" style:auto-text-indent="false" fo:padding="0in" fo:border="none"/>
      <style:text-properties fo:font-variant="normal" fo:text-transform="none" fo:color="#616161" loext:opacity="100%" style:font-name="system-ui" fo:font-size="9.75pt" fo:letter-spacing="normal" fo:font-style="normal" fo:font-weight="normal"/>
    </style:style>
    <style:style style:name="P1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16161" loext:opacity="100%" style:font-name="system-ui" fo:font-size="9.75pt" fo:letter-spacing="normal" fo:font-style="normal" fo:font-weight="normal" officeooo:paragraph-rsid="00055bd0"/>
    </style:style>
    <style:style style:name="P20" style:family="paragraph" style:parent-style-name="Text_20_body">
      <style:paragraph-properties fo:margin-left="0in" fo:margin-right="0in" fo:margin-top="0in" fo:margin-bottom="0in" style:contextual-spacing="false" style:line-height-at-least="0.1665in" fo:orphans="1" fo:widows="2" fo:text-indent="0in" style:auto-text-indent="false"/>
      <style:text-properties fo:font-variant="normal" fo:text-transform="none" fo:color="#717171" loext:opacity="100%" style:font-name="system-ui" fo:font-size="7.5pt" fo:letter-spacing="normal" fo:font-style="normal" fo:font-weight="normal" loext:padding="0in" loext:border="none"/>
    </style:style>
    <style:style style:name="P21"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list-style-name="L3">
      <style:paragraph-properties fo:margin-left="0.0102in" fo:margin-right="0.0102in" fo:margin-top="0in" fo:margin-bottom="0in" style:contextual-spacing="false" fo:orphans="2" fo:widows="2" fo:text-indent="0in" style:auto-text-indent="false" fo:padding="0in" fo:border="none"/>
    </style:style>
    <style:style style:name="P23" style:family="paragraph" style:parent-style-name="Text_20_body" style:list-style-name="L4">
      <style:paragraph-properties fo:margin-left="0.0102in" fo:margin-right="0.0102in" fo:margin-top="0in" fo:margin-bottom="0in" style:contextual-spacing="false" fo:orphans="2" fo:widows="2" fo:text-indent="0in" style:auto-text-indent="false" fo:padding="0in" fo:border="none"/>
    </style:style>
    <style:style style:name="P24"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list-style-name="L5">
      <style:paragraph-properties fo:margin-left="0.0102in" fo:margin-right="0.0102in" fo:margin-top="0in" fo:margin-bottom="0in" style:contextual-spacing="false" fo:orphans="2" fo:widows="2" fo:text-indent="0in" style:auto-text-indent="false" fo:padding="0in" fo:border="none"/>
    </style:style>
    <style:style style:name="P26" style:family="paragraph" style:parent-style-name="Text_20_body" style:list-style-name="L6">
      <style:paragraph-properties fo:margin-left="0.0102in" fo:margin-right="0.0102in" fo:margin-top="0in" fo:margin-bottom="0in" style:contextual-spacing="false" fo:orphans="2" fo:widows="2" fo:text-indent="0in" style:auto-text-indent="false" fo:padding="0in" fo:border="none"/>
    </style:style>
    <style:style style:name="P27" style:family="paragraph" style:parent-style-name="Text_20_body">
      <style:paragraph-properties fo:margin-left="0in" fo:margin-right="0in" fo:margin-top="0in" fo:margin-bottom="0in" style:contextual-spacing="false" fo:orphans="2" fo:widows="2" fo:text-indent="0in" style:auto-text-indent="false"/>
    </style:style>
    <style:style style:name="P28" style:family="paragraph" style:parent-style-name="Text_20_body">
      <style:paragraph-properties fo:margin-left="0in" fo:margin-right="0in" fo:margin-top="0in" fo:margin-bottom="0.1665in" style:contextual-spacing="false" fo:orphans="2" fo:widows="2" fo:text-indent="0in" style:auto-text-indent="false"/>
    </style:style>
    <style:style style:name="P29" style:family="paragraph" style:parent-style-name="Text_20_body">
      <style:paragraph-properties fo:margin-left="0.0102in" fo:margin-right="0.0102in" fo:margin-top="0in" fo:margin-bottom="0in" style:contextual-spacing="false" fo:orphans="2" fo:widows="2" fo:text-indent="0in" style:auto-text-indent="false"/>
    </style:style>
    <style:style style:name="P30"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31"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616161" loext:opacity="100%" style:font-name="system-ui" fo:font-size="9.75pt" fo:letter-spacing="normal" fo:font-style="normal" fo:font-weight="normal"/>
    </style:style>
    <style:style style:name="T2" style:family="text">
      <style:text-properties fo:font-variant="normal" fo:text-transform="none" fo:color="#616161" loext:opacity="100%" style:font-name="system-ui" fo:font-size="9.75pt" fo:letter-spacing="normal" fo:font-style="normal" fo:font-weight="normal" loext:padding="0in" loext:border="none"/>
    </style:style>
    <style:style style:name="T3" style:family="text">
      <style:text-properties fo:font-variant="normal" fo:text-transform="none" fo:color="#616161" loext:opacity="100%" style:text-line-through-style="none" style:text-line-through-type="none" style:font-name="system-ui" fo:font-size="9.75pt" fo:letter-spacing="normal" fo:font-style="normal" style:text-underline-style="none" fo:font-weight="normal" style:text-blinking="false" loext:padding="0in" loext:border="none"/>
    </style:style>
    <style:style style:name="T4" style:family="text">
      <style:text-properties fo:font-variant="normal" fo:text-transform="none" fo:color="#a31515" loext:opacity="100%" style:font-name="Ubuntu Mono" fo:font-size="8.25pt" fo:letter-spacing="normal" fo:font-style="normal" fo:font-weight="normal" fo:background-color="#000000" loext:char-shading-value="0" loext:padding="0in" loext:border="none"/>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If users can connect to the group but cannot see messages from other users, the issue is likely on the backend (server) side, not in the Angular client code you provided. The client is subscribing to the correct topic and sending messages as expected.</text:p>
      <text:p text:style-name="P1">Here are the most common causes for this issue:</text:p>
      <text:list text:style-name="L1">
        <text:list-item>
          <text:p text:style-name="P3">The backend is not broadcasting messages to the correct topic (e.g., /topic/rooms/{roomName}).</text:p>
        </text:list-item>
        <text:list-item>
          <text:p text:style-name="P4">The backend is not configured to relay messages sent to /app/chat/{roomName} to the correct topic.</text:p>
        </text:list-item>
        <text:list-item>
          <text:p text:style-name="P4">There is a CORS or WebSocket configuration issue on the backend.</text:p>
        </text:list-item>
        <text:list-item>
          <text:p text:style-name="P5">The backend is not persisting or forwarding messages to all subscribers.</text:p>
        </text:list-item>
      </text:list>
      <text:p text:style-name="P1">To debug:</text:p>
      <text:list text:style-name="L2">
        <text:list-item>
          <text:p text:style-name="P6">Check the backend controller or message handler for /app/chat/{roomName}. It should use @MessageMapping and @SendTo or messagingTemplate.convertAndSend to /topic/rooms/{roomName}.</text:p>
        </text:list-item>
        <text:list-item>
          <text:p text:style-name="P7">Ensure the backend logs show messages being received and sent to the topic.</text:p>
        </text:list-item>
        <text:list-item>
          <text:p text:style-name="P8">Make sure the STOMP/WebSocket configuration allows broadcasting to all clients.</text:p>
        </text:list-item>
      </text:list>
      <text:p text:style-name="P2">If you want, I can help you review your backend WebSocket/STOMP configuration and controller code. Please provide the relevant backend code (Java Spring controller or WebSocket config) for further assist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line-break/>You are correct: your application has two different chat systems, each with its own routing and message handling. Here’s what’s happening:</text:p>
      <text:list text:style-name="L3">
        <text:list-item>
          <text:p text:style-name="P21"><text:span text:style-name="T1">The "groups chat" feature (your current file) expects to send messages to </text:span><text:span text:style-name="Source_20_Text"><text:span text:style-name="T4">/app/chat/{roomName}</text:span></text:span><text:span text:style-name="T1"> and receive them from </text:span><text:span text:style-name="Source_20_Text"><text:span text:style-name="T4">/topic/rooms/{roomName}</text:span></text:span><text:span text:style-name="T1">.</text:span></text:p>
        </text:list-item>
        <text:list-item>
          <text:p text:style-name="P22"><text:span text:style-name="T1">The other chat (the "websockets chat component") sends to </text:span><text:a xlink:type="simple" xlink:href="vscode-file://vscode-app/home/ahanys/Desktop/VSCode-linux-x64/resources/app/out/vs/code/electron-browser/workbench/workbench.html" text:style-name="Internet_20_link" text:visited-style-name="Visited_20_Internet_20_Link"><text:span text:style-name="T3">/app/send-log</text:span></text:a><text:span text:style-name="T1"> and receives from </text:span><text:span text:style-name="Source_20_Text"><text:span text:style-name="T4">/topic/logs</text:span></text:span><text:span text:style-name="T1">, handled by a </text:span><text:a xlink:type="simple" xlink:href="vscode-file://vscode-app/home/ahanys/Desktop/VSCode-linux-x64/resources/app/out/vs/code/electron-browser/workbench/workbench.html" text:style-name="Internet_20_link" text:visited-style-name="Visited_20_Internet_20_Link"><text:span text:style-name="T3">LogController</text:span></text:a><text:span text:style-name="T1">.</text:span></text:p>
        </text:list-item>
      </text:list>
      <text:p text:style-name="P1">From the backend code, your main group chat controller (in myapp-jpa-server and json modules) is set up to:</text:p>
      <text:list text:style-name="L4">
        <text:list-item>
          <text:p text:style-name="P23"><text:span text:style-name="T1">Accept messages at </text:span><text:a xlink:type="simple" xlink:href="vscode-file://vscode-app/home/ahanys/Desktop/VSCode-linux-x64/resources/app/out/vs/code/electron-browser/workbench/workbench.html" text:style-name="Internet_20_link" text:visited-style-name="Visited_20_Internet_20_Link"><text:span text:style-name="T3">/app/chat/{room}</text:span></text:a><text:span text:style-name="T1"> (via </text:span><text:a xlink:type="simple" xlink:href="vscode-file://vscode-app/home/ahanys/Desktop/VSCode-linux-x64/resources/app/out/vs/code/electron-browser/workbench/workbench.html" text:style-name="Internet_20_link" text:visited-style-name="Visited_20_Internet_20_Link"><text:span text:style-name="T3">@MessageMapping("/chat/{room}")</text:span></text:a><text:span text:style-name="T1">)</text:span></text:p>
        </text:list-item>
        <text:list-item>
          <text:p text:style-name="P23"><text:span text:style-name="T1">Broadcast to </text:span><text:a xlink:type="simple" xlink:href="vscode-file://vscode-app/home/ahanys/Desktop/VSCode-linux-x64/resources/app/out/vs/code/electron-browser/workbench/workbench.html" text:style-name="Internet_20_link" text:visited-style-name="Visited_20_Internet_20_Link"><text:span text:style-name="T3">/topic/rooms/{room}</text:span></text:a></text:p>
        </text:list-item>
      </text:list>
      <text:p text:style-name="P27"><text:soft-page-break/><text:span text:style-name="T1">But your LogController (in both myapp-jpa-server and myapp-mongo-server) is only for </text:span><text:a xlink:type="simple" xlink:href="vscode-file://vscode-app/home/ahanys/Desktop/VSCode-linux-x64/resources/app/out/vs/code/electron-browser/workbench/workbench.html" text:style-name="Internet_20_link" text:visited-style-name="Visited_20_Internet_20_Link"><text:span text:style-name="T2">/app/send-log</text:span></text:a><text:span text:style-name="T1"> → </text:span><text:span text:style-name="Source_20_Text"><text:span text:style-name="T4">/topic/logs</text:span></text:span><text:span text:style-name="T1"> and is unrelated to group chat.</text:span></text:p>
      <text:p text:style-name="P28"><text:span text:style-name="Strong_20_Emphasis"><text:span text:style-name="T1">If users in the "groups chat" cannot see each other's messages, but the connection works:</text:span></text:span></text:p>
      <text:list text:style-name="L5">
        <text:list-item>
          <text:p text:style-name="P9">Make sure all users are connected to the same backend (not split between JPA and Mongo servers).</text:p>
        </text:list-item>
        <text:list-item>
          <text:p text:style-name="P24"><text:span text:style-name="T1">Make sure all users are subscribing to </text:span><text:span text:style-name="Source_20_Text"><text:span text:style-name="T4">/topic/rooms/{roomName}</text:span></text:span><text:span text:style-name="T1"> (which your Angular code does).</text:span></text:p>
        </text:list-item>
        <text:list-item>
          <text:p text:style-name="P25"><text:span text:style-name="T1">Make sure the backend is not running multiple </text:span><text:a xlink:type="simple" xlink:href="vscode-file://vscode-app/home/ahanys/Desktop/VSCode-linux-x64/resources/app/out/vs/code/electron-browser/workbench/workbench.html" text:style-name="Internet_20_link" text:visited-style-name="Visited_20_Internet_20_Link"><text:span text:style-name="T3">@EnableWebSocketMessageBroker</text:span></text:a><text:span text:style-name="T1"> configs (see the comment in ChatWebSocketConfig.java: having more than one can break message routing).</text:span></text:p>
        </text:list-item>
        <text:list-item>
          <text:p text:style-name="P24"><text:span text:style-name="T1">Make sure the backend is not only running the LogController (which only handles </text:span><text:span text:style-name="Source_20_Text"><text:span text:style-name="T4">/topic/logs</text:span></text:span><text:span text:style-name="T1">).</text:span></text:p>
        </text:list-item>
      </text:list>
      <text:p text:style-name="P28"><text:span text:style-name="Strong_20_Emphasis"><text:span text:style-name="T1">What to check/fix:</text:span></text:span></text:p>
      <text:list text:style-name="L6">
        <text:list-item>
          <text:p text:style-name="P26"><text:span text:style-name="T1">Only one </text:span><text:a xlink:type="simple" xlink:href="vscode-file://vscode-app/home/ahanys/Desktop/VSCode-linux-x64/resources/app/out/vs/code/electron-browser/workbench/workbench.html" text:style-name="Internet_20_link" text:visited-style-name="Visited_20_Internet_20_Link"><text:span text:style-name="T3">@EnableWebSocketMessageBroker</text:span></text:a><text:span text:style-name="T1"> config should be active in the backend server you are running.</text:span></text:p>
        </text:list-item>
        <text:list-item>
          <text:p text:style-name="P26"><text:span text:style-name="T1">The backend you are running must have the </text:span><text:a xlink:type="simple" xlink:href="vscode-file://vscode-app/home/ahanys/Desktop/VSCode-linux-x64/resources/app/out/vs/code/electron-browser/workbench/workbench.html" text:style-name="Internet_20_link" text:visited-style-name="Visited_20_Internet_20_Link"><text:span text:style-name="T3">ChatController</text:span></text:a><text:span text:style-name="T1"> (with </text:span><text:a xlink:type="simple" xlink:href="vscode-file://vscode-app/home/ahanys/Desktop/VSCode-linux-x64/resources/app/out/vs/code/electron-browser/workbench/workbench.html" text:style-name="Internet_20_link" text:visited-style-name="Visited_20_Internet_20_Link"><text:span text:style-name="T3">/app/chat/{room}</text:span></text:a><text:span text:style-name="T1"> and </text:span><text:a xlink:type="simple" xlink:href="vscode-file://vscode-app/home/ahanys/Desktop/VSCode-linux-x64/resources/app/out/vs/code/electron-browser/workbench/workbench.html" text:style-name="Internet_20_link" text:visited-style-name="Visited_20_Internet_20_Link"><text:span text:style-name="T3">/topic/rooms/{room}</text:span></text:a><text:span text:style-name="T1">) enabled and not just the LogController.</text:span></text:p>
        </text:list-item>
        <text:list-item>
          <text:p text:style-name="P10">All clients must connect to the same backend and subscribe to the same topic.</text:p>
        </text:list-item>
      </text:list>
      <text:p text:style-name="P29"><text:span text:style-name="Strong_20_Emphasis"><text:span text:style-name="T1">Summary:</text:span></text:span><text:span text:style-name="T1"><text:line-break/>Your "groups chat" is correctly set up to use </text:span><text:a xlink:type="simple" xlink:href="vscode-file://vscode-app/home/ahanys/Desktop/VSCode-linux-x64/resources/app/out/vs/code/electron-browser/workbench/workbench.html" text:style-name="Internet_20_link" text:visited-style-name="Visited_20_Internet_20_Link"><text:span text:style-name="T2">/app/chat/{room}</text:span></text:a><text:span text:style-name="T1"> and </text:span><text:a xlink:type="simple" xlink:href="vscode-file://vscode-app/home/ahanys/Desktop/VSCode-linux-x64/resources/app/out/vs/code/electron-browser/workbench/workbench.html" text:style-name="Internet_20_link" text:visited-style-name="Visited_20_Internet_20_Link"><text:span text:style-name="T2">/topic/rooms/{room}</text:span></text:a><text:span text:style-name="T1">. If users do not see each other's messages, the backend may be misconfigured (wrong controller, multiple brokers, or running the wrong server).<text:line-break/>You should run only the backend with the correct </text:span><text:a xlink:type="simple" xlink:href="vscode-file://vscode-app/home/ahanys/Desktop/VSCode-linux-x64/resources/app/out/vs/code/electron-browser/workbench/workbench.html" text:style-name="Internet_20_link" text:visited-style-name="Visited_20_Internet_20_Link"><text:span text:style-name="T2">ChatController</text:span></text:a><text:span text:style-name="T1"> and a single WebSocket config.</text:span></text:p>
      <text:p text:style-name="P2">Would you like help identifying which backend is running or how to disable the extra WebSocket config?</text:p>
      <text:list text:style-name="L7">
        <text:list-item>
          <text:p text:style-name="P30"/>
        </text:list-item>
      </text:list>
      <text:p text:style-name="P20">GPT-4.1 • 0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reat, since you are running the myapp-jpa-server backend, here’s what you need to ensure for group chat to work:</text:p>
      <text:p text:style-name="Standard"/>
      <text:p text:style-name="Standard">Only one WebSocket config should be active. The file ChatWebSocketConfig.java is marked as @Deprecated and intentionally inert, so only WebSocketConfig.java should be active.</text:p>
      <text:p text:style-name="Standard">The ChatController in myapp-jpa-server is set up correctly: it receives messages at /app/chat/{room} and broadcasts to /topic/rooms/{room}.</text:p>
      <text:p text:style-name="Standard">Your Angular client is subscribing to /topic/rooms/{roomName} and sending to /app/chat/{roomName}, which matches the backend.</text:p>
      <text:p text:style-name="Standard">If users still cannot see each other's messages:</text:p>
      <text:p text:style-name="Standard"/>
      <text:p text:style-name="Standard">Make sure the backend is not running the LogController as the only active chat controller (LogController only handles /topic/logs, not group chat).</text:p>
      <text:p text:style-name="Standard">Make sure the ChatController is enabled and not excluded from the build or configuration.</text:p>
      <text:p text:style-name="Standard">Check backend logs for message receipt and broadcast (look for "Broadcasting to <text:soft-page-break/>/topic/rooms/{room}" in logs).</text:p>
      <text:p text:style-name="Standard">If you want, I can help you check if ChatController is enabled and LogController is not interfering. Would you like to see how to verify this in your backend code or logs?</text:p>
      <text:p text:style-name="Standard"/>
      <text:p text:style-name="Standard"/>
      <text:p text:style-name="Standard"/>
      <text:p text:style-name="Standard"/>
      <text:p text:style-name="Standard"/>
      <text:p text:style-name="Standard"/>
      <text:p text:style-name="Standard"/>
      <text:p text:style-name="P1"><text:line-break/>Your backend (myapp-jpa-server) has both ChatController and LogController enabled:</text:p>
      <text:list text:style-name="L8">
        <text:list-item>
          <text:p text:style-name="P11">ChatController handles group chat: receives at /app/chat/{room}, broadcasts to /topic/rooms/{room}.</text:p>
        </text:list-item>
        <text:list-item>
          <text:p text:style-name="P12">LogController handles log chat: receives at /app/send-log, broadcasts to /topic/logs.</text:p>
        </text:list-item>
      </text:list>
      <text:p text:style-name="P1">This is correct and will not cause conflicts as long as your clients use the right endpoints.</text:p>
      <text:p text:style-name="P28"><text:span text:style-name="Strong_20_Emphasis"><text:span text:style-name="T1">To verify ChatController is working:</text:span></text:span></text:p>
      <text:list text:style-name="L9">
        <text:list-item>
          <text:p text:style-name="P13">Make sure your Angular group chat client sends messages to /app/chat/{roomName} and subscribes to /topic/rooms/{roomName} (which it does).</text:p>
        </text:list-item>
        <text:list-item>
          <text:p text:style-name="P14">Check backend logs for "Chat receive" and "Broadcasting to /topic/rooms/{room}" when you send a message.</text:p>
        </text:list-item>
      </text:list>
      <text:p text:style-name="P28"><text:span text:style-name="Strong_20_Emphasis"><text:span text:style-name="T1">If you do not see these logs or messages:</text:span></text:span></text:p>
      <text:list text:style-name="L10">
        <text:list-item>
          <text:p text:style-name="P15">The ChatController may not be receiving messages (possible frontend/backend mismatch).</text:p>
        </text:list-item>
        <text:list-item>
          <text:p text:style-name="P16">The frontend may be sending to the wrong endpoint (e.g., /app/send-log instead of /app/chat/{roomName}).</text:p>
        </text:list-item>
      </text:list>
      <text:p text:style-name="P28"><text:span text:style-name="Strong_20_Emphasis"><text:span text:style-name="T1">Action steps:</text:span></text:span></text:p>
      <text:list text:style-name="L11">
        <text:list-item>
          <text:p text:style-name="P17">Open backend logs and send a message from the group chat client.</text:p>
        </text:list-item>
        <text:list-item>
          <text:p text:style-name="P18">Look for log lines like: "Chat receive: room=..., sender=..., type=..., content=..." and "Broadcasting to /topic/rooms/..."</text:p>
        </text:list-item>
        <text:list-item>
          <text:p text:style-name="P18">If you see these, the backend is working. If not, the frontend may be sending to the wrong endpoint.</text:p>
        </text:list-item>
      </text:list>
      <text:p text:style-name="P19">Would you like instructions to chec</text:p>
      <text:p text:style-name="P19">k your frontend message sending, or help with backend log analysis?</text:p>
      <text:list text:style-name="L12">
        <text:list-item>
          <text:p text:style-name="P31"/>
        </text:list-item>
      </text:list>
      <text:p text:style-name="P20">GPT-4.1 • 0x</text:p>
      <text:p text:style-name="Standard"/>
      <text:p text:style-name="Standard"/>
      <text:p text:style-name="Standard"/>
      <text:p text:style-name="Standard"/>
      <text:p text:style-name="Standard">User: Now connecting to the group works, but still users cannot see the messages of other users.</text:p>
      <text:p text:style-name="Standard"/>
      <text:p text:style-name="Standard">GitHub Copilot: If users can connect to the group but cannot see messages from other users, the issue is likely on the backend (server) side, not in the Angular client code you provided. The client is subscribing to the correct topic and sending messages as expected.</text:p>
      <text:p text:style-name="Standard"/>
      <text:p text:style-name="Standard">Here are the most common causes for this issue:</text:p>
      <text:p text:style-name="Standard"><text:soft-page-break/></text:p>
      <text:p text:style-name="Standard">1. The backend is not broadcasting messages to the correct topic (e.g., /topic/rooms/{roomName}).</text:p>
      <text:p text:style-name="Standard">2. The backend is not configured to relay messages sent to /app/chat/{roomName} to the correct topic.</text:p>
      <text:p text:style-name="Standard">3. There is a CORS or WebSocket configuration issue on the backend.</text:p>
      <text:p text:style-name="Standard">4. The backend is not persisting or forwarding messages to all subscribers.</text:p>
      <text:p text:style-name="Standard"/>
      <text:p text:style-name="Standard">To debug:</text:p>
      <text:p text:style-name="Standard"/>
      <text:p text:style-name="Standard">- Check the backend controller or message handler for /app/chat/{roomName}. It should use @MessageMapping and @SendTo or messagingTemplate.convertAndSend to /topic/rooms/{roomName}.</text:p>
      <text:p text:style-name="Standard">- Ensure the backend logs show messages being received and sent to the topic.</text:p>
      <text:p text:style-name="Standard">- Make sure the STOMP/WebSocket configuration allows broadcasting to all clients.</text:p>
      <text:p text:style-name="Standard"/>
      <text:p text:style-name="Standard">If you want, I can help you review your backend WebSocket/STOMP configuration and controller code. Please provide the relevant backend code (Java Spring controller or WebSocket config) for further assistance.</text:p>
      <text:p text:style-name="Standard"/>
      <text:p text:style-name="Standard">User: possible problem might be in that I have 2 chats in my sample application and routing of mesages could be wrong. Can you look at it?</text:p>
      <text:p text:style-name="Standard"/>
      <text:p text:style-name="Standard">GitHub Copilot: Searched codebase for "WebSocket, STOMP, chat, message mapping, @MessageMapping, /app/chat, /topic/rooms, controller, chat routing", 29 results</text:p>
      <text:p text:style-name="Standard"/>
      <text:p text:style-name="Standard">You are correct: your application has two different chat systems, each with its own routing and message handling. Here’s what’s happening:</text:p>
      <text:p text:style-name="Standard"/>
      <text:p text:style-name="Standard">- The "groups chat" feature (your current file) expects to send messages to `/app/chat/{roomName}` and receive them from `/topic/rooms/{roomName}`.</text:p>
      <text:p text:style-name="Standard">- The other chat (the "websockets chat component") sends to `/app/send-log` and receives from `/topic/logs`, handled by a `LogController`.</text:p>
      <text:p text:style-name="Standard"/>
      <text:p text:style-name="Standard">From the backend code, your main group chat controller (in myapp-jpa-server and json modules) is set up to:</text:p>
      <text:p text:style-name="Standard">- Accept messages at `/app/chat/{room}` (via `@MessageMapping("/chat/{room}")`)</text:p>
      <text:p text:style-name="Standard">- Broadcast to `/topic/rooms/{room}`</text:p>
      <text:p text:style-name="Standard"/>
      <text:p text:style-name="Standard">But your LogController (in both myapp-jpa-server and myapp-mongo-server) is only for `/app/send-log` → `/topic/logs` and is unrelated to group chat.</text:p>
      <text:p text:style-name="Standard"/>
      <text:p text:style-name="Standard">**If users in the "groups chat" cannot see each other's messages, but the connection works:**</text:p>
      <text:p text:style-name="Standard">- Make sure all users are connected to the same backend (not split between JPA and Mongo servers).</text:p>
      <text:p text:style-name="Standard">- Make sure all users are subscribing to `/topic/rooms/{roomName}` (which your Angular code does).</text:p>
      <text:p text:style-name="Standard">- Make sure the backend is not running multiple `@EnableWebSocketMessageBroker` configs (see the comment in ChatWebSocketConfig.java: having more than one can break message routing).</text:p>
      <text:p text:style-name="Standard">- Make sure the backend is not only running the LogController (which only handles `/topic/logs`).</text:p>
      <text:p text:style-name="Standard"/>
      <text:p text:style-name="Standard">**What to check/fix:**</text:p>
      <text:p text:style-name="Standard">1. Only one `@EnableWebSocketMessageBroker` config should be active in the backend server <text:soft-page-break/>you are running.</text:p>
      <text:p text:style-name="Standard">2. The backend you are running must have the `ChatController` (with `/app/chat/{room}` and `/topic/rooms/{room}`) enabled and not just the LogController.</text:p>
      <text:p text:style-name="Standard">3. All clients must connect to the same backend and subscribe to the same topic.</text:p>
      <text:p text:style-name="Standard"/>
      <text:p text:style-name="Standard">**Summary:** <text:s/></text:p>
      <text:p text:style-name="Standard">Your "groups chat" is correctly set up to use `/app/chat/{room}` and `/topic/rooms/{room}`. If users do not see each other's messages, the backend may be misconfigured (wrong controller, multiple brokers, or running the wrong server). <text:s/></text:p>
      <text:p text:style-name="Standard">You should run only the backend with the correct `ChatController` and a single WebSocket config.</text:p>
      <text:p text:style-name="Standard"/>
      <text:p text:style-name="Standard">Would you like help identifying which backend is running or how to disable the extra WebSocket config?</text:p>
      <text:p text:style-name="Standard"/>
      <text:p text:style-name="Standard">User: Backend which I run is myapp-jpa-server.</text:p>
      <text:p text:style-name="Standard"/>
      <text:p text:style-name="Standard">GitHub Copilot: Great, since you are running the myapp-jpa-server backend, here’s what you need to ensure for group chat to work:</text:p>
      <text:p text:style-name="Standard"/>
      <text:p text:style-name="Standard">1. Only one WebSocket config should be active. The file ChatWebSocketConfig.java is marked as @Deprecated and intentionally inert, so only WebSocketConfig.java should be active.</text:p>
      <text:p text:style-name="Standard">2. The ChatController in myapp-jpa-server is set up correctly: it receives messages at /app/chat/{room} and broadcasts to /topic/rooms/{room}.</text:p>
      <text:p text:style-name="Standard">3. Your Angular client is subscribing to /topic/rooms/{roomName} and sending to /app/chat/{roomName}, which matches the backend.</text:p>
      <text:p text:style-name="Standard"/>
      <text:p text:style-name="Standard">If users still cannot see each other's messages:</text:p>
      <text:p text:style-name="Standard">- Make sure the backend is not running the LogController as the only active chat controller (LogController only handles /topic/logs, not group chat).</text:p>
      <text:p text:style-name="Standard">- Make sure the ChatController is enabled and not excluded from the build or configuration.</text:p>
      <text:p text:style-name="Standard">- Check backend logs for message receipt and broadcast (look for "Broadcasting to /topic/rooms/{room}" in logs).</text:p>
      <text:p text:style-name="Standard"/>
      <text:p text:style-name="Standard">If you want, I can help you check if ChatController is enabled and LogController is not interfering. Would you like to see how to verify this in your backend code or logs?</text:p>
      <text:p text:style-name="Standard"/>
      <text:p text:style-name="Standard">User: yes</text:p>
      <text:p text:style-name="Standard"/>
      <text:p text:style-name="Standard">GitHub Copilot: Searched for regex `@Controller|@RestController|@MessageMapping|@SendTo` (`**/myapp-jpa-server/src/main/java/**`), 12 results</text:p>
      <text:p text:style-name="Standard"/>
      <text:p text:style-name="Standard">Read [](file:///home/ahanys/Desktop/DATATABLES/datatables/myapp-jpa-server/src/main/java/com/angular/backend/chat/ChatController.java#1-1), lines 1 to 80</text:p>
      <text:p text:style-name="Standard"/>
      <text:p text:style-name="Standard">Read [](file:///home/ahanys/Desktop/DATATABLES/datatables/myapp-jpa-server/src/main/java/com/angular/backend/employees/LogController.java)</text:p>
      <text:p text:style-name="Standard"/>
      <text:p text:style-name="Standard">Your backend (myapp-jpa-server) has both ChatController and LogController enabled:</text:p>
      <text:p text:style-name="Standard"/>
      <text:p text:style-name="Standard">- ChatController handles group chat: receives at /app/chat/{room}, broadcasts to /topic/rooms/{room}.</text:p>
      <text:p text:style-name="Standard">- LogController handles log chat: receives at /app/send-log, broadcasts to /topic/logs.</text:p>
      <text:p text:style-name="Standard"><text:soft-page-break/></text:p>
      <text:p text:style-name="Standard">This is correct and will not cause conflicts as long as your clients use the right endpoints.</text:p>
      <text:p text:style-name="Standard"/>
      <text:p text:style-name="Standard">**To verify ChatController is working:**</text:p>
      <text:p text:style-name="Standard">- Make sure your Angular group chat client sends messages to /app/chat/{roomName} and subscribes to /topic/rooms/{roomName} (which it does).</text:p>
      <text:p text:style-name="Standard">- Check backend logs for "Chat receive" and "Broadcasting to /topic/rooms/{room}" when you send a message.</text:p>
      <text:p text:style-name="Standard"/>
      <text:p text:style-name="Standard">**If you do not see these logs or messages:**</text:p>
      <text:p text:style-name="Standard">- The ChatController may not be receiving messages (possible frontend/backend mismatch).</text:p>
      <text:p text:style-name="Standard">- The frontend may be sending to the wrong endpoint (e.g., /app/send-log instead of /app/chat/{roomName}).</text:p>
      <text:p text:style-name="Standard"/>
      <text:p text:style-name="Standard">**Action steps:**</text:p>
      <text:p text:style-name="Standard">- Open backend logs and send a message from the group chat client.</text:p>
      <text:p text:style-name="Standard">- Look for log lines like: "Chat receive: room=..., sender=..., type=..., content=..." and "Broadcasting to /topic/rooms/..."</text:p>
      <text:p text:style-name="Standard">- If you see these, the backend is working. If not, the frontend may be sending to the wrong endpoint.</text:p>
      <text:p text:style-name="Standard"/>
      <text:p text:style-name="Standard">Would you like instructions to check your frontend message sending, or help with backend log analys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find myapp-jpa-server/src/main/resources -name "application.properties"</text:p>
      <text:p text:style-name="Standard"><text:s/>Enable shell integration to improve command detection</text:p>
      <text:p text:style-name="Standard"/>
      <text:p text:style-name="Standard">Analyzed RabbitMQ setup and message routing</text:p>
      <text:p text:style-name="Standard">I have analyzed your backend code and found a significant issue that likely causes confusion and potential message duplication, although the "no messages seen" issue might heavily depend on your RabbitMQ environment.</text:p>
      <text:p text:style-name="Standard"/>
      <text:p text:style-name="Standard">The Problem: Duplicate &amp; Conflicting Message Routing</text:p>
      <text:p text:style-name="Standard">You have two components attempting to handle and broadcast the same chat messages:</text:p>
      <text:p text:style-name="Standard"/>
      <text:p text:style-name="Standard">ChatController: This is the correct, standard implementation. It receives messages at /app/chat/{room}, persists them, and broadcasts to /topic/rooms/{room}.</text:p>
      <text:p text:style-name="Standard">ChatInboundProcessor (invoked by StompLoggingConfig): This is an interceptor that also manually deserializes, persists, and broadcasts the same messages.</text:p>
      <text:p text:style-name="Standard">This double processing is bad practice and can lead to race conditions or duplicate messages on the client. I will disable the processing logic in ChatInboundProcessor so that only ChatController handles the messages.</text:p>
      <text:p text:style-name="Standard"/>
      <text:p text:style-name="Standard">Fixing the Backend Code</text:p>
      <text:p text:style-name="Standard"/>
      <text:p text:style-name="Standard">I will modify ChatInboundProcessor.java to stop it from processing/broadcasting messages, making it purely an optional logger or inert.</text:p>
      <text:p text:style-name="Standard"/>
      <text:p text:style-name="Standard">Edited</text:p>
      <text:p text:style-name="Standard">ChatInboundProcessor.java+6-5</text:p>
      <text:p text:style-name="Standard">The issue is that your backend has duplicate message handling logic, which is likely causing confusion or overriding behavior.</text:p>
      <text:p text:style-name="Standard">Specifically, ChatInboundProcessor (triggered by an interceptor in StompLoggingConfig) performs the same actions as ChatController—persisting messages and broadcasting them. This results in double processing and potential race conditions.</text:p>
      <text:p text:style-name="Standard"/>
      <text:p text:style-name="Standard">I have disabled the duplicate logic in ChatInboundProcessor.java so that it only logs the message but does not persist or broadcast it. Now, only ChatController will be responsible for handling the chat logic.</text:p>
      <text:p text:style-name="Standard"/>
      <text:p text:style-name="Standard">Steps to verify the fix:</text:p>
      <text:p text:style-name="Standard"/>
      <text:p text:style-name="Standard">Restart your myapp-jpa-server.</text:p>
      <text:p text:style-name="Standard">Connect two users to the group chat.</text:p>
      <text:p text:style-name="Standard">Send a message.</text:p>
      <text:p text:style-name="Standard">Check the backend logs. You should see "Chat receive: ..." from ChatController and "Broadcasting to /topic/rooms/...".</text:p>
      <text:p text:style-name="Standard">Verify on the client if messages appear.</text:p>
      <text:p text:style-name="Standard">If messages are still not appearing:</text:p>
      <text:p text:style-name="Standard"/>
      <text:p text:style-name="Standard">Ensure that RabbitMQ is running (if you are using the default configuration which points to localhost RabbitMQ).</text:p>
      <text:p text:style-name="Standard">If RabbitMQ is NOT running or needed, ensure application.properties does not configure spring.rabbitmq.host, so it falls back to the in-memory SimpleBroker. All clients must be connected <text:soft-page-break/>to the same server instance if using in-memory broker.</text:p>
      <text:p text:style-name="Standard">Gemini 3 Pro (Preview) • 1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Liberation Mono', 'DejaVu Sans Mono', 'Courier New', monospace"/>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12T19:03:16.030227834</dc:date>
    <meta:editing-duration>PT4M29S</meta:editing-duration>
    <meta:editing-cycles>1</meta:editing-cycles>
    <meta:document-statistic meta:table-count="0" meta:image-count="0" meta:object-count="0" meta:page-count="8" meta:paragraph-count="147" meta:word-count="2158" meta:character-count="14913" meta:non-whitespace-character-count="12922"/>
    <meta:generator>LibreOffice/24.2.7.2$Linux_X86_64 LibreOffice_project/420$Build-2</meta:generator>
  </office:meta>
</office:document-meta>
</file>