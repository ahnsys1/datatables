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650000049116AFD0DE.png" manifest:media-type="image/png"/>
  <manifest:file-entry manifest:full-path="Pictures/10000001000007740000049179F2953A.png" manifest:media-type="image/png"/>
  <manifest:file-entry manifest:full-path="Pictures/10000001000007800000049129B0DCA8.png" manifest:media-type="image/png"/>
  <manifest:file-entry manifest:full-path="Pictures/10000001000007800000049117582E66.png" manifest:media-type="image/png"/>
  <manifest:file-entry manifest:full-path="Pictures/100000010000078000000491ABBEFE99.png" manifest:media-type="image/png"/>
  <manifest:file-entry manifest:full-path="Pictures/100000010000078000000491B53DBFB6.png" manifest:media-type="image/png"/>
  <manifest:file-entry manifest:full-path="Pictures/100000010000078000000491EA532244.png" manifest:media-type="image/png"/>
  <manifest:file-entry manifest:full-path="Pictures/1000000100000780000003F28D6F220B.png" manifest:media-type="image/png"/>
  <manifest:file-entry manifest:full-path="Pictures/1000000000000780000004B0AB6A0EEF.png" manifest:media-type="image/png"/>
  <manifest:file-entry manifest:full-path="Pictures/1000000000000780000004B041A6C67F.png" manifest:media-type="image/png"/>
  <manifest:file-entry manifest:full-path="Pictures/1000000000000780000004B0EA18059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handas" svg:font-family="Chandas" style:font-pitch="variable"/>
    <style:font-face style:name="Droid Sans Mono" svg:font-family="'Droid Sans Mono', monospace, monospac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ystem-ui, sans-serif"/>
    <style:font-face style:name="Roboto Mono" svg:font-family="'Roboto Mono', 'Droid Sans Mono', monospace, monospace"/>
    <style:font-face style:name="Roboto Mono1" svg:font-family="'Roboto Mono', Menlo, Courier, monospace"/>
    <style:font-face style:name="Roboto Mono2" svg:font-family="'Roboto Mono', monospace"/>
    <style:font-face style:name="Roboto Mono3" svg:font-family="'Roboto Mono', ui-monospace, monospace"/>
    <style:font-face style:name="SFMono-Regular" svg:font-family="SFMono-Regular, Menlo, Monaco, Consolas, 'Liberation Mono', 'Courier New', monospace"/>
    <style:font-face style:name="Times New Roman" svg:font-family="'Times New Roman'"/>
    <style:font-face style:name="WarpMono" svg:font-family="WarpMono, 'WarpMono Fallback'"/>
    <style:font-face style:name="inherit" svg:font-family="inherit"/>
    <style:font-face style:name="system-ui" svg:font-family="system-ui, Ubuntu, 'Droid Sans', sans-serif"/>
    <style:font-face style:name="ui-monospace" svg:font-family="ui-monospace, 'Cascadia Mono', 'Segoe UI Mono', 'Liberation Mono', Menlo, Monaco, Consolas, monospace"/>
  </office:font-face-decls>
  <office:automatic-styles>
    <style:style style:name="Table1" style:family="table">
      <style:table-properties style:width="1.5868in" table:align="left"/>
    </style:style>
    <style:style style:name="Table1.A" style:family="table-column">
      <style:table-column-properties style:column-width="1.5868in"/>
    </style:style>
    <style:style style:name="Table1.A1" style:family="table-cell">
      <style:table-cell-properties style:vertical-align="middle" fo:padding="0in" fo:border="none"/>
    </style:style>
    <style:style style:name="Table2" style:family="table">
      <style:table-properties style:width="1.9479in" table:align="left"/>
    </style:style>
    <style:style style:name="Table2.A" style:family="table-column">
      <style:table-column-properties style:column-width="1.9479in"/>
    </style:style>
    <style:style style:name="Table2.A1" style:family="table-cell">
      <style:table-cell-properties style:vertical-align="middle" fo:padding="0in" fo:border="none"/>
    </style:style>
    <style:style style:name="P1" style:family="paragraph" style:parent-style-name="Standard">
      <style:paragraph-properties fo:text-align="start" style:justify-single-word="false"/>
      <style:text-properties fo:color="#ff860d" loext:opacity="100%" fo:font-size="26pt" officeooo:rsid="000413f4" officeooo:paragraph-rsid="000413f4" style:font-size-asian="26pt" style:font-size-complex="26pt"/>
    </style:style>
    <style:style style:name="P2" style:family="paragraph" style:parent-style-name="Preformatted_20_Text">
      <style:paragraph-properties fo:text-align="start" style:justify-single-word="false"/>
      <style:text-properties fo:color="#ff860d" loext:opacity="100%" fo:font-size="26pt" officeooo:rsid="000413f4" officeooo:paragraph-rsid="000413f4" style:font-size-asian="26pt" style:font-size-complex="26pt"/>
    </style:style>
    <style:style style:name="P3" style:family="paragraph" style:parent-style-name="Standard">
      <style:paragraph-properties fo:text-align="start" style:justify-single-word="false"/>
      <style:text-properties fo:color="#ff860d" loext:opacity="100%" fo:font-size="26pt" officeooo:rsid="0005e77b" officeooo:paragraph-rsid="0005e77b" style:font-size-asian="26pt" style:font-size-complex="26pt"/>
    </style:style>
    <style:style style:name="P4" style:family="paragraph" style:parent-style-name="Standard">
      <style:paragraph-properties fo:text-align="start" style:justify-single-word="false"/>
      <style:text-properties fo:color="#ff860d" loext:opacity="100%" fo:font-size="26pt" officeooo:rsid="0005e77b" officeooo:paragraph-rsid="0022cf70" style:font-size-asian="26pt" style:font-size-complex="26pt"/>
    </style:style>
    <style:style style:name="P5" style:family="paragraph" style:parent-style-name="Text_20_body">
      <style:paragraph-properties fo:text-align="start" style:justify-single-word="false"/>
      <style:text-properties fo:color="#ff860d" loext:opacity="100%" fo:font-size="26pt" officeooo:rsid="0005e77b" officeooo:paragraph-rsid="0003a816" style:font-size-asian="26pt" style:font-size-complex="26pt"/>
    </style:style>
    <style:style style:name="P6" style:family="paragraph" style:parent-style-name="Preformatted_20_Text">
      <style:paragraph-properties fo:text-align="start" style:justify-single-word="false"/>
      <style:text-properties fo:color="#ff860d" loext:opacity="100%" fo:font-size="26pt" fo:font-weight="bold" officeooo:rsid="0018436f" officeooo:paragraph-rsid="0018436f" style:font-size-asian="26pt" style:font-weight-asian="bold" style:font-size-complex="26pt" style:font-weight-complex="bold"/>
    </style:style>
    <style:style style:name="P7" style:family="paragraph" style:parent-style-name="Preformatted_20_Text">
      <style:paragraph-properties fo:text-align="start" style:justify-single-word="false"/>
      <style:text-properties fo:color="#ff860d" loext:opacity="100%" fo:font-size="26pt" fo:font-weight="bold" officeooo:rsid="001a3402" officeooo:paragraph-rsid="001a3402" style:font-size-asian="26pt" style:font-weight-asian="bold" style:font-size-complex="26pt" style:font-weight-complex="bold"/>
    </style:style>
    <style:style style:name="P8" style:family="paragraph" style:parent-style-name="Preformatted_20_Text">
      <style:paragraph-properties fo:text-align="start" style:justify-single-word="false"/>
      <style:text-properties fo:color="#ff860d" loext:opacity="100%" fo:font-size="26pt" fo:font-weight="bold" officeooo:rsid="001a4ec9" officeooo:paragraph-rsid="001a4ec9" style:font-size-asian="26pt" style:font-weight-asian="bold" style:font-size-complex="26pt" style:font-weight-complex="bold"/>
    </style:style>
    <style:style style:name="P9" style:family="paragraph" style:parent-style-name="Preformatted_20_Text">
      <style:text-properties fo:font-size="18pt" fo:font-weight="bold" officeooo:rsid="001d9a73" officeooo:paragraph-rsid="0005e77b" style:font-size-asian="18pt" style:font-weight-asian="bold" style:font-size-complex="18pt" style:font-weight-complex="bold"/>
    </style:style>
    <style:style style:name="P10" style:family="paragraph" style:parent-style-name="Standard">
      <style:text-properties fo:font-size="18pt" fo:font-weight="bold" officeooo:rsid="001d9a73" officeooo:paragraph-rsid="0005e77b" style:font-size-asian="18pt" style:font-weight-asian="bold" style:font-size-complex="18pt" style:font-weight-complex="bold"/>
    </style:style>
    <style:style style:name="P11" style:family="paragraph" style:parent-style-name="Standard">
      <style:text-properties fo:font-size="18pt" fo:font-weight="bold" officeooo:rsid="001d9a73" officeooo:paragraph-rsid="00083680" style:font-size-asian="18pt" style:font-weight-asian="bold" style:font-size-complex="18pt" style:font-weight-complex="bold"/>
    </style:style>
    <style:style style:name="P12" style:family="paragraph" style:parent-style-name="Standard">
      <style:text-properties fo:font-size="18pt" fo:font-weight="bold" officeooo:rsid="001d9a73" officeooo:paragraph-rsid="0009fcf7" style:font-size-asian="18pt" style:font-weight-asian="bold" style:font-size-complex="18pt" style:font-weight-complex="bold"/>
    </style:style>
    <style:style style:name="P13" style:family="paragraph" style:parent-style-name="Standard">
      <style:text-properties fo:font-size="18pt" fo:font-weight="bold" officeooo:rsid="001d9a73" officeooo:paragraph-rsid="000ca821" style:font-size-asian="18pt" style:font-weight-asian="bold" style:font-size-complex="18pt" style:font-weight-complex="bold"/>
    </style:style>
    <style:style style:name="P14" style:family="paragraph" style:parent-style-name="Preformatted_20_Text">
      <style:text-properties fo:font-size="18pt" fo:font-weight="bold" officeooo:rsid="00323161" officeooo:paragraph-rsid="0005e77b" style:font-size-asian="18pt" style:font-weight-asian="bold" style:font-size-complex="18pt" style:font-weight-complex="bold"/>
    </style:style>
    <style:style style:name="P15" style:family="paragraph" style:parent-style-name="Standard">
      <style:text-properties fo:font-size="18pt" fo:font-weight="bold" officeooo:rsid="00323161" officeooo:paragraph-rsid="0005e77b" style:font-size-asian="18pt" style:font-weight-asian="bold" style:font-size-complex="18pt" style:font-weight-complex="bold"/>
    </style:style>
    <style:style style:name="P16" style:family="paragraph" style:parent-style-name="Preformatted_20_Text">
      <style:text-properties fo:font-size="18pt" fo:font-weight="bold" officeooo:rsid="006c827c" officeooo:paragraph-rsid="0005e77b" style:font-size-asian="18pt" style:font-weight-asian="bold" style:font-size-complex="18pt" style:font-weight-complex="bold"/>
    </style:style>
    <style:style style:name="P17" style:family="paragraph" style:parent-style-name="Standard">
      <style:text-properties fo:font-size="18pt" fo:font-weight="bold" officeooo:rsid="006c827c" officeooo:paragraph-rsid="0005e77b" style:font-size-asian="18pt" style:font-weight-asian="bold" style:font-size-complex="18pt" style:font-weight-complex="bold"/>
    </style:style>
    <style:style style:name="P18" style:family="paragraph" style:parent-style-name="Preformatted_20_Text">
      <style:text-properties fo:font-size="18pt" fo:font-weight="bold" officeooo:rsid="004dd0f9" officeooo:paragraph-rsid="0005e77b" style:font-size-asian="18pt" style:font-weight-asian="bold" style:font-size-complex="18pt" style:font-weight-complex="bold"/>
    </style:style>
    <style:style style:name="P19" style:family="paragraph" style:parent-style-name="Standard">
      <style:text-properties fo:font-size="18pt" fo:font-weight="bold" officeooo:rsid="004dd0f9" officeooo:paragraph-rsid="0005e77b" style:font-size-asian="18pt" style:font-weight-asian="bold" style:font-size-complex="18pt" style:font-weight-complex="bold"/>
    </style:style>
    <style:style style:name="P20" style:family="paragraph" style:parent-style-name="Standard">
      <style:text-properties fo:font-size="18pt" fo:font-weight="bold" officeooo:rsid="002a76d6" officeooo:paragraph-rsid="0005e77b" style:font-size-asian="18pt" style:font-weight-asian="bold" style:font-size-complex="18pt" style:font-weight-complex="bold"/>
    </style:style>
    <style:style style:name="P21" style:family="paragraph" style:parent-style-name="Standard">
      <style:text-properties fo:font-size="18pt" fo:font-weight="bold" officeooo:rsid="002d97af" officeooo:paragraph-rsid="0005e77b" style:font-size-asian="18pt" style:font-weight-asian="bold" style:font-size-complex="18pt" style:font-weight-complex="bold"/>
    </style:style>
    <style:style style:name="P22" style:family="paragraph" style:parent-style-name="Standard">
      <style:text-properties fo:font-size="18pt" fo:font-weight="bold" officeooo:rsid="00376ac8" officeooo:paragraph-rsid="0005e77b" style:font-size-asian="18pt" style:font-weight-asian="bold" style:font-size-complex="18pt" style:font-weight-complex="bold"/>
    </style:style>
    <style:style style:name="P23" style:family="paragraph" style:parent-style-name="Standard">
      <style:text-properties fo:font-size="18pt" fo:font-weight="bold" officeooo:rsid="003a9736" officeooo:paragraph-rsid="0005e77b" style:font-size-asian="18pt" style:font-weight-asian="bold" style:font-size-complex="18pt" style:font-weight-complex="bold"/>
    </style:style>
    <style:style style:name="P24" style:family="paragraph" style:parent-style-name="Standard">
      <style:text-properties fo:font-size="18pt" fo:font-weight="bold" officeooo:rsid="003e41ba" officeooo:paragraph-rsid="0005e77b" style:font-size-asian="18pt" style:font-weight-asian="bold" style:font-size-complex="18pt" style:font-weight-complex="bold"/>
    </style:style>
    <style:style style:name="P25" style:family="paragraph" style:parent-style-name="Text_20_body">
      <style:text-properties fo:font-size="18pt" fo:font-weight="bold" officeooo:rsid="003e41ba" officeooo:paragraph-rsid="0005e77b" style:font-size-asian="18pt" style:font-weight-asian="bold" style:font-size-complex="18pt" style:font-weight-complex="bold"/>
    </style:style>
    <style:style style:name="P26" style:family="paragraph" style:parent-style-name="Standard">
      <style:text-properties fo:font-size="18pt" fo:font-weight="bold" officeooo:rsid="00435db3" officeooo:paragraph-rsid="0005e77b" style:font-size-asian="18pt" style:font-weight-asian="bold" style:font-size-complex="18pt" style:font-weight-complex="bold"/>
    </style:style>
    <style:style style:name="P27" style:family="paragraph" style:parent-style-name="Standard">
      <style:text-properties fo:font-size="18pt" fo:font-weight="bold" officeooo:rsid="0046807f" officeooo:paragraph-rsid="0005e77b" style:font-size-asian="18pt" style:font-weight-asian="bold" style:font-size-complex="18pt" style:font-weight-complex="bold"/>
    </style:style>
    <style:style style:name="P28" style:family="paragraph" style:parent-style-name="Standard">
      <style:text-properties fo:font-size="18pt" fo:font-weight="bold" officeooo:rsid="0046807f" officeooo:paragraph-rsid="001faea8" style:font-size-asian="18pt" style:font-weight-asian="bold" style:font-size-complex="18pt" style:font-weight-complex="bold"/>
    </style:style>
    <style:style style:name="P29" style:family="paragraph" style:parent-style-name="Standard">
      <style:text-properties fo:font-size="18pt" fo:font-weight="bold" officeooo:rsid="0049b71f" officeooo:paragraph-rsid="0005e77b" style:font-size-asian="18pt" style:font-weight-asian="bold" style:font-size-complex="18pt" style:font-weight-complex="bold"/>
    </style:style>
    <style:style style:name="P30" style:family="paragraph" style:parent-style-name="Standard">
      <style:text-properties fo:font-size="18pt" fo:font-weight="bold" officeooo:rsid="00649ca7" officeooo:paragraph-rsid="0005e77b" style:font-size-asian="18pt" style:font-weight-asian="bold" style:font-size-complex="18pt" style:font-weight-complex="bold"/>
    </style:style>
    <style:style style:name="P31" style:family="paragraph" style:parent-style-name="Standard">
      <style:text-properties fo:font-size="18pt" fo:font-weight="bold" officeooo:rsid="00892204" officeooo:paragraph-rsid="0005e77b" style:font-size-asian="18pt" style:font-weight-asian="bold" style:font-size-complex="18pt" style:font-weight-complex="bold"/>
    </style:style>
    <style:style style:name="P32" style:family="paragraph" style:parent-style-name="Standard">
      <style:text-properties fo:font-size="18pt" fo:font-weight="bold" officeooo:rsid="005ad9a8" officeooo:paragraph-rsid="0005e77b" style:font-size-asian="18pt" style:font-weight-asian="bold" style:font-size-complex="18pt" style:font-weight-complex="bold"/>
    </style:style>
    <style:style style:name="P33" style:family="paragraph" style:parent-style-name="Text_20_body">
      <style:text-properties fo:font-size="18pt" fo:font-weight="bold" officeooo:rsid="005ad9a8" officeooo:paragraph-rsid="0005e77b" style:font-size-asian="18pt" style:font-weight-asian="bold" style:font-size-complex="18pt" style:font-weight-complex="bold"/>
    </style:style>
    <style:style style:name="P34" style:family="paragraph" style:parent-style-name="Standard">
      <style:text-properties fo:font-size="18pt" fo:font-weight="bold" officeooo:rsid="006e9911" officeooo:paragraph-rsid="0005e77b" style:font-size-asian="18pt" style:font-weight-asian="bold" style:font-size-complex="18pt" style:font-weight-complex="bold"/>
    </style:style>
    <style:style style:name="P35" style:family="paragraph" style:parent-style-name="Standard">
      <style:text-properties fo:font-size="18pt" fo:font-weight="bold" officeooo:rsid="00514373" officeooo:paragraph-rsid="0005e77b" style:font-size-asian="18pt" style:font-weight-asian="bold" style:font-size-complex="18pt" style:font-weight-complex="bold"/>
    </style:style>
    <style:style style:name="P36" style:family="paragraph" style:parent-style-name="Standard">
      <style:text-properties fo:font-size="18pt" fo:font-weight="bold" officeooo:rsid="0009fcf7" officeooo:paragraph-rsid="0009fcf7" style:font-size-asian="18pt" style:font-weight-asian="bold" style:font-size-complex="18pt" style:font-weight-complex="bold"/>
    </style:style>
    <style:style style:name="P37" style:family="paragraph" style:parent-style-name="Standard">
      <style:text-properties fo:font-size="18pt" fo:font-weight="bold" officeooo:rsid="0009fcf7" officeooo:paragraph-rsid="000ca821" style:font-size-asian="18pt" style:font-weight-asian="bold" style:font-size-complex="18pt" style:font-weight-complex="bold"/>
    </style:style>
    <style:style style:name="P38" style:family="paragraph" style:parent-style-name="Standard">
      <style:text-properties fo:font-size="18pt" fo:font-weight="bold" officeooo:rsid="000ca821" officeooo:paragraph-rsid="000ca821" style:font-size-asian="18pt" style:font-weight-asian="bold" style:font-size-complex="18pt" style:font-weight-complex="bold"/>
    </style:style>
    <style:style style:name="P39" style:family="paragraph" style:parent-style-name="Standard">
      <style:text-properties fo:font-size="18pt" fo:font-weight="bold" officeooo:rsid="006ef83a" officeooo:paragraph-rsid="006ef83a" style:font-size-asian="18pt" style:font-weight-asian="bold" style:font-size-complex="18pt" style:font-weight-complex="bold"/>
    </style:style>
    <style:style style:name="P40" style:family="paragraph" style:parent-style-name="Standard">
      <style:text-properties fo:font-size="18pt" fo:font-weight="bold" officeooo:rsid="008f3b43" officeooo:paragraph-rsid="008f3b43" style:font-size-asian="18pt" style:font-weight-asian="bold" style:font-size-complex="18pt" style:font-weight-complex="bold"/>
    </style:style>
    <style:style style:name="P41" style:family="paragraph" style:parent-style-name="Preformatted_20_Text">
      <style:text-properties fo:font-size="18pt" officeooo:paragraph-rsid="0005e77b" style:font-size-asian="18pt" style:font-size-complex="18pt"/>
    </style:style>
    <style:style style:name="P42" style:family="paragraph" style:parent-style-name="Preformatted_20_Text">
      <style:paragraph-properties fo:margin-top="0in" fo:margin-bottom="0.1965in" style:contextual-spacing="false"/>
      <style:text-properties fo:font-size="18pt" officeooo:paragraph-rsid="0005e77b" style:font-size-asian="18pt" style:font-size-complex="18pt"/>
    </style:style>
    <style:style style:name="P43" style:family="paragraph" style:parent-style-name="Preformatted_20_Text">
      <style:text-properties fo:color="#c9211e" loext:opacity="100%" fo:font-size="18pt" fo:font-weight="bold" officeooo:rsid="0076902e" officeooo:paragraph-rsid="0005e77b" style:font-size-asian="18pt" style:font-weight-asian="bold" style:font-size-complex="18pt" style:font-weight-complex="bold"/>
    </style:style>
    <style:style style:name="P44" style:family="paragraph" style:parent-style-name="Standard">
      <style:text-properties fo:color="#c9211e" loext:opacity="100%" fo:font-size="18pt" fo:font-weight="bold" officeooo:rsid="00514373" officeooo:paragraph-rsid="0005e77b" style:font-size-asian="18pt" style:font-weight-asian="bold" style:font-size-complex="18pt" style:font-weight-complex="bold"/>
    </style:style>
    <style:style style:name="P45" style:family="paragraph" style:parent-style-name="Standard">
      <style:text-properties fo:color="#c9211e" loext:opacity="100%" fo:font-size="18pt" fo:font-weight="bold" officeooo:rsid="0052fed7" officeooo:paragraph-rsid="0005e77b" style:font-size-asian="18pt" style:font-weight-asian="bold" style:font-size-complex="18pt" style:font-weight-complex="bold"/>
    </style:style>
    <style:style style:name="P46" style:family="paragraph" style:parent-style-name="Standard">
      <style:text-properties fo:color="#c9211e" loext:opacity="100%" fo:font-size="18pt" fo:font-weight="bold" officeooo:rsid="0074afe7" officeooo:paragraph-rsid="0005e77b" style:font-size-asian="18pt" style:font-weight-asian="bold" style:font-size-complex="18pt" style:font-weight-complex="bold"/>
    </style:style>
    <style:style style:name="P47" style:family="paragraph" style:parent-style-name="Standard">
      <style:text-properties fo:color="#c9211e" loext:opacity="100%" fo:font-size="18pt" fo:font-weight="bold" officeooo:rsid="006c827c" officeooo:paragraph-rsid="0005e77b" style:font-size-asian="18pt" style:font-weight-asian="bold" style:font-size-complex="18pt" style:font-weight-complex="bold"/>
    </style:style>
    <style:style style:name="P48" style:family="paragraph" style:parent-style-name="Standard">
      <style:text-properties fo:color="#c9211e" loext:opacity="100%" fo:font-size="18pt" fo:font-weight="bold" officeooo:rsid="0009fcf7" officeooo:paragraph-rsid="0009fcf7" style:font-size-asian="18pt" style:font-weight-asian="bold" style:font-size-complex="18pt" style:font-weight-complex="bold"/>
    </style:style>
    <style:style style:name="P49" style:family="paragraph" style:parent-style-name="Preformatted_20_Text">
      <style:text-properties fo:color="#c9211e" loext:opacity="100%" fo:font-size="20pt" fo:font-weight="bold" officeooo:rsid="009b611b" officeooo:paragraph-rsid="0005e77b" style:font-size-asian="20pt" style:font-weight-asian="bold" style:font-size-complex="20pt" style:font-weight-complex="bold"/>
    </style:style>
    <style:style style:name="P50" style:family="paragraph" style:parent-style-name="Standard">
      <style:paragraph-properties>
        <style:tab-stops>
          <style:tab-stop style:position="4.8063in"/>
        </style:tab-stops>
      </style:paragraph-properties>
      <style:text-properties fo:color="#c9211e" loext:opacity="100%" fo:font-size="20pt" officeooo:rsid="00267b7a" officeooo:paragraph-rsid="00267b7a" style:font-size-asian="20pt" style:font-size-complex="20pt"/>
    </style:style>
    <style:style style:name="P51" style:family="paragraph" style:parent-style-name="Standard">
      <style:paragraph-properties fo:text-align="center" style:justify-single-word="false"/>
      <style:text-properties fo:color="#c9211e" loext:opacity="100%" fo:font-size="26pt" officeooo:rsid="0003a816" officeooo:paragraph-rsid="0003a816" style:font-size-asian="26pt" style:font-size-complex="26pt"/>
    </style:style>
    <style:style style:name="P52" style:family="paragraph" style:parent-style-name="Standard">
      <style:paragraph-properties fo:text-align="start" style:justify-single-word="false"/>
      <style:text-properties fo:color="#c9211e" loext:opacity="100%" fo:font-size="26pt" officeooo:rsid="0003a816" officeooo:paragraph-rsid="0003a816" style:font-size-asian="26pt" style:font-size-complex="26pt"/>
    </style:style>
    <style:style style:name="P53" style:family="paragraph" style:parent-style-name="Standard">
      <style:paragraph-properties fo:text-align="start" style:justify-single-word="false"/>
      <style:text-properties fo:color="#c9211e" loext:opacity="100%" fo:font-size="26pt" officeooo:rsid="0003a816" officeooo:paragraph-rsid="0094b8a2" style:font-size-asian="26pt" style:font-size-complex="26pt"/>
    </style:style>
    <style:style style:name="P54" style:family="paragraph" style:parent-style-name="Standard">
      <style:paragraph-properties fo:text-align="start" style:justify-single-word="false"/>
      <style:text-properties fo:color="#c9211e" loext:opacity="100%" fo:font-size="26pt" officeooo:rsid="00462dd1" officeooo:paragraph-rsid="00462dd1" style:font-size-asian="26pt" style:font-size-complex="26pt"/>
    </style:style>
    <style:style style:name="P55" style:family="paragraph" style:parent-style-name="Standard">
      <style:paragraph-properties fo:text-align="center" style:justify-single-word="false"/>
      <style:text-properties fo:color="#c9211e" loext:opacity="100%" fo:font-size="26pt" officeooo:rsid="004a14dc" officeooo:paragraph-rsid="004a14dc" style:font-size-asian="26pt" style:font-size-complex="26pt"/>
    </style:style>
    <style:style style:name="P56" style:family="paragraph" style:parent-style-name="Standard">
      <style:paragraph-properties fo:text-align="center" style:justify-single-word="false"/>
      <style:text-properties fo:color="#c9211e" loext:opacity="100%" fo:font-size="26pt" officeooo:rsid="006ffe21" officeooo:paragraph-rsid="006ffe21" style:font-size-asian="26pt" style:font-size-complex="26pt"/>
    </style:style>
    <style:style style:name="P57" style:family="paragraph" style:parent-style-name="Standard">
      <style:paragraph-properties fo:text-align="center" style:justify-single-word="false">
        <style:tab-stops>
          <style:tab-stop style:position="0.7992in"/>
        </style:tab-stops>
      </style:paragraph-properties>
      <style:text-properties fo:color="#c9211e" loext:opacity="100%" fo:font-size="26pt" officeooo:rsid="006ffe21" officeooo:paragraph-rsid="006ffe21" style:font-size-asian="26pt" style:font-size-complex="26pt"/>
    </style:style>
    <style:style style:name="P58" style:family="paragraph" style:parent-style-name="Standard">
      <style:paragraph-properties fo:text-align="start" style:justify-single-word="false"/>
      <style:text-properties fo:color="#c9211e" loext:opacity="100%" fo:font-size="26pt" officeooo:rsid="006076d1" officeooo:paragraph-rsid="006076d1" style:font-size-asian="26pt" style:font-size-complex="26pt"/>
    </style:style>
    <style:style style:name="P59" style:family="paragraph" style:parent-style-name="Standard">
      <style:paragraph-properties fo:text-align="start" style:justify-single-word="false"/>
      <style:text-properties fo:color="#c9211e" loext:opacity="100%" fo:font-size="26pt" officeooo:rsid="000413f4" officeooo:paragraph-rsid="000413f4" style:font-size-asian="26pt" style:font-size-complex="26pt"/>
    </style:style>
    <style:style style:name="P60" style:family="paragraph" style:parent-style-name="Preformatted_20_Text">
      <style:paragraph-properties fo:text-align="start" style:justify-single-word="false"/>
      <style:text-properties fo:color="#c9211e" loext:opacity="100%" fo:font-size="26pt" officeooo:rsid="000413f4" officeooo:paragraph-rsid="000413f4" style:font-size-asian="26pt" style:font-size-complex="26pt"/>
    </style:style>
    <style:style style:name="P61" style:family="paragraph" style:parent-style-name="Standard">
      <style:paragraph-properties fo:text-align="start" style:justify-single-word="false"/>
      <style:text-properties fo:color="#c9211e" loext:opacity="100%" fo:font-size="26pt" officeooo:rsid="0005e77b" officeooo:paragraph-rsid="0005e77b" style:font-size-asian="26pt" style:font-size-complex="26pt"/>
    </style:style>
    <style:style style:name="P62" style:family="paragraph" style:parent-style-name="Standard">
      <style:text-properties fo:color="#c9211e" loext:opacity="100%" fo:font-size="15pt" fo:font-weight="bold" officeooo:rsid="00823d69" officeooo:paragraph-rsid="0005e77b" style:font-size-asian="15pt" style:font-weight-asian="bold" style:font-size-complex="15pt" style:font-weight-complex="bold"/>
    </style:style>
    <style:style style:name="P63" style:family="paragraph" style:parent-style-name="Standard">
      <style:paragraph-properties fo:text-align="start" style:justify-single-word="false"/>
      <style:text-properties fo:color="#c9211e" loext:opacity="100%" fo:font-size="15pt" fo:font-weight="bold" officeooo:rsid="00f1033c" officeooo:paragraph-rsid="00f1033c" style:font-size-asian="15pt" style:font-weight-asian="bold" style:font-size-complex="15pt" style:font-weight-complex="bold"/>
    </style:style>
    <style:style style:name="P64" style:family="paragraph" style:parent-style-name="Standard">
      <style:paragraph-properties fo:text-align="start" style:justify-single-word="false"/>
      <style:text-properties fo:color="#c9211e" loext:opacity="100%" fo:font-size="15pt" fo:font-weight="bold" officeooo:rsid="00ee874a" officeooo:paragraph-rsid="00ee874a" style:font-size-asian="15pt" style:font-weight-asian="bold" style:font-size-complex="15pt" style:font-weight-complex="bold"/>
    </style:style>
    <style:style style:name="P65" style:family="paragraph" style:parent-style-name="Standard">
      <style:paragraph-properties fo:text-align="start" style:justify-single-word="false"/>
      <style:text-properties fo:color="#c9211e" loext:opacity="100%" fo:font-size="15pt" fo:font-weight="bold" officeooo:rsid="00ee874a" officeooo:paragraph-rsid="00f34090" style:font-size-asian="15pt" style:font-weight-asian="bold" style:font-size-complex="15pt" style:font-weight-complex="bold"/>
    </style:style>
    <style:style style:name="P66" style:family="paragraph" style:parent-style-name="Standard">
      <style:paragraph-properties fo:text-align="start" style:justify-single-word="false"/>
      <style:text-properties fo:color="#c9211e" loext:opacity="100%" fo:font-size="15pt" fo:font-weight="bold" officeooo:rsid="00f34090" officeooo:paragraph-rsid="00f34090" style:font-size-asian="15pt" style:font-weight-asian="bold" style:font-size-complex="15pt" style:font-weight-complex="bold"/>
    </style:style>
    <style:style style:name="P67" style:family="paragraph" style:parent-style-name="Standard">
      <style:paragraph-properties fo:text-align="start" style:justify-single-word="false"/>
      <style:text-properties fo:color="#c9211e" loext:opacity="100%" fo:font-size="15pt" fo:font-weight="bold" officeooo:rsid="00fc7f57" officeooo:paragraph-rsid="00fc7f57" style:font-size-asian="15pt" style:font-weight-asian="bold" style:font-size-complex="15pt" style:font-weight-complex="bold"/>
    </style:style>
    <style:style style:name="P68" style:family="paragraph" style:parent-style-name="Standard">
      <style:text-properties fo:color="#c9211e" loext:opacity="100%" fo:font-size="24pt" fo:font-weight="bold" officeooo:rsid="00514373" officeooo:paragraph-rsid="0005e77b" style:font-size-asian="24pt" style:font-weight-asian="bold" style:font-size-complex="24pt" style:font-weight-complex="bold"/>
    </style:style>
    <style:style style:name="P69" style:family="paragraph" style:parent-style-name="Standard">
      <style:paragraph-properties fo:text-align="center" style:justify-single-word="false" fo:break-before="page"/>
      <style:text-properties fo:color="#c9211e" loext:opacity="100%" fo:font-size="24pt" fo:font-weight="bold" officeooo:rsid="00c13825" officeooo:paragraph-rsid="00c13825" style:font-size-asian="24pt" style:font-weight-asian="bold" style:font-size-complex="24pt" style:font-weight-complex="bold"/>
    </style:style>
    <style:style style:name="P70" style:family="paragraph" style:parent-style-name="Text_20_body">
      <style:paragraph-properties fo:margin-top="0in" fo:margin-bottom="0in" style:contextual-spacing="false"/>
      <style:text-properties fo:color="#c9211e" loext:opacity="100%" fo:font-size="24pt" officeooo:rsid="00a76c64" officeooo:paragraph-rsid="00a76c64" style:font-size-asian="24pt" style:font-size-complex="24pt"/>
    </style:style>
    <style:style style:name="P71" style:family="paragraph" style:parent-style-name="Standard">
      <style:paragraph-properties fo:text-align="center" style:justify-single-word="false"/>
      <style:text-properties fo:color="#c9211e" loext:opacity="100%" fo:font-size="24pt" officeooo:rsid="00b41f7c" officeooo:paragraph-rsid="00b41f7c" style:font-size-asian="24pt" style:font-size-complex="24pt"/>
    </style:style>
    <style:style style:name="P72" style:family="paragraph" style:parent-style-name="Standard">
      <style:paragraph-properties fo:text-align="center" style:justify-single-word="false"/>
      <style:text-properties fo:color="#c9211e" loext:opacity="100%" fo:font-size="24pt" officeooo:rsid="00baba5f" officeooo:paragraph-rsid="00baba5f" style:font-size-asian="24pt" style:font-size-complex="24pt"/>
    </style:style>
    <style:style style:name="P73" style:family="paragraph" style:parent-style-name="Standard">
      <style:text-properties fo:color="#c9211e" loext:opacity="100%" fo:font-size="22pt" officeooo:rsid="001e8202" officeooo:paragraph-rsid="001e8202" style:font-size-asian="22pt" style:font-size-complex="22pt"/>
    </style:style>
    <style:style style:name="P74" style:family="paragraph" style:parent-style-name="Text_20_body">
      <style:paragraph-properties fo:margin-top="0in" fo:margin-bottom="0in" style:contextual-spacing="false"/>
      <style:text-properties fo:color="#c9211e" loext:opacity="100%" fo:font-size="22pt" officeooo:rsid="009dfa9f" officeooo:paragraph-rsid="009dfa9f" style:font-size-asian="19.25pt" style:font-size-complex="22pt"/>
    </style:style>
    <style:style style:name="P75" style:family="paragraph" style:parent-style-name="Standard">
      <style:paragraph-properties fo:text-align="start" style:justify-single-word="false"/>
      <style:text-properties fo:color="#c9211e" loext:opacity="100%" fo:font-size="14pt" officeooo:rsid="00462dd1" officeooo:paragraph-rsid="00462dd1" style:font-size-asian="14pt" style:font-size-complex="14pt"/>
    </style:style>
    <style:style style:name="P76" style:family="paragraph" style:parent-style-name="Text_20_body">
      <style:paragraph-properties fo:margin-top="0in" fo:margin-bottom="0in" style:contextual-spacing="false"/>
      <style:text-properties fo:color="#c9211e" loext:opacity="100%" fo:font-weight="bold" officeooo:rsid="0052dbce" officeooo:paragraph-rsid="0052dbce" style:font-weight-asian="bold" style:font-weight-complex="bold"/>
    </style:style>
    <style:style style:name="P77" style:family="paragraph" style:parent-style-name="Text_20_body">
      <style:paragraph-properties fo:margin-top="0in" fo:margin-bottom="0in" style:contextual-spacing="false"/>
      <style:text-properties fo:color="#c9211e" loext:opacity="100%" fo:font-size="16pt" officeooo:rsid="00a76c64" officeooo:paragraph-rsid="00a76c64" style:font-size-asian="14pt" style:font-size-complex="16pt"/>
    </style:style>
    <style:style style:name="P78" style:family="paragraph" style:parent-style-name="Preformatted_20_Text">
      <style:text-properties fo:font-variant="normal" fo:text-transform="none" fo:color="#212529" loext:opacity="100%" style:font-name="SFMono-Regular" fo:font-size="7.5pt" fo:letter-spacing="normal" fo:font-style="normal" fo:font-weight="normal" officeooo:rsid="006c827c" officeooo:paragraph-rsid="0005e77b" style:font-size-asian="18pt" style:font-weight-asian="bold" style:font-size-complex="18pt" style:font-weight-complex="bold"/>
    </style:style>
    <style:style style:name="P79" style:family="paragraph" style:parent-style-name="Preformatted_20_Text">
      <style:text-properties fo:font-variant="normal" fo:text-transform="none" fo:color="#212529" loext:opacity="100%" style:font-name="SFMono-Regular" fo:font-size="15pt" fo:letter-spacing="normal" fo:font-style="normal" fo:font-weight="normal" officeooo:rsid="006c827c" officeooo:paragraph-rsid="0005e77b" style:font-size-asian="15pt" style:font-weight-asian="bold" style:font-size-complex="15pt" style:font-weight-complex="bold"/>
    </style:style>
    <style:style style:name="P80" style:family="paragraph" style:parent-style-name="Preformatted_20_Text">
      <style:text-properties fo:font-variant="normal" fo:text-transform="none" fo:color="#c9211e" loext:opacity="100%" style:font-name="SFMono-Regular" fo:font-size="20pt" fo:letter-spacing="normal" fo:font-style="normal" fo:font-weight="bold" officeooo:rsid="00946b08" officeooo:paragraph-rsid="0005e77b" style:font-size-asian="20pt" style:font-weight-asian="bold" style:font-size-complex="20pt" style:font-weight-complex="bold"/>
    </style:style>
    <style:style style:name="P81" style:family="paragraph" style:parent-style-name="Preformatted_20_Text">
      <style:paragraph-properties fo:text-align="start" style:justify-single-word="false"/>
      <style:text-properties fo:font-variant="normal" fo:text-transform="none" fo:color="#c9211e" loext:opacity="100%" style:font-name="Roboto Mono2" fo:font-size="28pt" fo:letter-spacing="normal" fo:font-style="normal" fo:font-weight="normal" officeooo:rsid="003b1433" officeooo:paragraph-rsid="003b1433" style:font-size-asian="24.5pt" style:font-weight-asian="bold" style:font-size-complex="28pt" style:font-weight-complex="bold"/>
    </style:style>
    <style:style style:name="P82" style:family="paragraph" style:parent-style-name="Text_20_body">
      <style:paragraph-properties fo:text-align="start" style:justify-single-word="false"/>
      <style:text-properties fo:font-variant="normal" fo:text-transform="none" fo:color="#c9211e" loext:opacity="100%" style:font-name="Roboto Mono2" fo:font-size="28pt" fo:letter-spacing="normal" fo:font-style="normal" fo:font-weight="normal" officeooo:rsid="003b1433" officeooo:paragraph-rsid="003b1433" style:font-size-asian="24.5pt" style:font-weight-asian="bold" style:font-size-complex="28pt" style:font-weight-complex="bold"/>
    </style:style>
    <style:style style:name="P83" style:family="paragraph" style:parent-style-name="Preformatted_20_Text">
      <style:paragraph-properties fo:text-align="start" style:justify-single-word="false"/>
      <style:text-properties fo:font-variant="normal" fo:text-transform="none" fo:color="#c9211e" loext:opacity="100%" style:font-name="Roboto Mono2" fo:font-size="28pt" fo:letter-spacing="normal" fo:font-style="normal" fo:font-weight="normal" officeooo:rsid="004ecacc" officeooo:paragraph-rsid="004ecacc" style:font-size-asian="24.5pt" style:font-weight-asian="bold" style:font-size-complex="28pt" style:font-weight-complex="bold"/>
    </style:style>
    <style:style style:name="P84" style:family="paragraph" style:parent-style-name="Preformatted_20_Text">
      <style:paragraph-properties fo:text-align="start" style:justify-single-word="false"/>
      <style:text-properties fo:font-variant="normal" fo:text-transform="none" fo:color="#c9211e" loext:opacity="100%" style:font-name="Roboto Mono2" fo:font-size="28pt" fo:letter-spacing="normal" fo:font-style="normal" fo:font-weight="normal" officeooo:paragraph-rsid="00a23a29"/>
    </style:style>
    <style:style style:name="P85" style:family="paragraph" style:parent-style-name="Preformatted_20_Text">
      <style:paragraph-properties fo:text-align="start" style:justify-single-word="false"/>
      <style:text-properties fo:font-variant="normal" fo:text-transform="none" fo:color="#c9211e" loext:opacity="100%" style:font-name="Roboto Mono2" fo:font-size="15pt" fo:letter-spacing="normal" fo:font-style="normal" fo:font-weight="normal" officeooo:rsid="00a23a29" officeooo:paragraph-rsid="00a23a29" style:font-size-asian="13.1000003814697pt" style:font-style-asian="normal" style:font-weight-asian="bold" style:font-size-complex="15pt" style:font-style-complex="normal" style:font-weight-complex="bold"/>
    </style:style>
    <style:style style:name="P86" style:family="paragraph" style:parent-style-name="Standard">
      <style:text-properties fo:font-variant="normal" fo:text-transform="none" fo:color="#adbecb" loext:opacity="100%" style:font-name="Roboto Mono3" fo:font-size="18pt" fo:letter-spacing="normal" fo:font-style="normal" fo:font-weight="normal" officeooo:rsid="006c827c" officeooo:paragraph-rsid="0005e77b" style:font-size-asian="18pt" style:font-weight-asian="bold" style:font-size-complex="18pt" style:font-weight-complex="bold"/>
    </style:style>
    <style:style style:name="P87" style:family="paragraph" style:parent-style-name="Preformatted_20_Text">
      <style:paragraph-properties fo:text-align="start" style:justify-single-word="false"/>
      <style:text-properties fo:font-variant="normal" fo:text-transform="none" fo:color="#f8f8f2" loext:opacity="100%" style:font-name="Chandas" fo:font-size="28pt" fo:letter-spacing="normal" fo:font-style="normal" fo:font-weight="normal" officeooo:rsid="001a4ec9" officeooo:paragraph-rsid="00322f13" style:font-size-asian="24.5pt" style:font-weight-asian="bold" style:font-size-complex="28pt" style:font-weight-complex="bold"/>
    </style:style>
    <style:style style:name="P88" style:family="paragraph" style:parent-style-name="Preformatted_20_Text">
      <style:paragraph-properties fo:text-align="start" style:justify-single-word="false"/>
      <style:text-properties fo:font-variant="normal" fo:text-transform="none" fo:color="#f8f8f2" loext:opacity="100%" style:font-name="Roboto Mono2" fo:font-size="28pt" fo:letter-spacing="normal" fo:font-style="normal" fo:font-weight="normal" officeooo:rsid="001a4ec9" officeooo:paragraph-rsid="001a4ec9" style:font-size-asian="24.5pt" style:font-weight-asian="bold" style:font-size-complex="28pt" style:font-weight-complex="bold"/>
    </style:style>
    <style:style style:name="P89" style:family="paragraph" style:parent-style-name="Text_20_body">
      <style:paragraph-properties fo:text-align="start" style:justify-single-word="false"/>
      <style:text-properties fo:font-variant="normal" fo:text-transform="none" fo:color="#f8f8f2" loext:opacity="100%" style:font-name="Roboto Mono2" fo:font-size="28pt" fo:letter-spacing="normal" fo:font-style="normal" fo:font-weight="normal" officeooo:rsid="001a4ec9" officeooo:paragraph-rsid="001a4ec9" style:font-size-asian="24.5pt" style:font-weight-asian="bold" style:font-size-complex="28pt" style:font-weight-complex="bold"/>
    </style:style>
    <style:style style:name="P90" style:family="paragraph" style:parent-style-name="Standard">
      <style:paragraph-properties fo:text-align="start" style:justify-single-word="false"/>
      <style:text-properties fo:font-variant="normal" fo:text-transform="none" fo:color="#008000" loext:opacity="100%" style:font-name="Droid Sans Mono" fo:font-size="7.5pt" fo:letter-spacing="normal" fo:font-style="normal" fo:font-weight="normal" officeooo:rsid="001a4ec9" officeooo:paragraph-rsid="001a4ec9" fo:background-color="#ffffff" style:font-size-asian="24.5pt" style:font-weight-asian="bold" style:font-size-complex="28pt" style:font-weight-complex="bold"/>
    </style:style>
    <style:style style:name="P91" style:family="paragraph" style:parent-style-name="Text_20_body">
      <style:paragraph-properties fo:text-align="start" style:justify-single-word="false"/>
      <style:text-properties fo:font-variant="normal" fo:text-transform="none" fo:color="#616161" loext:opacity="100%" style:font-name="system-ui" fo:font-size="24pt" fo:letter-spacing="normal" fo:font-style="normal" fo:font-weight="normal" officeooo:rsid="0003a816" officeooo:paragraph-rsid="0003a816" fo:background-color="#ffffff" style:font-size-asian="24pt" style:font-size-complex="24pt" loext:padding-left="0in" loext:padding-right="0in" loext:padding-top="0.0193in" loext:padding-bottom="0.0193in" loext:border-left="none" loext:border-right="none" loext:border-top="0.06pt solid #c8c8c8" loext:border-bottom="0.06pt solid #c8c8c8"/>
    </style:style>
    <style:style style:name="P92" style:family="paragraph" style:parent-style-name="Heading_20_3">
      <style:paragraph-properties fo:margin-top="0.0299in" fo:margin-bottom="0.0972in" style:contextual-spacing="false" style:line-height-at-least="0.1492in" fo:orphans="2" fo:widows="2"/>
      <style:text-properties fo:font-variant="normal" fo:text-transform="none" fo:color="#616161" loext:opacity="100%" style:font-name="system-ui" fo:font-size="7pt" fo:letter-spacing="normal" fo:font-style="normal" fo:font-weight="normal" loext:padding="0in" loext:border="none"/>
    </style:style>
    <style:style style:name="P93" style:family="paragraph" style:parent-style-name="Preformatted_20_Text">
      <style:paragraph-properties fo:margin-top="0.0299in" fo:margin-bottom="0.0972in" style:contextual-spacing="false" style:line-height-at-least="0.1492in" fo:orphans="2" fo:widows="2"/>
      <style:text-properties fo:font-variant="normal" fo:text-transform="none" fo:color="#616161" loext:opacity="100%" style:font-name="system-ui" fo:font-size="7pt" fo:letter-spacing="normal" fo:font-style="normal" fo:font-weight="normal" loext:padding="0in" loext:border="none"/>
    </style:style>
    <style:style style:name="P94" style:family="paragraph" style:parent-style-name="Heading_20_4">
      <style:paragraph-properties fo:margin-top="0.0299in" fo:margin-bottom="0.0972in" style:contextual-spacing="false" style:line-height-at-least="0.1492in" fo:orphans="2" fo:widows="2"/>
      <style:text-properties fo:font-variant="normal" fo:text-transform="none" fo:color="#616161" loext:opacity="100%" style:font-name="system-ui" fo:font-size="7pt" fo:letter-spacing="normal" fo:font-style="normal" fo:font-weight="normal" loext:padding="0in" loext:border="none"/>
    </style:style>
    <style:style style:name="P95" style:family="paragraph" style:parent-style-name="Text_20_body">
      <style:paragraph-properties fo:margin-top="0.0299in" fo:margin-bottom="0in" style:contextual-spacing="false" style:line-height-at-least="0.1492in" fo:orphans="2" fo:widows="2"/>
      <style:text-properties fo:font-variant="normal" fo:text-transform="none" fo:color="#616161" loext:opacity="100%" style:font-name="system-ui" fo:font-size="7pt" fo:letter-spacing="normal" fo:font-style="normal" fo:font-weight="normal" loext:padding="0in" loext:border="none"/>
    </style:style>
    <style:style style:name="P96" style:family="paragraph" style:parent-style-name="Preformatted_20_Text">
      <style:paragraph-properties fo:margin-left="0.0374in" fo:margin-right="0.0374in" fo:margin-top="0in" fo:margin-bottom="0in" style:contextual-spacing="false" style:line-height-at-least="0.1492in" fo:orphans="2" fo:widows="2" fo:text-indent="0in" style:auto-text-indent="false"/>
      <style:text-properties fo:font-variant="normal" fo:text-transform="none" fo:color="#616161" loext:opacity="100%" style:font-name="system-ui" fo:font-size="7pt" fo:letter-spacing="normal" fo:font-style="normal" fo:font-weight="normal" loext:padding="0in" loext:border="none"/>
    </style:style>
    <style:style style:name="P97" style:family="paragraph" style:parent-style-name="Heading_20_4">
      <style:paragraph-properties fo:margin-left="0in" fo:margin-right="0in" fo:orphans="2" fo:widows="2" fo:text-indent="0in" style:auto-text-indent="false"/>
      <style:text-properties fo:font-variant="normal" fo:text-transform="none" fo:color="#616161" loext:opacity="100%" style:font-name="system-ui" fo:font-size="7pt" fo:letter-spacing="normal" fo:font-style="normal" fo:font-weight="normal"/>
    </style:style>
    <style:style style:name="P98"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616161" loext:opacity="100%" style:font-name="system-ui" fo:font-size="7pt" fo:letter-spacing="normal" fo:font-style="normal" fo:font-weight="normal"/>
    </style:style>
    <style:style style:name="P99" style:family="paragraph" style:parent-style-name="Text_20_body">
      <style:paragraph-properties fo:text-align="start" style:justify-single-word="false"/>
      <style:text-properties fo:font-variant="normal" fo:text-transform="none" fo:color="#616161" loext:opacity="100%" style:font-name="system-ui" fo:font-size="7pt" fo:letter-spacing="normal" fo:font-style="normal" fo:font-weight="normal" officeooo:rsid="004ecacc" officeooo:paragraph-rsid="004ecacc" fo:background-color="#ffffff" style:font-size-asian="24.5pt" style:font-weight-asian="bold" style:font-size-complex="28pt" style:font-weight-complex="bold" loext:padding-left="0in" loext:padding-right="0in" loext:padding-top="0.0193in" loext:padding-bottom="0.0193in" loext:border-left="none" loext:border-right="none" loext:border-top="0.06pt solid #c8c8c8" loext:border-bottom="0.06pt solid #c8c8c8"/>
    </style:style>
    <style:style style:name="P100" style:family="paragraph" style:parent-style-name="Text_20_body">
      <style:paragraph-properties fo:margin-top="0in" fo:margin-bottom="0in" style:contextual-spacing="false"/>
      <style:text-properties fo:font-variant="normal" fo:text-transform="none" fo:color="#616161" loext:opacity="100%" style:font-name="system-ui" fo:font-size="7pt" fo:letter-spacing="normal" fo:font-style="normal" fo:font-weight="normal" officeooo:rsid="0052dbce" officeooo:paragraph-rsid="0052dbce" fo:background-color="#ffffff" loext:padding-left="0in" loext:padding-right="0in" loext:padding-top="0.0193in" loext:padding-bottom="0.0193in" loext:border-left="none" loext:border-right="none" loext:border-top="0.06pt solid #c8c8c8" loext:border-bottom="0.06pt solid #c8c8c8"/>
    </style:style>
    <style:style style:name="P101" style:family="paragraph" style:parent-style-name="Text_20_body">
      <style:paragraph-properties fo:margin-top="0in" fo:margin-bottom="0in" style:contextual-spacing="false"/>
      <style:text-properties fo:font-variant="normal" fo:text-transform="none" fo:color="#616161" loext:opacity="100%" style:font-name="system-ui" fo:font-size="7pt" fo:letter-spacing="normal" fo:font-style="normal" fo:font-weight="normal"/>
    </style:style>
    <style:style style:name="P102" style:family="paragraph" style:parent-style-name="Text_20_body">
      <style:paragraph-properties fo:margin-top="0in" fo:margin-bottom="0in" style:contextual-spacing="false"/>
      <style:text-properties fo:font-variant="normal" fo:text-transform="none" fo:color="#616161" loext:opacity="100%" style:font-name="system-ui" fo:font-size="7pt" fo:letter-spacing="normal" fo:font-style="normal" fo:font-weight="normal" officeooo:rsid="00a76c64" officeooo:paragraph-rsid="00a76c64" style:font-size-asian="14pt" style:font-size-complex="16pt" loext:padding="0in" loext:border="none"/>
    </style:style>
    <style:style style:name="P103" style:family="paragraph" style:parent-style-name="Heading_20_3">
      <style:paragraph-properties fo:margin-top="0.0299in" fo:margin-bottom="0.0972in" style:contextual-spacing="false" style:line-height-at-least="0.1492in"/>
      <style:text-properties fo:font-variant="normal" fo:text-transform="none" fo:color="#616161" loext:opacity="100%" style:font-name="system-ui" fo:font-size="7pt" fo:font-style="normal" fo:font-weight="normal" loext:padding="0in" loext:border="none"/>
    </style:style>
    <style:style style:name="P104" style:family="paragraph" style:parent-style-name="Preformatted_20_Text">
      <style:paragraph-properties fo:margin-top="0.0299in" fo:margin-bottom="0.0972in" style:contextual-spacing="false" style:line-height-at-least="0.1492in"/>
      <style:text-properties fo:font-variant="normal" fo:text-transform="none" fo:color="#616161" loext:opacity="100%" style:font-name="system-ui" fo:font-size="7pt" fo:font-style="normal" fo:font-weight="normal" loext:padding="0in" loext:border="none"/>
    </style:style>
    <style:style style:name="P105" style:family="paragraph" style:parent-style-name="Preformatted_20_Text">
      <style:paragraph-properties fo:margin-left="0.0374in" fo:margin-right="0.0374in" fo:margin-top="0in" fo:margin-bottom="0in" style:contextual-spacing="false" style:line-height-at-least="0.1492in" fo:text-indent="0in" style:auto-text-indent="false"/>
      <style:text-properties fo:font-variant="normal" fo:text-transform="none" fo:color="#616161" loext:opacity="100%" style:font-name="system-ui" fo:font-size="7pt" fo:font-style="normal" fo:font-weight="normal" loext:padding="0in" loext:border="none"/>
    </style:style>
    <style:style style:name="P106" style:family="paragraph" style:parent-style-name="Text_20_body">
      <style:paragraph-properties fo:margin-top="0.0299in" fo:margin-bottom="0in" style:contextual-spacing="false" style:line-height-at-least="0.1492in"/>
      <style:text-properties fo:font-variant="normal" fo:text-transform="none" fo:color="#616161" loext:opacity="100%" style:font-name="system-ui" fo:font-size="7pt" fo:font-style="normal" fo:font-weight="normal" loext:padding="0in" loext:border="none"/>
    </style:style>
    <style:style style:name="P107" style:family="paragraph" style:parent-style-name="Text_20_body">
      <style:paragraph-properties fo:margin-top="0in" fo:margin-bottom="0in" style:contextual-spacing="false"/>
      <style:text-properties fo:font-variant="normal" fo:text-transform="none" fo:color="#616161" loext:opacity="100%" style:font-name="system-ui" fo:font-size="7pt" fo:font-style="normal" fo:font-weight="normal" fo:background-color="#ffffff" loext:padding-left="0in" loext:padding-right="0in" loext:padding-top="0.0193in" loext:padding-bottom="0.0193in" loext:border-left="none" loext:border-right="none" loext:border-top="0.06pt solid #c8c8c8" loext:border-bottom="0.06pt solid #c8c8c8"/>
    </style:style>
    <style:style style:name="P108" style:family="paragraph" style:parent-style-name="Heading_20_3">
      <style:paragraph-properties fo:margin-left="0in" fo:margin-right="0in" fo:orphans="2" fo:widows="2" fo:text-indent="0in" style:auto-text-indent="false"/>
      <style:text-properties fo:font-variant="normal" fo:text-transform="none" fo:color="#616161" loext:opacity="100%" style:font-name="system-ui" fo:letter-spacing="normal" fo:font-style="normal" fo:font-weight="normal"/>
    </style:style>
    <style:style style:name="P109" style:family="paragraph" style:parent-style-name="Heading_20_1">
      <style:paragraph-properties fo:margin-left="0.0598in" fo:margin-right="0in" fo:margin-top="0in" fo:margin-bottom="0in" style:contextual-spacing="false" fo:text-indent="0in" style:auto-text-indent="false"/>
      <style:text-properties fo:font-variant="normal" fo:text-transform="none" fo:color="#616161" loext:opacity="100%" style:font-name="system-ui" fo:font-size="7.5pt" fo:font-style="normal" fo:font-weight="bold" loext:padding="0in" loext:border="none"/>
    </style:style>
    <style:style style:name="P110" style:family="paragraph" style:parent-style-name="Heading_20_1">
      <style:paragraph-properties fo:margin-left="0.0598in" fo:margin-right="0in" fo:margin-top="0in" fo:margin-bottom="0in" style:contextual-spacing="false" fo:orphans="2" fo:widows="2" fo:text-indent="0in" style:auto-text-indent="false"/>
      <style:text-properties fo:font-variant="normal" fo:text-transform="none" fo:color="#616161" loext:opacity="100%" style:font-name="system-ui" fo:font-size="7.5pt" fo:letter-spacing="normal" fo:font-style="normal" fo:font-weight="bold" loext:padding="0in" loext:border="none"/>
    </style:style>
    <style:style style:name="P111" style:family="paragraph" style:parent-style-name="Text_20_body">
      <style:paragraph-properties fo:text-align="start" style:justify-single-word="false"/>
      <style:text-properties fo:font-variant="normal" fo:text-transform="none" fo:color="#616161" loext:opacity="100%" style:font-name="system-ui" fo:font-size="14pt" fo:letter-spacing="normal" fo:font-style="normal" fo:font-weight="normal" officeooo:rsid="0003a816" officeooo:paragraph-rsid="0003a816" fo:background-color="#ffffff" style:font-size-asian="14pt" style:font-size-complex="14pt" loext:padding-left="0in" loext:padding-right="0in" loext:padding-top="0.0193in" loext:padding-bottom="0.0193in" loext:border-left="none" loext:border-right="none" loext:border-top="0.06pt solid #c8c8c8" loext:border-bottom="0.06pt solid #c8c8c8"/>
    </style:style>
    <style:style style:name="P112" style:family="paragraph" style:parent-style-name="Preformatted_20_Text">
      <style:paragraph-properties fo:margin-top="0.0299in" fo:margin-bottom="0.0972in" style:contextual-spacing="false" style:line-height-at-least="0.1492in"/>
      <style:text-properties fo:font-variant="normal" fo:text-transform="none" fo:color="#616161" loext:opacity="100%" style:font-name="Google Sans Text" fo:font-size="7.5pt" fo:font-style="normal" fo:font-weight="normal" loext:padding="0in" loext:border="none"/>
    </style:style>
    <style:style style:name="P113" style:family="paragraph" style:parent-style-name="Preformatted_20_Text">
      <style:paragraph-properties fo:margin-top="0.0299in" fo:margin-bottom="0.0972in" style:contextual-spacing="false" style:line-height-at-least="0.1492in" fo:orphans="2" fo:widows="2"/>
      <style:text-properties fo:font-variant="normal" fo:text-transform="none" fo:color="#616161" loext:opacity="100%" style:font-name="Google Sans Text" fo:font-size="7.5pt" fo:letter-spacing="normal" fo:font-style="normal" fo:font-weight="normal" loext:padding="0in" loext:border="none"/>
    </style:style>
    <style:style style:name="P114" style:family="paragraph" style:parent-style-name="Preformatted_20_Text">
      <style:paragraph-properties fo:margin-left="0in" fo:margin-right="0in" fo:orphans="2" fo:widows="2" fo:text-indent="0in" style:auto-text-indent="false"/>
      <style:text-properties fo:font-variant="normal" fo:text-transform="none" fo:color="#616161" loext:opacity="100%" style:font-name="Google Sans Text" fo:font-size="7.5pt" fo:letter-spacing="normal" fo:font-style="normal" fo:font-weight="normal"/>
    </style:style>
    <style:style style:name="P115" style:family="paragraph" style:parent-style-name="Preformatted_20_Text">
      <style:paragraph-properties fo:margin-left="0in" fo:margin-right="0in" fo:orphans="2" fo:widows="2" fo:text-indent="0in" style:auto-text-indent="false"/>
      <style:text-properties fo:font-variant="normal" fo:text-transform="none" fo:color="#616161" loext:opacity="100%" fo:font-size="7pt" fo:letter-spacing="normal" fo:font-style="normal" fo:font-weight="normal"/>
    </style:style>
    <style:style style:name="P116" style:family="paragraph" style:parent-style-name="Preformatted_20_Text">
      <style:paragraph-properties fo:margin-left="0.0374in" fo:margin-right="0.0374in" fo:margin-top="0in" fo:margin-bottom="0in" style:contextual-spacing="false" fo:orphans="2" fo:widows="2" fo:text-indent="0in" style:auto-text-indent="false"/>
      <style:text-properties fo:font-variant="normal" fo:text-transform="none" fo:color="#616161" loext:opacity="100%" fo:font-size="7pt" fo:letter-spacing="normal" fo:font-style="normal" fo:font-weight="normal"/>
    </style:style>
    <style:style style:name="P117" style:family="paragraph" style:parent-style-name="Text_20_body">
      <style:paragraph-properties fo:margin-top="0in" fo:margin-bottom="0.0744in" style:contextual-spacing="false"/>
      <style:text-properties fo:font-variant="normal" fo:text-transform="none" fo:color="#717171" loext:opacity="100%" style:font-name="Google Sans Text" fo:font-size="7pt" fo:font-style="italic" fo:font-weight="normal" loext:padding="0in" loext:border="none"/>
    </style:style>
    <style:style style:name="P118" style:family="paragraph" style:parent-style-name="Text_20_body">
      <style:paragraph-properties fo:margin-top="0in" fo:margin-bottom="0.0744in" style:contextual-spacing="false" fo:orphans="2" fo:widows="2"/>
      <style:text-properties fo:font-variant="normal" fo:text-transform="none" fo:color="#717171" loext:opacity="100%" style:font-name="Google Sans Text" fo:font-size="7pt" fo:letter-spacing="normal" fo:font-style="italic" fo:font-weight="normal" loext:padding="0in" loext:border="none"/>
    </style:style>
    <style:style style:name="P119"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120"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fo:font-style="normal" fo:font-weight="normal"/>
    </style:style>
    <style:style style:name="P121" style:family="paragraph" style:parent-style-name="Standard">
      <style:paragraph-properties fo:text-align="center" style:justify-single-word="false"/>
      <style:text-properties fo:font-variant="normal" fo:text-transform="none" fo:color="#ff0000" loext:opacity="100%" style:font-name="system-ui" fo:font-size="24pt" fo:letter-spacing="normal" fo:font-style="normal" fo:font-weight="normal" officeooo:rsid="0003a816" officeooo:paragraph-rsid="0003a816" style:font-size-asian="24pt" style:font-size-complex="24pt"/>
    </style:style>
    <style:style style:name="P122" style:family="paragraph" style:parent-style-name="Preformatted_20_Text">
      <style:paragraph-properties fo:margin-left="0.0374in" fo:margin-right="0.0374in" fo:margin-top="0in" fo:margin-bottom="0in" style:contextual-spacing="false" fo:orphans="2" fo:widows="2" fo:text-indent="0in" style:auto-text-indent="false"/>
      <style:text-properties fo:font-variant="normal" fo:text-transform="none" fo:color="#48985d" loext:opacity="100%" fo:font-size="7pt" fo:letter-spacing="normal" fo:font-style="normal" fo:font-weight="normal"/>
    </style:style>
    <style:style style:name="P123" style:family="paragraph" style:parent-style-name="Preformatted_20_Text">
      <style:text-properties fo:font-size="11pt" fo:font-weight="bold" officeooo:rsid="006c827c" officeooo:paragraph-rsid="0005e77b" style:font-size-asian="11pt" style:font-weight-asian="bold" style:font-size-complex="11pt" style:font-weight-complex="bold"/>
    </style:style>
    <style:style style:name="P124" style:family="paragraph" style:parent-style-name="Preformatted_20_Text">
      <style:text-properties fo:font-size="11pt" fo:font-weight="bold" officeooo:rsid="00990f2e" officeooo:paragraph-rsid="0005e77b" style:font-size-asian="11pt" style:font-weight-asian="bold" style:font-size-complex="11pt" style:font-weight-complex="bold"/>
    </style:style>
    <style:style style:name="P125" style:family="paragraph" style:parent-style-name="Preformatted_20_Text">
      <style:text-properties officeooo:paragraph-rsid="0005e77b"/>
    </style:style>
    <style:style style:name="P126" style:family="paragraph" style:parent-style-name="Preformatted_20_Text">
      <style:paragraph-properties fo:margin-top="0in" fo:margin-bottom="0.1965in" style:contextual-spacing="false"/>
      <style:text-properties officeooo:paragraph-rsid="0005e77b"/>
    </style:style>
    <style:style style:name="P127" style:family="paragraph" style:parent-style-name="Standard">
      <style:text-properties officeooo:paragraph-rsid="0005e77b"/>
    </style:style>
    <style:style style:name="P128" style:family="paragraph" style:parent-style-name="Standard">
      <style:text-properties officeooo:rsid="001354a2" officeooo:paragraph-rsid="0005e77b"/>
    </style:style>
    <style:style style:name="P129" style:family="paragraph" style:parent-style-name="Standard">
      <style:text-properties officeooo:rsid="0015f541" officeooo:paragraph-rsid="0005e77b"/>
    </style:style>
    <style:style style:name="P130" style:family="paragraph" style:parent-style-name="Standard">
      <style:text-properties officeooo:rsid="001b70a3" officeooo:paragraph-rsid="0005e77b"/>
    </style:style>
    <style:style style:name="P131" style:family="paragraph" style:parent-style-name="Standard">
      <style:text-properties officeooo:rsid="001d9a73" officeooo:paragraph-rsid="0005e77b"/>
    </style:style>
    <style:style style:name="P132" style:family="paragraph" style:parent-style-name="Standard">
      <style:text-properties fo:font-size="36pt" fo:font-weight="bold" officeooo:rsid="00376ac8" officeooo:paragraph-rsid="0005e77b" style:font-size-asian="36pt" style:font-weight-asian="bold" style:font-size-complex="36pt" style:font-weight-complex="bold"/>
    </style:style>
    <style:style style:name="P133" style:family="paragraph" style:parent-style-name="Standard">
      <style:text-properties fo:font-size="36pt" fo:font-weight="bold" officeooo:rsid="0046807f" officeooo:paragraph-rsid="0005e77b" style:font-size-asian="36pt" style:font-weight-asian="bold" style:font-size-complex="36pt" style:font-weight-complex="bold"/>
    </style:style>
    <style:style style:name="P134" style:family="paragraph" style:parent-style-name="Standard">
      <style:text-properties fo:color="#2d0bf2" loext:opacity="100%" style:font-name="Droid Sans Mono" fo:font-size="8.05000019073486pt" fo:font-weight="normal" officeooo:rsid="003e41ba" officeooo:paragraph-rsid="0005e77b" fo:background-color="#ffffff" style:font-size-asian="18pt" style:font-weight-asian="bold" style:font-size-complex="18pt" style:font-weight-complex="bold"/>
    </style:style>
    <style:style style:name="P135" style:family="paragraph" style:parent-style-name="Standard">
      <style:text-properties fo:color="#2d0bf2" loext:opacity="100%" style:font-name="Droid Sans Mono" fo:font-size="20pt" fo:font-weight="normal" officeooo:rsid="003e41ba" officeooo:paragraph-rsid="0005e77b" fo:background-color="#ffffff" style:font-size-asian="20pt" style:font-weight-asian="bold" style:font-size-complex="20pt" style:font-weight-complex="bold"/>
    </style:style>
    <style:style style:name="P136" style:family="paragraph" style:parent-style-name="Standard">
      <style:text-properties fo:color="#2d0bf2" loext:opacity="100%" style:font-name="Droid Sans Mono" fo:font-size="16pt" fo:font-weight="normal" officeooo:rsid="003e41ba" officeooo:paragraph-rsid="0005e77b" fo:background-color="#ffffff" style:font-size-asian="16pt" style:font-weight-asian="bold" style:font-size-complex="16pt" style:font-weight-complex="bold"/>
    </style:style>
    <style:style style:name="P137" style:family="paragraph" style:parent-style-name="Standard">
      <style:text-properties fo:color="#ff4000" loext:opacity="100%" fo:font-size="18pt" fo:font-weight="bold" officeooo:rsid="006c827c" officeooo:paragraph-rsid="0005e77b" style:font-size-asian="18pt" style:font-weight-asian="bold" style:font-size-complex="18pt" style:font-weight-complex="bold"/>
    </style:style>
    <style:style style:name="P138" style:family="paragraph" style:parent-style-name="Standard">
      <style:text-properties fo:color="#ff4000" loext:opacity="100%" fo:font-size="18pt" fo:font-weight="bold" officeooo:rsid="0009fcf7" officeooo:paragraph-rsid="0009fcf7" style:font-size-asian="18pt" style:font-weight-asian="bold" style:font-size-complex="18pt" style:font-weight-complex="bold"/>
    </style:style>
    <style:style style:name="P139" style:family="paragraph" style:parent-style-name="Standard">
      <style:text-properties fo:color="#ff4000" loext:opacity="100%" officeooo:rsid="000bef0f" officeooo:paragraph-rsid="000bef0f"/>
    </style:style>
    <style:style style:name="P140" style:family="paragraph" style:parent-style-name="Standard">
      <style:text-properties fo:color="#ff4000" loext:opacity="100%" fo:font-weight="bold" officeooo:rsid="000bef0f" officeooo:paragraph-rsid="000bef0f" style:font-weight-asian="bold" style:font-weight-complex="bold"/>
    </style:style>
    <style:style style:name="P141" style:family="paragraph" style:parent-style-name="Standard">
      <style:paragraph-properties fo:text-align="start" style:justify-single-word="false"/>
      <style:text-properties fo:color="#ff4000" loext:opacity="100%" fo:font-size="15pt" officeooo:rsid="00d0dad4" officeooo:paragraph-rsid="000413f4" style:font-size-asian="15pt" style:font-size-complex="15pt"/>
    </style:style>
    <style:style style:name="P142" style:family="paragraph" style:parent-style-name="Standard">
      <style:text-properties fo:font-size="15pt" fo:font-weight="bold" officeooo:rsid="0082291d" officeooo:paragraph-rsid="0005e77b" style:font-size-asian="15pt" style:font-weight-asian="bold" style:font-size-complex="15pt" style:font-weight-complex="bold"/>
    </style:style>
    <style:style style:name="P143" style:family="paragraph" style:parent-style-name="Standard">
      <style:text-properties fo:font-size="15pt" fo:font-weight="bold" officeooo:rsid="0046807f" officeooo:paragraph-rsid="0005e77b" style:font-size-asian="15pt" style:font-weight-asian="bold" style:font-size-complex="15pt" style:font-weight-complex="bold"/>
    </style:style>
    <style:style style:name="P144" style:family="paragraph" style:parent-style-name="Standard">
      <style:text-properties fo:font-size="15pt" fo:font-weight="bold" officeooo:rsid="00823d69" officeooo:paragraph-rsid="0005e77b" style:font-size-asian="15pt" style:font-weight-asian="bold" style:font-size-complex="15pt" style:font-weight-complex="bold"/>
    </style:style>
    <style:style style:name="P145" style:family="paragraph" style:parent-style-name="Standard">
      <style:text-properties fo:color="#3faf46" loext:opacity="100%" fo:font-size="18pt" fo:font-weight="bold" officeooo:rsid="00892204" officeooo:paragraph-rsid="0005e77b" style:font-size-asian="18pt" style:font-weight-asian="bold" style:font-size-complex="18pt" style:font-weight-complex="bold"/>
    </style:style>
    <style:style style:name="P146" style:family="paragraph" style:parent-style-name="Standard">
      <style:text-properties fo:color="#3faf46" loext:opacity="100%" fo:font-size="18pt" fo:font-weight="bold" officeooo:rsid="004dd0f9" officeooo:paragraph-rsid="0005e77b" style:font-size-asian="18pt" style:font-weight-asian="bold" style:font-size-complex="18pt" style:font-weight-complex="bold"/>
    </style:style>
    <style:style style:name="P147" style:family="paragraph" style:parent-style-name="Standard">
      <style:text-properties fo:color="#3faf46" loext:opacity="100%" fo:font-size="18pt" fo:font-weight="bold" officeooo:rsid="0009fcf7" officeooo:paragraph-rsid="000bef0f" style:font-size-asian="18pt" style:font-weight-asian="bold" style:font-size-complex="18pt" style:font-weight-complex="bold"/>
    </style:style>
    <style:style style:name="P148" style:family="paragraph" style:parent-style-name="Standard">
      <style:paragraph-properties fo:text-align="start" style:justify-single-word="false"/>
      <style:text-properties fo:color="#3faf46" loext:opacity="100%" fo:font-size="18pt" fo:font-style="italic" fo:font-weight="bold" officeooo:rsid="008e5cdb" officeooo:paragraph-rsid="0005e77b" style:font-size-asian="18pt" style:font-style-asian="italic" style:font-weight-asian="bold" style:font-size-complex="18pt" style:font-style-complex="italic" style:font-weight-complex="bold"/>
    </style:style>
    <style:style style:name="P149" style:family="paragraph" style:parent-style-name="Standard">
      <style:paragraph-properties fo:text-align="start" style:justify-single-word="false"/>
      <style:text-properties fo:color="#3faf46" loext:opacity="100%" fo:font-size="16pt" fo:font-weight="bold" officeooo:rsid="007721fc" officeooo:paragraph-rsid="007721fc" style:font-size-asian="16pt" style:font-weight-asian="bold" style:font-size-complex="16pt" style:font-weight-complex="bold"/>
    </style:style>
    <style:style style:name="P150" style:family="paragraph" style:parent-style-name="Standard">
      <style:text-properties fo:color="#ff5429" loext:opacity="100%" fo:font-size="18pt" fo:font-weight="bold" officeooo:rsid="00692b38" officeooo:paragraph-rsid="0005e77b" style:font-size-asian="18pt" style:font-weight-asian="bold" style:font-size-complex="18pt" style:font-weight-complex="bold"/>
    </style:style>
    <style:style style:name="P151" style:family="paragraph" style:parent-style-name="Standard">
      <style:paragraph-properties fo:text-align="start" style:justify-single-word="false"/>
      <style:text-properties fo:color="#ff5429" loext:opacity="100%" fo:font-size="26pt" officeooo:rsid="005d0d7e" officeooo:paragraph-rsid="005d0d7e" style:font-size-asian="26pt" style:font-size-complex="26pt"/>
    </style:style>
    <style:style style:name="P152" style:family="paragraph" style:parent-style-name="Standard">
      <style:text-properties fo:language="en" fo:country="US" officeooo:paragraph-rsid="0005e77b"/>
    </style:style>
    <style:style style:name="P153" style:family="paragraph" style:parent-style-name="Preformatted_20_Text">
      <style:paragraph-properties fo:text-align="start" style:justify-single-word="false"/>
      <style:text-properties fo:color="#069a2e" loext:opacity="100%" fo:font-size="26pt" officeooo:rsid="000bef0f" officeooo:paragraph-rsid="000bef0f" style:font-size-asian="26pt" style:font-size-complex="26pt"/>
    </style:style>
    <style:style style:name="P154" style:family="paragraph" style:parent-style-name="Standard">
      <style:paragraph-properties fo:text-align="start" style:justify-single-word="false"/>
      <style:text-properties fo:color="#069a2e" loext:opacity="100%" fo:font-size="26pt" officeooo:rsid="000bef0f" officeooo:paragraph-rsid="000bef0f" style:font-size-asian="26pt" style:font-size-complex="26pt"/>
    </style:style>
    <style:style style:name="P155" style:family="paragraph" style:parent-style-name="Standard">
      <style:paragraph-properties fo:text-align="start" style:justify-single-word="false"/>
      <style:text-properties fo:color="#069a2e" loext:opacity="100%" fo:font-size="26pt" officeooo:rsid="0003a816" officeooo:paragraph-rsid="0003a816" style:font-size-asian="26pt" style:font-size-complex="26pt"/>
    </style:style>
    <style:style style:name="P156" style:family="paragraph" style:parent-style-name="Text_20_body">
      <style:paragraph-properties fo:text-align="start" style:justify-single-word="false"/>
      <style:text-properties fo:color="#069a2e" loext:opacity="100%" fo:font-size="26pt" officeooo:rsid="0003a816" officeooo:paragraph-rsid="0003a816" style:font-size-asian="26pt" style:font-size-complex="26pt"/>
    </style:style>
    <style:style style:name="P157" style:family="paragraph" style:parent-style-name="Standard">
      <style:paragraph-properties fo:text-align="start" style:justify-single-word="false"/>
      <style:text-properties fo:color="#069a2e" loext:opacity="100%" fo:font-size="26pt" officeooo:rsid="0003a816" officeooo:paragraph-rsid="00382c73" style:font-size-asian="26pt" style:font-size-complex="26pt"/>
    </style:style>
    <style:style style:name="P158" style:family="paragraph" style:parent-style-name="Standard">
      <style:paragraph-properties fo:text-align="start" style:justify-single-word="false"/>
      <style:text-properties fo:color="#069a2e" loext:opacity="100%" fo:font-size="26pt" officeooo:rsid="002f9d20" officeooo:paragraph-rsid="002f9d20" style:font-size-asian="26pt" style:font-size-complex="26pt"/>
    </style:style>
    <style:style style:name="P159" style:family="paragraph" style:parent-style-name="Standard">
      <style:paragraph-properties fo:text-align="start" style:justify-single-word="false"/>
      <style:text-properties fo:color="#069a2e" loext:opacity="100%" fo:font-size="26pt" officeooo:rsid="00331bb6" officeooo:paragraph-rsid="00331bb6" style:font-size-asian="26pt" style:font-size-complex="26pt"/>
    </style:style>
    <style:style style:name="P160" style:family="paragraph" style:parent-style-name="Standard">
      <style:paragraph-properties fo:text-align="start" style:justify-single-word="false"/>
      <style:text-properties fo:color="#069a2e" loext:opacity="100%" fo:font-size="26pt" officeooo:rsid="002d6ed3" officeooo:paragraph-rsid="002d6ed3" style:font-size-asian="26pt" style:font-size-complex="26pt"/>
    </style:style>
    <style:style style:name="P161" style:family="paragraph" style:parent-style-name="Standard">
      <style:paragraph-properties fo:text-align="start" style:justify-single-word="false"/>
      <style:text-properties fo:color="#069a2e" loext:opacity="100%" fo:font-size="26pt" officeooo:rsid="005756dd" officeooo:paragraph-rsid="00d82f7b" style:font-size-asian="26pt" style:font-size-complex="26pt"/>
    </style:style>
    <style:style style:name="P162" style:family="paragraph" style:parent-style-name="Standard">
      <style:paragraph-properties fo:text-align="start" style:justify-single-word="false"/>
      <style:text-properties fo:color="#069a2e" loext:opacity="100%" fo:font-size="26pt" officeooo:rsid="00e69310" officeooo:paragraph-rsid="00e69310" style:font-size-asian="26pt" style:font-size-complex="26pt"/>
    </style:style>
    <style:style style:name="P163" style:family="paragraph" style:parent-style-name="Standard">
      <style:paragraph-properties fo:text-align="start" style:justify-single-word="false"/>
      <style:text-properties fo:color="#069a2e" loext:opacity="100%" fo:font-size="24pt" officeooo:rsid="0003a816" officeooo:paragraph-rsid="0003a816" style:font-size-asian="24pt" style:font-size-complex="24pt"/>
    </style:style>
    <style:style style:name="P164" style:family="paragraph" style:parent-style-name="Standard">
      <style:paragraph-properties fo:text-align="start" style:justify-single-word="false"/>
      <style:text-properties fo:color="#069a2e" loext:opacity="100%" fo:font-size="16pt" officeooo:rsid="0066c602" officeooo:paragraph-rsid="0066c602" style:font-size-asian="16pt" style:font-size-complex="16pt"/>
    </style:style>
    <style:style style:name="P165" style:family="paragraph" style:parent-style-name="Standard">
      <style:paragraph-properties fo:text-align="start" style:justify-single-word="false"/>
      <style:text-properties fo:color="#069a2e" loext:opacity="100%" fo:font-size="16pt" officeooo:rsid="00688b70" officeooo:paragraph-rsid="0066c602" style:font-size-asian="16pt" style:font-size-complex="16pt"/>
    </style:style>
    <style:style style:name="P166" style:family="paragraph" style:parent-style-name="Standard">
      <style:paragraph-properties fo:text-align="start" style:justify-single-word="false"/>
      <style:text-properties fo:color="#069a2e" loext:opacity="100%" fo:font-size="16pt" fo:font-weight="bold" officeooo:rsid="0064f3e1" officeooo:paragraph-rsid="0064f3e1" style:font-size-asian="14pt" style:font-weight-asian="bold" style:font-size-complex="16pt" style:font-weight-complex="bold"/>
    </style:style>
    <style:style style:name="P167" style:family="paragraph" style:parent-style-name="Standard">
      <style:paragraph-properties fo:text-align="start" style:justify-single-word="false"/>
      <style:text-properties fo:color="#069a2e" loext:opacity="100%" fo:font-size="16pt" officeooo:rsid="00619d32" officeooo:paragraph-rsid="00619d32" style:font-size-asian="14pt" style:font-size-complex="16pt"/>
    </style:style>
    <style:style style:name="P168" style:family="paragraph" style:parent-style-name="Standard">
      <style:paragraph-properties fo:text-align="start" style:justify-single-word="false"/>
      <style:text-properties fo:color="#069a2e" loext:opacity="100%" fo:font-size="16pt" officeooo:rsid="00638afe" officeooo:paragraph-rsid="00638afe" style:font-size-asian="14pt" style:font-size-complex="16pt"/>
    </style:style>
    <style:style style:name="P169" style:family="paragraph" style:parent-style-name="Standard">
      <style:paragraph-properties fo:text-align="start" style:justify-single-word="false"/>
      <style:text-properties fo:color="#069a2e" loext:opacity="100%" fo:font-size="16pt" officeooo:rsid="00638afe" officeooo:paragraph-rsid="00da4711" style:font-size-asian="14pt" style:font-size-complex="16pt"/>
    </style:style>
    <style:style style:name="P170" style:family="paragraph" style:parent-style-name="Standard">
      <style:paragraph-properties fo:text-align="start" style:justify-single-word="false"/>
      <style:text-properties fo:color="#069a2e" loext:opacity="100%" fo:font-size="16pt" officeooo:rsid="00638afe" officeooo:paragraph-rsid="00619d32" style:font-size-asian="14pt" style:font-size-complex="16pt"/>
    </style:style>
    <style:style style:name="P171" style:family="paragraph" style:parent-style-name="Standard">
      <style:paragraph-properties fo:text-align="start" style:justify-single-word="false"/>
      <style:text-properties fo:color="#069a2e" loext:opacity="100%" fo:font-size="16pt" officeooo:rsid="00df5cb2" officeooo:paragraph-rsid="00df5cb2" style:font-size-asian="14pt" style:font-size-complex="16pt"/>
    </style:style>
    <style:style style:name="P172" style:family="paragraph" style:parent-style-name="Standard">
      <style:text-properties fo:color="#069a2e" loext:opacity="100%" fo:font-size="20pt" fo:font-weight="bold" officeooo:rsid="000691a2" officeooo:paragraph-rsid="000691a2" style:font-size-asian="20pt" style:font-weight-asian="bold" style:font-size-complex="20pt" style:font-weight-complex="bold"/>
    </style:style>
    <style:style style:name="P173" style:family="paragraph" style:parent-style-name="Standard">
      <style:text-properties fo:color="#069a2e" loext:opacity="100%" fo:font-size="18pt" fo:font-weight="bold" officeooo:rsid="00725d53" officeooo:paragraph-rsid="00725d53" style:font-size-asian="18pt" style:font-weight-asian="bold" style:font-size-complex="18pt" style:font-weight-complex="bold"/>
    </style:style>
    <style:style style:name="P174" style:family="paragraph" style:parent-style-name="Standard">
      <style:text-properties fo:color="#069a2e" loext:opacity="100%" fo:font-size="18pt" fo:font-weight="bold" officeooo:rsid="00735c7f" officeooo:paragraph-rsid="00735c7f" style:font-size-asian="18pt" style:font-weight-asian="bold" style:font-size-complex="18pt" style:font-weight-complex="bold"/>
    </style:style>
    <style:style style:name="P175" style:family="paragraph" style:parent-style-name="Standard">
      <style:text-properties fo:color="#069a2e" loext:opacity="100%" fo:font-size="18pt" fo:font-weight="bold" officeooo:rsid="00435db3" officeooo:paragraph-rsid="0005e77b" style:font-size-asian="18pt" style:font-weight-asian="bold" style:font-size-complex="18pt" style:font-weight-complex="bold"/>
    </style:style>
    <style:style style:name="P176" style:family="paragraph" style:parent-style-name="Standard">
      <style:paragraph-properties fo:text-align="start" style:justify-single-word="false"/>
      <style:text-properties fo:color="#069a2e" loext:opacity="100%" fo:font-size="15pt" officeooo:rsid="000413f4" officeooo:paragraph-rsid="000413f4" style:font-size-asian="15pt" style:font-size-complex="15pt"/>
    </style:style>
    <style:style style:name="P177" style:family="paragraph" style:parent-style-name="Standard">
      <style:paragraph-properties fo:text-align="start" style:justify-single-word="false"/>
      <style:text-properties fo:color="#ff0000" loext:opacity="100%" fo:font-size="26pt" officeooo:rsid="0005e77b" officeooo:paragraph-rsid="0005e77b" style:font-size-asian="26pt" style:font-size-complex="26pt"/>
    </style:style>
    <style:style style:name="P178" style:family="paragraph" style:parent-style-name="Standard">
      <style:paragraph-properties fo:text-align="start" style:justify-single-word="false"/>
      <style:text-properties fo:color="#ff0000" loext:opacity="100%" fo:font-size="26pt" officeooo:rsid="00374a38" officeooo:paragraph-rsid="00374a38" style:font-size-asian="26pt" style:font-size-complex="26pt"/>
    </style:style>
    <style:style style:name="P179" style:family="paragraph" style:parent-style-name="Preformatted_20_Text">
      <style:paragraph-properties fo:text-align="start" style:justify-single-word="false"/>
      <style:text-properties fo:color="#ff0000" loext:opacity="100%" fo:font-size="18pt" fo:font-weight="bold" officeooo:rsid="001a3402" officeooo:paragraph-rsid="001a3402" style:font-size-asian="18pt" style:font-weight-asian="bold" style:font-size-complex="18pt" style:font-weight-complex="bold"/>
    </style:style>
    <style:style style:name="P180" style:family="paragraph" style:parent-style-name="Standard">
      <style:paragraph-properties fo:text-align="center" style:justify-single-word="false"/>
      <style:text-properties fo:color="#ff0000" loext:opacity="100%" fo:font-size="24pt" officeooo:rsid="0003a816" officeooo:paragraph-rsid="0003a816" style:font-size-asian="24pt" style:font-size-complex="24pt"/>
    </style:style>
    <style:style style:name="P181" style:family="paragraph" style:parent-style-name="Standard">
      <style:paragraph-properties fo:text-align="center" style:justify-single-word="false"/>
      <style:text-properties fo:color="#ff0000" loext:opacity="100%" fo:font-size="24pt" officeooo:rsid="0003a816" officeooo:paragraph-rsid="00ab02ba" style:font-size-asian="24pt" style:font-size-complex="24pt"/>
    </style:style>
    <style:style style:name="P182" style:family="paragraph" style:parent-style-name="Standard">
      <style:paragraph-properties fo:text-align="center" style:justify-single-word="false" fo:break-before="page"/>
      <style:text-properties fo:color="#ff0000" loext:opacity="100%" fo:font-size="24pt" officeooo:rsid="00ab02ba" officeooo:paragraph-rsid="00ab02ba" style:font-size-asian="24pt" style:font-size-complex="24pt"/>
    </style:style>
    <style:style style:name="P183" style:family="paragraph" style:parent-style-name="Standard">
      <style:paragraph-properties fo:text-align="center" style:justify-single-word="false"/>
      <style:text-properties fo:color="#ff0000" loext:opacity="100%" fo:font-size="24pt" officeooo:rsid="00ad9fc7" officeooo:paragraph-rsid="00ad9fc7" style:font-size-asian="24pt" style:font-size-complex="24pt"/>
    </style:style>
    <style:style style:name="P184" style:family="paragraph" style:parent-style-name="Standard">
      <style:paragraph-properties fo:text-align="center" style:justify-single-word="false"/>
      <style:text-properties fo:color="#ff0000" loext:opacity="100%" fo:font-size="24pt" officeooo:rsid="00ae11b8" officeooo:paragraph-rsid="00ae11b8" style:font-size-asian="24pt" style:font-size-complex="24pt"/>
    </style:style>
    <style:style style:name="P185" style:family="paragraph" style:parent-style-name="Standard">
      <style:paragraph-properties fo:text-align="center" style:justify-single-word="false"/>
      <style:text-properties fo:color="#ff0000" loext:opacity="100%" fo:font-size="24pt" officeooo:rsid="00ae11b8" officeooo:paragraph-rsid="00afee16" style:font-size-asian="24pt" style:font-size-complex="24pt"/>
    </style:style>
    <style:style style:name="P186" style:family="paragraph" style:parent-style-name="Standard">
      <style:paragraph-properties fo:text-align="center" style:justify-single-word="false"/>
      <style:text-properties fo:color="#ff0000" loext:opacity="100%" fo:font-size="24pt" officeooo:rsid="00b00f68" officeooo:paragraph-rsid="00b00f68" style:font-size-asian="24pt" style:font-size-complex="24pt"/>
    </style:style>
    <style:style style:name="P187" style:family="paragraph" style:parent-style-name="Standard">
      <style:paragraph-properties fo:text-align="center" style:justify-single-word="false"/>
      <style:text-properties fo:color="#ff0000" loext:opacity="100%" fo:font-size="24pt" officeooo:rsid="00afee16" officeooo:paragraph-rsid="00afee16" style:font-size-asian="24pt" style:font-size-complex="24pt"/>
    </style:style>
    <style:style style:name="P188" style:family="paragraph" style:parent-style-name="Standard">
      <style:paragraph-properties fo:text-align="center" style:justify-single-word="false" fo:break-before="page"/>
      <style:text-properties fo:color="#ff0000" loext:opacity="100%" fo:font-size="14pt" officeooo:rsid="00c42e82" officeooo:paragraph-rsid="00c42e82" style:font-size-asian="14pt" style:font-size-complex="14pt"/>
    </style:style>
    <style:style style:name="P189" style:family="paragraph" style:parent-style-name="Standard">
      <style:paragraph-properties fo:text-align="start" style:justify-single-word="false"/>
      <style:text-properties fo:color="#ff0000" loext:opacity="100%" fo:font-size="15pt" officeooo:paragraph-rsid="0079c7ff" fo:background-color="#ffff00" style:font-size-asian="15pt" style:font-size-complex="15pt"/>
    </style:style>
    <style:style style:name="P190" style:family="paragraph" style:parent-style-name="Standard">
      <style:paragraph-properties fo:text-align="start" style:justify-single-word="false"/>
      <style:text-properties fo:color="#ff0000" loext:opacity="100%" fo:font-size="20pt" fo:font-weight="bold" officeooo:rsid="00da4711" officeooo:paragraph-rsid="00da4711" style:font-size-asian="20pt" style:font-weight-asian="bold" style:font-size-complex="20pt" style:font-weight-complex="bold"/>
    </style:style>
    <style:style style:name="P191" style:family="paragraph" style:parent-style-name="Standard">
      <style:text-properties officeooo:rsid="0091e0cd" officeooo:paragraph-rsid="0005e77b"/>
    </style:style>
    <style:style style:name="P192" style:family="paragraph" style:parent-style-name="Standard">
      <style:paragraph-properties>
        <style:tab-stops>
          <style:tab-stop style:position="4.8063in"/>
        </style:tab-stops>
      </style:paragraph-properties>
      <style:text-properties officeooo:rsid="0091e0cd" officeooo:paragraph-rsid="0005e77b"/>
    </style:style>
    <style:style style:name="P193" style:family="paragraph" style:parent-style-name="Standard">
      <style:text-properties officeooo:rsid="0091e0cd" officeooo:paragraph-rsid="00267b7a"/>
    </style:style>
    <style:style style:name="P194" style:family="paragraph" style:parent-style-name="Standard">
      <style:text-properties officeooo:rsid="000bef0f" officeooo:paragraph-rsid="000bef0f"/>
    </style:style>
    <style:style style:name="P195" style:family="paragraph" style:parent-style-name="Standard">
      <style:text-properties fo:color="#f10d0c" loext:opacity="100%" fo:font-size="18pt" fo:font-weight="bold" officeooo:rsid="000ca821" officeooo:paragraph-rsid="000cc7b4" style:font-size-asian="18pt" style:font-weight-asian="bold" style:font-size-complex="18pt" style:font-weight-complex="bold"/>
    </style:style>
    <style:style style:name="P196" style:family="paragraph" style:parent-style-name="Standard">
      <style:text-properties fo:color="#f10d0c" loext:opacity="100%" fo:font-size="28pt" fo:font-weight="bold" officeooo:rsid="0009fcf7" officeooo:paragraph-rsid="0009fcf7" style:font-size-asian="28pt" style:font-weight-asian="bold" style:font-size-complex="28pt" style:font-weight-complex="bold"/>
    </style:style>
    <style:style style:name="P197" style:family="paragraph" style:parent-style-name="Standard">
      <style:text-properties fo:color="#f10d0c" loext:opacity="100%" fo:font-size="32pt" fo:font-weight="bold" officeooo:rsid="0009fcf7" officeooo:paragraph-rsid="0009fcf7" style:font-size-asian="32pt" style:font-weight-asian="bold" style:font-size-complex="32pt" style:font-weight-complex="bold"/>
    </style:style>
    <style:style style:name="P198" style:family="paragraph" style:parent-style-name="Standard">
      <style:text-properties fo:font-size="26pt" officeooo:rsid="000bef0f" officeooo:paragraph-rsid="000bef0f" style:font-size-asian="26pt" style:font-size-complex="26pt"/>
    </style:style>
    <style:style style:name="P199" style:family="paragraph" style:parent-style-name="Preformatted_20_Text">
      <style:paragraph-properties fo:text-align="start" style:justify-single-word="false"/>
      <style:text-properties fo:color="#729fcf" loext:opacity="100%" fo:font-size="18pt" fo:font-weight="bold" officeooo:rsid="0018436f" officeooo:paragraph-rsid="0018436f" style:font-size-asian="18pt" style:font-weight-asian="bold" style:font-size-complex="18pt" style:font-weight-complex="bold"/>
    </style:style>
    <style:style style:name="P200" style:family="paragraph" style:parent-style-name="Standard">
      <style:text-properties officeooo:rsid="001e8202" officeooo:paragraph-rsid="001e8202"/>
    </style:style>
    <style:style style:name="P201" style:family="paragraph" style:parent-style-name="Standard">
      <style:text-properties officeooo:rsid="002b924b" officeooo:paragraph-rsid="002b924b"/>
    </style:style>
    <style:style style:name="P202" style:family="paragraph" style:parent-style-name="Preformatted_20_Text">
      <style:paragraph-properties fo:text-align="start" style:justify-single-word="false"/>
      <style:text-properties fo:color="#f8f8f2" loext:opacity="100%" style:font-name="Roboto Mono2" fo:font-size="28pt" fo:font-weight="normal" officeooo:paragraph-rsid="00322f13"/>
    </style:style>
    <style:style style:name="P203" style:family="paragraph" style:parent-style-name="Standard">
      <style:paragraph-properties style:line-height-at-least="0.1417in"/>
      <style:text-properties fo:color="#000000" loext:opacity="100%" style:font-name="Droid Sans Mono" fo:font-size="7.5pt" fo:font-weight="normal" fo:background-color="#ffffff"/>
    </style:style>
    <style:style style:name="P204" style:family="paragraph" style:parent-style-name="Standard">
      <style:paragraph-properties fo:text-align="center" style:justify-single-word="false"/>
      <style:text-properties fo:color="#000000" loext:opacity="100%" style:font-name="Droid Sans Mono" fo:font-size="10.5pt" fo:font-weight="normal" officeooo:rsid="00b00f68" officeooo:paragraph-rsid="00b00f68" fo:background-color="#ffffff" style:font-size-asian="24pt" style:font-size-complex="24pt"/>
    </style:style>
    <style:style style:name="P205" style:family="paragraph" style:parent-style-name="Standard">
      <style:paragraph-properties fo:text-align="start" style:justify-single-word="false"/>
      <style:text-properties fo:color="#000000" loext:opacity="100%" fo:font-size="26pt" officeooo:rsid="00374a38" officeooo:paragraph-rsid="00374a38" style:font-size-asian="26pt" style:font-size-complex="26pt"/>
    </style:style>
    <style:style style:name="P206" style:family="paragraph" style:parent-style-name="Standard">
      <style:paragraph-properties fo:text-align="start" style:justify-single-word="false"/>
      <style:text-properties fo:color="#000000" loext:opacity="100%" fo:font-size="26pt" officeooo:rsid="00556c1b" officeooo:paragraph-rsid="00556c1b" style:font-size-asian="26pt" style:font-size-complex="26pt"/>
    </style:style>
    <style:style style:name="P207" style:family="paragraph" style:parent-style-name="Standard">
      <style:paragraph-properties style:line-height-at-least="0.1417in"/>
      <style:text-properties fo:color="#008000" loext:opacity="100%" style:font-name="Droid Sans Mono" fo:font-size="7.5pt" fo:font-weight="normal" fo:background-color="#ffffff"/>
    </style:style>
    <style:style style:name="P208" style:family="paragraph" style:parent-style-name="Standard">
      <style:paragraph-properties style:line-height-at-least="0.1417in"/>
    </style:style>
    <style:style style:name="P209" style:family="paragraph" style:parent-style-name="Text_20_body">
      <style:paragraph-properties fo:margin-top="0.0299in" fo:margin-bottom="0in" style:contextual-spacing="false" style:line-height-at-least="0.1492in" fo:orphans="2" fo:widows="2"/>
    </style:style>
    <style:style style:name="P210" style:family="paragraph" style:parent-style-name="Heading_20_3">
      <style:paragraph-properties fo:margin-top="0.0299in" fo:margin-bottom="0.0972in" style:contextual-spacing="false" style:line-height-at-least="0.1492in" fo:orphans="2" fo:widows="2"/>
    </style:style>
    <style:style style:name="P211" style:family="paragraph" style:parent-style-name="Preformatted_20_Text">
      <style:paragraph-properties fo:margin-top="0.0299in" fo:margin-bottom="0.0972in" style:contextual-spacing="false" style:line-height-at-least="0.1492in" fo:orphans="2" fo:widows="2"/>
    </style:style>
    <style:style style:name="P212" style:family="paragraph" style:parent-style-name="Heading_20_4">
      <style:paragraph-properties fo:margin-top="0.0299in" fo:margin-bottom="0.0972in" style:contextual-spacing="false" style:line-height-at-least="0.1492in" fo:orphans="2" fo:widows="2"/>
    </style:style>
    <style:style style:name="P213" style:family="paragraph" style:parent-style-name="Horizontal_20_Line">
      <style:paragraph-properties fo:margin-top="0.0299in" fo:margin-bottom="0.0972in" style:contextual-spacing="false" style:line-height-at-least="0.1492in" fo:orphans="2" fo:widows="2"/>
    </style:style>
    <style:style style:name="P214" style:family="paragraph" style:parent-style-name="Quotations">
      <style:paragraph-properties fo:margin-left="0in" fo:margin-right="0in" fo:margin-top="0in" fo:margin-bottom="0in" style:contextual-spacing="false" style:line-height-at-least="0.1492in" fo:orphans="2" fo:widows="2" fo:text-indent="0in" style:auto-text-indent="false" fo:padding="0in" fo:border="none"/>
    </style:style>
    <style:style style:name="P215" style:family="paragraph" style:parent-style-name="Heading_20_3">
      <style:paragraph-properties fo:margin-top="0.0299in" fo:margin-bottom="0.0972in" style:contextual-spacing="false" style:line-height-at-least="0.1492in"/>
    </style:style>
    <style:style style:name="P216" style:family="paragraph" style:parent-style-name="Preformatted_20_Text">
      <style:paragraph-properties fo:margin-top="0.0299in" fo:margin-bottom="0.0972in" style:contextual-spacing="false" style:line-height-at-least="0.1492in"/>
    </style:style>
    <style:style style:name="P217" style:family="paragraph" style:parent-style-name="Text_20_body">
      <style:paragraph-properties fo:margin-top="0.0299in" fo:margin-bottom="0in" style:contextual-spacing="false" style:line-height-at-least="0.1492in"/>
    </style:style>
    <style:style style:name="P218" style:family="paragraph" style:parent-style-name="Text_20_body">
      <style:paragraph-properties fo:margin-left="0in" fo:margin-right="0in" fo:margin-top="0in" fo:margin-bottom="0in" style:contextual-spacing="false" fo:orphans="2" fo:widows="2" fo:text-indent="0in" style:auto-text-indent="false"/>
    </style:style>
    <style:style style:name="P219" style:family="paragraph" style:parent-style-name="Heading_20_3">
      <style:paragraph-properties fo:margin-left="0in" fo:margin-right="0in" fo:orphans="2" fo:widows="2" fo:text-indent="0in" style:auto-text-indent="false"/>
    </style:style>
    <style:style style:name="P220" style:family="paragraph" style:parent-style-name="Heading_20_4">
      <style:paragraph-properties fo:margin-left="0in" fo:margin-right="0in" fo:orphans="2" fo:widows="2" fo:text-indent="0in" style:auto-text-indent="false"/>
    </style:style>
    <style:style style:name="P221" style:family="paragraph" style:parent-style-name="Preformatted_20_Text">
      <style:paragraph-properties fo:orphans="2" fo:widows="2" fo:text-indent="0in" style:auto-text-indent="false"/>
    </style:style>
    <style:style style:name="P222" style:family="paragraph" style:parent-style-name="Preformatted_20_Text">
      <style:paragraph-properties fo:margin-top="0in" fo:margin-bottom="0.1965in" style:contextual-spacing="false" fo:orphans="2" fo:widows="2" fo:text-indent="0in" style:auto-text-indent="false"/>
    </style:style>
    <style:style style:name="P223" style:family="paragraph" style:parent-style-name="Preformatted_20_Text">
      <style:paragraph-properties fo:margin-top="0in" fo:margin-bottom="0.1965in" style:contextual-spacing="false" fo:orphans="2" fo:widows="2"/>
    </style:style>
    <style:style style:name="P224" style:family="paragraph" style:parent-style-name="Preformatted_20_Text">
      <style:paragraph-properties fo:orphans="2" fo:widows="2"/>
    </style:style>
    <style:style style:name="P225" style:family="paragraph" style:parent-style-name="Standard">
      <style:text-properties officeooo:rsid="00449403" officeooo:paragraph-rsid="00449403"/>
    </style:style>
    <style:style style:name="P226" style:family="paragraph" style:parent-style-name="Heading_20_2">
      <style:paragraph-properties fo:margin-left="0in" fo:margin-right="0in" fo:margin-top="0.0445in" fo:margin-bottom="0.0445in" style:contextual-spacing="false" fo:text-indent="0in" style:auto-text-indent="false" fo:padding="0in" fo:border="none"/>
      <style:text-properties fo:font-size="7.5pt" fo:font-weight="bold" fo:background-color="#ffffff" loext:padding="0in" loext:border="none"/>
    </style:style>
    <style:style style:name="P227" style:family="paragraph" style:parent-style-name="Text_20_body">
      <style:text-properties fo:color="#616161" loext:opacity="100%" fo:background-color="#ffffff" loext:padding="0in" loext:border="none"/>
    </style:style>
    <style:style style:name="P228" style:family="paragraph" style:parent-style-name="Text_20_body">
      <style:paragraph-properties fo:margin-top="0in" fo:margin-bottom="0in" style:contextual-spacing="false"/>
    </style:style>
    <style:style style:name="P229" style:family="paragraph" style:parent-style-name="Text_20_body">
      <style:paragraph-properties fo:margin-left="0.0598in" fo:margin-right="0.0598in" fo:margin-top="0in" fo:margin-bottom="0.0146in" style:contextual-spacing="false" fo:text-indent="0in" style:auto-text-indent="false"/>
      <style:text-properties fo:background-color="#ffffff" loext:padding="0in" loext:border="none"/>
    </style:style>
    <style:style style:name="P230" style:family="paragraph" style:parent-style-name="Text_20_body">
      <style:paragraph-properties fo:margin-left="0.1043in" fo:margin-right="0.0598in" fo:margin-top="0in" fo:margin-bottom="0.0146in" style:contextual-spacing="false" fo:text-indent="0in" style:auto-text-indent="false"/>
      <style:text-properties fo:background-color="#ffffff" loext:padding="0in" loext:border="none"/>
    </style:style>
    <style:style style:name="P231" style:family="paragraph" style:parent-style-name="Text_20_body">
      <style:paragraph-properties fo:margin-left="0in" fo:margin-right="0in" fo:margin-top="0in" fo:margin-bottom="0in" style:contextual-spacing="false" fo:text-indent="0in" style:auto-text-indent="false"/>
      <style:text-properties fo:background-color="#ffffff" loext:padding="0in" loext:border="none"/>
    </style:style>
    <style:style style:name="P232" style:family="paragraph" style:parent-style-name="Text_20_body">
      <style:paragraph-properties fo:margin-left="0.1339in" fo:margin-right="0.2083in" fo:margin-top="0in" fo:margin-bottom="0in" style:contextual-spacing="false" fo:text-indent="0in" style:auto-text-indent="false"/>
      <style:text-properties fo:color="#007acc" loext:opacity="100%" fo:font-size="7.5pt" fo:font-weight="bold" fo:background-color="#ffffff" loext:padding="0in" loext:border="none"/>
    </style:style>
    <style:style style:name="P233" style:family="paragraph" style:parent-style-name="Text_20_body">
      <style:paragraph-properties fo:margin-top="0in" fo:margin-bottom="0in" style:contextual-spacing="false"/>
      <style:text-properties fo:font-size="24pt" style:font-size-asian="21pt" style:font-size-complex="24pt"/>
    </style:style>
    <style:style style:name="P234" style:family="paragraph" style:parent-style-name="Text_20_body">
      <style:paragraph-properties fo:margin-top="0in" fo:margin-bottom="0in" style:contextual-spacing="false"/>
      <style:text-properties officeooo:rsid="0052dbce" officeooo:paragraph-rsid="0052dbce"/>
    </style:style>
    <style:style style:name="P235" style:family="paragraph" style:parent-style-name="Text_20_body">
      <style:paragraph-properties fo:margin-left="0in" fo:margin-right="0in" fo:margin-top="0in" fo:margin-bottom="0in" style:contextual-spacing="false" fo:orphans="2" fo:widows="2" fo:text-indent="0in" style:auto-text-indent="false"/>
      <style:text-properties loext:padding="0in" loext:border="none"/>
    </style:style>
    <style:style style:name="P236" style:family="paragraph" style:parent-style-name="Standard">
      <style:paragraph-properties fo:text-align="start" style:justify-single-word="false"/>
      <style:text-properties fo:color="#ed4c05" loext:opacity="100%" fo:font-size="26pt" fo:font-weight="bold" officeooo:rsid="007721fc" officeooo:paragraph-rsid="007721fc" style:font-size-asian="26pt" style:font-weight-asian="bold" style:font-size-complex="26pt" style:font-weight-complex="bold"/>
    </style:style>
    <style:style style:name="P237" style:family="paragraph" style:parent-style-name="Standard">
      <style:paragraph-properties fo:text-align="start" style:justify-single-word="false"/>
      <style:text-properties fo:color="#ed4c05" loext:opacity="100%" fo:font-size="26pt" fo:font-weight="bold" officeooo:rsid="0003a816" officeooo:paragraph-rsid="0003a816" style:font-size-asian="26pt" style:font-weight-asian="bold" style:font-size-complex="26pt" style:font-weight-complex="bold"/>
    </style:style>
    <style:style style:name="P238" style:family="paragraph" style:parent-style-name="Standard">
      <style:paragraph-properties fo:text-align="start" style:justify-single-word="false"/>
      <style:text-properties officeooo:paragraph-rsid="0079c7ff"/>
    </style:style>
    <style:style style:name="P239" style:family="paragraph" style:parent-style-name="Standard">
      <style:text-properties fo:font-size="16pt" fo:font-weight="bold" officeooo:rsid="00435db3" officeooo:paragraph-rsid="0005e77b" style:font-size-asian="16pt" style:font-weight-asian="bold" style:font-size-complex="16pt" style:font-weight-complex="bold"/>
    </style:style>
    <style:style style:name="P240" style:family="paragraph" style:parent-style-name="Standard">
      <style:paragraph-properties fo:text-align="center" style:justify-single-word="false"/>
      <style:text-properties fo:color="#81d41a" loext:opacity="100%" fo:font-size="24pt" officeooo:rsid="00ae11b8" officeooo:paragraph-rsid="00afee16" style:font-size-asian="24pt" style:font-size-complex="24pt"/>
    </style:style>
    <style:style style:name="P241" style:family="paragraph" style:parent-style-name="Standard">
      <style:paragraph-properties fo:text-align="center" style:justify-single-word="false"/>
      <style:text-properties fo:color="#81d41a" loext:opacity="100%" fo:font-size="24pt" officeooo:rsid="00b00f68" officeooo:paragraph-rsid="00b00f68" style:font-size-asian="24pt" style:font-size-complex="24pt"/>
    </style:style>
    <style:style style:name="P242" style:family="paragraph" style:parent-style-name="Standard">
      <style:paragraph-properties fo:text-align="center" style:justify-single-word="false"/>
      <style:text-properties fo:color="#81d41a" loext:opacity="100%" fo:font-size="24pt" officeooo:rsid="00b41f7c" officeooo:paragraph-rsid="00b41f7c" style:font-size-asian="24pt" style:font-size-complex="24pt"/>
    </style:style>
    <style:style style:name="P243" style:family="paragraph" style:parent-style-name="Standard">
      <style:paragraph-properties fo:text-align="center" style:justify-single-word="false" fo:break-before="page"/>
      <style:text-properties fo:color="#81d41a" loext:opacity="100%" fo:font-size="24pt" officeooo:rsid="00b899fa" officeooo:paragraph-rsid="00b899fa" style:font-size-asian="24pt" style:font-size-complex="24pt"/>
    </style:style>
    <style:style style:name="P244" style:family="paragraph" style:parent-style-name="Standard">
      <style:paragraph-properties fo:text-align="center" style:justify-single-word="false"/>
      <style:text-properties fo:color="#81d41a" loext:opacity="100%" fo:font-size="24pt" officeooo:rsid="00b899fa" officeooo:paragraph-rsid="00b899fa" style:font-size-asian="24pt" style:font-size-complex="24pt"/>
    </style:style>
    <style:style style:name="P245" style:family="paragraph" style:parent-style-name="Standard">
      <style:paragraph-properties fo:text-align="center" style:justify-single-word="false"/>
      <style:text-properties fo:color="#81d41a" loext:opacity="100%" fo:font-size="24pt" officeooo:rsid="00baba5f" officeooo:paragraph-rsid="00baba5f" style:font-size-asian="24pt" style:font-size-complex="24pt"/>
    </style:style>
    <style:style style:name="P246" style:family="paragraph" style:parent-style-name="Standard">
      <style:paragraph-properties fo:text-align="center" style:justify-single-word="false"/>
      <style:text-properties fo:color="#81d41a" loext:opacity="100%" fo:font-size="24pt" officeooo:rsid="00be5fe5" officeooo:paragraph-rsid="00be5fe5" style:font-size-asian="24pt" style:font-size-complex="24pt"/>
    </style:style>
    <style:style style:name="P247" style:family="paragraph" style:parent-style-name="Standard">
      <style:paragraph-properties fo:text-align="center" style:justify-single-word="false"/>
      <style:text-properties fo:color="#81d41a" loext:opacity="100%" fo:font-size="24pt" officeooo:rsid="00c4afde" officeooo:paragraph-rsid="00c4afde" style:font-size-asian="24pt" style:font-size-complex="24pt"/>
    </style:style>
    <style:style style:name="P248" style:family="paragraph" style:parent-style-name="Standard">
      <style:paragraph-properties fo:text-align="center" style:justify-single-word="false" fo:break-before="column"/>
      <style:text-properties fo:color="#81d41a" loext:opacity="100%" fo:font-size="24pt" officeooo:rsid="00c4afde" officeooo:paragraph-rsid="00c4afde" style:font-size-asian="24pt" style:font-size-complex="24pt"/>
    </style:style>
    <style:style style:name="P249" style:family="paragraph" style:parent-style-name="Standard">
      <style:paragraph-properties fo:text-align="center" style:justify-single-word="false" fo:break-before="column"/>
      <style:text-properties fo:color="#81d41a" loext:opacity="100%" fo:font-size="24pt" officeooo:rsid="00c4cb6f" officeooo:paragraph-rsid="00c4cb6f" style:font-size-asian="24pt" style:font-size-complex="24pt"/>
    </style:style>
    <style:style style:name="P250" style:family="paragraph" style:parent-style-name="Standard">
      <style:paragraph-properties fo:text-align="center" style:justify-single-word="false"/>
      <style:text-properties fo:color="#81d41a" loext:opacity="100%" fo:font-size="14pt" officeooo:rsid="00c4afde" officeooo:paragraph-rsid="00c4afde" style:font-size-asian="14pt" style:font-size-complex="14pt"/>
    </style:style>
    <style:style style:name="P251" style:family="paragraph" style:parent-style-name="Standard">
      <style:paragraph-properties fo:text-align="center" style:justify-single-word="false"/>
      <style:text-properties fo:color="#1d2a3e" loext:opacity="100%" fo:font-size="9pt" officeooo:rsid="00b899fa" officeooo:paragraph-rsid="00b899fa" style:font-size-asian="24pt" style:font-size-complex="24pt"/>
    </style:style>
    <style:style style:name="P252" style:family="paragraph" style:parent-style-name="Standard">
      <style:paragraph-properties fo:text-align="center" style:justify-single-word="false"/>
      <style:text-properties fo:color="#1d2a3e" loext:opacity="100%" style:font-name="Roboto Mono" fo:font-size="9pt" fo:font-weight="normal" officeooo:rsid="00b899fa" officeooo:paragraph-rsid="00b899fa" fo:background-color="#f6f9fc" style:font-size-asian="24pt" style:font-size-complex="24pt"/>
    </style:style>
    <style:style style:name="P253" style:family="paragraph" style:parent-style-name="Standard">
      <style:paragraph-properties fo:text-align="center" style:justify-single-word="false"/>
      <style:text-properties fo:color="#1d2a3e" loext:opacity="100%" style:font-name="Roboto Mono" fo:font-size="9pt" fo:font-weight="normal" officeooo:rsid="00c4afde" officeooo:paragraph-rsid="00c4afde" fo:background-color="#f6f9fc" style:font-size-asian="24pt" style:font-size-complex="24pt"/>
    </style:style>
    <style:style style:name="P254" style:family="paragraph" style:parent-style-name="Standard">
      <style:paragraph-properties style:line-height-at-least="0.2189in"/>
      <style:text-properties fo:color="#1d2a3e" loext:opacity="100%" style:font-name="Roboto Mono" fo:font-size="9pt" fo:font-weight="normal" fo:background-color="#f6f9fc"/>
    </style:style>
    <style:style style:name="P255" style:family="paragraph" style:parent-style-name="Standard">
      <style:paragraph-properties fo:text-align="center" style:justify-single-word="false"/>
      <style:text-properties fo:color="#3465a4" loext:opacity="100%" fo:font-size="14pt" officeooo:rsid="00b899fa" officeooo:paragraph-rsid="00b899fa" style:font-size-asian="14pt" style:font-size-complex="14pt"/>
    </style:style>
    <style:style style:name="P256" style:family="paragraph" style:parent-style-name="Standard">
      <style:paragraph-properties fo:text-align="center" style:justify-single-word="false"/>
      <style:text-properties fo:color="#5983b0" loext:opacity="100%" fo:font-size="24pt" officeooo:rsid="00c6ace9" officeooo:paragraph-rsid="00c6ace9" style:font-size-asian="24pt" style:font-size-complex="24pt"/>
    </style:style>
    <style:style style:name="P257" style:family="paragraph" style:parent-style-name="Preformatted_20_Text">
      <loext:graphic-properties draw:fill="solid" draw:fill-color="#f6f6f6" draw:opacity="100%"/>
      <style:paragraph-properties fo:margin-left="0in" fo:margin-right="0in" fo:margin-top="0in" fo:margin-bottom="0in" style:contextual-spacing="false" fo:line-height="130%" fo:background-color="#f6f6f6" fo:padding="0in" fo:border="none"/>
    </style:style>
    <style:style style:name="P258" style:family="paragraph" style:parent-style-name="Standard">
      <style:paragraph-properties fo:text-align="center" style:justify-single-word="false"/>
      <style:text-properties fo:color="#e8a202" loext:opacity="100%" fo:font-size="15pt" officeooo:rsid="00c4afde" officeooo:paragraph-rsid="00c4afde" style:font-size-asian="15pt" style:font-size-complex="15pt"/>
    </style:style>
    <style:style style:name="P259" style:family="paragraph" style:parent-style-name="Preformatted_20_Text">
      <style:paragraph-properties fo:text-align="start" style:justify-single-word="false"/>
      <style:text-properties fo:color="#e8a202" loext:opacity="100%" fo:font-size="15pt" officeooo:rsid="00f34090" officeooo:paragraph-rsid="00f34090" style:font-size-asian="15pt" style:font-size-complex="15pt"/>
    </style:style>
    <style:style style:name="P260" style:family="paragraph" style:parent-style-name="Standard">
      <style:paragraph-properties fo:text-align="start" style:justify-single-word="false"/>
      <style:text-properties fo:color="#e8a202" loext:opacity="100%" fo:font-size="15pt" officeooo:rsid="00f34090" officeooo:paragraph-rsid="00f34090" style:font-size-asian="15pt" style:font-size-complex="15pt"/>
    </style:style>
    <style:style style:name="P261" style:family="paragraph" style:parent-style-name="Standard">
      <style:paragraph-properties fo:text-align="start" style:justify-single-word="false"/>
      <style:text-properties fo:color="#e8a202" loext:opacity="100%" fo:font-size="15pt" officeooo:rsid="00ee874a" officeooo:paragraph-rsid="00ee874a" style:font-size-asian="15pt" style:font-size-complex="15pt"/>
    </style:style>
    <style:style style:name="P262" style:family="paragraph" style:parent-style-name="Standard">
      <style:paragraph-properties fo:text-align="center" style:justify-single-word="false"/>
      <style:text-properties fo:color="#5eb91e" loext:opacity="100%" fo:font-size="20pt" fo:font-weight="bold" officeooo:rsid="00ee874a" officeooo:paragraph-rsid="00ee874a" style:font-size-asian="20pt" style:font-weight-asian="bold" style:font-size-complex="20pt" style:font-weight-complex="bold"/>
    </style:style>
    <style:style style:name="P263" style:family="paragraph" style:parent-style-name="Heading_20_3" style:list-style-name="L2">
      <style:paragraph-properties fo:text-align="start" style:justify-single-word="false"/>
      <style:text-properties fo:font-variant="normal" fo:text-transform="none" fo:color="#069a2e" loext:opacity="100%" style:font-name="Roboto" fo:font-size="26pt" fo:letter-spacing="normal" fo:font-style="normal" fo:font-weight="normal" officeooo:rsid="0003a816" officeooo:paragraph-rsid="0095848a" style:font-size-asian="26pt" style:font-size-complex="26pt"/>
    </style:style>
    <style:style style:name="P264" style:family="paragraph" style:parent-style-name="Heading_20_3" style:list-style-name="L2">
      <style:paragraph-properties fo:text-align="start" style:justify-single-word="false"/>
      <style:text-properties fo:color="#069a2e" loext:opacity="100%" fo:font-size="26pt" officeooo:rsid="0003a816" officeooo:paragraph-rsid="0095848a" style:font-size-asian="26pt" style:font-size-complex="26pt"/>
    </style:style>
    <style:style style:name="P265" style:family="paragraph" style:parent-style-name="Preformatted_20_Text" style:list-style-name="L7">
      <style:paragraph-properties fo:orphans="2" fo:widows="2"/>
      <style:text-properties fo:font-variant="normal" fo:text-transform="none" fo:color="#616161" loext:opacity="100%" style:font-name="system-ui" fo:font-size="7pt" fo:letter-spacing="normal" fo:font-style="normal" fo:font-weight="normal"/>
    </style:style>
    <style:style style:name="P266" style:family="paragraph" style:parent-style-name="Preformatted_20_Text" style:list-style-name="L8">
      <style:paragraph-properties fo:margin-top="0.0299in" fo:margin-bottom="0.0972in" style:contextual-spacing="false" style:line-height-at-least="0.1492in" fo:orphans="2" fo:widows="2"/>
      <style:text-properties fo:font-variant="normal" fo:text-transform="none" fo:color="#616161" loext:opacity="100%" style:font-name="system-ui" fo:font-size="7pt" fo:letter-spacing="normal" fo:font-style="normal" fo:font-weight="normal" loext:padding="0in" loext:border="none"/>
    </style:style>
    <style:style style:name="P267" style:family="paragraph" style:parent-style-name="Preformatted_20_Text" style:list-style-name="L9">
      <style:paragraph-properties fo:margin-top="0.0299in" fo:margin-bottom="0.0972in" style:contextual-spacing="false" style:line-height-at-least="0.1492in" fo:orphans="2" fo:widows="2"/>
      <style:text-properties fo:font-variant="normal" fo:text-transform="none" fo:color="#616161" loext:opacity="100%" style:font-name="system-ui" fo:font-size="7pt" fo:letter-spacing="normal" fo:font-style="normal" fo:font-weight="normal" loext:padding="0in" loext:border="none"/>
    </style:style>
    <style:style style:name="P268" style:family="paragraph" style:parent-style-name="Preformatted_20_Text" style:list-style-name="L10">
      <style:paragraph-properties fo:margin-top="0.0299in" fo:margin-bottom="0.0972in" style:contextual-spacing="false" style:line-height-at-least="0.1492in" fo:orphans="2" fo:widows="2"/>
      <style:text-properties fo:font-variant="normal" fo:text-transform="none" fo:color="#616161" loext:opacity="100%" style:font-name="system-ui" fo:font-size="7pt" fo:letter-spacing="normal" fo:font-style="normal" fo:font-weight="normal" loext:padding="0in" loext:border="none"/>
    </style:style>
    <style:style style:name="P269" style:family="paragraph" style:parent-style-name="Preformatted_20_Text" style:list-style-name="L15">
      <style:paragraph-properties fo:margin-top="0.0299in" fo:margin-bottom="0.0972in" style:contextual-spacing="false" style:line-height-at-least="0.1492in"/>
      <style:text-properties fo:font-variant="normal" fo:text-transform="none" fo:color="#616161" loext:opacity="100%" style:font-name="system-ui" fo:font-size="7pt" fo:font-style="normal" fo:font-weight="normal" loext:padding="0in" loext:border="none"/>
    </style:style>
    <style:style style:name="P270" style:family="paragraph" style:parent-style-name="Preformatted_20_Text" style:list-style-name="L7">
      <style:paragraph-properties fo:margin-top="0in" fo:margin-bottom="0.1965in" style:contextual-spacing="false" fo:orphans="2" fo:widows="2"/>
    </style:style>
    <style:style style:name="P271" style:family="paragraph" style:parent-style-name="Preformatted_20_Text">
      <style:paragraph-properties fo:margin-top="0in" fo:margin-bottom="0.1965in" style:contextual-spacing="false" fo:orphans="2" fo:widows="2" fo:text-indent="0in" style:auto-text-indent="false"/>
      <style:text-properties officeooo:paragraph-rsid="00d63bc3"/>
    </style:style>
    <style:style style:name="P272" style:family="paragraph" style:parent-style-name="Preformatted_20_Text" style:list-style-name="L8">
      <style:paragraph-properties fo:margin-top="0.0299in" fo:margin-bottom="0.0972in" style:contextual-spacing="false" style:line-height-at-least="0.1492in" fo:orphans="2" fo:widows="2"/>
    </style:style>
    <style:style style:name="P273" style:family="paragraph" style:parent-style-name="Preformatted_20_Text" style:list-style-name="L9">
      <style:paragraph-properties fo:margin-top="0.0299in" fo:margin-bottom="0.0972in" style:contextual-spacing="false" style:line-height-at-least="0.1492in" fo:orphans="2" fo:widows="2"/>
    </style:style>
    <style:style style:name="P274" style:family="paragraph" style:parent-style-name="Preformatted_20_Text" style:list-style-name="L10">
      <style:paragraph-properties fo:margin-top="0.0299in" fo:margin-bottom="0.0972in" style:contextual-spacing="false" style:line-height-at-least="0.1492in" fo:orphans="2" fo:widows="2"/>
    </style:style>
    <style:style style:name="P275" style:family="paragraph" style:parent-style-name="Preformatted_20_Text" style:list-style-name="L15">
      <style:paragraph-properties fo:margin-top="0.0299in" fo:margin-bottom="0.0972in" style:contextual-spacing="false" style:line-height-at-least="0.1492in"/>
    </style:style>
    <style:style style:name="P276" style:family="paragraph" style:parent-style-name="Standard" style:list-style-name="L1">
      <style:paragraph-properties fo:text-align="start" style:justify-single-word="false"/>
      <style:text-properties fo:color="#c9211e" loext:opacity="100%" fo:font-size="26pt" officeooo:rsid="000413f4" officeooo:paragraph-rsid="000413f4" style:font-size-asian="26pt" style:font-size-complex="26pt"/>
    </style:style>
    <style:style style:name="P277" style:family="paragraph" style:parent-style-name="Standard" style:list-style-name="L1">
      <style:paragraph-properties fo:text-align="start" style:justify-single-word="false"/>
      <style:text-properties fo:color="#c9211e" loext:opacity="100%" fo:font-size="26pt" officeooo:rsid="0005e77b" officeooo:paragraph-rsid="0005e77b" style:font-size-asian="26pt" style:font-size-complex="26pt"/>
    </style:style>
    <style:style style:name="P278" style:family="paragraph" style:parent-style-name="Standard">
      <style:paragraph-properties fo:text-align="center" style:justify-single-word="false"/>
      <style:text-properties fo:color="#c9211e" loext:opacity="100%" fo:font-size="26pt" officeooo:rsid="004a14dc" officeooo:paragraph-rsid="00fdba55" style:font-size-asian="26pt" style:font-size-complex="26pt"/>
    </style:style>
    <style:style style:name="P279" style:family="paragraph" style:parent-style-name="Standard">
      <style:paragraph-properties fo:text-align="center" style:justify-single-word="false"/>
      <style:text-properties fo:color="#c9211e" loext:opacity="100%" fo:font-size="26pt" officeooo:rsid="00fe0b47" officeooo:paragraph-rsid="00fe0b47" style:font-size-asian="26pt" style:font-size-complex="26pt"/>
    </style:style>
    <style:style style:name="P280" style:family="paragraph" style:parent-style-name="Standard" style:list-style-name="L1">
      <style:paragraph-properties fo:text-align="start" style:justify-single-word="false"/>
      <style:text-properties fo:color="#ff4000" loext:opacity="100%" officeooo:paragraph-rsid="00ea41d5"/>
    </style:style>
    <style:style style:name="P281" style:family="paragraph" style:parent-style-name="Standard" style:list-style-name="L3">
      <style:paragraph-properties fo:text-align="start" style:justify-single-word="false"/>
      <style:text-properties fo:color="#069a2e" loext:opacity="100%" fo:font-size="26pt" officeooo:rsid="0095848a" officeooo:paragraph-rsid="0095848a" style:font-size-asian="26pt" style:font-size-complex="26pt"/>
    </style:style>
    <style:style style:name="P282" style:family="paragraph" style:parent-style-name="Standard" style:list-style-name="L4">
      <style:paragraph-properties fo:text-align="start" style:justify-single-word="false"/>
      <style:text-properties fo:color="#ff860d" loext:opacity="100%" fo:font-size="26pt" officeooo:rsid="002d6ed3" officeooo:paragraph-rsid="002d6ed3" style:font-size-asian="26pt" style:font-size-complex="26pt"/>
    </style:style>
    <style:style style:name="P283" style:family="paragraph" style:parent-style-name="Standard" style:list-style-name="L5">
      <style:text-properties officeooo:paragraph-rsid="0005e77b"/>
    </style:style>
    <style:style style:name="P284" style:family="paragraph" style:parent-style-name="Standard" style:list-style-name="L5">
      <style:text-properties officeooo:rsid="00119b1b" officeooo:paragraph-rsid="0005e77b"/>
    </style:style>
    <style:style style:name="P285" style:family="paragraph" style:parent-style-name="Standard" style:list-style-name="L5">
      <style:text-properties officeooo:rsid="001354a2" officeooo:paragraph-rsid="0005e77b"/>
    </style:style>
    <style:style style:name="P286" style:family="paragraph" style:parent-style-name="Standard" style:list-style-name="L5">
      <style:text-properties officeooo:rsid="0011e4e1" officeooo:paragraph-rsid="0005e77b"/>
    </style:style>
    <style:style style:name="P287" style:family="paragraph" style:parent-style-name="Standard">
      <style:paragraph-properties fo:text-align="start" style:justify-single-word="false"/>
      <style:text-properties officeooo:paragraph-rsid="00fa1456"/>
    </style:style>
    <style:style style:name="P288" style:family="paragraph" style:parent-style-name="Standard">
      <style:paragraph-properties fo:text-align="center" style:justify-single-word="false"/>
      <style:text-properties fo:color="#5983b0" loext:opacity="100%" fo:font-size="26pt" fo:font-weight="bold" officeooo:rsid="00fe0b47" officeooo:paragraph-rsid="00fe0b47" style:font-size-asian="26pt" style:font-weight-asian="bold" style:font-size-complex="26pt" style:font-weight-complex="bold"/>
    </style:style>
    <style:style style:name="P289" style:family="paragraph" style:parent-style-name="Text_20_body" style:list-style-name="L6">
      <style:paragraph-properties fo:margin-top="0in" fo:margin-bottom="0in" style:contextual-spacing="false" fo:orphans="2" fo:widows="2" fo:padding="0in" fo:border="none"/>
    </style:style>
    <style:style style:name="P290" style:family="paragraph" style:parent-style-name="Text_20_body" style:list-style-name="L6">
      <style:paragraph-properties fo:orphans="2" fo:widows="2" fo:padding="0in" fo:border="none"/>
    </style:style>
    <style:style style:name="P291" style:family="paragraph" style:parent-style-name="Text_20_body" style:list-style-name="L7">
      <style:paragraph-properties fo:margin-top="0in" fo:margin-bottom="0in" style:contextual-spacing="false" fo:orphans="2" fo:widows="2"/>
    </style:style>
    <style:style style:name="P292" style:family="paragraph" style:parent-style-name="Text_20_body" style:list-style-name="L11">
      <style:paragraph-properties fo:margin-top="0in" fo:margin-bottom="0in" style:contextual-spacing="false" fo:orphans="2" fo:widows="2"/>
    </style:style>
    <style:style style:name="P293" style:family="paragraph" style:parent-style-name="Text_20_body" style:list-style-name="L11">
      <style:paragraph-properties fo:orphans="2" fo:widows="2"/>
    </style:style>
    <style:style style:name="P294" style:family="paragraph" style:parent-style-name="Text_20_body" style:list-style-name="L12">
      <style:paragraph-properties fo:margin-top="0in" fo:margin-bottom="0in" style:contextual-spacing="false" fo:orphans="2" fo:widows="2"/>
    </style:style>
    <style:style style:name="P295" style:family="paragraph" style:parent-style-name="Text_20_body" style:list-style-name="L12">
      <style:paragraph-properties fo:orphans="2" fo:widows="2"/>
    </style:style>
    <style:style style:name="P296" style:family="paragraph" style:parent-style-name="Text_20_body" style:list-style-name="L13">
      <style:paragraph-properties fo:margin-top="0in" fo:margin-bottom="0in" style:contextual-spacing="false" fo:orphans="2" fo:widows="2"/>
    </style:style>
    <style:style style:name="P297" style:family="paragraph" style:parent-style-name="Text_20_body" style:list-style-name="L13">
      <style:paragraph-properties fo:orphans="2" fo:widows="2"/>
    </style:style>
    <style:style style:name="P298" style:family="paragraph" style:parent-style-name="Text_20_body" style:list-style-name="L20">
      <style:paragraph-properties fo:margin-top="0in" fo:margin-bottom="0in" style:contextual-spacing="false" fo:orphans="2" fo:widows="2" fo:padding="0in" fo:border="none"/>
    </style:style>
    <style:style style:name="P299" style:family="paragraph" style:parent-style-name="Text_20_body" style:list-style-name="L20">
      <style:paragraph-properties fo:orphans="2" fo:widows="2" fo:padding="0in" fo:border="none"/>
    </style:style>
    <style:style style:name="P300" style:family="paragraph" style:parent-style-name="Text_20_body" style:list-style-name="L21">
      <style:paragraph-properties fo:orphans="2" fo:widows="2"/>
    </style:style>
    <style:style style:name="P301" style:family="paragraph" style:parent-style-name="Text_20_body" style:list-style-name="L22">
      <style:paragraph-properties fo:margin-top="0in" fo:margin-bottom="0in" style:contextual-spacing="false" fo:orphans="2" fo:widows="2"/>
    </style:style>
    <style:style style:name="P302" style:family="paragraph" style:parent-style-name="Text_20_body" style:list-style-name="L22">
      <style:paragraph-properties fo:orphans="2" fo:widows="2"/>
    </style:style>
    <style:style style:name="P303" style:family="paragraph" style:parent-style-name="Text_20_body" style:list-style-name="L23">
      <style:paragraph-properties fo:margin-top="0in" fo:margin-bottom="0in" style:contextual-spacing="false" fo:orphans="2" fo:widows="2" fo:padding="0in" fo:border="none"/>
    </style:style>
    <style:style style:name="P304" style:family="paragraph" style:parent-style-name="Text_20_body" style:list-style-name="L23">
      <style:paragraph-properties fo:orphans="2" fo:widows="2" fo:padding="0in" fo:border="none"/>
    </style:style>
    <style:style style:name="P305" style:family="paragraph" style:parent-style-name="Text_20_body" style:list-style-name="L8">
      <style:paragraph-properties fo:margin-top="0.0299in" fo:margin-bottom="0.0972in" style:contextual-spacing="false" style:line-height-at-least="0.1492in" fo:orphans="2" fo:widows="2"/>
    </style:style>
    <style:style style:name="P306" style:family="paragraph" style:parent-style-name="Text_20_body" style:list-style-name="L9">
      <style:paragraph-properties fo:margin-top="0.0299in" fo:margin-bottom="0.0972in" style:contextual-spacing="false" style:line-height-at-least="0.1492in" fo:orphans="2" fo:widows="2"/>
    </style:style>
    <style:style style:name="P307" style:family="paragraph" style:parent-style-name="Text_20_body" style:list-style-name="L10">
      <style:paragraph-properties fo:margin-top="0.0299in" fo:margin-bottom="0.0972in" style:contextual-spacing="false" style:line-height-at-least="0.1492in" fo:orphans="2" fo:widows="2"/>
    </style:style>
    <style:style style:name="P308" style:family="paragraph" style:parent-style-name="Text_20_body" style:list-style-name="L16">
      <style:paragraph-properties fo:margin-top="0.0299in" fo:margin-bottom="0.0972in" style:contextual-spacing="false" style:line-height-at-least="0.1492in" fo:orphans="2" fo:widows="2"/>
    </style:style>
    <style:style style:name="P309" style:family="paragraph" style:parent-style-name="Text_20_body" style:list-style-name="L17">
      <style:paragraph-properties fo:margin-top="0.0299in" fo:margin-bottom="0.0972in" style:contextual-spacing="false" style:line-height-at-least="0.1492in" fo:orphans="2" fo:widows="2"/>
    </style:style>
    <style:style style:name="P310" style:family="paragraph" style:parent-style-name="Text_20_body" style:list-style-name="L18">
      <style:paragraph-properties fo:margin-top="0.0299in" fo:margin-bottom="0in" style:contextual-spacing="false" style:line-height-at-least="0.1492in" fo:orphans="2" fo:widows="2"/>
    </style:style>
    <style:style style:name="P311" style:family="paragraph" style:parent-style-name="Text_20_body" style:list-style-name="L19">
      <style:paragraph-properties fo:margin-top="0.0299in" fo:margin-bottom="0.0972in" style:contextual-spacing="false" style:line-height-at-least="0.1492in" fo:orphans="2" fo:widows="2"/>
    </style:style>
    <style:style style:name="P312" style:family="paragraph" style:parent-style-name="Text_20_body" style:list-style-name="L27">
      <style:paragraph-properties fo:margin-top="0.0299in" fo:margin-bottom="0in" style:contextual-spacing="false" style:line-height-at-least="0.1492in" fo:orphans="2" fo:widows="2" fo:padding="0in" fo:border="none"/>
    </style:style>
    <style:style style:name="P313" style:family="paragraph" style:parent-style-name="Text_20_body" style:list-style-name="L27">
      <style:paragraph-properties fo:margin-top="0.0299in" fo:margin-bottom="0.0972in" style:contextual-spacing="false" style:line-height-at-least="0.1492in" fo:orphans="2" fo:widows="2" fo:padding="0in" fo:border="none"/>
    </style:style>
    <style:style style:name="P314" style:family="paragraph" style:parent-style-name="Text_20_body" style:list-style-name="L14">
      <style:paragraph-properties fo:margin-top="0.0299in" fo:margin-bottom="0in" style:contextual-spacing="false" style:line-height-at-least="0.1492in"/>
    </style:style>
    <style:style style:name="P315" style:family="paragraph" style:parent-style-name="Text_20_body" style:list-style-name="L14">
      <style:paragraph-properties fo:margin-top="0.0299in" fo:margin-bottom="0.0972in" style:contextual-spacing="false" style:line-height-at-least="0.1492in"/>
    </style:style>
    <style:style style:name="P316" style:family="paragraph" style:parent-style-name="Text_20_body" style:list-style-name="L15">
      <style:paragraph-properties fo:margin-top="0.0299in" fo:margin-bottom="0in" style:contextual-spacing="false" style:line-height-at-least="0.1492in"/>
    </style:style>
    <style:style style:name="P317" style:family="paragraph" style:parent-style-name="Text_20_body" style:list-style-name="L24">
      <style:paragraph-properties fo:margin-top="0.0299in" fo:margin-bottom="0.0972in" style:contextual-spacing="false" style:line-height-at-least="0.1492in"/>
    </style:style>
    <style:style style:name="P318" style:family="paragraph" style:parent-style-name="Text_20_body" style:list-style-name="L25">
      <style:paragraph-properties fo:margin-top="0.0299in" fo:margin-bottom="0.0972in" style:contextual-spacing="false" style:line-height-at-least="0.1492in"/>
    </style:style>
    <style:style style:name="P319" style:family="paragraph" style:parent-style-name="Text_20_body" style:list-style-name="L26">
      <style:paragraph-properties fo:margin-top="0.0299in" fo:margin-bottom="0.0972in" style:contextual-spacing="false" style:line-height-at-least="0.1492in" fo:padding="0in" fo:border="none"/>
    </style:style>
    <style:style style:name="P320" style:family="paragraph" style:parent-style-name="Text_20_body" style:list-style-name="L14">
      <style:paragraph-properties fo:margin-top="0.0299in" fo:margin-bottom="0.0972in" style:contextual-spacing="false" style:line-height-at-least="0.1492in"/>
      <style:text-properties fo:font-variant="normal" fo:text-transform="none" fo:color="#616161" loext:opacity="100%" style:font-name="system-ui" fo:font-size="7pt" fo:font-style="normal" fo:font-weight="normal" loext:padding="0in" loext:border="none"/>
    </style:style>
    <style:style style:name="P321" style:family="paragraph" style:parent-style-name="Text_20_body" style:list-style-name="L15">
      <style:paragraph-properties fo:margin-top="0.0299in" fo:margin-bottom="0in" style:contextual-spacing="false" style:line-height-at-least="0.1492in"/>
      <style:text-properties fo:font-variant="normal" fo:text-transform="none" fo:color="#616161" loext:opacity="100%" style:font-name="system-ui" fo:font-size="7pt" fo:font-style="normal" fo:font-weight="normal" loext:padding="0in" loext:border="none"/>
    </style:style>
    <style:style style:name="P322" style:family="paragraph" style:parent-style-name="Text_20_body" style:list-style-name="L16">
      <style:paragraph-properties fo:margin-top="0.0299in" fo:margin-bottom="0.0972in" style:contextual-spacing="false" style:line-height-at-least="0.1492in" fo:orphans="2" fo:widows="2"/>
      <style:text-properties fo:font-variant="normal" fo:text-transform="none" fo:color="#616161" loext:opacity="100%" style:font-name="system-ui" fo:font-size="7pt" fo:letter-spacing="normal" fo:font-style="normal" fo:font-weight="normal" loext:padding="0in" loext:border="none"/>
    </style:style>
    <style:style style:name="P323" style:family="paragraph">
      <style:paragraph-properties fo:text-align="center" style:writing-mode="lr-tb"/>
    </style:style>
    <style:style style:name="P324" style:family="paragraph">
      <loext:graphic-properties draw:fill-color="#bbe33d"/>
      <style:paragraph-properties style:writing-mode="lr-tb"/>
    </style:style>
    <style:style style:name="T1" style:family="text">
      <style:text-properties fo:font-variant="normal" fo:text-transform="none" fo:color="#fb99f7" loext:opacity="100%" style:font-name="WarpMono" fo:font-size="8.60000038146973pt" fo:letter-spacing="normal" fo:font-style="normal" fo:font-weight="normal" loext:padding="0in" loext:border="none"/>
    </style:style>
    <style:style style:name="T2" style:family="text">
      <style:text-properties fo:font-variant="normal" fo:text-transform="none" fo:color="#fb99f7" loext:opacity="100%" style:font-name="WarpMono" fo:font-size="14pt" fo:letter-spacing="normal" fo:font-style="normal" fo:font-weight="normal" style:font-size-asian="14pt" style:font-size-complex="14pt" loext:padding="0in" loext:border="none"/>
    </style:style>
    <style:style style:name="T3" style:family="text">
      <style:text-properties fo:font-variant="normal" fo:text-transform="none" style:font-name="WarpMono" fo:font-size="14pt" fo:letter-spacing="normal" fo:font-style="normal" fo:font-weight="normal" style:font-size-asian="14pt" style:font-size-complex="14pt" loext:padding="0in" loext:border="none"/>
    </style:style>
    <style:style style:name="T4" style:family="text">
      <style:text-properties fo:font-variant="normal" fo:text-transform="none" fo:color="#ff4000" loext:opacity="100%" style:font-name="Roboto Mono3" fo:font-size="14pt" fo:letter-spacing="normal" fo:font-style="normal" fo:font-weight="normal" style:font-size-asian="14pt" style:font-size-complex="14pt"/>
    </style:style>
    <style:style style:name="T5" style:family="text">
      <style:text-properties fo:font-variant="normal" fo:text-transform="none" style:font-name="inherit" fo:font-size="7pt" fo:font-style="normal" fo:font-weight="normal" fo:background-color="transparent" loext:char-shading-value="0" loext:padding="0in" loext:border="none"/>
    </style:style>
    <style:style style:name="T6" style:family="text">
      <style:text-properties fo:font-variant="normal" fo:text-transform="none" fo:color="#5983b0" loext:opacity="100%" style:font-name="inherit" fo:font-size="15pt" fo:font-style="normal" fo:font-weight="normal" officeooo:rsid="000413f4" fo:background-color="transparent" loext:char-shading-value="0" style:font-size-asian="15pt" style:font-size-complex="15pt" loext:padding="0in" loext:border="none"/>
    </style:style>
    <style:style style:name="T7" style:family="text">
      <style:text-properties fo:font-variant="normal" fo:text-transform="none" fo:color="#ff0000" loext:opacity="100%" style:font-name="Droid Sans Mono" fo:font-size="7.5pt" fo:letter-spacing="normal" fo:font-style="normal" fo:font-weight="normal" fo:background-color="transparent" loext:char-shading-value="0" loext:padding="0in" loext:border="none"/>
    </style:style>
    <style:style style:name="T8" style:family="text">
      <style:text-properties fo:font-variant="normal" fo:text-transform="none" fo:color="#c9211e" loext:opacity="100%" style:font-name="system-ui" fo:font-size="16pt" fo:letter-spacing="normal" fo:font-style="normal" fo:font-weight="normal" style:font-size-asian="16pt" style:font-size-complex="16pt"/>
    </style:style>
    <style:style style:name="T9" style:family="text">
      <style:text-properties fo:font-variant="normal" fo:text-transform="none" fo:color="#c9211e" loext:opacity="100%" style:font-name="system-ui" fo:font-size="16pt" fo:letter-spacing="normal" fo:font-style="normal" fo:font-weight="normal" style:font-size-asian="16pt" style:font-size-complex="16pt" loext:padding="0in" loext:border="none"/>
    </style:style>
    <style:style style:name="T10" style:family="text">
      <style:text-properties fo:font-variant="normal" fo:text-transform="none" fo:color="#c9211e" loext:opacity="100%" style:text-line-through-style="none" style:text-line-through-type="none" style:font-name="system-ui" fo:font-size="16pt" fo:letter-spacing="normal" fo:font-style="normal" style:text-underline-style="none" fo:font-weight="normal" style:text-blinking="false" style:font-size-asian="16pt" style:font-size-complex="16pt" loext:padding="0in" loext:border="none"/>
    </style:style>
    <style:style style:name="T11" style:family="text">
      <style:text-properties fo:font-variant="normal" fo:text-transform="none" fo:color="#c9211e" loext:opacity="100%" style:font-name="ui-monospace" fo:font-size="9.75pt" fo:font-style="normal" fo:font-weight="bold" fo:background-color="transparent" loext:char-shading-value="0" style:font-weight-asian="bold" style:font-weight-complex="bold" loext:padding="0in" loext:border="none"/>
    </style:style>
    <style:style style:name="T12" style:family="text">
      <style:text-properties fo:font-variant="normal" fo:text-transform="none" style:font-name="Chandas" fo:letter-spacing="normal" fo:font-style="normal" officeooo:rsid="001a4ec9" style:font-size-asian="24.5pt" style:font-weight-asian="bold" style:font-size-complex="28pt" style:font-weight-complex="bold"/>
    </style:style>
    <style:style style:name="T13" style:family="text">
      <style:text-properties fo:font-variant="normal" fo:text-transform="none" style:font-name="Chandas" fo:font-size="18pt" fo:letter-spacing="normal" fo:font-style="normal" officeooo:rsid="001a4ec9" style:font-size-asian="15.75pt" style:font-weight-asian="bold" style:font-size-complex="18pt" style:font-weight-complex="bold"/>
    </style:style>
    <style:style style:name="T14" style:family="text">
      <style:text-properties fo:font-variant="normal" fo:text-transform="none" fo:font-size="18pt" fo:letter-spacing="normal" fo:font-style="normal" officeooo:rsid="001a4ec9" style:font-size-asian="15.75pt" style:font-weight-asian="bold" style:font-size-complex="18pt" style:font-weight-complex="bold"/>
    </style:style>
    <style:style style:name="T15" style:family="text">
      <style:text-properties fo:font-variant="normal" fo:text-transform="none" fo:letter-spacing="normal" fo:font-style="normal" officeooo:rsid="001a4ec9" style:font-size-asian="24.5pt" style:font-weight-asian="bold" style:font-size-complex="28pt" style:font-weight-complex="bold"/>
    </style:style>
    <style:style style:name="T16" style:family="text">
      <style:text-properties fo:font-variant="normal" fo:text-transform="none" fo:color="#616161" loext:opacity="100%" style:font-name="system-ui" fo:font-size="7pt" fo:letter-spacing="normal" fo:font-style="normal" fo:font-weight="normal"/>
    </style:style>
    <style:style style:name="T17" style:family="text">
      <style:text-properties fo:font-variant="normal" fo:text-transform="none" fo:color="#616161" loext:opacity="100%" style:font-name="system-ui" fo:font-size="7pt" fo:letter-spacing="normal" fo:font-style="normal" fo:font-weight="normal" loext:padding="0in" loext:border="none"/>
    </style:style>
    <style:style style:name="T18" style:family="text">
      <style:text-properties fo:font-variant="normal" fo:text-transform="none" fo:color="#616161" loext:opacity="100%" style:font-name="system-ui" fo:font-size="7pt" fo:font-style="normal" fo:font-weight="normal" loext:padding="0in" loext:border="none"/>
    </style:style>
    <style:style style:name="T19" style:family="text">
      <style:text-properties fo:font-variant="normal" fo:text-transform="none" fo:color="#616161" loext:opacity="100%" style:font-name="system-ui" fo:letter-spacing="normal" fo:font-style="normal" fo:font-weight="normal"/>
    </style:style>
    <style:style style:name="T20" style:family="text">
      <style:text-properties fo:font-variant="normal" fo:text-transform="none" fo:color="#616161" loext:opacity="100%" style:font-name="Droid Sans Mono" fo:font-size="7.5pt" fo:letter-spacing="normal" fo:font-style="normal" fo:font-weight="normal" fo:background-color="transparent" loext:char-shading-value="0" loext:padding="0in" loext:border="none"/>
    </style:style>
    <style:style style:name="T21" style:family="text">
      <style:text-properties fo:font-variant="normal" fo:text-transform="none" fo:color="#616161" loext:opacity="100%" style:font-name="Droid Sans Mono" fo:font-size="7.5pt" fo:font-style="normal" fo:font-weight="normal" fo:background-color="transparent" loext:char-shading-value="0" loext:padding="0in" loext:border="none"/>
    </style:style>
    <style:style style:name="T22" style:family="text">
      <style:text-properties fo:font-variant="normal" fo:text-transform="none" fo:color="#616161" loext:opacity="100%" fo:letter-spacing="normal" fo:background-color="transparent" loext:char-shading-value="0" loext:padding="0in" loext:border="none"/>
    </style:style>
    <style:style style:name="T23" style:family="text">
      <style:text-properties fo:font-variant="normal" fo:text-transform="none" fo:color="#616161" loext:opacity="100%" fo:background-color="transparent" loext:char-shading-value="0" loext:padding="0in" loext:border="none"/>
    </style:style>
    <style:style style:name="T24" style:family="text">
      <style:text-properties fo:font-variant="normal" fo:text-transform="none" fo:color="#a31515" loext:opacity="100%" style:font-name="system-ui" fo:font-size="7.5pt" fo:letter-spacing="normal" fo:font-style="normal" fo:font-weight="normal" loext:padding="0in" loext:border="none"/>
    </style:style>
    <style:style style:name="T25" style:family="text">
      <style:text-properties fo:font-variant="normal" fo:text-transform="none" fo:color="#a31515" loext:opacity="100%" style:font-name="system-ui" fo:font-size="7.5pt" fo:font-style="normal" fo:font-weight="normal" loext:padding="0in" loext:border="none"/>
    </style:style>
    <style:style style:name="T26" style:family="text">
      <style:text-properties fo:font-variant="normal" fo:text-transform="none" fo:color="#a31515" loext:opacity="100%" style:font-name="Droid Sans Mono" fo:font-size="7.5pt" fo:letter-spacing="normal" fo:font-style="normal" fo:font-weight="normal" fo:background-color="transparent" loext:char-shading-value="0" loext:padding="0in" loext:border="none"/>
    </style:style>
    <style:style style:name="T27" style:family="text">
      <style:text-properties fo:font-variant="normal" fo:text-transform="none" fo:color="#a31515" loext:opacity="100%" style:font-name="Droid Sans Mono" fo:font-size="7.5pt" fo:font-style="normal" fo:font-weight="normal" fo:background-color="transparent" loext:char-shading-value="0" loext:padding="0in" loext:border="none"/>
    </style:style>
    <style:style style:name="T28" style:family="text">
      <style:text-properties fo:font-variant="normal" fo:text-transform="none" fo:color="#006ab1" loext:opacity="100%" style:text-line-through-style="none" style:text-line-through-type="none" style:font-name="system-ui" fo:font-size="7.5pt" fo:letter-spacing="normal" fo:font-style="normal" style:text-underline-style="none" fo:font-weight="normal" style:text-blinking="false" loext:padding="0in" loext:border="none"/>
    </style:style>
    <style:style style:name="T29" style:family="text">
      <style:text-properties fo:font-variant="normal" fo:text-transform="none" fo:color="#006ab1" loext:opacity="100%" style:text-line-through-style="none" style:text-line-through-type="none" style:font-name="system-ui" fo:font-size="7.5pt" fo:font-style="normal" style:text-underline-style="none" fo:font-weight="normal" style:text-blinking="false" loext:padding="0in" loext:border="none"/>
    </style:style>
    <style:style style:name="T30" style:family="text">
      <style:text-properties fo:font-variant="normal" fo:text-transform="none" fo:color="#008000" loext:opacity="100%" style:font-name="Droid Sans Mono" fo:font-size="7.5pt" fo:letter-spacing="normal" fo:font-style="normal" fo:font-weight="normal" fo:background-color="transparent" loext:char-shading-value="0" loext:padding="0in" loext:border="none"/>
    </style:style>
    <style:style style:name="T31" style:family="text">
      <style:text-properties fo:font-variant="normal" fo:text-transform="none" fo:color="#008000" loext:opacity="100%" style:font-name="Droid Sans Mono" fo:font-size="7.5pt" fo:font-style="normal" fo:font-weight="normal" fo:background-color="transparent" loext:char-shading-value="0" loext:padding="0in" loext:border="none"/>
    </style:style>
    <style:style style:name="T32" style:family="text">
      <style:text-properties fo:font-variant="normal" fo:text-transform="none" fo:color="#008000" loext:opacity="100%" fo:letter-spacing="normal" fo:background-color="transparent" loext:char-shading-value="0" loext:padding="0in" loext:border="none"/>
    </style:style>
    <style:style style:name="T33" style:family="text">
      <style:text-properties fo:font-variant="normal" fo:text-transform="none" fo:color="#0000ff" loext:opacity="100%" style:font-name="Droid Sans Mono" fo:font-size="7.5pt" fo:letter-spacing="normal" fo:font-style="normal" fo:font-weight="normal" fo:background-color="transparent" loext:char-shading-value="0" loext:padding="0in" loext:border="none"/>
    </style:style>
    <style:style style:name="T34" style:family="text">
      <style:text-properties fo:font-variant="normal" fo:text-transform="none" fo:color="#0000ff" loext:opacity="100%" style:font-name="Droid Sans Mono" fo:font-size="7.5pt" fo:font-style="normal" fo:font-weight="normal" fo:background-color="transparent" loext:char-shading-value="0" loext:padding="0in" loext:border="none"/>
    </style:style>
    <style:style style:name="T35" style:family="text">
      <style:text-properties fo:font-variant="normal" fo:text-transform="none" fo:color="#2b91af" loext:opacity="100%" style:font-name="Droid Sans Mono" fo:font-size="7.5pt" fo:font-style="normal" fo:font-weight="normal" fo:background-color="transparent" loext:char-shading-value="0" loext:padding="0in" loext:border="none"/>
    </style:style>
    <style:style style:name="T36" style:family="text">
      <style:text-properties fo:font-variant="normal" fo:text-transform="none" fo:color="#2b91af" loext:opacity="100%" style:font-name="Droid Sans Mono" fo:font-size="7.5pt" fo:letter-spacing="normal" fo:font-style="normal" fo:font-weight="normal" fo:background-color="transparent" loext:char-shading-value="0" loext:padding="0in" loext:border="none"/>
    </style:style>
    <style:style style:name="T37" style:family="text">
      <style:text-properties fo:font-variant="normal" fo:text-transform="none" fo:color="#000000" loext:opacity="100%" fo:letter-spacing="normal" fo:font-style="normal" fo:font-weight="normal"/>
    </style:style>
    <style:style style:name="T38" style:family="text">
      <style:text-properties fo:font-variant="normal" fo:text-transform="none" fo:color="#00b0e8" loext:opacity="100%" style:font-name="Droid Sans Mono" fo:font-size="7.5pt" fo:letter-spacing="normal" fo:font-style="normal" fo:font-weight="normal" fo:background-color="transparent" loext:char-shading-value="0" loext:padding="0in" loext:border="none"/>
    </style:style>
    <style:style style:name="T39" style:family="text">
      <style:text-properties fo:font-variant="normal" fo:text-transform="none" fo:color="#1d2a3e" loext:opacity="100%" style:font-name="Roboto Mono1" fo:font-size="8.25pt" fo:letter-spacing="normal" fo:font-style="normal" fo:font-weight="normal" loext:padding="0in" loext:border="none"/>
    </style:style>
    <style:style style:name="T40" style:family="text">
      <style:text-properties fo:font-variant="normal" fo:text-transform="none" fo:color="#a11262" loext:opacity="100%" style:font-name="Roboto Mono1" fo:font-size="8.25pt" fo:letter-spacing="normal" fo:font-style="normal" fo:font-weight="normal" loext:padding="0in" loext:border="none"/>
    </style:style>
    <style:style style:name="T41" style:family="text">
      <style:text-properties fo:font-variant="normal" fo:text-transform="none" fo:color="#0a0a0a" loext:opacity="100%" fo:font-size="10.5pt" fo:letter-spacing="normal" fo:font-style="normal" fo:font-weight="normal"/>
    </style:style>
    <style:style style:name="T42" style:family="text">
      <style:text-properties fo:font-variant="normal" fo:text-transform="none" fo:color="#0a0a0a" loext:opacity="100%" fo:font-size="10.5pt" fo:letter-spacing="normal" fo:font-style="normal" fo:font-weight="normal" officeooo:rsid="00d0dad4" style:font-size-asian="15pt" style:font-size-complex="15pt"/>
    </style:style>
    <style:style style:name="T43" style:family="text">
      <style:text-properties fo:font-variant="normal" fo:text-transform="none" fo:color="#0a0a0a" loext:opacity="100%" fo:font-size="10.5pt" fo:letter-spacing="normal" fo:font-style="normal" fo:font-weight="bold" fo:background-color="transparent" loext:char-shading-value="0" style:font-weight-asian="bold" style:font-weight-complex="bold" loext:padding="0in" loext:border="none"/>
    </style:style>
    <style:style style:name="T44" style:family="text">
      <style:text-properties fo:font-variant="normal" fo:text-transform="none" fo:color="#0a0a0a" loext:opacity="100%" fo:font-size="10.5pt" fo:letter-spacing="normal" fo:font-style="normal" fo:font-weight="bold" officeooo:rsid="00d63bc3" style:font-weight-asian="bold" style:font-weight-complex="bold"/>
    </style:style>
    <style:style style:name="T45" style:family="text">
      <style:text-properties fo:font-variant="normal" fo:text-transform="none" fo:color="#0a0a0a" loext:opacity="100%" fo:font-size="10.5pt" fo:letter-spacing="normal" fo:font-style="normal" fo:font-weight="bold" officeooo:rsid="0101632a" style:font-weight-asian="bold" style:font-weight-complex="bold"/>
    </style:style>
    <style:style style:name="T46" style:family="text">
      <style:text-properties fo:font-variant="normal" fo:text-transform="none" fo:color="#0a0a0a" loext:opacity="100%" style:font-name="ui-monospace" fo:font-size="9.75pt" fo:letter-spacing="normal" fo:font-style="normal" fo:font-weight="bold" fo:background-color="transparent" loext:char-shading-value="0" style:font-weight-asian="bold" style:font-weight-complex="bold" loext:padding="0in" loext:border="none"/>
    </style:style>
    <style:style style:name="T47" style:family="text">
      <style:text-properties fo:font-variant="normal" fo:text-transform="none" fo:color="#0a0a0a" loext:opacity="100%" style:font-name="Times New Roman" fo:font-size="14pt" fo:letter-spacing="normal" fo:font-style="normal" fo:font-weight="normal" officeooo:rsid="0101632a" style:font-weight-asian="bold" style:font-weight-complex="bold"/>
    </style:style>
    <style:style style:name="T48" style:family="text">
      <style:text-properties fo:font-variant="normal" fo:text-transform="none" style:font-name="ui-monospace" fo:font-size="9.75pt" fo:font-style="normal" fo:font-weight="bold" fo:background-color="transparent" loext:char-shading-value="0" style:font-weight-asian="bold" style:font-weight-complex="bold" loext:padding="0in" loext:border="none"/>
    </style:style>
    <style:style style:name="T49" style:family="text">
      <style:text-properties fo:font-variant="normal" fo:text-transform="none" fo:font-weight="bold" fo:background-color="transparent" loext:char-shading-value="0" style:font-weight-asian="bold" style:font-weight-complex="bold" loext:padding="0in" loext:border="none"/>
    </style:style>
    <style:style style:name="T50" style:family="text">
      <style:text-properties fo:font-variant="normal" fo:text-transform="none" fo:color="#069a2e" loext:opacity="100%" fo:font-size="10.5pt" fo:letter-spacing="normal" fo:font-style="normal" fo:font-weight="bold" officeooo:rsid="00d63bc3" style:font-weight-asian="bold" style:font-weight-complex="bold"/>
    </style:style>
    <style:style style:name="T51" style:family="text">
      <style:text-properties fo:color="#069a2e" loext:opacity="100%"/>
    </style:style>
    <style:style style:name="T52" style:family="text">
      <style:text-properties fo:color="#069a2e" loext:opacity="100%" fo:font-size="15pt" style:font-size-asian="15pt" style:font-size-complex="15pt"/>
    </style:style>
    <style:style style:name="T53" style:family="text">
      <style:text-properties officeooo:rsid="0018c803"/>
    </style:style>
    <style:style style:name="T54" style:family="text">
      <style:text-properties officeooo:rsid="003b07df"/>
    </style:style>
    <style:style style:name="T55" style:family="text">
      <style:text-properties officeooo:rsid="007d26e6"/>
    </style:style>
    <style:style style:name="T56" style:family="text">
      <style:text-properties officeooo:rsid="004fcac0"/>
    </style:style>
    <style:style style:name="T57" style:family="text">
      <style:text-properties officeooo:rsid="0070202a"/>
    </style:style>
    <style:style style:name="T58" style:family="text">
      <style:text-properties officeooo:rsid="009bde60"/>
    </style:style>
    <style:style style:name="T59" style:family="text">
      <style:text-properties officeooo:rsid="006dcc57"/>
    </style:style>
    <style:style style:name="T60" style:family="text">
      <style:text-properties officeooo:rsid="00660ddc"/>
    </style:style>
    <style:style style:name="T61" style:family="text">
      <style:text-properties officeooo:rsid="00892204"/>
    </style:style>
    <style:style style:name="T62" style:family="text">
      <style:text-properties officeooo:rsid="0067b626"/>
    </style:style>
    <style:style style:name="T63" style:family="text">
      <style:text-properties fo:font-weight="bold"/>
    </style:style>
    <style:style style:name="T64" style:family="text">
      <style:text-properties fo:font-weight="bold" style:font-weight-asian="bold" style:font-weight-complex="bold"/>
    </style:style>
    <style:style style:name="T65" style:family="text">
      <style:text-properties fo:color="#bbbbbb" loext:opacity="100%"/>
    </style:style>
    <style:style style:name="T66" style:family="text">
      <style:text-properties officeooo:rsid="0099a12a"/>
    </style:style>
    <style:style style:name="T67" style:family="text">
      <style:text-properties fo:color="#000000" loext:opacity="100%"/>
    </style:style>
    <style:style style:name="T68" style:family="text">
      <style:text-properties fo:color="#000000" loext:opacity="100%" fo:font-size="26pt" officeooo:rsid="00556c1b" style:font-size-asian="26pt" style:font-size-complex="26pt"/>
    </style:style>
    <style:style style:name="T69" style:family="text">
      <style:text-properties fo:color="#000000" loext:opacity="100%" style:text-line-through-style="none" style:text-line-through-type="none" style:text-underline-style="none" fo:font-weight="bold" style:text-blinking="false"/>
    </style:style>
    <style:style style:name="T70" style:family="text">
      <style:text-properties fo:color="#000000" loext:opacity="100%" officeooo:rsid="00374a38" style:font-size-asian="16pt"/>
    </style:style>
    <style:style style:name="T71" style:family="text">
      <style:text-properties fo:color="#000000" loext:opacity="100%" officeooo:rsid="00556c1b" style:font-size-asian="16pt"/>
    </style:style>
    <style:style style:name="T72" style:family="text">
      <style:text-properties officeooo:rsid="000bef0f"/>
    </style:style>
    <style:style style:name="T73" style:family="text">
      <style:text-properties officeooo:rsid="000ca821"/>
    </style:style>
    <style:style style:name="T74" style:family="text">
      <style:text-properties officeooo:rsid="000cc7b4"/>
    </style:style>
    <style:style style:name="T75" style:family="text">
      <style:text-properties officeooo:rsid="000f0d48"/>
    </style:style>
    <style:style style:name="T76" style:family="text">
      <style:text-properties officeooo:rsid="0013d355"/>
    </style:style>
    <style:style style:name="T77" style:family="text">
      <style:text-properties officeooo:rsid="00156c17"/>
    </style:style>
    <style:style style:name="T78" style:family="text">
      <style:text-properties officeooo:rsid="001617f6"/>
    </style:style>
    <style:style style:name="T79" style:family="text">
      <style:text-properties fo:font-size="14pt" style:font-size-asian="14pt" style:font-size-complex="14pt"/>
    </style:style>
    <style:style style:name="T80" style:family="text">
      <style:text-properties officeooo:rsid="001faea8"/>
    </style:style>
    <style:style style:name="T81" style:family="text">
      <style:text-properties fo:font-size="21pt" fo:font-weight="bold" style:font-size-asian="21pt" style:font-weight-asian="bold" style:font-size-complex="21pt" style:font-weight-complex="bold"/>
    </style:style>
    <style:style style:name="T82" style:family="text">
      <style:text-properties fo:color="#af00db" loext:opacity="100%"/>
    </style:style>
    <style:style style:name="T83" style:family="text">
      <style:text-properties fo:color="#267f99" loext:opacity="100%"/>
    </style:style>
    <style:style style:name="T84" style:family="text">
      <style:text-properties fo:color="#001080" loext:opacity="100%"/>
    </style:style>
    <style:style style:name="T85" style:family="text">
      <style:text-properties fo:color="#a31515" loext:opacity="100%"/>
    </style:style>
    <style:style style:name="T86" style:family="text">
      <style:text-properties fo:color="#a31515" loext:opacity="100%" style:font-name="system-ui" fo:font-size="7.5pt" loext:padding="0in" loext:border="none"/>
    </style:style>
    <style:style style:name="T87" style:family="text">
      <style:text-properties fo:color="#008000" loext:opacity="100%" style:font-name="Droid Sans Mono" fo:font-size="7.5pt" fo:background-color="#ffffff" loext:char-shading-value="0"/>
    </style:style>
    <style:style style:name="T88" style:family="text">
      <style:text-properties fo:color="#616161" loext:opacity="100%" style:font-name="system-ui" fo:font-size="7pt"/>
    </style:style>
    <style:style style:name="T89" style:family="text">
      <style:text-properties fo:color="#616161" loext:opacity="100%" style:font-name="system-ui" fo:font-size="7pt" loext:padding="0in" loext:border="none"/>
    </style:style>
    <style:style style:name="T90" style:family="text">
      <style:text-properties officeooo:rsid="004ecacc" style:font-size-asian="24.5pt" style:font-weight-asian="bold" style:font-size-complex="28pt" style:font-weight-complex="bold"/>
    </style:style>
    <style:style style:name="T91" style:family="text">
      <style:text-properties officeooo:rsid="00a23a29" style:font-size-asian="24.5pt" style:font-weight-asian="bold" style:font-size-complex="28pt" style:font-weight-complex="bold"/>
    </style:style>
    <style:style style:name="T92" style:family="text">
      <style:text-properties fo:color="#e51400" loext:opacity="100%"/>
    </style:style>
    <style:style style:name="T93" style:family="text">
      <style:text-properties fo:color="#48985d" loext:opacity="100%"/>
    </style:style>
    <style:style style:name="T94" style:family="text">
      <style:text-properties fo:font-size="16pt" fo:font-weight="bold" style:font-size-asian="16pt" style:font-weight-asian="bold" style:font-size-complex="16pt" style:font-weight-complex="bold"/>
    </style:style>
    <style:style style:name="T95" style:family="text">
      <style:text-properties fo:font-size="16pt" style:font-size-asian="16pt" style:font-size-complex="16pt"/>
    </style:style>
    <style:style style:name="T96" style:family="text">
      <style:text-properties fo:color="#c9211e" loext:opacity="100%" fo:font-size="24pt" fo:font-weight="bold" officeooo:rsid="006db06b" style:font-size-asian="24pt" style:font-weight-asian="bold" style:font-size-complex="24pt" style:font-weight-complex="bold"/>
    </style:style>
    <style:style style:name="T97" style:family="text">
      <style:text-properties fo:color="#c9211e" loext:opacity="100%" fo:font-size="26pt" officeooo:rsid="0079c7ff" style:font-size-asian="26pt" style:font-size-complex="26pt"/>
    </style:style>
    <style:style style:name="T98" style:family="text">
      <style:text-properties fo:color="#c9211e" loext:opacity="100%" fo:font-size="26pt" officeooo:rsid="007b2bb4" style:font-size-asian="26pt" style:font-size-complex="26pt"/>
    </style:style>
    <style:style style:name="T99" style:family="text">
      <style:text-properties fo:color="#c9211e" loext:opacity="100%" fo:font-size="15pt" officeooo:rsid="00fa1456" style:font-size-asian="15pt" style:font-size-complex="15pt"/>
    </style:style>
    <style:style style:name="T100" style:family="text">
      <style:text-properties officeooo:rsid="008cda47"/>
    </style:style>
    <style:style style:name="T101" style:family="text">
      <style:text-properties officeooo:rsid="0094b8a2"/>
    </style:style>
    <style:style style:name="T102" style:family="text">
      <style:text-properties officeooo:rsid="00973690"/>
    </style:style>
    <style:style style:name="T103" style:family="text">
      <style:text-properties officeooo:rsid="009e9481"/>
    </style:style>
    <style:style style:name="T104" style:family="text">
      <style:text-properties fo:font-size="15pt" officeooo:rsid="00a23a29" style:font-size-asian="13.1000003814697pt" style:font-weight-asian="bold" style:font-size-complex="15pt" style:font-weight-complex="bold"/>
    </style:style>
    <style:style style:name="T105" style:family="text">
      <style:text-properties fo:font-size="15pt" officeooo:rsid="00a23a29" style:font-size-asian="13.1000003814697pt" style:font-style-asian="normal" style:font-weight-asian="bold" style:font-size-complex="15pt" style:font-style-complex="normal" style:font-weight-complex="bold"/>
    </style:style>
    <style:style style:name="T106" style:family="text">
      <style:text-properties fo:font-size="15pt" fo:font-style="italic" officeooo:rsid="00a23a29" style:font-size-asian="13.1000003814697pt" style:font-style-asian="italic" style:font-weight-asian="bold" style:font-size-complex="15pt" style:font-style-complex="italic" style:font-weight-complex="bold"/>
    </style:style>
    <style:style style:name="T107" style:family="text">
      <style:text-properties fo:font-size="15pt" officeooo:rsid="004ecacc" style:font-size-asian="15pt" style:font-weight-asian="bold" style:font-size-complex="15pt" style:font-weight-complex="bold"/>
    </style:style>
    <style:style style:name="T108" style:family="text">
      <style:text-properties fo:color="#a71627" loext:opacity="100%"/>
    </style:style>
    <style:style style:name="T109" style:family="text">
      <style:text-properties fo:color="#a71627" loext:opacity="100%" style:font-name="Roboto Mono" fo:font-weight="normal" fo:background-color="#f6f9fc" loext:char-shading-value="0"/>
    </style:style>
    <style:style style:name="T110" style:family="text">
      <style:text-properties fo:color="#1750ba" loext:opacity="100%"/>
    </style:style>
    <style:style style:name="T111" style:family="text">
      <style:text-properties fo:color="#1750ba" loext:opacity="100%" style:font-name="Roboto Mono" fo:font-weight="normal" fo:background-color="#f6f9fc" loext:char-shading-value="0"/>
    </style:style>
    <style:style style:name="T112" style:family="text">
      <style:text-properties style:font-name="Roboto Mono" fo:font-weight="normal" fo:background-color="#f6f9fc" loext:char-shading-value="0"/>
    </style:style>
    <style:style style:name="T113" style:family="text">
      <style:text-properties fo:color="#ff4000" loext:opacity="100%" fo:font-size="15pt" officeooo:rsid="00d0dad4" style:font-size-asian="15pt" style:font-size-complex="15pt"/>
    </style:style>
    <style:style style:name="T114" style:family="text">
      <style:text-properties fo:color="#ff5429" loext:opacity="100%"/>
    </style:style>
    <style:style style:name="T115" style:family="text">
      <style:text-properties fo:color="#ff5429" loext:opacity="100%" officeooo:rsid="005d0d7e"/>
    </style:style>
    <style:style style:name="T116" style:family="text">
      <style:text-properties officeooo:rsid="00d94115"/>
    </style:style>
    <style:style style:name="T117" style:family="text">
      <style:text-properties officeooo:rsid="0079c7ff"/>
    </style:style>
    <style:style style:name="T118" style:family="text">
      <style:text-properties officeooo:rsid="0098c89d"/>
    </style:style>
    <style:style style:name="T119" style:family="text">
      <style:text-properties fo:color="#ff0000" loext:opacity="100%" fo:font-weight="bold" style:font-weight-asian="bold" style:font-weight-complex="bold"/>
    </style:style>
    <style:style style:name="T120" style:family="text">
      <style:text-properties fo:color="#ff0000" loext:opacity="100%" fo:font-weight="bold" officeooo:rsid="00da4711" style:font-weight-asian="bold" style:font-weight-complex="bold"/>
    </style:style>
    <style:style style:name="T121" style:family="text">
      <style:text-properties fo:color="#ff0000" loext:opacity="100%" fo:font-weight="bold" officeooo:rsid="00e07d02" style:font-weight-asian="bold" style:font-weight-complex="bold"/>
    </style:style>
    <style:style style:name="T122" style:family="text">
      <style:text-properties officeooo:rsid="00638afe"/>
    </style:style>
    <style:style style:name="T123" style:family="text">
      <style:text-properties officeooo:rsid="00ea41d5"/>
    </style:style>
    <style:style style:name="T124" style:family="text">
      <style:text-properties officeooo:rsid="000413f4"/>
    </style:style>
    <style:style style:name="T125" style:family="text">
      <style:text-properties fo:color="#e8a202" loext:opacity="100%" fo:font-size="15pt" officeooo:rsid="00fa1456" style:font-size-asian="15pt" style:font-size-complex="15pt"/>
    </style:style>
    <style:style style:name="T126" style:family="text">
      <style:text-properties officeooo:rsid="00fe0b47"/>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style:style style:name="fr2"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style:style style:name="fr3"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left="1.05pt solid #0062a3" fo:border-right="none" fo:border-top="1.05pt solid #0062a3" fo:border-bottom="1.05pt solid #0062a3"/>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022in" fo:margin-right="0.022in" fo:margin-top="0.022in" fo:margin-bottom="0.022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svg:stroke-color="#ea7500" draw:fill-color="#bbe33d" draw:textarea-horizontal-align="justify" draw:textarea-vertical-align="middle" draw:auto-grow-height="false" fo:min-height="1.1008in" fo:min-width="2.1709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4" text:anchor-type="page" text:anchor-page-number="1" svg:x="0in" svg:y="0in" svg:width="0.2236in" draw:z-index="8">
        <draw:text-box fo:min-height="0.2236in">
          <text:p text:style-name="Text_20_body"><draw:frame draw:style-name="fr7" draw:name="Image6" text:anchor-type="as-char" svg:width="0.1791in" svg:height="0.1791in" draw:z-index="20"><draw:image xlink:href="https://file+.vscode-resource.vscode-cdn.net/home/vj/.vscode/extensions/google.geminicodeassist-2.50.0/images/gemini_color.svg" xlink:type="simple" xlink:show="embed" xlink:actuate="onLoad"/></draw:frame></text:p>
        </draw:text-box>
      </draw:frame>
      <draw:frame draw:style-name="fr3" draw:name="Frame3" text:anchor-type="page" text:anchor-page-number="1" svg:x="0.0374in" svg:y="0.0374in" svg:width="0.1339in" draw:z-index="6">
        <draw:text-box fo:min-height="0.1339in">
          <text:p text:style-name="Text_20_body"/>
        </draw:text-box>
      </draw:frame>
      <draw:frame draw:style-name="fr2" draw:name="Frame2" text:anchor-type="page" text:anchor-page-number="1" svg:x="0in" svg:y="0in" svg:width="0.2236in" draw:z-index="5">
        <draw:text-box fo:min-height="0.2236in">
          <text:p text:style-name="Text_20_body"><draw:frame draw:style-name="fr7" draw:name="Image5" text:anchor-type="as-char" svg:width="0.1791in" svg:height="0.1791in" draw:z-index="21"><draw:image xlink:href="https://file+.vscode-resource.vscode-cdn.net/home/vj/.vscode/extensions/google.geminicodeassist-2.50.0/images/gemini_color.svg" xlink:type="simple" xlink:show="embed" xlink:actuate="onLoad"/></draw:frame></text:p>
        </draw:text-box>
      </draw:frame>
      <draw:frame draw:style-name="fr2" draw:name="Frame1" text:anchor-type="page" text:anchor-page-number="1" svg:x="0in" svg:y="0in" svg:width="0.2236in" draw:z-index="1">
        <draw:text-box fo:min-height="0.2236in">
          <text:p text:style-name="Text_20_body"><draw:frame draw:style-name="fr7" draw:name="Image3" text:anchor-type="as-char" svg:width="0.1791in" svg:height="0.1791in" draw:z-index="2"><draw:image xlink:href="https://file+.vscode-resource.vscode-cdn.net/home/vj/.vscode/extensions/google.geminicodeassist-2.49.0/images/gemini_color.svg" xlink:type="simple" xlink:show="embed" xlink:actuate="onLoad"/></draw:frame></text:p>
        </draw:text-box>
      </draw:frame>
      <draw:frame draw:style-name="fr2" draw:name="Frame5" text:anchor-type="page" text:anchor-page-number="1" svg:x="0in" svg:y="0in" svg:width="0.2236in" draw:z-index="9">
        <draw:text-box fo:min-height="0.2236in">
          <text:p text:style-name="Text_20_body"><draw:frame draw:style-name="fr7" draw:name="Image7" text:anchor-type="as-char" svg:width="0.1791in" svg:height="0.1791in" draw:z-index="19"><draw:image xlink:href="https://file+.vscode-resource.vscode-cdn.net/home/vj/.vscode/extensions/google.geminicodeassist-2.55.0/images/gemini_color.svg" xlink:type="simple" xlink:show="embed" xlink:actuate="onLoad"/></draw:frame></text:p>
        </draw:text-box>
      </draw:frame>
      <text:p text:style-name="P57"/>
      <text:p text:style-name="P57"/>
      <text:p text:style-name="P57"/>
      <text:p text:style-name="P57">Angular tutorial v19</text:p>
      <text:p text:style-name="P56">https://www.youtube.com/watch?v=jYV2enNmplM</text:p>
      <text:p text:style-name="P51"/>
      <text:p text:style-name="P51"><draw:frame draw:style-name="fr6" draw:name="Image4" text:anchor-type="char" svg:width="6.6929in" svg:height="4.1827in" draw:z-index="4"><draw:image xlink:href="Pictures/1000000000000780000004B0EA180599.png" xlink:type="simple" xlink:show="embed" xlink:actuate="onLoad" draw:mime-type="image/png"/></draw:frame></text:p>
      <text:p text:style-name="P51"/>
      <text:p text:style-name="P55"/>
      <text:p text:style-name="P51"/>
      <text:p text:style-name="P51"><text:span text:style-name="T77">Myapp</text:span> Application</text:p>
      <text:p text:style-name="P121"/>
      <text:p text:style-name="P180"/>
      <text:p text:style-name="P181"><text:soft-page-break/></text:p>
      <text:p text:style-name="P53">1. Download tools</text:p>
      <text:p text:style-name="P53">Docker Desktop</text:p>
      <text:list text:style-name="L1">
        <text:list-item>
          <text:p text:style-name="P276">pgAdmin<text:line-break/><text:a xlink:type="simple" xlink:href="https://pgadmin-archive.postgresql.org/pgadmin4/apt/jammy/dists/pgadmin4/main/binary-amd64/index.html" text:style-name="Internet_20_link" text:visited-style-name="Visited_20_Internet_20_Link"><text:span text:style-name="T52">https://pgadmin-archive.postgresql.org/pgadmin4/apt/jammy/dists/pgadmin4/main/binary-amd64/index.html</text:span></text:a></text:p>
        </text:list-item>
      </text:list>
      <text:p text:style-name="P59"><text:span text:style-name="T52"/></text:p>
      <text:p text:style-name="P59"><text:span text:style-name="T52"><text:tab/><text:tab/></text:span><text:span text:style-name="T113">maybe you need to install python3.10!!!</text:span></text:p>
      <text:p text:style-name="P60"><text:span text:style-name="Source_20_Text"><text:span text:style-name="T42">sudo add-apt-repository ppa:deadsnakes/ppa</text:span></text:span></text:p>
      <text:p text:style-name="P221"><text:span text:style-name="Source_20_Text"><text:span text:style-name="T41">sudo apt update</text:span></text:span></text:p>
      <text:p text:style-name="P222"><text:span text:style-name="Source_20_Text"><text:span text:style-name="T41">sudo apt install python3.10 python3.10-venv </text:span></text:span></text:p>
      <text:p text:style-name="P222"><text:span text:style-name="Source_20_Text"><text:span text:style-name="T43"><text:s/></text:span></text:span><text:span text:style-name="Source_20_Text"><text:span text:style-name="T46">sudo apt update</text:span></text:span></text:p>
      <text:p text:style-name="P257"><text:span text:style-name="Source_20_Text"><text:span text:style-name="T49"><text:s/></text:span></text:span><text:span text:style-name="Source_20_Text"><text:span text:style-name="T48">sudo apt install pgadmin4</text:span></text:span></text:p>
      <text:p text:style-name="P271"><text:span text:style-name="Source_20_Text"><text:span text:style-name="T50">or use debian package:</text:span></text:span><text:span text:style-name="Source_20_Text"><text:span text:style-name="T44"><text:line-break/></text:span></text:span><text:a xlink:type="simple" xlink:href="https://pgadmin-archive.postgresql.org/pgadmin4/apt/jammy/dists/pgadmin4/main/binary-amd64/index.html" text:style-name="Internet_20_link" text:visited-style-name="Visited_20_Internet_20_Link"><text:span text:style-name="Source_20_Text">https://pgadmin-archive.postgresql.org/pgadmin4/apt/jammy/dists/pgadmin4/main/binary-amd64/index.html</text:span></text:a></text:p>
      <text:p text:style-name="P271"><text:span text:style-name="Source_20_Text"><text:span text:style-name="T45"><text:s/>MAKE SURE YOU INSTALL </text:span></text:span><text:a xlink:type="simple" xlink:href="https://pgadmin-archive.postgresql.org/pgadmin4/apt/jammy/dists/pgadmin4/main/binary-amd64/pgadmin4-desktop_9.11-1.jammy_amd64.deb" text:style-name="Internet_20_link" text:visited-style-name="Visited_20_Internet_20_Link"><text:span text:style-name="Source_20_Text"><text:span text:style-name="T47">pgadmin4-desktop_9.11-1.jammy_amd64.deb</text:span></text:span></text:a></text:p>
      <text:p text:style-name="P141">https://www.google.com/search?client=opera&amp;q=Error%3A+Dependency+is+not+satisfiable%3A+python3.10&amp;sourceid=opera&amp;ie=UTF-8&amp;oe=UTF-8</text:p>
      <text:list text:continue-numbering="true" text:style-name="L1">
        <text:list-item>
          <text:p text:style-name="P276">git</text:p>
        </text:list-item>
        <text:list-item>
          <text:p text:style-name="P276">vs code</text:p>
        </text:list-item>
        <text:list-item>
          <text:p text:style-name="P276">dbeaver-ce</text:p>
        </text:list-item>
      </text:list>
      <text:p text:style-name="P176">https://dbeaver.io/download/</text:p>
      <text:list text:continue-numbering="true" text:style-name="L1">
        <text:list-item>
          <text:p text:style-name="P277">Angular <text:span text:style-name="T101">19 or 20</text:span></text:p>
          <text:p text:style-name="P277"><draw:frame draw:style-name="fr4" draw:name="Image1" text:anchor-type="char" svg:x="0.1252in" svg:y="0.252in" svg:width="6.4429in" svg:height="4.0264in" draw:z-index="18"><draw:image xlink:href="Pictures/1000000000000780000004B041A6C67F.png" xlink:type="simple" xlink:show="embed" xlink:actuate="onLoad" draw:mime-type="image/png"/></draw:frame><text:soft-page-break/></text:p>
        </text:list-item>
        <text:list-item>
          <text:p text:style-name="P280"><text:span text:style-name="T124">DOWNLOAD JAVA </text:span><text:span text:style-name="T123">24</text:span></text:p>
        </text:list-item>
      </text:list>
      <text:p text:style-name="P61"/>
      <text:p text:style-name="P52">2. Download docker images</text:p>
      <text:list text:style-name="L2">
        <text:list-item>
          <text:h text:style-name="P263" text:outline-level="3">postgres:latest</text:h>
        </text:list-item>
        <text:list-item>
          <text:h text:style-name="P264" text:outline-level="3">litmuschaos/mongo</text:h>
        </text:list-item>
      </text:list>
      <text:list text:style-name="L3">
        <text:list-header>
          <text:p text:style-name="P281">Or any other versioned image so it’s not downloaded every time you run docker tests with testcontainers</text:p>
        </text:list-header>
      </text:list>
      <text:p text:style-name="P155"/>
      <text:p text:style-name="P154">You can do it by the following command<text:span text:style-name="T78">s</text:span></text:p>
      <text:p text:style-name="P153"><text:span text:style-name="Source_20_Text"><text:span text:style-name="T4">docker pull postgres</text:span></text:span></text:p>
      <text:p text:style-name="P153"><text:span text:style-name="Source_20_Text"><text:span text:style-name="T4">docker pull mongodb/mongodb-community-server</text:span></text:span></text:p>
      <text:p text:style-name="P154"/>
      <text:p text:style-name="P155"><text:soft-page-break/></text:p>
      <text:p text:style-name="P155"/>
      <text:p text:style-name="P155"/>
      <text:p text:style-name="P155"/>
      <text:p text:style-name="P155"/>
      <text:p text:style-name="P54"><text:span text:style-name="T64">User logging when spring-security is on the classpath</text:span><text:line-break/><text:span text:style-name="T79">Using generated security password:</text:span></text:p>
      <text:p text:style-name="P75">Username: user</text:p>
      <text:p text:style-name="P75">Password can be found in the run log: 4ba792da-2c3f-4995-ba2d-8984566be5eb</text:p>
      <text:p text:style-name="P155"/>
      <text:p text:style-name="P155"/>
      <text:p text:style-name="P155"/>
      <text:p text:style-name="P155"/>
      <text:p text:style-name="P155"/>
      <text:p text:style-name="P236">LOAD BALLANCER</text:p>
      <text:p text:style-name="P149">docker compose up --scale backend=7 --build</text:p>
      <text:p text:style-name="P237"/>
      <text:p text:style-name="P178">When you build docker-compose up –build<text:line-break/>before that you should delete containers which are part of the compose project, <text:span text:style-name="T102">and images too.</text:span><text:line-break/><text:span text:style-name="T67">delete existing containers in docker desktop</text:span></text:p>
      <text:p text:style-name="P205">docket compose down<text:line-break/>docker compose up --build</text:p>
      <text:p text:style-name="P206">docker compose up <text:s text:c="10"/></text:p>
      <text:p text:style-name="P155"><text:soft-page-break/></text:p>
      <text:p text:style-name="P155"/>
      <text:p text:style-name="P151">This way you run the application JPA/Mongo</text:p>
      <text:p text:style-name="P161"><text:span text:style-name="T114">docker-compose.yml i</text:span><text:span text:style-name="T115">s</text:span><text:span text:style-name="T114"> on location</text:span><text:span text:style-name="T115">s</text:span><text:span text:style-name="T114">:<text:line-break/></text:span><text:span text:style-name="T94">datatables/myapp-jpa-server/docker-compose.yml</text:span></text:p>
      <text:p text:style-name="P161"><text:line-break/></text:p>
      <text:p text:style-name="P155"/>
      <text:p text:style-name="P155"/>
      <text:p text:style-name="P158">Docker compose</text:p>
      <text:p text:style-name="P156"><text:span text:style-name="Strong_20_Emphasis"><text:span text:style-name="T8">Simplifying Deployment:</text:span></text:span><text:span text:style-name="T8"> With a single </text:span><text:a xlink:type="simple" xlink:href="code-assist-path:/home/vj/Desktop/A/backu20/datatables/myapp-jpa-server/docker-compose.yml" text:style-name="Internet_20_link" text:visited-style-name="Visited_20_Internet_20_Link"><text:span text:style-name="Source_20_Text"><text:span text:style-name="T10">docker-compose.yml</text:span></text:span></text:a><text:span text:style-name="T8"> file, you can start, stop, and manage your entire application stack with simple commands like </text:span><text:span text:style-name="Source_20_Text"><text:span text:style-name="T9">docker compose up</text:span></text:span><text:span text:style-name="T8"> and </text:span><text:span text:style-name="Source_20_Text"><text:span text:style-name="T9">docker-compose down</text:span></text:span><text:span text:style-name="T8">. This simplifies deployment and makes it more repeatable.</text:span></text:p>
      <text:p text:style-name="P155"/>
      <text:p text:style-name="P155"/>
      <text:p text:style-name="P155"/>
      <text:p text:style-name="P58">Build and run steps</text:p>
      <text:p text:style-name="P189"><text:span text:style-name="T117">In RabbitMQ create 2 queues </text:span><text:span text:style-name="T118">in -</text:span><text:span text:style-name="T116"> PROBABLY NOT NECESSARY STEP BECAUSE myapp-jpa-server contains definition of queues.</text:span></text:p>
      <table:table table:name="Table1" table:style-name="Table1">
        <table:table-column table:style-name="Table1.A"/>
        <table:table-row>
          <table:table-cell table:style-name="Table1.A1" office:value-type="string">
            <text:p text:style-name="Table_20_Contents"><text:a xlink:type="simple" xlink:href="http://localhost:15672/#/queues/%2F/new-employee-queue" text:style-name="Internet_20_link" text:visited-style-name="Visited_20_Internet_20_Link"><text:span text:style-name="T69"><text:line-break/>new-employee-queue</text:span></text:a></text:p>
          </table:table-cell>
        </table:table-row>
      </table:table>
      <table:table table:name="Table2" table:style-name="Table2">
        <table:table-column table:style-name="Table2.A"/>
        <table:table-row>
          <table:table-cell table:style-name="Table2.A1" office:value-type="string">
            <text:p text:style-name="Table_20_Contents"><text:a xlink:type="simple" xlink:href="http://localhost:15672/#/queues/%2F/updated-employees-queue" text:style-name="Internet_20_link" text:visited-style-name="Visited_20_Internet_20_Link"><text:span text:style-name="T69"><text:line-break/>updated-employees-queue</text:span></text:a></text:p>
          </table:table-cell>
        </table:table-row>
      </table:table>
      <text:p text:style-name="P238"><text:span text:style-name="T98">Make them durable</text:span><text:span text:style-name="T97"><text:line-break/></text:span></text:p>
      <text:p text:style-name="P167"/>
      <text:p text:style-name="P167"/>
      <text:p text:style-name="P167"/>
      <text:p text:style-name="P170"><text:soft-page-break/></text:p>
      <text:p text:style-name="P190">datatables/build.sh</text:p>
      <text:p text:style-name="P171"><text:span text:style-name="T120">t</text:span><text:span text:style-name="T119">his command builds myapp-client and myapp-jpa-server</text:span></text:p>
      <text:p text:style-name="P171"><text:span text:style-name="T119">You should run the command when you want to use docker compos</text:span><text:span text:style-name="T121">e up.</text:span><text:span text:style-name="T122"><text:line-break/></text:span><text:span text:style-name="T70">docket-compose down<text:line-break/>docker-compose up –build</text:span></text:p>
      <text:p text:style-name="P169"><text:span text:style-name="T71">docker-compose up</text:span><text:span text:style-name="T68"> <text:s text:c="8"/></text:span><text:line-break/><text:line-break/>The commands will create the docker images and run the containers as you can see in Docker Desktop application.</text:p>
      <text:p text:style-name="P168"/>
      <text:p text:style-name="P166"/>
      <text:p text:style-name="P155"/>
      <text:p text:style-name="P155"/>
      <text:p text:style-name="P164"/>
      <text:p text:style-name="P165"><text:span text:style-name="T64"/></text:p>
      <text:p text:style-name="P162"/>
      <text:p text:style-name="P155"/>
      <text:p text:style-name="P157"/>
      <text:p text:style-name="P159">Docker-compose up : NETWORK CHANGED</text:p>
      <text:p text:style-name="P163"/>
      <text:p text:style-name="P111">docker-compose up ERROR: Network "myapp-jpa-server_default" needs to be recreated - option "com.docker.network.enable_ipv6" has changed</text:p>
      <text:p text:style-name="P91"/>
      <text:p text:style-name="P91"/>
      <text:p text:style-name="P91"/>
      <text:p text:style-name="P91"><text:soft-page-break/></text:p>
      <text:p text:style-name="P91"/>
      <text:p text:style-name="P91"/>
      <text:p text:style-name="P5"/>
      <text:p text:style-name="P160">Find a proceess running on port 9090</text:p>
      <text:list text:style-name="L4">
        <text:list-item>
          <text:p text:style-name="P282">sudo lsof -i :9090</text:p>
        </text:list-item>
      </text:list>
      <text:p text:style-name="P1"/>
      <text:p text:style-name="P3">Create database in pgAdmin</text:p>
      <text:p text:style-name="P177">mydatabase</text:p>
      <text:p text:style-name="P2"><text:span text:style-name="Source_20_Text"><text:span text:style-name="T5"/></text:span></text:p>
      <text:p text:style-name="P4"><text:span text:style-name="Source_20_Text"><text:span text:style-name="T6">docker run --name some-postgres -e POSTGRES_PASSWORD=mysecretpassword -d -p 5432:5432 postgres</text:span></text:span></text:p>
      <text:p text:style-name="P192"/>
      <text:p text:style-name="P192"/>
      <text:p text:style-name="P50">Spring profiles</text:p>
      <text:p text:style-name="P191">java -Dspring.profiles.active=prod -jar target/myapp-jpa-server-1.0.0.jar</text:p>
      <text:p text:style-name="P191"/>
      <text:p text:style-name="P191"/>
      <text:p text:style-name="P193"/>
      <text:p text:style-name="P191"/>
      <text:p text:style-name="P73">Create mvn in project:</text:p>
      <text:p text:style-name="P200">mvn -N io.takari:maven:wrapper</text:p>
      <text:p text:style-name="P191"/>
      <text:p text:style-name="P191"/>
      <text:p text:style-name="P191"/>
      <text:p text:style-name="P172">Install angular 19 or 20</text:p>
      <text:list text:style-name="L5">
        <text:list-item>
          <text:p text:style-name="P284">Instal NodeJS</text:p>
          <text:p text:style-name="P283"><text:a xlink:type="simple" xlink:href="https://nodejs.org/en/download" text:style-name="Internet_20_link" text:visited-style-name="Visited_20_Internet_20_Link">https://nodejs.org/en/download</text:a></text:p>
          <text:p text:style-name="P285">or</text:p>
        </text:list-item>
        <text:list-item>
          <text:p text:style-name="P285">sudo apt install npm</text:p>
        </text:list-item>
      </text:list>
      <text:p text:style-name="P128"/>
      <text:p text:style-name="P128"># Download and install nvm:</text:p>
      <text:p text:style-name="P128">curl -o- https://raw.githubusercontent.com/nvm-sh/nvm/v0.40.2/install.sh | bash</text:p>
      <text:p text:style-name="P128"/>
      <text:p text:style-name="P128"><text:soft-page-break/># in lieu of restarting the shell</text:p>
      <text:p text:style-name="P128">\. "$HOME/.nvm/nvm.sh"</text:p>
      <text:p text:style-name="P128"/>
      <text:p text:style-name="P128"># Download and install Node.js:</text:p>
      <text:p text:style-name="P128">nvm install 2<text:span text:style-name="T53">2</text:span></text:p>
      <text:p text:style-name="P128"/>
      <text:p text:style-name="P128"># Verify the Node.js version:</text:p>
      <text:p text:style-name="P128">node -v # Should print "v23.11.0".</text:p>
      <text:p text:style-name="P128">nvm current # Should print "v23.11.0".</text:p>
      <text:p text:style-name="P128"/>
      <text:p text:style-name="P128"># Verify npm version:</text:p>
      <text:p text:style-name="P128">npm -v # Should print "10.9.2".</text:p>
      <text:p text:style-name="P128"/>
      <text:list text:continue-numbering="true" text:style-name="L5">
        <text:list-header>
          <text:p text:style-name="P286"/>
        </text:list-header>
      </text:list>
      <text:p text:style-name="P129">npm I -g typescript</text:p>
      <text:p text:style-name="P129"/>
      <text:p text:style-name="P129"/>
      <text:p text:style-name="P225">Creating maven project</text:p>
      <text:p text:style-name="P225">mvn archetype:generate -DgroupId=com.swaagger -DartifactId=demo -DarchetypeArtifactId=maven-archetype-quickstart -DinteractiveMode=false</text:p>
      <text:p text:style-name="P129"/>
      <text:list text:continue-numbering="true" text:style-name="L5">
        <text:list-item>
          <text:p text:style-name="P284">install typescript extension to visual studio <text:span text:style-name="T72">code</text:span></text:p>
        </text:list-item>
      </text:list>
      <text:p text:style-name="P130"/>
      <text:p text:style-name="P139">First run docker dependencies</text:p>
      <text:p text:style-name="P194"/>
      <text:p text:style-name="P198">donwload <text:span text:style-name="T76">docker images</text:span></text:p>
      <text:p text:style-name="P194"/>
      <text:p text:style-name="P194"/>
      <text:p text:style-name="P140">Postgres container <text:span text:style-name="T73">() I am not sure you need the following command</text:span></text:p>
      <text:p text:style-name="P194">docker run --hostname=467ca158f369 --mac-address=1a:22:4b:7e:6b:f6 --env=POSTGRES_PASSWORD=password --env=PATH=/usr/local/sbin:/usr/local/bin:/usr/sbin:/usr/bin:/sbin:/bin:/usr/lib/postgresql/17/bin --env=GOSU_VERSION=1.17 --env=LANG=en_US.utf8 --env=PG_MAJOR=17 --env=PG_VERSION=17.5-1.pgdg120+1 --env=PGDATA=/var/lib/postgresql/data --volume=/var/lib/postgresql/data --network=bridge -p 5432:5432 --restart=no --runtime=runc -d postgres:latest <text:s text:c="2"/></text:p>
      <text:p text:style-name="P130"/>
      <text:p text:style-name="P130"/>
      <text:p text:style-name="P130"/>
      <text:p text:style-name="P130"/>
      <text:p text:style-name="P130"/>
      <text:p text:style-name="P130"/>
      <text:p text:style-name="P130"/>
      <text:p text:style-name="P201"><text:span text:style-name="T81">Number of watched files by OS</text:span><text:line-break/>echo fs.inotify.max_user_watches=524288 | sudo tee -a /etc/sysctl.conf &amp;&amp; sudo sysctl -p</text:p>
      <text:p text:style-name="P130"/>
      <text:p text:style-name="P130"/>
      <text:p text:style-name="P131">################## RUN ##########################</text:p>
      <text:p text:style-name="P12"><text:tab/></text:p>
      <text:p text:style-name="P196"><text:soft-page-break/>Download music and myapp projects</text:p>
      <text:p text:style-name="P48"><text:span text:style-name="T67">git clone </text:span><text:a xlink:type="simple" xlink:href="https://github.com/ahnsys1/MYAPP_AND_MUSIC.git" text:style-name="Internet_20_link" text:visited-style-name="Visited_20_Internet_20_Link">https://github.com/ahnsys1/MYAPP_AND_MUSIC.git</text:a></text:p>
      <text:p text:style-name="P48"/>
      <text:p text:style-name="P48"/>
      <text:p text:style-name="P197">MyApp</text:p>
      <text:p text:style-name="P36">mongo-myapp-client-release</text:p>
      <text:p text:style-name="P36">myapp-backend-development</text:p>
      <text:p text:style-name="P12">myapp-jpa-client-release</text:p>
      <text:p text:style-name="P12"/>
      <text:p text:style-name="P12"/>
      <text:p text:style-name="P138">now let’s start backend first</text:p>
      <text:p text:style-name="P147">myapp-backend-development/mvn clean install</text:p>
      <text:p text:style-name="P147">myapp-backend-development/java -jar target/backend-0.0.1-SNAPSHOT.jar</text:p>
      <text:p text:style-name="P12"/>
      <text:p text:style-name="P37">myapp-client/<text:span text:style-name="T73">npm i</text:span></text:p>
      <text:p text:style-name="P37">mongo-myapp-client-release/<text:span text:style-name="T73">ng s</text:span></text:p>
      <text:p text:style-name="P195">OR: <text:span text:style-name="T74">depending if you want to store data in MongoDB or in <text:s/>PostrgeSQL</text:span></text:p>
      <text:p text:style-name="P13">myapp-client/<text:span text:style-name="T73">npm i</text:span></text:p>
      <text:p text:style-name="P13">myapp-client/<text:span text:style-name="T73">ng s</text:span></text:p>
      <text:p text:style-name="P38"/>
      <text:p text:style-name="P39">sudo update-java-alternatives </text:p>
      <text:p text:style-name="P38"/>
      <text:p text:style-name="P12"/>
      <text:p text:style-name="P12"/>
      <text:p text:style-name="P12">npm i uuid --<text:span text:style-name="T100">s</text:span><text:span text:style-name="T75">ave</text:span></text:p>
      <text:p text:style-name="P9"><text:bookmark text:name="8514"/>npm i jquery --save</text:p>
      <text:p text:style-name="P41">npm i datatables.net --save</text:p>
      <text:p text:style-name="P41">npm i datatables.net-dt --save</text:p>
      <text:p text:style-name="P41">npm i angular-datatables --save</text:p>
      <text:p text:style-name="P42">npm i @types/jquery --save-dev</text:p>
      <text:p text:style-name="P10"><text:soft-page-break/></text:p>
      <text:p text:style-name="P10"/>
      <text:p text:style-name="P10"/>
      <text:p text:style-name="P10"/>
      <text:p text:style-name="P11"><text:tab/>npm i bootstrap5 --save</text:p>
      <text:p text:style-name="P10"/>
      <text:p text:style-name="P10"><text:tab/>ng add @ng-bootstrap/ng-bootstrap</text:p>
      <text:p text:style-name="P10"/>
      <text:p text:style-name="P10"/>
      <text:p text:style-name="P20"/>
      <text:p text:style-name="P10">npm list -g</text:p>
      <text:p text:style-name="P10">/home/vj/.nvm/versions/node/v23.11.0/lib</text:p>
      <text:p text:style-name="P10">├── @angular/cli@19.2.6</text:p>
      <text:p text:style-name="P10">├── corepack@0.32.0</text:p>
      <text:p text:style-name="P10">├── npm@10.9.2</text:p>
      <text:p text:style-name="P10">├── typescript@5.8.3</text:p>
      <text:p text:style-name="P10">└── <text:a xlink:type="simple" xlink:href="mailto:uuid@11.1.0" text:style-name="Internet_20_link" text:visited-style-name="Visited_20_Internet_20_Link">uuid@11.1.0</text:a></text:p>
      <text:p text:style-name="P10"/>
      <text:p text:style-name="P10"/>
      <text:p text:style-name="P10"/>
      <text:p text:style-name="P10"/>
      <text:p text:style-name="P10"/>
      <text:p text:style-name="P10"/>
      <text:p text:style-name="P10"/>
      <text:p text:style-name="P21">Manual for integrating datatables into Angular project</text:p>
      <text:p text:style-name="P21"><text:a xlink:type="simple" xlink:href="https://nipuanandawansha.medium.com/angular-datatables-with-angular-19-4ee54d989639" text:style-name="Internet_20_link" text:visited-style-name="Visited_20_Internet_20_Link">https://nipuanandawansha.medium.com/angular-datatables-with-angular-19-4ee54d989639</text:a></text:p>
      <text:p text:style-name="P15"/>
      <text:p text:style-name="P14"><text:span text:style-name="Source_20_Text">npm i @types/datatables.net --save-dev</text:span></text:p>
      <text:p text:style-name="P15"/>
      <text:p text:style-name="P15"/>
      <text:p text:style-name="P15"/>
      <text:p text:style-name="P15">npm i json-server</text:p>
      <text:p text:style-name="P15"/>
      <text:p text:style-name="P15"/>
      <text:p text:style-name="P15"><text:soft-page-break/>Angular_19/src/REST-endpoints$</text:p>
      <text:p text:style-name="P15">json-server -w users-data.json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2">angular-datatables-master</text:p>
      <text:p text:style-name="P22"/>
      <text:p text:style-name="P22"><text:a xlink:type="simple" xlink:href="https://github.com/l-lin/angular-datatables/tree/master" text:style-name="Internet_20_link" text:visited-style-name="Visited_20_Internet_20_Link">https://github.com/l-lin/angular-datatables/tree/master</text:a></text:p>
      <text:p text:style-name="P22"/>
      <text:p text:style-name="P22">npm start</text:p>
      <text:p text:style-name="P22"/>
      <text:p text:style-name="P22"><text:tab/>this starts development server</text:p>
      <text:p text:style-name="P22"><text:tab/>localhost:4200</text:p>
      <text:p text:style-name="P23"/>
      <text:p text:style-name="P23">npm <text:span text:style-name="T54">i</text:span> –<text:span text:style-name="T54">save </text:span>@types/jquery</text:p>
      <text:p text:style-name="P23"/>
      <text:p text:style-name="P23"/>
      <text:p text:style-name="P23">ng add @angular/material</text:p>
      <text:p text:style-name="P23"/>
      <text:p text:style-name="P23"/>
      <text:p text:style-name="P24">PROJECT EXPORT</text:p>
      <text:p text:style-name="P25"><text:span text:style-name="Source_20_Text">git archive --format=zip --output zipfile.zip development</text:span></text:p>
      <text:p text:style-name="P25"><text:soft-page-break/><text:span text:style-name="Source_20_Text"/></text:p>
      <text:p text:style-name="P24">json-server -w employee-data.json</text:p>
      <text:p text:style-name="P134"/>
      <text:p text:style-name="P135">json-server -p 4000 -w users-data.json</text:p>
      <text:p text:style-name="P135"/>
      <text:p text:style-name="P134"/>
      <text:p text:style-name="P136">http://localhost:4000/users</text:p>
      <text:p text:style-name="P239"/>
      <text:p text:style-name="P40">JSON PATH</text:p>
      <text:p text:style-name="P173">JSONPATH.COM</text:p>
      <text:p text:style-name="P174">jsonformatter.org</text:p>
      <text:p text:style-name="P175"/>
      <text:p text:style-name="P26"/>
      <text:p text:style-name="P26"/>
      <text:p text:style-name="P26"/>
      <text:p text:style-name="P26"/>
      <text:p text:style-name="P26"/>
      <text:p text:style-name="P26"/>
      <text:p text:style-name="P26"/>
      <text:p text:style-name="P26"/>
      <text:p text:style-name="P26"/>
      <text:p text:style-name="P133"/>
      <text:p text:style-name="P133"/>
      <text:p text:style-name="P133"/>
      <text:p text:style-name="P133"/>
      <text:p text:style-name="P133">server</text:p>
      <text:p text:style-name="P27">java -agentlib:jdwp=transport=dt_socket,server=y,suspend=<text:span text:style-name="T55">y</text:span>,address=8000 -jar target/backend-0.0.1-SNAPSHOT.jar</text:p>
      <text:p text:style-name="P27"/>
      <text:p text:style-name="P27"><text:soft-page-break/></text:p>
      <text:p text:style-name="P27"/>
      <text:p text:style-name="P27"/>
      <text:p text:style-name="P27"/>
      <text:p text:style-name="P27"/>
      <text:p text:style-name="P27"/>
      <text:p text:style-name="P29">DOCKER</text:p>
      <text:p text:style-name="P137">MONGODB</text:p>
      <text:p text:style-name="P86">docker pull mongo</text:p>
      <text:p text:style-name="P16"><text:bookmark text:name="93d8"/>docker run -d --name my-mongodb -p </text:p>
      <text:p text:style-name="P16">27017:27017 mongo</text:p>
      <text:p text:style-name="P16"/>
      <text:p text:style-name="P16"><text:bookmark text:name="4054"/>docker exec -it my-mongodb mongosh</text:p>
      <text:p text:style-name="P17"/>
      <text:p text:style-name="P27"/>
      <text:p text:style-name="P28">docker pull postgres:16.9</text:p>
      <text:p text:style-name="P27"/>
      <text:p text:style-name="P27"/>
      <text:p text:style-name="P27"/>
      <text:p text:style-name="P27"/>
      <text:p text:style-name="P27"><text:s/>/<text:span text:style-name="T80">h</text:span>ome/vj/Desktop/Angular/myapp-backed/backend</text:p>
      <text:p text:style-name="P62">run without docker</text:p>
      <text:p text:style-name="P142">mvn clean install</text:p>
      <text:p text:style-name="P143">java -jar target/backend-0.0.1-SNAPSHOT.jar</text:p>
      <text:p text:style-name="P143"/>
      <text:p text:style-name="P62">run with docker</text:p>
      <text:p text:style-name="P143"><text:bookmark-start text:name="__DdeLink__592_3811136580"/>docker build -t myapp-backend:<text:span text:style-name="T56">1.0.0 .</text:span><text:bookmark-end text:name="__DdeLink__592_3811136580"/></text:p>
      <text:p text:style-name="P27">docker run -p 9090:9090 myapp-backend:<text:span text:style-name="T57">1.0.0</text:span></text:p>
      <text:p text:style-name="P30">docker container stop myapp-backend:<text:span text:style-name="T57">1.0.0</text:span></text:p>
      <text:p text:style-name="P143"/>
      <text:p text:style-name="P62">run without docker</text:p>
      <text:p text:style-name="P143">~/Desktop/Angular/myapp$</text:p>
      <text:p text:style-name="P142">ng build</text:p>
      <text:p text:style-name="P144">ng s <text:s text:c="9"/><text:span text:style-name="T58">or <text:s text:c="16"/>npm start</text:span></text:p>
      <text:p text:style-name="P62">run with docker</text:p>
      <text:p text:style-name="P143">docker build -t myapp-web:<text:span text:style-name="T59">1.0.0</text:span> .</text:p>
      <text:p text:style-name="P143">docker run <text:s/>-p 80:80 myapp-web:<text:span text:style-name="T59">1.0.0</text:span></text:p>
      <text:p text:style-name="P30"><text:bookmark-start text:name="__DdeLink__595_3811136580"/><text:soft-page-break/>docker container stop myapp-<text:span text:style-name="T60">web:</text:span><text:span text:style-name="T57">1.0.0</text:span></text:p>
      <text:p text:style-name="P30"><text:bookmark-end text:name="__DdeLink__595_3811136580"/></text:p>
      <text:p text:style-name="P17"/>
      <text:p text:style-name="P145">MUSIC</text:p>
      <text:p text:style-name="P31">docker build -t music:1.0.0 .</text:p>
      <text:p text:style-name="P143">docker run <text:s/>-p <text:span text:style-name="T61">80</text:span>80:<text:span text:style-name="T61">80</text:span>80 <text:span text:style-name="T61">music</text:span>:<text:span text:style-name="T59">1.0.0</text:span></text:p>
      <text:p text:style-name="P30">docker container stop <text:span text:style-name="T61">music</text:span><text:span text:style-name="T60">:</text:span><text:span text:style-name="T57">1.0.0</text:span></text:p>
      <text:p text:style-name="P30"/>
      <text:p text:style-name="P32"/>
      <text:p text:style-name="P33"><text:span text:style-name="T16">Okay, here's how you can send a message to a specific queue using </text:span><text:span text:style-name="Source_20_Text"><text:span text:style-name="T24">RabbitTemplate</text:span></text:span><text:span text:style-name="T16"> in Spring AMQP:</text:span></text:p>
      <text:p text:style-name="P115">java</text:p>
      <text:p text:style-name="P224"><text:span text:style-name="Source_20_Text"><text:span text:style-name="T33">import</text:span></text:span><text:span text:style-name="Source_20_Text"><text:span text:style-name="T20"> org.springframework.amqp.rabbit.core.RabbitTemplate;</text:span></text:span></text:p>
      <text:p text:style-name="P224"><text:span text:style-name="Source_20_Text"><text:span text:style-name="T33">import</text:span></text:span><text:span text:style-name="Source_20_Text"><text:span text:style-name="T20"> org.springframework.beans.factory.annotation.Autowired;</text:span></text:span></text:p>
      <text:p text:style-name="P224"><text:span text:style-name="Source_20_Text"><text:span text:style-name="T33">import</text:span></text:span><text:span text:style-name="Source_20_Text"><text:span text:style-name="T20"> org.springframework.stereotype.Component;</text:span></text:span></text:p>
      <text:p text:style-name="P224"/>
      <text:p text:style-name="P224"><text:span text:style-name="Source_20_Text"><text:span text:style-name="T36">@Component</text:span></text:span></text:p>
      <text:p text:style-name="P224"><text:span text:style-name="Source_20_Text"><text:span text:style-name="T33">public</text:span></text:span><text:span text:style-name="Source_20_Text"><text:span text:style-name="T20"> </text:span></text:span><text:span text:style-name="Source_20_Text"><text:span text:style-name="T33">class</text:span></text:span><text:span text:style-name="Source_20_Text"><text:span text:style-name="T20"> </text:span></text:span><text:span text:style-name="Source_20_Text"><text:span text:style-name="T26">MessageSender</text:span></text:span><text:span text:style-name="Source_20_Text"><text:span text:style-name="T20"> {</text:span></text:span></text:p>
      <text:p text:style-name="P224"/>
      <text:p text:style-name="P224"><text:span text:style-name="Source_20_Text"><text:span text:style-name="T22"><text:s text:c="4"/></text:span></text:span><text:span text:style-name="Source_20_Text"><text:span text:style-name="T36">@Autowired</text:span></text:span></text:p>
      <text:p text:style-name="P224"><text:span text:style-name="Source_20_Text"><text:span text:style-name="T22"><text:s text:c="4"/></text:span></text:span><text:span text:style-name="Source_20_Text"><text:span text:style-name="T33">private</text:span></text:span><text:span text:style-name="Source_20_Text"><text:span text:style-name="T20"> RabbitTemplate rabbitTemplate;</text:span></text:span></text:p>
      <text:p text:style-name="P224"/>
      <text:p text:style-name="P224"><text:span text:style-name="Source_20_Text"><text:span text:style-name="T22"><text:s text:c="4"/></text:span></text:span><text:span text:style-name="Source_20_Text"><text:span text:style-name="T33">public</text:span></text:span><text:span text:style-name="Source_20_Text"><text:span text:style-name="T20"> </text:span></text:span><text:span text:style-name="Source_20_Text"><text:span text:style-name="T33">void</text:span></text:span><text:span text:style-name="Source_20_Text"><text:span text:style-name="T20"> </text:span></text:span><text:span text:style-name="Source_20_Text"><text:span text:style-name="T26">sendMessage</text:span></text:span><text:span text:style-name="Source_20_Text"><text:span text:style-name="T20">(String queueName, String message) {</text:span></text:span></text:p>
      <text:p text:style-name="P224"><text:span text:style-name="Source_20_Text"><text:span text:style-name="T22"><text:s text:c="8"/></text:span></text:span><text:span text:style-name="Source_20_Text"><text:span text:style-name="T20">rabbitTemplate.convertAndSend(queueName, message);</text:span></text:span></text:p>
      <text:p text:style-name="P224"><text:span text:style-name="Source_20_Text"><text:span text:style-name="T22"><text:s text:c="4"/></text:span></text:span><text:span text:style-name="Source_20_Text"><text:span text:style-name="T20">}</text:span></text:span></text:p>
      <text:p text:style-name="P223"><text:span text:style-name="Source_20_Text"><text:span text:style-name="T20">}</text:span></text:span></text:p>
      <text:p text:style-name="P218"><text:span text:style-name="Strong_20_Emphasis"><text:span text:style-name="T16">Explanation:</text:span></text:span></text:p>
      <text:list text:style-name="L6">
        <text:list-item>
          <text:p text:style-name="P289"><text:span text:style-name="Strong_20_Emphasis"><text:span text:style-name="Source_20_Text"><text:span text:style-name="T24">@Autowired private RabbitTemplate rabbitTemplate;</text:span></text:span></text:span><text:span text:style-name="T16">: This line injects an instance of </text:span><text:span text:style-name="Source_20_Text"><text:span text:style-name="T24">RabbitTemplate</text:span></text:span><text:span text:style-name="T16"> into your class. </text:span><text:span text:style-name="Source_20_Text"><text:span text:style-name="T24">RabbitTemplate</text:span></text:span><text:span text:style-name="T16"> is the core class for sending messages to RabbitMQ.</text:span></text:p>
        </text:list-item>
        <text:list-item>
          <text:p text:style-name="P289"><text:span text:style-name="Strong_20_Emphasis"><text:span text:style-name="Source_20_Text"><text:span text:style-name="T24">rabbitTemplate.convertAndSend(queueName, message);</text:span></text:span></text:span><text:span text:style-name="T16">: This is the key line.</text:span></text:p>
          <text:list>
            <text:list-item>
              <text:p text:style-name="P289"><text:span text:style-name="Source_20_Text"><text:span text:style-name="T24">queueName</text:span></text:span><text:span text:style-name="T16">: This is a </text:span><text:span text:style-name="Source_20_Text"><text:span text:style-name="T24">String</text:span></text:span><text:span text:style-name="T16"> that specifies the name of the queue you want to send the message to.</text:span></text:p>
            </text:list-item>
            <text:list-item>
              <text:p text:style-name="P290"><text:span text:style-name="Source_20_Text"><text:span text:style-name="T24">message</text:span></text:span><text:span text:style-name="T16">: This is the message you want to send. The </text:span><text:span text:style-name="Source_20_Text"><text:span text:style-name="T24">convertAndSend</text:span></text:span><text:span text:style-name="T16"> method will automatically convert the </text:span><text:span text:style-name="Source_20_Text"><text:span text:style-name="T24">message</text:span></text:span><text:span text:style-name="T16"> object to a byte array using a message converter. The default converter is a </text:span><text:span text:style-name="Source_20_Text"><text:span text:style-name="T24">SimpleMessageConverter</text:span></text:span><text:span text:style-name="T16">, which works well for simple </text:span><text:span text:style-name="Source_20_Text"><text:span text:style-name="T24">String</text:span></text:span><text:span text:style-name="T16"> messages.</text:span></text:p>
            </text:list-item>
          </text:list>
        </text:list-item>
      </text:list>
      <text:p text:style-name="P218"><text:span text:style-name="Strong_20_Emphasis"><text:span text:style-name="T16">Example Usage:</text:span></text:span></text:p>
      <text:p text:style-name="P115">java</text:p>
      <text:p text:style-name="P224"><text:span text:style-name="Source_20_Text"><text:span text:style-name="T36">@Autowired</text:span></text:span></text:p>
      <text:p text:style-name="P224"><text:span text:style-name="Source_20_Text"><text:span text:style-name="T20">MessageSender messageSender;</text:span></text:span></text:p>
      <text:p text:style-name="P224"/>
      <text:p text:style-name="P224"><text:span text:style-name="Source_20_Text"><text:span text:style-name="T33">public</text:span></text:span><text:span text:style-name="Source_20_Text"><text:span text:style-name="T20"> </text:span></text:span><text:span text:style-name="Source_20_Text"><text:span text:style-name="T33">void</text:span></text:span><text:span text:style-name="Source_20_Text"><text:span text:style-name="T20"> </text:span></text:span><text:span text:style-name="Source_20_Text"><text:span text:style-name="T26">someMethod</text:span></text:span><text:span text:style-name="Source_20_Text"><text:span text:style-name="T20">() {</text:span></text:span></text:p>
      <text:p text:style-name="P224"><text:span text:style-name="Source_20_Text"><text:span text:style-name="T22"><text:s text:c="4"/></text:span></text:span><text:span text:style-name="Source_20_Text"><text:span text:style-name="T20">String queueName = </text:span></text:span><text:span text:style-name="Source_20_Text"><text:span text:style-name="T26">"myQueue"</text:span></text:span><text:span text:style-name="Source_20_Text"><text:span text:style-name="T20">;</text:span></text:span></text:p>
      <text:p text:style-name="P224"><text:span text:style-name="Source_20_Text"><text:span text:style-name="T22"><text:s text:c="4"/></text:span></text:span><text:span text:style-name="Source_20_Text"><text:span text:style-name="T20">String message = </text:span></text:span><text:span text:style-name="Source_20_Text"><text:span text:style-name="T26">"Hello, RabbitMQ!"</text:span></text:span><text:span text:style-name="Source_20_Text"><text:span text:style-name="T20">;</text:span></text:span></text:p>
      <text:p text:style-name="P224"><text:span text:style-name="Source_20_Text"><text:span text:style-name="T22"><text:s text:c="4"/></text:span></text:span><text:span text:style-name="Source_20_Text"><text:span text:style-name="T20">messageSender.sendMessage(queueName, message);</text:span></text:span></text:p>
      <text:p text:style-name="P223"><text:span text:style-name="Source_20_Text"><text:span text:style-name="T20">}</text:span></text:span></text:p>
      <text:p text:style-name="P218"><text:span text:style-name="Strong_20_Emphasis"><text:span text:style-name="T16">Important Considerations:</text:span></text:span></text:p>
      <text:list text:style-name="L7">
        <text:list-item>
          <text:p text:style-name="P291"><text:span text:style-name="Strong_20_Emphasis"><text:span text:style-name="T16">Queue Declaration:</text:span></text:span><text:span text:style-name="T16"> Make sure the queue you're sending to (</text:span><text:span text:style-name="Source_20_Text"><text:span text:style-name="T24">myQueue</text:span></text:span><text:span text:style-name="T16"> in the example) has been declared in your RabbitMQ configuration. If the queue doesn't exist, the message might be lost (depending on your RabbitMQ configuration and exchange settings). The </text:span><text:a xlink:type="simple" xlink:href="code-assist-path:/home/vj/Desktop/A/backu20/datatables/myapp-mongo-server/src/main/java/com/angular/backend/employees/RabbitMQConfig.java" text:style-name="Internet_20_link" text:visited-style-name="Visited_20_Internet_20_Link"><text:span text:style-name="Source_20_Text"><text:span text:style-name="T28">RabbitMQConfig.java</text:span></text:span></text:a><text:span text:style-name="T16"> file in the context shows how to declare a queue.</text:span></text:p>
        </text:list-item>
        <text:list-item>
          <text:p text:style-name="P291"><text:span text:style-name="Strong_20_Emphasis"><text:span text:style-name="T16">Message Conversion:</text:span></text:span><text:span text:style-name="T16"> If you need to send more complex objects than simple strings, you might need to configure a custom message converter. Spring AMQP provides several built-in converters (like </text:span><text:span text:style-name="Source_20_Text"><text:span text:style-name="T24">Jackson2JsonMessageConverter</text:span></text:span><text:span text:style-name="T16"> for JSON).</text:span></text:p>
        </text:list-item>
        <text:list-item>
          <text:p text:style-name="P291"><text:span text:style-name="Strong_20_Emphasis"><text:span text:style-name="T16">Exchange:</text:span></text:span><text:span text:style-name="T16"> While this example sends directly to a queue, you can also send messages to an exchange, which then routes the message to one or more queues based on routing keys and exchange type. The </text:span><text:a xlink:type="simple" xlink:href="code-assist-path:/home/vj/Desktop/A/backu20/datatables/myapp-mongo-server/src/main/java/com/angular/backend/employees/RabbitMQConfig.java" text:style-name="Internet_20_link" text:visited-style-name="Visited_20_Internet_20_Link"><text:span text:style-name="Source_20_Text"><text:span text:style-name="T28">RabbitMQConfig.java</text:span></text:span></text:a><text:span text:style-name="T16"> file in the context shows how to declare an exchange and bind it to a queue. To send to an exchange, you'd use a different overload of </text:span><text:span text:style-name="Source_20_Text"><text:span text:style-name="T24">convertAndSend</text:span></text:span><text:span text:style-name="T16">:</text:span></text:p>
          <text:p text:style-name="P265"><text:soft-page-break/>java</text:p>
          <text:p text:style-name="P270"><text:span text:style-name="Source_20_Text"><text:span text:style-name="T20">rabbitTemplate.convertAndSend(exchangeName, routingKey, message);</text:span></text:span></text:p>
          <text:p text:style-name="P291"><text:span text:style-name="T16">Where </text:span><text:span text:style-name="Source_20_Text"><text:span text:style-name="T24">exchangeName</text:span></text:span><text:span text:style-name="T16"> is the name of the exchange, and </text:span><text:span text:style-name="Source_20_Text"><text:span text:style-name="T24">routingKey</text:span></text:span><text:span text:style-name="T16"> is used for routing.</text:span></text:p>
        </text:list-item>
        <text:list-item>
          <text:p text:style-name="P291"><text:span text:style-name="Strong_20_Emphasis"><text:span text:style-name="T16">Error Handling:</text:span></text:span><text:span text:style-name="T16"> Consider adding error handling (e.g., try-catch blocks) around the </text:span><text:span text:style-name="Source_20_Text"><text:span text:style-name="T24">convertAndSend</text:span></text:span><text:span text:style-name="T16"> method to handle potential exceptions during message sending. The </text:span><text:a xlink:type="simple" xlink:href="code-assist-path:/home/vj/Desktop/A/backu20/datatables/myapp-mongo-server/src/main/java/com/angular/backend/employees/EmployeeMongoService.java" text:style-name="Internet_20_link" text:visited-style-name="Visited_20_Internet_20_Link"><text:span text:style-name="Source_20_Text"><text:span text:style-name="T28">EmployeeMongoService.java</text:span></text:span></text:a><text:span text:style-name="T16"> file in the context shows an example of error handling.</text:span></text:p>
        </text:list-item>
      </text:list>
      <text:p text:style-name="P32"/>
      <text:p text:style-name="P32"/>
      <text:p text:style-name="P148">LIST OF Images and Containers</text:p>
      <text:p text:style-name="P34">docker images</text:p>
      <text:p text:style-name="P34">docker container ps</text:p>
      <text:p text:style-name="P32"/>
      <text:p text:style-name="P150">removes all stopped contianers</text:p>
      <text:p text:style-name="P27">docker container prune</text:p>
      <text:p text:style-name="P27"/>
      <text:p text:style-name="P27"/>
      <text:p text:style-name="P27"/>
      <text:p text:style-name="P27"/>
      <text:p text:style-name="P27"/>
      <text:p text:style-name="P146">remove all stopped containers</text:p>
      <text:p text:style-name="P18"><text:span text:style-name="Source_20_Text"><text:span text:style-name="T1">d</text:span></text:span><text:span text:style-name="Source_20_Text"><text:span text:style-name="T2">ocker</text:span></text:span><text:span text:style-name="Source_20_Text"><text:span text:style-name="T3"> container prune</text:span></text:span></text:p>
      <text:p text:style-name="P19"/>
      <text:p text:style-name="P19"/>
      <text:p text:style-name="P68">Show containers</text:p>
      <text:p text:style-name="P35">docker container ps -<text:span text:style-name="T62">a</text:span></text:p>
      <text:p text:style-name="P44"/>
      <text:p text:style-name="P45"/>
      <text:p text:style-name="P32">docker run -p 9090:9090 myapp-backend</text:p>
      <text:p text:style-name="P32">docker run <text:s/>-p 80:80 myapp-web</text:p>
      <text:p text:style-name="P32"/>
      <text:p text:style-name="P35"/>
      <text:p text:style-name="P35"/>
      <text:p text:style-name="P35"/>
      <text:p text:style-name="P35"/>
      <text:p text:style-name="P35"/>
      <text:p text:style-name="P35"/>
      <text:p text:style-name="P35"/>
      <text:p text:style-name="P17"><text:soft-page-break/></text:p>
      <text:p text:style-name="P17"/>
      <text:p text:style-name="P16">use mydb</text:p>
      <text:p text:style-name="P125">db.createCollection("users")</text:p>
      <text:p text:style-name="P126">db.users.insertOne({name: "John Doe", email: "john@example.com"})</text:p>
      <text:p text:style-name="P17"/>
      <text:p text:style-name="P17"/>
      <text:p text:style-name="P17"/>
      <text:p text:style-name="P46">TEST USE OF PERSISTENCE</text:p>
      <text:p text:style-name="P16"><text:bookmark text:name="fc79"/>docker stop my-mongodb</text:p>
      <text:p text:style-name="P126">docker rm my-mongodb</text:p>
      <text:p text:style-name="P16"><text:tab/><text:tab/><text:tab/> <text:s text:c="9"/></text:p>
      <text:p text:style-name="P16"/>
      <text:p text:style-name="P16"/>
      <text:p text:style-name="P43">TEST DB FIND</text:p>
      <text:p text:style-name="P16"><text:bookmark text:name="472e"/>docker exec -it my-mongodb mongo</text:p>
      <text:p text:style-name="P125">use mydb</text:p>
      <text:p text:style-name="P126">db.users.find()</text:p>
      <text:p text:style-name="P16"/>
      <text:p text:style-name="P47">Where is the Docker volume?</text:p>
      <text:section text:style-name="Sect1" text:name="_3IwlaJ3oJ-KC9u8P6vWy0Q0_52">
        <text:section text:style-name="Sect1" text:name="3IwlaJ3oJ-KC9u8P6vWy0Q0__39">
          <text:p text:style-name="P127">/var/lib/docker/volume</text:p>
        </text:section>
        <text:section text:style-name="Sect1" text:name="3IwlaJ3oJ-KC9u8P6vWy0Q0__40">
          <text:p text:style-name="P152">Volumes are also stored as part of the host file system, which is managed by Docker. On Linux, volumes are stored in “<text:span text:style-name="T63">/var/lib/docker/volume</text:span>”.</text:p>
        </text:section>
      </text:section>
      <text:p text:style-name="P16"/>
      <text:p text:style-name="P16"/>
      <text:p text:style-name="P16"/>
      <text:p text:style-name="P16"/>
      <text:p text:style-name="P16"/>
      <text:p text:style-name="P16"/>
      <text:p text:style-name="P16"/>
      <text:p text:style-name="P16"/>
      <text:p text:style-name="P16"><text:a xlink:type="simple" xlink:href="https://shamsfiroz.medium.com/running-mongodb-in-docker-a-practical-guide-2b4cf39d5d60" text:style-name="Internet_20_link" text:visited-style-name="Visited_20_Internet_20_Link">https://shamsfiroz.medium.com/running-mongodb-in-docker-a-practical-guide-2b4cf39d5d60</text:a></text:p>
      <text:p text:style-name="P16"/>
      <text:p text:style-name="P16"/>
      <text:p text:style-name="P16"><text:soft-page-break/><text:tab/></text:p>
      <text:p text:style-name="P16"><text:a xlink:type="simple" xlink:href="https://www.baeldung.com/ops/docker-mounting-multiple-volumes" text:style-name="Internet_20_link" text:visited-style-name="Visited_20_Internet_20_Link">https://www.baeldung.com/ops/docker-mounting-multiple-volumes</text:a></text:p>
      <text:p text:style-name="P16"/>
      <text:p text:style-name="P16"><text:a xlink:type="simple" xlink:href="https://www.mongodb.com/resources/products/compatibilities/spring-boot" text:style-name="Internet_20_link" text:visited-style-name="Visited_20_Internet_20_Link">https://www.mongodb.com/resources/products/compatibilities/spring-boot</text:a></text:p>
      <text:p text:style-name="P16"/>
      <text:p text:style-name="P16"/>
      <text:p text:style-name="P16"><text:a xlink:type="simple" xlink:href="https://www.baeldung.com/spring-data-" text:style-name="Internet_20_link" text:visited-style-name="Visited_20_Internet_20_Link">https://www.baeldung.com/spring-data-</text:a></text:p>
      <text:p text:style-name="P16"><text:a xlink:type="simple" xlink:href="https://www.baeldung.com/spring-data-mongodb-tutorial" text:style-name="Internet_20_link" text:visited-style-name="Visited_20_Internet_20_Link">mongodb-tutorial</text:a></text:p>
      <text:p text:style-name="P16"/>
      <text:p text:style-name="P16"/>
      <text:p text:style-name="P16"/>
      <text:p text:style-name="P16"/>
      <text:p text:style-name="P16"/>
      <text:p text:style-name="P16"/>
      <text:p text:style-name="P16"/>
      <text:p text:style-name="P16"/>
      <text:p text:style-name="P16"/>
      <text:p text:style-name="P16"/>
      <text:p text:style-name="P78"/>
      <text:p text:style-name="P80">RUN PGADMIN</text:p>
      <text:p text:style-name="P80">https://www.pgadmin.org/docs/pgadmin4/latest/container_deployment.html</text:p>
      <text:p text:style-name="P80"/>
      <text:p text:style-name="P79">docker<text:span text:style-name="T65"> </text:span>pull<text:span text:style-name="T65"> </text:span>dpage/pgadmin4</text:p>
      <text:p text:style-name="P16"/>
      <text:p text:style-name="P16"/>
      <text:p text:style-name="P16"/>
      <text:p text:style-name="P123">docker run -p 180:180 \ <text:s text:c="49"/>-e 'PGADMIN_DEFAULT_EMAIL=user@domain.com' \</text:p>
      <text:p text:style-name="P123"><text:s text:c="4"/>-e 'PGADMIN_DEFAULT_PASSWORD=SuperSecret' \</text:p>
      <text:p text:style-name="P123"><text:s text:c="4"/>-e 'PGADMIN_CONFIG_ENHANCED_COOKIE_PROTECTION=True' \</text:p>
      <text:p text:style-name="P123"><text:s text:c="4"/>-e 'PGADMIN_CONFIG_LOGIN_BANNER="Authorised users only!"' \</text:p>
      <text:p text:style-name="P123"><text:s text:c="4"/>-e 'PGADMIN_CONFIG_CONSOLE_LOG_LEVEL=10' \</text:p>
      <text:p text:style-name="P123"><text:s text:c="4"/>-d dpage/pgadmin4</text:p>
      <text:p text:style-name="P123"/>
      <text:p text:style-name="P123"/>
      <text:p text:style-name="P123"><text:soft-page-break/></text:p>
      <text:p text:style-name="P123"/>
      <text:p text:style-name="P123"/>
      <text:p text:style-name="P123"/>
      <text:p text:style-name="P123"/>
      <text:p text:style-name="P123"/>
      <text:p text:style-name="P123"/>
      <text:p text:style-name="P123">2025-05-27 21:22:40.942 | Error: Database is uninitialized and superuser password is not specified.</text:p>
      <text:p text:style-name="P123">2025-05-27 21:22:40.942 | <text:s text:c="7"/>You must specify POSTGRES_PASSWORD to a non-empty value for the</text:p>
      <text:p text:style-name="P123">2025-05-27 21:22:40.942 | <text:s text:c="7"/>superuser. For example, "-e POSTGRES_PASSWORD=password" on "docker run".</text:p>
      <text:p text:style-name="P123">2025-05-27 21:22:40.942 | </text:p>
      <text:p text:style-name="P123">2025-05-27 21:22:40.942 | <text:s text:c="7"/>You may also use "POSTGRES_HOST_AUTH_METHOD=trust" to allow all</text:p>
      <text:p text:style-name="P123">2025-05-27 21:22:40.942 | <text:s text:c="7"/>connections without a password. This is *not* recommended.</text:p>
      <text:p text:style-name="P123">2025-05-27 21:22:40.942 | </text:p>
      <text:p text:style-name="P123">2025-05-27 21:22:40.942 | <text:s text:c="7"/>See PostgreSQL documentation about "trust":</text:p>
      <text:p text:style-name="P123">2025-05-27 21:22:40.942 | https://www.postgresql.org/docs/current/auth-trust.html</text:p>
      <text:p text:style-name="P123"/>
      <text:p text:style-name="P124">How to integrate backend with frontend (myapp, myapp-backed);</text:p>
      <text:p text:style-name="P124">1. ng build for myapp (web)</text:p>
      <text:p text:style-name="P124"/>
      <text:p text:style-name="P124">2 <text:s/>Copy myapp/dist/myapp/browser content into myapp-backedsrc/main/resources/static <text:s/></text:p>
      <text:p text:style-name="P124"/>
      <text:p text:style-name="P124">3. mvn clean install in project myapp-backend</text:p>
      <text:p text:style-name="P124"/>
      <text:p text:style-name="P124">4. java -jar target/backend-0.0.1-SNAPSHOT.jar<text:span text:style-name="T66">d a docker image</text:span></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49">Angular material</text:p>
      <text:p text:style-name="P124">ng add @angular/material</text:p>
      <text:p text:style-name="P124"/>
      <text:p text:style-name="P124"/>
      <text:p text:style-name="P124"/>
      <text:p text:style-name="P6">KAFKA</text:p>
      <text:p text:style-name="P6"><text:soft-page-break/><text:span text:style-name="T79">working directory:</text:span><text:line-break/><text:span text:style-name="T51">/opt/kafka/bin</text:span></text:p>
      <text:p text:style-name="P7">VYTVORENI TOPICU</text:p>
      <text:p text:style-name="P199">./kafka-topics.sh --bootstrap-server localhost:9092 --topic myapp-topic --create --partitions 3 --replication-factor 1</text:p>
      <text:p text:style-name="P199"/>
      <text:p text:style-name="P199"/>
      <text:p text:style-name="P179">VYPSANI VSECH TOPICU</text:p>
      <text:p text:style-name="P199">/opt/kafka/bin $ ./kafka-topics.sh --bootstrap-server localhost:9092 --list</text:p>
      <text:p text:style-name="P6"/>
      <text:p text:style-name="P8">Delete topic</text:p>
      <text:p text:style-name="P87">-92 --delete --topic first_topic --bootstrap-server localhost:9092 --delete –top</text:p>
      <text:p text:style-name="P87"/>
      <text:p text:style-name="P202"><text:span text:style-name="T12">ic </text:span><text:span text:style-name="T13">f</text:span><text:span text:style-name="T14">092</text:span><text:span text:style-name="T15"> --delete --topic first_topic</text:span><text:span text:style-name="T87"># Stage 1: Build the Angular application</text:span></text:p>
      <text:p text:style-name="P203"><text:span text:style-name="T82">FROM</text:span> <text:span text:style-name="T83">node</text:span>:<text:span text:style-name="T84">20-alpine</text:span> <text:span text:style-name="T82">AS</text:span> <text:span text:style-name="T83">builder</text:span></text:p>
      <text:p text:style-name="P203"><text:span text:style-name="T82">WORKDIR</text:span> <text:span text:style-name="T84">/app</text:span></text:p>
      <text:p text:style-name="P208"/>
      <text:p text:style-name="P207"># Copy package files and install dependencies</text:p>
      <text:p text:style-name="P203"><text:span text:style-name="T82">COPY</text:span> <text:span text:style-name="T84">package*.json</text:span> <text:span text:style-name="T84">./</text:span></text:p>
      <text:p text:style-name="P203"><text:span text:style-name="T82">RUN</text:span> <text:span text:style-name="T84">npm</text:span> <text:span text:style-name="T84">install</text:span></text:p>
      <text:p text:style-name="P208"/>
      <text:p text:style-name="P207"># Copy the rest of the application source code</text:p>
      <text:p text:style-name="P203"><text:span text:style-name="T82">COPY</text:span> <text:span text:style-name="T84">.</text:span> <text:span text:style-name="T84">.</text:span></text:p>
      <text:p text:style-name="P208"/>
      <text:p text:style-name="P207"># Build the application for production</text:p>
      <text:p text:style-name="P203"><text:span text:style-name="T82">RUN</text:span> <text:span text:style-name="T84">npm</text:span> <text:span text:style-name="T84">run</text:span> <text:span text:style-name="T84">build</text:span></text:p>
      <text:p text:style-name="P208"/>
      <text:p text:style-name="P207"># Stage 2: Serve the application with a lean Nginx server</text:p>
      <text:p text:style-name="P203"><text:span text:style-name="T82">FROM</text:span> <text:span text:style-name="T83">nginx</text:span>:<text:span text:style-name="T84">alpine</text:span></text:p>
      <text:p text:style-name="P208"/>
      <text:p text:style-name="P203"><text:span text:style-name="T82">CMD</text:span> <text:span text:style-name="T84">[</text:span><text:span text:style-name="T85">"ng"</text:span><text:span text:style-name="T84">,</text:span> <text:span text:style-name="T85">"build"</text:span><text:span text:style-name="T84">]</text:span></text:p>
      <text:p text:style-name="P208"/>
      <text:p text:style-name="P207"># Copy the built application from the builder stage</text:p>
      <text:p text:style-name="P203"><text:span text:style-name="T82">COPY</text:span> <text:span text:style-name="T84">dist/myapp/browser</text:span> <text:span text:style-name="T84">/usr/share/nginx/html</text:span></text:p>
      <text:p text:style-name="P208"><text:soft-page-break/></text:p>
      <text:p text:style-name="P207"># Expose port 80</text:p>
      <text:p text:style-name="P203"><text:span text:style-name="T82">COPY</text:span> <text:span text:style-name="T84">--from</text:span>=<text:span text:style-name="T84">builder</text:span> <text:span text:style-name="T84">/app/dist/angular-19/browser</text:span> <text:span text:style-name="T84">/usr/share/nginx/html</text:span></text:p>
      <text:p text:style-name="P203"><text:span text:style-name="T82">EXPOSE</text:span> <text:span text:style-name="T84">80</text:span></text:p>
      <text:p text:style-name="P208"/>
      <text:p text:style-name="P207"># Command to start nginx</text:p>
      <text:p text:style-name="P203"><text:span text:style-name="T82">CMD</text:span> <text:span text:style-name="T84">[</text:span><text:span text:style-name="T85">"nginx"</text:span><text:span text:style-name="T84">,</text:span> <text:span text:style-name="T85">"-g"</text:span><text:span text:style-name="T84">,</text:span> <text:span text:style-name="T85">"daemon off;"</text:span><text:span text:style-name="T84">]</text:span></text:p>
      <text:p text:style-name="P203"/>
      <text:p text:style-name="P90"># Stage 1: Build the Angular application</text:p>
      <text:p text:style-name="P203"><text:span text:style-name="T82">FROM</text:span> <text:span text:style-name="T83">node</text:span>:<text:span text:style-name="T84">20-alpine</text:span> <text:span text:style-name="T82">AS</text:span> <text:span text:style-name="T83">builder</text:span></text:p>
      <text:p text:style-name="P203"><text:span text:style-name="T82">WORKDIR</text:span> <text:span text:style-name="T84">/app</text:span></text:p>
      <text:p text:style-name="P208"/>
      <text:p text:style-name="P207"># Copy package files and install dependencies</text:p>
      <text:p text:style-name="P203"><text:span text:style-name="T82">COPY</text:span> <text:span text:style-name="T84">package*.json</text:span> <text:span text:style-name="T84">./</text:span></text:p>
      <text:p text:style-name="P203"><text:span text:style-name="T82">RUN</text:span> <text:span text:style-name="T84">npm</text:span> <text:span text:style-name="T84">install</text:span></text:p>
      <text:p text:style-name="P208"/>
      <text:p text:style-name="P207"># Copy the rest of the application source code</text:p>
      <text:p text:style-name="P203"><text:span text:style-name="T82">COPY</text:span> <text:span text:style-name="T84">.</text:span> <text:span text:style-name="T84">.</text:span></text:p>
      <text:p text:style-name="P208"/>
      <text:p text:style-name="P207"># Build the application for production</text:p>
      <text:p text:style-name="P203"><text:span text:style-name="T82">RUN</text:span> <text:span text:style-name="T84">npm</text:span> <text:span text:style-name="T84">run</text:span> <text:span text:style-name="T84">build</text:span></text:p>
      <text:p text:style-name="P208"/>
      <text:p text:style-name="P207"># Stage 2: Serve the application with a lean Nginx server</text:p>
      <text:p text:style-name="P203"><text:span text:style-name="T82">FROM</text:span> <text:span text:style-name="T83">nginx</text:span>:<text:span text:style-name="T84">alpine</text:span></text:p>
      <text:p text:style-name="P208"/>
      <text:p text:style-name="P203"><text:span text:style-name="T82">CMD</text:span> <text:span text:style-name="T84">[</text:span><text:span text:style-name="T85">"ng"</text:span><text:span text:style-name="T84">,</text:span> <text:span text:style-name="T85">"build"</text:span><text:span text:style-name="T84">]</text:span></text:p>
      <text:p text:style-name="P208"/>
      <text:p text:style-name="P207"># Copy the built application from the builder stage</text:p>
      <text:p text:style-name="P203"><text:span text:style-name="T82">COPY</text:span> <text:span text:style-name="T84">dist/myapp/browser</text:span> <text:span text:style-name="T84">/usr/share/nginx/html</text:span></text:p>
      <text:p text:style-name="P208"/>
      <text:p text:style-name="P207"># Expose port 80</text:p>
      <text:p text:style-name="P203"><text:span text:style-name="T82">COPY</text:span> <text:span text:style-name="T84">--from</text:span>=<text:span text:style-name="T84">builder</text:span> <text:span text:style-name="T84">/app/dist/angular-19/browser</text:span> <text:span text:style-name="T84">/usr/share/nginx/html</text:span></text:p>
      <text:p text:style-name="P203"><text:span text:style-name="T82">EXPOSE</text:span> <text:span text:style-name="T84">80</text:span></text:p>
      <text:p text:style-name="P208"/>
      <text:p text:style-name="P207"># Command to start nginx</text:p>
      <text:p text:style-name="P203"><text:span text:style-name="T82">CMD</text:span> <text:span text:style-name="T84">[</text:span><text:span text:style-name="T85">"nginx"</text:span><text:span text:style-name="T84">,</text:span> <text:span text:style-name="T85">"-g"</text:span><text:span text:style-name="T84">,</text:span> <text:span text:style-name="T85">"daemon off;"</text:span><text:span text:style-name="T84">]</text:span></text:p>
      <text:p text:style-name="P203"/>
      <text:p text:style-name="P88"/>
      <text:p text:style-name="P88"/>
      <text:p text:style-name="P88"/>
      <text:p text:style-name="P88"/>
      <text:p text:style-name="P89"><text:span text:style-name="T89">Of course, I can help with that. The traceback you're seeing with </text:span><text:span text:style-name="Source_20_Text"><text:span text:style-name="T86">docker-compose down</text:span></text:span><text:span text:style-name="T89"> indicates that </text:span><text:span text:style-name="Source_20_Text"><text:span text:style-name="T86">docker-compose</text:span></text:span><text:span text:style-name="T89"> is unable to communicate with the Docker daemon on your machine. The </text:span><text:span text:style-name="Source_20_Text"><text:span text:style-name="T86">500 Server Error</text:span></text:span><text:span text:style-name="T89"> suggests that the Docker daemon itself is having a problem.</text:span></text:p>
      <text:p text:style-name="P95">This is a common issue, and here are the most likely causes and how to fix them, in order from most to least common:</text:p>
      <text:h text:style-name="P92" text:outline-level="3">1. The Docker Daemon Isn't Running</text:h>
      <text:p text:style-name="P95">The most frequent cause is that the Docker service isn't running. You can check its status and start it if needed.</text:p>
      <text:p text:style-name="P95">Open your terminal and run:</text:p>
      <text:p text:style-name="P93">bash</text:p>
      <text:p text:style-name="P211"><text:span text:style-name="Source_20_Text"><text:span text:style-name="T20">sudo systemctl status docker</text:span></text:span></text:p>
      <text:p text:style-name="P95">If it's not active, you can start it with:</text:p>
      <text:p text:style-name="P93">bash</text:p>
      <text:p text:style-name="P211"><text:soft-page-break/><text:span text:style-name="Source_20_Text"><text:span text:style-name="T20">sudo systemctl start docker</text:span></text:span></text:p>
      <text:p text:style-name="P209"><text:span text:style-name="T17">After starting it, try your </text:span><text:span text:style-name="Source_20_Text"><text:span text:style-name="T24">docker-compose down</text:span></text:span><text:span text:style-name="T17"> command again.</text:span></text:p>
      <text:h text:style-name="P92" text:outline-level="3">2. Permission Issues</text:h>
      <text:p text:style-name="P95">The user you're logged in as might not have the required permissions to access the Docker socket.</text:p>
      <text:list text:style-name="L8">
        <text:list-item>
          <text:p text:style-name="P305"><text:span text:style-name="Strong_20_Emphasis"><text:span text:style-name="T17">Quick Test:</text:span></text:span><text:span text:style-name="T17"> Try running the command with </text:span><text:span text:style-name="Source_20_Text"><text:span text:style-name="T24">sudo</text:span></text:span><text:span text:style-name="T17">.</text:span></text:p>
          <text:p text:style-name="P266">bash</text:p>
          <text:p text:style-name="P272"><text:span text:style-name="Source_20_Text"><text:span text:style-name="T20">sudo docker-compose down</text:span></text:span></text:p>
        </text:list-item>
        <text:list-item>
          <text:p text:style-name="P305"><text:span text:style-name="Strong_20_Emphasis"><text:span text:style-name="T17">Permanent Fix:</text:span></text:span><text:span text:style-name="T17"> To avoid using </text:span><text:span text:style-name="Source_20_Text"><text:span text:style-name="T24">sudo</text:span></text:span><text:span text:style-name="T17"> every time, you can add your user to the </text:span><text:span text:style-name="Source_20_Text"><text:span text:style-name="T24">docker</text:span></text:span><text:span text:style-name="T17"> group.</text:span></text:p>
          <text:p text:style-name="P266">bash</text:p>
          <text:p text:style-name="P272"><text:span text:style-name="Source_20_Text"><text:span text:style-name="T20">sudo usermod -aG docker </text:span></text:span><text:span text:style-name="Source_20_Text"><text:span text:style-name="T30">${USER}</text:span></text:span></text:p>
          <text:p text:style-name="P305"><text:span text:style-name="T17">You will need to </text:span><text:span text:style-name="Strong_20_Emphasis"><text:span text:style-name="T17">log out and log back in</text:span></text:span><text:span text:style-name="T17"> for this change to take effect.</text:span></text:p>
        </text:list-item>
      </text:list>
      <text:h text:style-name="P92" text:outline-level="3">3. Docker Daemon is in a Bad State</text:h>
      <text:p text:style-name="P95">Sometimes, the Docker daemon can get into an unresponsive state. A simple restart can often fix this.</text:p>
      <text:p text:style-name="P93">bash</text:p>
      <text:p text:style-name="P211"><text:span text:style-name="Source_20_Text"><text:span text:style-name="T20">sudo systemctl restart docker</text:span></text:span></text:p>
      <text:h text:style-name="P210" text:outline-level="3"><text:span text:style-name="T17">4. Outdated Docker or </text:span><text:span text:style-name="Source_20_Text"><text:span text:style-name="T24">docker-compose</text:span></text:span></text:h>
      <text:p text:style-name="P209"><text:span text:style-name="T17">You are using </text:span><text:span text:style-name="Source_20_Text"><text:span text:style-name="T24">docker-compose</text:span></text:span><text:span text:style-name="T17"> version </text:span><text:span text:style-name="Source_20_Text"><text:span text:style-name="T24">1.29.2</text:span></text:span><text:span text:style-name="T17">, which is the older V1 standalone version. The current standard is </text:span><text:span text:style-name="Source_20_Text"><text:span text:style-name="T24">docker compose</text:span></text:span><text:span text:style-name="T17"> V2, which is a plugin for the Docker CLI. While V1 should still work, issues can arise.</text:span></text:p>
      <text:p text:style-name="P95">You could try using the V2 command:</text:p>
      <text:p text:style-name="P93">bash</text:p>
      <text:p text:style-name="P211"><text:span text:style-name="Source_20_Text"><text:span text:style-name="T20">docker compose down</text:span></text:span></text:p>
      <text:p text:style-name="P95">If none of these steps work, the issue might be a more complex problem with your Docker installation itself, and you might consider reinstalling Docker.</text:p>
      <text:p text:style-name="P95">I hope this helps you get your containers down! Let me know if you have any other questions.</text:p>
      <text:p text:style-name="P218"/>
      <text:p text:style-name="P88"/>
      <text:p text:style-name="P88"/>
      <text:p text:style-name="P88"/>
      <text:p text:style-name="P88"/>
      <text:p text:style-name="P82"><text:span text:style-name="T89">Of course, I can help with that. The traceback you're seeing with </text:span><text:span text:style-name="Source_20_Text"><text:span text:style-name="T86">docker-compose down</text:span></text:span><text:span text:style-name="T89"> indicates that </text:span><text:span text:style-name="Source_20_Text"><text:span text:style-name="T86">docker-compose</text:span></text:span><text:span text:style-name="T89"> is unable to communicate with the Docker daemon on your machine. The </text:span><text:span text:style-name="Source_20_Text"><text:span text:style-name="T86">500 Server Error</text:span></text:span><text:span text:style-name="T89"> suggests that the Docker daemon itself is having a problem.</text:span></text:p>
      <text:p text:style-name="P95">This is a common issue, and here are the most likely causes and how to fix them, in order from most to least common:</text:p>
      <text:h text:style-name="P92" text:outline-level="3">1. The Docker Daemon Isn't Running</text:h>
      <text:p text:style-name="P95">The most frequent cause is that the Docker service isn't running. You can check its status and start it if needed.</text:p>
      <text:p text:style-name="P95">Open your terminal and run:</text:p>
      <text:p text:style-name="P93">bash</text:p>
      <text:p text:style-name="P211"><text:span text:style-name="Source_20_Text"><text:span text:style-name="T20">sudo systemctl status docker</text:span></text:span></text:p>
      <text:p text:style-name="P95">If it's not active, you can start it with:</text:p>
      <text:p text:style-name="P93"><text:soft-page-break/>bash</text:p>
      <text:p text:style-name="P211"><text:span text:style-name="Source_20_Text"><text:span text:style-name="T20">sudo systemctl start docker</text:span></text:span></text:p>
      <text:p text:style-name="P209"><text:span text:style-name="T17">After starting it, try your </text:span><text:span text:style-name="Source_20_Text"><text:span text:style-name="T24">docker-compose down</text:span></text:span><text:span text:style-name="T17"> command again.</text:span></text:p>
      <text:h text:style-name="P92" text:outline-level="3">2. Permission Issues</text:h>
      <text:p text:style-name="P95">The user you're logged in as might not have the required permissions to access the Docker socket.</text:p>
      <text:list text:style-name="L9">
        <text:list-item>
          <text:p text:style-name="P306"><text:span text:style-name="Strong_20_Emphasis"><text:span text:style-name="T17">Quick Test:</text:span></text:span><text:span text:style-name="T17"> Try running the command with </text:span><text:span text:style-name="Source_20_Text"><text:span text:style-name="T24">sudo</text:span></text:span><text:span text:style-name="T17">.</text:span></text:p>
          <text:p text:style-name="P267">bash</text:p>
          <text:p text:style-name="P273"><text:span text:style-name="Source_20_Text"><text:span text:style-name="T20">sudo docker-compose down</text:span></text:span></text:p>
        </text:list-item>
        <text:list-item>
          <text:p text:style-name="P306"><text:span text:style-name="Strong_20_Emphasis"><text:span text:style-name="T17">Permanent Fix:</text:span></text:span><text:span text:style-name="T17"> To avoid using </text:span><text:span text:style-name="Source_20_Text"><text:span text:style-name="T24">sudo</text:span></text:span><text:span text:style-name="T17"> every time, you can add your user to the </text:span><text:span text:style-name="Source_20_Text"><text:span text:style-name="T24">docker</text:span></text:span><text:span text:style-name="T17"> group.</text:span></text:p>
          <text:p text:style-name="P267">bash</text:p>
          <text:p text:style-name="P273"><text:span text:style-name="Source_20_Text"><text:span text:style-name="T20">sudo usermod -aG docker </text:span></text:span><text:span text:style-name="Source_20_Text"><text:span text:style-name="T30">${USER}</text:span></text:span></text:p>
          <text:p text:style-name="P306"><text:span text:style-name="T17">You will need to </text:span><text:span text:style-name="Strong_20_Emphasis"><text:span text:style-name="T17">log out and log back in</text:span></text:span><text:span text:style-name="T17"> for this change to take effect.</text:span></text:p>
        </text:list-item>
      </text:list>
      <text:h text:style-name="P92" text:outline-level="3">3. Docker Daemon is in a Bad State</text:h>
      <text:p text:style-name="P95">Sometimes, the Docker daemon can get into an unresponsive state. A simple restart can often fix this.</text:p>
      <text:p text:style-name="P93">bash</text:p>
      <text:p text:style-name="P211"><text:span text:style-name="Source_20_Text"><text:span text:style-name="T20">sudo systemctl restart docker</text:span></text:span></text:p>
      <text:h text:style-name="P210" text:outline-level="3"><text:span text:style-name="T17">4. Outdated Docker or </text:span><text:span text:style-name="Source_20_Text"><text:span text:style-name="T24">docker-compose</text:span></text:span></text:h>
      <text:p text:style-name="P209"><text:span text:style-name="T17">You are using </text:span><text:span text:style-name="Source_20_Text"><text:span text:style-name="T24">docker-compose</text:span></text:span><text:span text:style-name="T17"> version </text:span><text:span text:style-name="Source_20_Text"><text:span text:style-name="T24">1.29.2</text:span></text:span><text:span text:style-name="T17">, which is the older V1 standalone version. The current standard is </text:span><text:span text:style-name="Source_20_Text"><text:span text:style-name="T24">docker compose</text:span></text:span><text:span text:style-name="T17"> V2, which is a plugin for the Docker CLI. While V1 should still work, issues can arise.</text:span></text:p>
      <text:p text:style-name="P95">You could try using the V2 command:</text:p>
      <text:p text:style-name="P93">bash</text:p>
      <text:p text:style-name="P211"><text:span text:style-name="Source_20_Text"><text:span text:style-name="T20">docker compose down</text:span></text:span></text:p>
      <text:p text:style-name="P95">If none of these steps work, the issue might be a more complex problem with your Docker installation itself, and you might consider reinstalling Docker.</text:p>
      <text:p text:style-name="P95">I hope this helps you get your containers down! Let me know if you have any other questions.</text:p>
      <text:p text:style-name="P218"/>
      <text:p text:style-name="P82"><text:span text:style-name="T89">Of course, I can help with that. The traceback you're seeing with </text:span><text:span text:style-name="Source_20_Text"><text:span text:style-name="T86">docker-compose down</text:span></text:span><text:span text:style-name="T89"> indicates that </text:span><text:span text:style-name="Source_20_Text"><text:span text:style-name="T86">docker-compose</text:span></text:span><text:span text:style-name="T89"> is unable to communicate with the Docker daemon on your machine. The </text:span><text:span text:style-name="Source_20_Text"><text:span text:style-name="T86">500 Server Error</text:span></text:span><text:span text:style-name="T89"> suggests that the Docker daemon itself is having a problem.</text:span></text:p>
      <text:p text:style-name="P95">This is a common issue, and here are the most likely causes and how to fix them, in order from most to least common:</text:p>
      <text:h text:style-name="P92" text:outline-level="3">1. The Docker Daemon Isn't Running</text:h>
      <text:p text:style-name="P95">The most frequent cause is that the Docker service isn't running. You can check its status and start it if needed.</text:p>
      <text:p text:style-name="P95">Open your terminal and run:</text:p>
      <text:p text:style-name="P93">bash</text:p>
      <text:p text:style-name="P211"><text:span text:style-name="Source_20_Text"><text:span text:style-name="T20">sudo systemctl status docker</text:span></text:span></text:p>
      <text:p text:style-name="P95">If it's not active, you can start it with:</text:p>
      <text:p text:style-name="P93">bash</text:p>
      <text:p text:style-name="P211"><text:span text:style-name="Source_20_Text"><text:span text:style-name="T20">sudo systemctl start docker</text:span></text:span></text:p>
      <text:p text:style-name="P209"><text:span text:style-name="T17">After starting it, try your </text:span><text:span text:style-name="Source_20_Text"><text:span text:style-name="T24">docker-compose down</text:span></text:span><text:span text:style-name="T17"> command again.</text:span></text:p>
      <text:h text:style-name="P92" text:outline-level="3">2. Permission Issues</text:h>
      <text:p text:style-name="P95">The user you're logged in as might not have the required permissions to access the Docker socket.</text:p>
      <text:list text:style-name="L10">
        <text:list-item>
          <text:p text:style-name="P307"><text:span text:style-name="Strong_20_Emphasis"><text:span text:style-name="T17">Quick Test:</text:span></text:span><text:span text:style-name="T17"> Try running the command with </text:span><text:span text:style-name="Source_20_Text"><text:span text:style-name="T24">sudo</text:span></text:span><text:span text:style-name="T17">.</text:span></text:p>
          <text:p text:style-name="P268">bash</text:p>
          <text:p text:style-name="P274"><text:span text:style-name="Source_20_Text"><text:span text:style-name="T20">sudo docker-compose down</text:span></text:span></text:p>
        </text:list-item>
        <text:list-item>
          <text:p text:style-name="P307"><text:soft-page-break/><text:span text:style-name="Strong_20_Emphasis"><text:span text:style-name="T17">Permanent Fix:</text:span></text:span><text:span text:style-name="T17"> To avoid using </text:span><text:span text:style-name="Source_20_Text"><text:span text:style-name="T24">sudo</text:span></text:span><text:span text:style-name="T17"> every time, you can add your user to the </text:span><text:span text:style-name="Source_20_Text"><text:span text:style-name="T24">docker</text:span></text:span><text:span text:style-name="T17"> group.</text:span></text:p>
          <text:p text:style-name="P268">bash</text:p>
          <text:p text:style-name="P274"><text:span text:style-name="Source_20_Text"><text:span text:style-name="T20">sudo usermod -aG docker </text:span></text:span><text:span text:style-name="Source_20_Text"><text:span text:style-name="T30">${USER}</text:span></text:span></text:p>
          <text:p text:style-name="P307"><text:span text:style-name="T17">You will need to </text:span><text:span text:style-name="Strong_20_Emphasis"><text:span text:style-name="T17">log out and log back in</text:span></text:span><text:span text:style-name="T17"> for this change to take effect.</text:span></text:p>
        </text:list-item>
      </text:list>
      <text:h text:style-name="P92" text:outline-level="3">3. Docker Daemon is in a Bad State</text:h>
      <text:p text:style-name="P95">Sometimes, the Docker daemon can get into an unresponsive state. A simple restart can often fix this.</text:p>
      <text:p text:style-name="P93">bash</text:p>
      <text:p text:style-name="P211"><text:span text:style-name="Source_20_Text"><text:span text:style-name="T20">sudo systemctl restart docker</text:span></text:span></text:p>
      <text:h text:style-name="P210" text:outline-level="3"><text:span text:style-name="T17">4. Outdated Docker or </text:span><text:span text:style-name="Source_20_Text"><text:span text:style-name="T24">docker-compose</text:span></text:span></text:h>
      <text:p text:style-name="P209"><text:span text:style-name="T17">You are using </text:span><text:span text:style-name="Source_20_Text"><text:span text:style-name="T24">docker-compose</text:span></text:span><text:span text:style-name="T17"> version </text:span><text:span text:style-name="Source_20_Text"><text:span text:style-name="T24">1.29.2</text:span></text:span><text:span text:style-name="T17">, which is the older V1 standalone version. The current standard is </text:span><text:span text:style-name="Source_20_Text"><text:span text:style-name="T24">docker compose</text:span></text:span><text:span text:style-name="T17"> V2, which is a plugin for the Docker CLI. While V1 should still work, issues can arise.</text:span></text:p>
      <text:p text:style-name="P95">You could try using the V2 command:</text:p>
      <text:p text:style-name="P93">bash</text:p>
      <text:p text:style-name="P211"><text:span text:style-name="Source_20_Text"><text:span text:style-name="T20">docker compose down</text:span></text:span></text:p>
      <text:p text:style-name="P95"><draw:custom-shape text:anchor-type="paragraph" draw:z-index="3" draw:name="Shape 1" draw:style-name="gr1" draw:text-style-name="P324" svg:width="2.1713in" svg:height="1.1012in" svg:x="5.1327in" svg:y="0.1898in"><text:p text:style-name="P323">WEB BROWSER</text:p><draw:enhanced-geometry svg:viewBox="0 0 21600 21600" draw:type="rectangle" draw:enhanced-path="M 0 0 L 21600 0 21600 21600 0 21600 0 0 Z N"/></draw:custom-shape>If none of these steps work, the issue might be a more complex problem with your Docker installation itself, and you might consider reinstalling Docker.</text:p>
      <text:p text:style-name="P95">I hope this helps you get your containers down! Let me know if you have any other questions.</text:p>
      <text:p text:style-name="P218"/>
      <text:p text:style-name="P81"/>
      <text:p text:style-name="P81"/>
      <text:p text:style-name="P81"/>
      <text:p text:style-name="P81"/>
      <text:p text:style-name="P81"/>
      <text:p text:style-name="P81"/>
      <text:p text:style-name="P81"/>
      <text:p text:style-name="P81"/>
      <text:p text:style-name="P81"/>
      <text:p text:style-name="P83"/>
      <text:p text:style-name="P83"/>
      <text:p text:style-name="P83"><text:soft-page-break/></text:p>
      <text:p text:style-name="P83"/>
      <text:p text:style-name="P83"/>
      <text:p text:style-name="P83"/>
      <text:p text:style-name="P83"/>
      <text:p text:style-name="P83"/>
      <text:p text:style-name="P83"/>
      <text:p text:style-name="P83"/>
      <text:p text:style-name="P83"/>
      <text:p text:style-name="P84"><draw:frame draw:style-name="fr6" draw:name="Image2" text:anchor-type="char" svg:width="6.6929in" svg:height="4.1827in" draw:z-index="0"><draw:image xlink:href="Pictures/1000000000000780000004B0AB6A0EEF.png" xlink:type="simple" xlink:show="embed" xlink:actuate="onLoad" draw:mime-type="image/png"/></draw:frame><text:span text:style-name="T90"><text:line-break/><text:tab/><text:tab/><text:line-break/></text:span><text:soft-page-break/><text:span text:style-name="T90"><text:line-break/></text:span><text:span text:style-name="T91">SPING BOOT PERMISSIONS</text:span></text:p>
      <text:p text:style-name="P84"><text:span text:style-name="T104">CREATE FOLDER /</text:span><text:span text:style-name="T106">etc</text:span><text:span text:style-name="T105">/rabbitmq</text:span></text:p>
      <text:p text:style-name="P85">set chown docker</text:p>
      <text:p text:style-name="P85">set chgrp docker</text:p>
      <text:p text:style-name="P85">set chmod 777</text:p>
      <text:p text:style-name="P84"><text:span text:style-name="T107">chown vj rabbitmq</text:span><text:span text:style-name="T90"><text:line-break/><text:line-break/><text:line-break/><text:line-break/><text:line-break/><text:line-break/><text:line-break/><text:line-break/><text:line-break/><text:line-break/><text:line-break/></text:span><text:span text:style-name="T88">Of course! Creating an HTTP client for a project with Swagger (now known as OpenAPI) endpoints is a common task. The best and most professional approach is to auto-generate a typed client from your API's OpenAPI specification file. This saves you time, reduces bugs, and makes your client automatically update when the API changes.</text:span></text:p>
      <text:p text:style-name="P218"><text:span text:style-name="T16">Let's walk through how to do this for your </text:span><text:span text:style-name="Source_20_Text"><text:span text:style-name="T24">swagger_demo1</text:span></text:span><text:span text:style-name="T16"> project.</text:span></text:p>
      <text:h text:style-name="P108" text:outline-level="3">What You'll Need: The OpenAPI Specification</text:h>
      <text:p text:style-name="P98">First, you need the OpenAPI specification file from your project. This is a JSON or YAML file that describes all of your API's endpoints, models, and operations. Usually, a Swagger-enabled application exposes this file at a URL like:</text:p>
      <text:list text:style-name="L11">
        <text:list-item>
          <text:p text:style-name="P292"><text:span text:style-name="Source_20_Text"><text:span text:style-name="T24">/swagger/v1/swagger.json</text:span></text:span></text:p>
        </text:list-item>
        <text:list-item>
          <text:p text:style-name="P292"><text:span text:style-name="Source_20_Text"><text:span text:style-name="T24">/openapi.json</text:span></text:span></text:p>
        </text:list-item>
        <text:list-item>
          <text:p text:style-name="P293"><text:span text:style-name="Source_20_Text"><text:span text:style-name="T24">/api-docs</text:span></text:span></text:p>
        </text:list-item>
      </text:list>
      <text:p text:style-name="P218"><text:span text:style-name="T16">Find this URL in your </text:span><text:span text:style-name="Source_20_Text"><text:span text:style-name="T24">swagger_demo1</text:span></text:span><text:span text:style-name="T16"> application, and save the contents as a file named </text:span><text:span text:style-name="Source_20_Text"><text:span text:style-name="T24">openapi.json</text:span></text:span><text:span text:style-name="T16"> in your client project's root directory.</text:span></text:p>
      <text:h text:style-name="P108" text:outline-level="3"><text:soft-page-break/>Recommended Approach: Auto-Generate a Client</text:h>
      <text:p text:style-name="P218"><text:span text:style-name="T16">We will use </text:span><text:span text:style-name="Source_20_Text"><text:span text:style-name="T24">openapi-generator-cli</text:span></text:span><text:span text:style-name="T16">, a powerful tool that can generate clients (and servers) in many languages. Since your project context appears to be Node.js/TypeScript based, I'll provide an example for that environment.</text:span></text:p>
      <text:h text:style-name="P97" text:outline-level="4">Step 1: Install the Generator</text:h>
      <text:p text:style-name="P98">In your client-side project, install the generator CLI as a development dependency.</text:p>
      <text:p text:style-name="P115">bash</text:p>
      <text:p text:style-name="P223"><text:span text:style-name="Source_20_Text"><text:span text:style-name="T20">npm install @openapitools/openapi-generator-cli --save-dev</text:span></text:span></text:p>
      <text:h text:style-name="P97" text:outline-level="4">Step 2: Generate the Client Code</text:h>
      <text:p text:style-name="P218"><text:span text:style-name="T16">Now, you can run the generator. This command will read your </text:span><text:span text:style-name="Source_20_Text"><text:span text:style-name="T24">openapi.json</text:span></text:span><text:span text:style-name="T16"> file and generate a complete TypeScript client using </text:span><text:span text:style-name="Source_20_Text"><text:span text:style-name="T24">axios</text:span></text:span><text:span text:style-name="T16"> for HTTP requests.</text:span></text:p>
      <text:p text:style-name="P218"><text:span text:style-name="T16">Add a script to your </text:span><text:a xlink:type="simple" xlink:href="code-assist-path:/home/vj/Desktop/A/backu20/datatables/myapp-client/package.json" text:style-name="Internet_20_link" text:visited-style-name="Visited_20_Internet_20_Link"><text:span text:style-name="Source_20_Text"><text:span text:style-name="T28">package.json</text:span></text:span></text:a><text:span text:style-name="T16"> for convenience:</text:span></text:p>
      <text:p text:style-name="P115">json</text:p>
      <text:p text:style-name="P224"><text:span text:style-name="Source_20_Text"><text:span text:style-name="T20">{</text:span></text:span></text:p>
      <text:p text:style-name="P224"><text:span text:style-name="Source_20_Text"><text:span text:style-name="T22"><text:s text:c="2"/></text:span></text:span><text:span text:style-name="Source_20_Text"><text:span text:style-name="T7">"scripts"</text:span></text:span><text:span text:style-name="Source_20_Text"><text:span text:style-name="T20">: {</text:span></text:span></text:p>
      <text:p text:style-name="P224"><text:span text:style-name="Source_20_Text"><text:span text:style-name="T22"><text:s text:c="4"/></text:span></text:span><text:span text:style-name="Source_20_Text"><text:span text:style-name="T7">"generate-api-client"</text:span></text:span><text:span text:style-name="Source_20_Text"><text:span text:style-name="T20">: </text:span></text:span><text:span text:style-name="Source_20_Text"><text:span text:style-name="T26">"openapi-generator-cli generate -i openapi.json -g typescript-axios -o ./src/api-client --additional-properties=usePromises=true"</text:span></text:span></text:p>
      <text:p text:style-name="P224"><text:span text:style-name="Source_20_Text"><text:span text:style-name="T22"><text:s text:c="2"/></text:span></text:span><text:span text:style-name="Source_20_Text"><text:span text:style-name="T20">}</text:span></text:span></text:p>
      <text:p text:style-name="P223"><text:span text:style-name="Source_20_Text"><text:span text:style-name="T20">}</text:span></text:span></text:p>
      <text:p text:style-name="P98">Now, run the script:</text:p>
      <text:p text:style-name="P115">bash</text:p>
      <text:p text:style-name="P223"><text:span text:style-name="Source_20_Text"><text:span text:style-name="T20">npm run generate-api-client</text:span></text:span></text:p>
      <text:p text:style-name="P98">Let's break down that command:</text:p>
      <text:list text:style-name="L12">
        <text:list-item>
          <text:p text:style-name="P294"><text:span text:style-name="Source_20_Text"><text:span text:style-name="T24">-i openapi.json</text:span></text:span><text:span text:style-name="T16">: Specifies the </text:span><text:span text:style-name="Strong_20_Emphasis"><text:span text:style-name="T16">i</text:span></text:span><text:span text:style-name="T16">nput OpenAPI specification file.</text:span></text:p>
        </text:list-item>
        <text:list-item>
          <text:p text:style-name="P294"><text:span text:style-name="Source_20_Text"><text:span text:style-name="T24">-g typescript-axios</text:span></text:span><text:span text:style-name="T16">: Specifies the </text:span><text:span text:style-name="Strong_20_Emphasis"><text:span text:style-name="T16">g</text:span></text:span><text:span text:style-name="T16">enerator to use. There are many others for different languages and libraries (e.g., </text:span><text:span text:style-name="Source_20_Text"><text:span text:style-name="T24">typescript-fetch</text:span></text:span><text:span text:style-name="T16">, </text:span><text:span text:style-name="Source_20_Text"><text:span text:style-name="T24">java</text:span></text:span><text:span text:style-name="T16">, </text:span><text:span text:style-name="Source_20_Text"><text:span text:style-name="T24">python</text:span></text:span><text:span text:style-name="T16">, </text:span><text:span text:style-name="Source_20_Text"><text:span text:style-name="T24">go</text:span></text:span><text:span text:style-name="T16">).</text:span></text:p>
        </text:list-item>
        <text:list-item>
          <text:p text:style-name="P294"><text:span text:style-name="Source_20_Text"><text:span text:style-name="T24">-o ./src/api-client</text:span></text:span><text:span text:style-name="T16">: Specifies the </text:span><text:span text:style-name="Strong_20_Emphasis"><text:span text:style-name="T16">o</text:span></text:span><text:span text:style-name="T16">utput directory for the generated code.</text:span></text:p>
        </text:list-item>
        <text:list-item>
          <text:p text:style-name="P295"><text:span text:style-name="Source_20_Text"><text:span text:style-name="T24">--additional-properties=usePromises=true</text:span></text:span><text:span text:style-name="T16">: A generator-specific option to ensure the client returns modern Promises.</text:span></text:p>
        </text:list-item>
      </text:list>
      <text:p text:style-name="P218"><text:span text:style-name="T16">This will create a new directory, </text:span><text:span text:style-name="Source_20_Text"><text:span text:style-name="T24">./src/api-client</text:span></text:span><text:span text:style-name="T16">, containing a fully-typed client for your API.</text:span></text:p>
      <text:h text:style-name="P97" text:outline-level="4">Step 3: Use the Generated Client</text:h>
      <text:p text:style-name="P98">Now you can import and use your new client. The generated code is easy to work with and provides full type safety and autocompletion for your API's endpoints and models.</text:p>
      <text:p text:style-name="P98">Here is an example of how you might use it:</text:p>
      <text:p text:style-name="P115">typescript</text:p>
      <text:p text:style-name="P224"><text:span text:style-name="Source_20_Text"><text:span text:style-name="T30">// src/services/my-api-service.ts</text:span></text:span></text:p>
      <text:p text:style-name="P224"/>
      <text:p text:style-name="P224"><text:span text:style-name="Source_20_Text"><text:span text:style-name="T33">import</text:span></text:span><text:span text:style-name="Source_20_Text"><text:span text:style-name="T20"> { Configuration, DefaultApi } </text:span></text:span><text:span text:style-name="Source_20_Text"><text:span text:style-name="T33">from</text:span></text:span><text:span text:style-name="Source_20_Text"><text:span text:style-name="T20"> </text:span></text:span><text:span text:style-name="Source_20_Text"><text:span text:style-name="T26">'../api-client'</text:span></text:span><text:span text:style-name="Source_20_Text"><text:span text:style-name="T20">;</text:span></text:span></text:p>
      <text:p text:style-name="P224"/>
      <text:p text:style-name="P224"><text:span text:style-name="Source_20_Text"><text:span text:style-name="T30">// You can configure the base path and other options</text:span></text:span></text:p>
      <text:p text:style-name="P224"><text:span text:style-name="Source_20_Text"><text:span text:style-name="T33">const</text:span></text:span><text:span text:style-name="Source_20_Text"><text:span text:style-name="T20"> config = </text:span></text:span><text:span text:style-name="Source_20_Text"><text:span text:style-name="T33">new</text:span></text:span><text:span text:style-name="Source_20_Text"><text:span text:style-name="T20"> Configuration({</text:span></text:span></text:p>
      <text:p text:style-name="P224"><text:span text:style-name="Source_20_Text"><text:span text:style-name="T22"><text:s text:c="4"/></text:span></text:span><text:span text:style-name="Source_20_Text"><text:span text:style-name="T7">basePath</text:span></text:span><text:span text:style-name="Source_20_Text"><text:span text:style-name="T20">: </text:span></text:span><text:span text:style-name="Source_20_Text"><text:span text:style-name="T26">'http://localhost:8080'</text:span></text:span><text:span text:style-name="Source_20_Text"><text:span text:style-name="T20">, </text:span></text:span><text:span text:style-name="Source_20_Text"><text:span text:style-name="T30">// Your swagger_demo1 API base URL</text:span></text:span></text:p>
      <text:p text:style-name="P224"><text:span text:style-name="Source_20_Text"><text:span text:style-name="T20">});</text:span></text:span></text:p>
      <text:p text:style-name="P224"/>
      <text:p text:style-name="P224"><text:span text:style-name="Source_20_Text"><text:span text:style-name="T30">// Instantiate the API client</text:span></text:span></text:p>
      <text:p text:style-name="P224"><text:span text:style-name="Source_20_Text"><text:span text:style-name="T33">const</text:span></text:span><text:span text:style-name="Source_20_Text"><text:span text:style-name="T20"> apiClient = </text:span></text:span><text:span text:style-name="Source_20_Text"><text:span text:style-name="T33">new</text:span></text:span><text:span text:style-name="Source_20_Text"><text:span text:style-name="T20"> DefaultApi(config);</text:span></text:span></text:p>
      <text:p text:style-name="P224"/>
      <text:p text:style-name="P224"><text:span text:style-name="Source_20_Text"><text:span text:style-name="T30">// Now you can call your API endpoints as methods</text:span></text:span></text:p>
      <text:p text:style-name="P224"><text:span text:style-name="Source_20_Text"><text:span text:style-name="T33">export</text:span></text:span><text:span text:style-name="Source_20_Text"><text:span text:style-name="T20"> </text:span></text:span><text:span text:style-name="Source_20_Text"><text:span text:style-name="T33">const</text:span></text:span><text:span text:style-name="Source_20_Text"><text:span text:style-name="T20"> fetchUsers = </text:span></text:span><text:span text:style-name="Source_20_Text"><text:span text:style-name="T33">async</text:span></text:span><text:span text:style-name="Source_20_Text"><text:span text:style-name="T20"> () =&gt; {</text:span></text:span></text:p>
      <text:p text:style-name="P224"><text:span text:style-name="Source_20_Text"><text:span text:style-name="T22"><text:s text:c="4"/></text:span></text:span><text:span text:style-name="Source_20_Text"><text:span text:style-name="T33">try</text:span></text:span><text:span text:style-name="Source_20_Text"><text:span text:style-name="T20"> {</text:span></text:span></text:p>
      <text:p text:style-name="P224"><text:span text:style-name="Source_20_Text"><text:span text:style-name="T22"><text:s text:c="8"/></text:span></text:span><text:span text:style-name="Source_20_Text"><text:span text:style-name="T30">// The method name (e.g., usersGet) is generated from your OpenAPI spec.</text:span></text:span></text:p>
      <text:p text:style-name="P224"><text:span text:style-name="Source_20_Text"><text:span text:style-name="T22"><text:s text:c="8"/></text:span></text:span><text:span text:style-name="Source_20_Text"><text:span text:style-name="T30">// You get full type safety on parameters and return types!</text:span></text:span></text:p>
      <text:p text:style-name="P224"><text:span text:style-name="Source_20_Text"><text:span text:style-name="T22"><text:s text:c="8"/></text:span></text:span><text:span text:style-name="Source_20_Text"><text:span text:style-name="T33">const</text:span></text:span><text:span text:style-name="Source_20_Text"><text:span text:style-name="T20"> response = </text:span></text:span><text:span text:style-name="Source_20_Text"><text:span text:style-name="T33">await</text:span></text:span><text:span text:style-name="Source_20_Text"><text:span text:style-name="T20"> apiClient.usersGet(); </text:span></text:span></text:p>
      <text:p text:style-name="P224"><text:span text:style-name="Source_20_Text"><text:span text:style-name="T22"><text:s text:c="8"/></text:span></text:span></text:p>
      <text:p text:style-name="P224"><text:span text:style-name="Source_20_Text"><text:span text:style-name="T22"><text:s text:c="8"/></text:span></text:span><text:span text:style-name="Source_20_Text"><text:span text:style-name="T33">console</text:span></text:span><text:span text:style-name="Source_20_Text"><text:span text:style-name="T20">.log(</text:span></text:span><text:span text:style-name="Source_20_Text"><text:span text:style-name="T26">'API Response:'</text:span></text:span><text:span text:style-name="Source_20_Text"><text:span text:style-name="T20">, response.data);</text:span></text:span></text:p>
      <text:p text:style-name="P224"><text:span text:style-name="Source_20_Text"><text:span text:style-name="T22"><text:s text:c="8"/></text:span></text:span><text:span text:style-name="Source_20_Text"><text:span text:style-name="T33">return</text:span></text:span><text:span text:style-name="Source_20_Text"><text:span text:style-name="T20"> response.data; </text:span></text:span><text:span text:style-name="Source_20_Text"><text:span text:style-name="T30">// This will be a typed array, e.g., User[]</text:span></text:span></text:p>
      <text:p text:style-name="P224"><text:span text:style-name="Source_20_Text"><text:span text:style-name="T22"><text:s text:c="4"/></text:span></text:span><text:span text:style-name="Source_20_Text"><text:span text:style-name="T20">} </text:span></text:span><text:span text:style-name="Source_20_Text"><text:span text:style-name="T33">catch</text:span></text:span><text:span text:style-name="Source_20_Text"><text:span text:style-name="T20"> (error) {</text:span></text:span></text:p>
      <text:p text:style-name="P224"><text:span text:style-name="Source_20_Text"><text:span text:style-name="T22"><text:s text:c="8"/></text:span></text:span><text:span text:style-name="Source_20_Text"><text:span text:style-name="T33">console</text:span></text:span><text:span text:style-name="Source_20_Text"><text:span text:style-name="T20">.error(</text:span></text:span><text:span text:style-name="Source_20_Text"><text:span text:style-name="T26">'Failed to fetch users:'</text:span></text:span><text:span text:style-name="Source_20_Text"><text:span text:style-name="T20">, error);</text:span></text:span></text:p>
      <text:p text:style-name="P224"><text:span text:style-name="Source_20_Text"><text:span text:style-name="T22"><text:s text:c="8"/></text:span></text:span><text:span text:style-name="Source_20_Text"><text:span text:style-name="T33">throw</text:span></text:span><text:span text:style-name="Source_20_Text"><text:span text:style-name="T20"> error;</text:span></text:span></text:p>
      <text:p text:style-name="P224"><text:span text:style-name="Source_20_Text"><text:span text:style-name="T22"><text:s text:c="4"/></text:span></text:span><text:span text:style-name="Source_20_Text"><text:span text:style-name="T20">}</text:span></text:span></text:p>
      <text:p text:style-name="P224"><text:soft-page-break/><text:span text:style-name="Source_20_Text"><text:span text:style-name="T20">};</text:span></text:span></text:p>
      <text:p text:style-name="P224"/>
      <text:p text:style-name="P224"><text:span text:style-name="Source_20_Text"><text:span text:style-name="T33">export</text:span></text:span><text:span text:style-name="Source_20_Text"><text:span text:style-name="T20"> </text:span></text:span><text:span text:style-name="Source_20_Text"><text:span text:style-name="T33">const</text:span></text:span><text:span text:style-name="Source_20_Text"><text:span text:style-name="T20"> createUser = </text:span></text:span><text:span text:style-name="Source_20_Text"><text:span text:style-name="T33">async</text:span></text:span><text:span text:style-name="Source_20_Text"><text:span text:style-name="T20"> (newUser: </text:span></text:span><text:span text:style-name="Source_20_Text"><text:span text:style-name="T33">any</text:span></text:span><text:span text:style-name="Source_20_Text"><text:span text:style-name="T20">) =&gt; { </text:span></text:span><text:span text:style-name="Source_20_Text"><text:span text:style-name="T30">// Replace 'any' with the generated User model</text:span></text:span></text:p>
      <text:p text:style-name="P224"><text:span text:style-name="Source_20_Text"><text:span text:style-name="T22"><text:s text:c="4"/></text:span></text:span><text:span text:style-name="Source_20_Text"><text:span text:style-name="T33">try</text:span></text:span><text:span text:style-name="Source_20_Text"><text:span text:style-name="T20"> {</text:span></text:span></text:p>
      <text:p text:style-name="P224"><text:span text:style-name="Source_20_Text"><text:span text:style-name="T22"><text:s text:c="8"/></text:span></text:span><text:span text:style-name="Source_20_Text"><text:span text:style-name="T30">// Example for a POST request</text:span></text:span></text:p>
      <text:p text:style-name="P224"><text:span text:style-name="Source_20_Text"><text:span text:style-name="T22"><text:s text:c="8"/></text:span></text:span><text:span text:style-name="Source_20_Text"><text:span text:style-name="T33">const</text:span></text:span><text:span text:style-name="Source_20_Text"><text:span text:style-name="T20"> response = </text:span></text:span><text:span text:style-name="Source_20_Text"><text:span text:style-name="T33">await</text:span></text:span><text:span text:style-name="Source_20_Text"><text:span text:style-name="T20"> apiClient.usersPost(newUser);</text:span></text:span></text:p>
      <text:p text:style-name="P224"><text:span text:style-name="Source_20_Text"><text:span text:style-name="T22"><text:s text:c="8"/></text:span></text:span><text:span text:style-name="Source_20_Text"><text:span text:style-name="T33">console</text:span></text:span><text:span text:style-name="Source_20_Text"><text:span text:style-name="T20">.log(</text:span></text:span><text:span text:style-name="Source_20_Text"><text:span text:style-name="T26">'User created:'</text:span></text:span><text:span text:style-name="Source_20_Text"><text:span text:style-name="T20">, response.data);</text:span></text:span></text:p>
      <text:p text:style-name="P224"><text:span text:style-name="Source_20_Text"><text:span text:style-name="T22"><text:s text:c="8"/></text:span></text:span><text:span text:style-name="Source_20_Text"><text:span text:style-name="T33">return</text:span></text:span><text:span text:style-name="Source_20_Text"><text:span text:style-name="T20"> response.data;</text:span></text:span></text:p>
      <text:p text:style-name="P224"><text:span text:style-name="Source_20_Text"><text:span text:style-name="T22"><text:s text:c="4"/></text:span></text:span><text:span text:style-name="Source_20_Text"><text:span text:style-name="T20">} </text:span></text:span><text:span text:style-name="Source_20_Text"><text:span text:style-name="T33">catch</text:span></text:span><text:span text:style-name="Source_20_Text"><text:span text:style-name="T20"> (error) {</text:span></text:span></text:p>
      <text:p text:style-name="P224"><text:span text:style-name="Source_20_Text"><text:span text:style-name="T22"><text:s text:c="8"/></text:span></text:span><text:span text:style-name="Source_20_Text"><text:span text:style-name="T33">console</text:span></text:span><text:span text:style-name="Source_20_Text"><text:span text:style-name="T20">.error(</text:span></text:span><text:span text:style-name="Source_20_Text"><text:span text:style-name="T26">'Failed to create user:'</text:span></text:span><text:span text:style-name="Source_20_Text"><text:span text:style-name="T20">, error);</text:span></text:span></text:p>
      <text:p text:style-name="P224"><text:span text:style-name="Source_20_Text"><text:span text:style-name="T22"><text:s text:c="8"/></text:span></text:span><text:span text:style-name="Source_20_Text"><text:span text:style-name="T33">throw</text:span></text:span><text:span text:style-name="Source_20_Text"><text:span text:style-name="T20"> error;</text:span></text:span></text:p>
      <text:p text:style-name="P224"><text:span text:style-name="Source_20_Text"><text:span text:style-name="T22"><text:s text:c="4"/></text:span></text:span><text:span text:style-name="Source_20_Text"><text:span text:style-name="T20">}</text:span></text:span></text:p>
      <text:p text:style-name="P223"><text:span text:style-name="Source_20_Text"><text:span text:style-name="T20">}</text:span></text:span></text:p>
      <text:h text:style-name="P219" text:outline-level="3"><text:span text:style-name="T19">Alternative: Manual Client with </text:span><text:span text:style-name="Source_20_Text"><text:span text:style-name="T24">axios</text:span></text:span></text:h>
      <text:p text:style-name="P98">You could write the client manually, but I strongly advise against it for any non-trivial API. It's brittle and requires a lot of boilerplate.</text:p>
      <text:p text:style-name="P98">Here's how you might make a single call manually for comparison:</text:p>
      <text:p text:style-name="P115">typescript</text:p>
      <text:p text:style-name="P224"><text:span text:style-name="Source_20_Text"><text:span text:style-name="T33">import</text:span></text:span><text:span text:style-name="Source_20_Text"><text:span text:style-name="T20"> axios </text:span></text:span><text:span text:style-name="Source_20_Text"><text:span text:style-name="T33">from</text:span></text:span><text:span text:style-name="Source_20_Text"><text:span text:style-name="T20"> </text:span></text:span><text:span text:style-name="Source_20_Text"><text:span text:style-name="T26">'axios'</text:span></text:span><text:span text:style-name="Source_20_Text"><text:span text:style-name="T20">;</text:span></text:span></text:p>
      <text:p text:style-name="P224"/>
      <text:p text:style-name="P224"><text:span text:style-name="Source_20_Text"><text:span text:style-name="T33">const</text:span></text:span><text:span text:style-name="Source_20_Text"><text:span text:style-name="T20"> apiClient = axios.create({</text:span></text:span></text:p>
      <text:p text:style-name="P224"><text:span text:style-name="Source_20_Text"><text:span text:style-name="T22"><text:s text:c="4"/></text:span></text:span><text:span text:style-name="Source_20_Text"><text:span text:style-name="T7">baseURL</text:span></text:span><text:span text:style-name="Source_20_Text"><text:span text:style-name="T20">: </text:span></text:span><text:span text:style-name="Source_20_Text"><text:span text:style-name="T26">'http://localhost:8080'</text:span></text:span><text:span text:style-name="Source_20_Text"><text:span text:style-name="T20">, </text:span></text:span><text:span text:style-name="Source_20_Text"><text:span text:style-name="T30">// Your swagger_demo1 API base URL</text:span></text:span></text:p>
      <text:p text:style-name="P224"><text:span text:style-name="Source_20_Text"><text:span text:style-name="T20">});</text:span></text:span></text:p>
      <text:p text:style-name="P224"/>
      <text:p text:style-name="P224"><text:span text:style-name="Source_20_Text"><text:span text:style-name="T33">export</text:span></text:span><text:span text:style-name="Source_20_Text"><text:span text:style-name="T20"> </text:span></text:span><text:span text:style-name="Source_20_Text"><text:span text:style-name="T33">const</text:span></text:span><text:span text:style-name="Source_20_Text"><text:span text:style-name="T20"> fetchUsersManually = </text:span></text:span><text:span text:style-name="Source_20_Text"><text:span text:style-name="T33">async</text:span></text:span><text:span text:style-name="Source_20_Text"><text:span text:style-name="T20"> () =&gt; {</text:span></text:span></text:p>
      <text:p text:style-name="P224"><text:span text:style-name="Source_20_Text"><text:span text:style-name="T22"><text:s text:c="4"/></text:span></text:span><text:span text:style-name="Source_20_Text"><text:span text:style-name="T33">try</text:span></text:span><text:span text:style-name="Source_20_Text"><text:span text:style-name="T20"> {</text:span></text:span></text:p>
      <text:p text:style-name="P224"><text:span text:style-name="Source_20_Text"><text:span text:style-name="T22"><text:s text:c="8"/></text:span></text:span><text:span text:style-name="Source_20_Text"><text:span text:style-name="T30">// No type safety for the URL, parameters, or response</text:span></text:span></text:p>
      <text:p text:style-name="P224"><text:span text:style-name="Source_20_Text"><text:span text:style-name="T22"><text:s text:c="8"/></text:span></text:span><text:span text:style-name="Source_20_Text"><text:span text:style-name="T33">const</text:span></text:span><text:span text:style-name="Source_20_Text"><text:span text:style-name="T20"> response = </text:span></text:span><text:span text:style-name="Source_20_Text"><text:span text:style-name="T33">await</text:span></text:span><text:span text:style-name="Source_20_Text"><text:span text:style-name="T20"> apiClient.get(</text:span></text:span><text:span text:style-name="Source_20_Text"><text:span text:style-name="T26">'/users'</text:span></text:span><text:span text:style-name="Source_20_Text"><text:span text:style-name="T20">);</text:span></text:span></text:p>
      <text:p text:style-name="P224"><text:span text:style-name="Source_20_Text"><text:span text:style-name="T22"><text:s text:c="8"/></text:span></text:span><text:span text:style-name="Source_20_Text"><text:span text:style-name="T33">return</text:span></text:span><text:span text:style-name="Source_20_Text"><text:span text:style-name="T20"> response.data;</text:span></text:span></text:p>
      <text:p text:style-name="P224"><text:span text:style-name="Source_20_Text"><text:span text:style-name="T22"><text:s text:c="4"/></text:span></text:span><text:span text:style-name="Source_20_Text"><text:span text:style-name="T20">} </text:span></text:span><text:span text:style-name="Source_20_Text"><text:span text:style-name="T33">catch</text:span></text:span><text:span text:style-name="Source_20_Text"><text:span text:style-name="T20"> (error) {</text:span></text:span></text:p>
      <text:p text:style-name="P224"><text:span text:style-name="Source_20_Text"><text:span text:style-name="T22"><text:s text:c="8"/></text:span></text:span><text:span text:style-name="Source_20_Text"><text:span text:style-name="T33">console</text:span></text:span><text:span text:style-name="Source_20_Text"><text:span text:style-name="T20">.error(</text:span></text:span><text:span text:style-name="Source_20_Text"><text:span text:style-name="T26">'Failed to fetch users:'</text:span></text:span><text:span text:style-name="Source_20_Text"><text:span text:style-name="T20">, error);</text:span></text:span></text:p>
      <text:p text:style-name="P224"><text:span text:style-name="Source_20_Text"><text:span text:style-name="T22"><text:s text:c="8"/></text:span></text:span><text:span text:style-name="Source_20_Text"><text:span text:style-name="T33">throw</text:span></text:span><text:span text:style-name="Source_20_Text"><text:span text:style-name="T20"> error;</text:span></text:span></text:p>
      <text:p text:style-name="P224"><text:span text:style-name="Source_20_Text"><text:span text:style-name="T22"><text:s text:c="4"/></text:span></text:span><text:span text:style-name="Source_20_Text"><text:span text:style-name="T20">}</text:span></text:span></text:p>
      <text:p text:style-name="P223"><text:span text:style-name="Source_20_Text"><text:span text:style-name="T20">};</text:span></text:span></text:p>
      <text:p text:style-name="P218"><text:span text:style-name="Strong_20_Emphasis"><text:span text:style-name="T16">Drawbacks of the manual approach:</text:span></text:span></text:p>
      <text:list text:style-name="L13">
        <text:list-item>
          <text:p text:style-name="P296"><text:span text:style-name="Strong_20_Emphasis"><text:span text:style-name="T16">No Type Safety:</text:span></text:span><text:span text:style-name="T16"> You lose all benefits of TypeScript for your API contract.</text:span></text:p>
        </text:list-item>
        <text:list-item>
          <text:p text:style-name="P296"><text:span text:style-name="Strong_20_Emphasis"><text:span text:style-name="T16">Error-Prone:</text:span></text:span><text:span text:style-name="T16"> It's easy to make typos in URLs or mismatches in request/response shapes.</text:span></text:p>
        </text:list-item>
        <text:list-item>
          <text:p text:style-name="P297"><text:span text:style-name="Strong_20_Emphasis"><text:span text:style-name="T16">High Maintenance:</text:span></text:span><text:span text:style-name="T16"> If an endpoint changes in </text:span><text:span text:style-name="Source_20_Text"><text:span text:style-name="T24">swagger_demo1</text:span></text:span><text:span text:style-name="T16">, you have to manually find and update it in your client code. With a generated client, you just re-run the generator script.</text:span></text:p>
        </text:list-item>
      </text:list>
      <text:p text:style-name="P98">Using a code generator is the standard in modern development for consuming OpenAPI-documented services. It establishes a reliable, type-safe contract between your frontend and backend.</text:p>
      <text:p text:style-name="P83"/>
      <text:p text:style-name="P83"/>
      <text:p text:style-name="P83"/>
      <text:p text:style-name="P83"/>
      <text:p text:style-name="P83"/>
      <text:p text:style-name="P99">how to access HTTP endpoint which is login page protected? Which tool to use for it?</text:p>
      <text:h text:style-name="P109" text:outline-level="1"><text:soft-page-break/>Gemini</text:h>
      <text:p text:style-name="P117">Thinking</text:p>
      <text:p text:style-name="P106">Of course! I can certainly explain how to access endpoints protected by a login page and the tools you can use.</text:p>
      <text:p text:style-name="P217"><text:span text:style-name="T18">Based on your project's </text:span><text:a xlink:type="simple" xlink:href="code-assist-path:/home/vj/Desktop/A/backu20/swagger_demo1/src/main/java/com/swagger/demo/security/SecurityConfig.java" text:style-name="Internet_20_link" text:visited-style-name="Visited_20_Internet_20_Link"><text:span text:style-name="Source_20_Text"><text:span text:style-name="T29">SecurityConfig.java</text:span></text:span></text:a><text:span text:style-name="T18"> file, your application is configured to use Spring Security's form-based login.</text:span></text:p>
      <text:p text:style-name="P104">java</text:p>
      <text:p text:style-name="P216"><text:span text:style-name="Source_20_Text"><text:span text:style-name="T31">// /home/vj/Desktop/A/backu20/swagger_demo1/src/main/java/com/swagger/demo/security/SecurityConfig.java</text:span></text:span></text:p>
      <text:p text:style-name="P216"><text:span text:style-name="Source_20_Text"><text:span text:style-name="T21">...</text:span></text:span></text:p>
      <text:p text:style-name="P216"><text:span text:style-name="Source_20_Text"><text:span text:style-name="T23"><text:s text:c="16"/></text:span></text:span><text:span text:style-name="Source_20_Text"><text:span text:style-name="T31">// Enable form-based login with default configuration</text:span></text:span></text:p>
      <text:p text:style-name="P216"><text:span text:style-name="Source_20_Text"><text:span text:style-name="T23"><text:s text:c="16"/></text:span></text:span><text:span text:style-name="Source_20_Text"><text:span text:style-name="T21">.formLogin(Customizer.withDefaults());</text:span></text:span></text:p>
      <text:p text:style-name="P216"><text:span text:style-name="Source_20_Text"><text:span text:style-name="T21">...</text:span></text:span></text:p>
      <text:p text:style-name="P216"><text:span text:style-name="Source_20_Text"><text:span text:style-name="T23"><text:s text:c="4"/></text:span></text:span><text:span text:style-name="Source_20_Text"><text:span text:style-name="T34">public</text:span></text:span><text:span text:style-name="Source_20_Text"><text:span text:style-name="T21"> UserDetailsService </text:span></text:span><text:span text:style-name="Source_20_Text"><text:span text:style-name="T27">userDetailsService</text:span></text:span><text:span text:style-name="Source_20_Text"><text:span text:style-name="T21">() {</text:span></text:span></text:p>
      <text:p text:style-name="P216"><text:span text:style-name="Source_20_Text"><text:span text:style-name="T23"><text:s text:c="8"/></text:span></text:span><text:span text:style-name="Source_20_Text"><text:span text:style-name="T21">UserDetails user = User.builder()</text:span></text:span></text:p>
      <text:p text:style-name="P216"><text:span text:style-name="Source_20_Text"><text:span text:style-name="T23"><text:s text:c="16"/></text:span></text:span><text:span text:style-name="Source_20_Text"><text:span text:style-name="T21">.username(</text:span></text:span><text:span text:style-name="Source_20_Text"><text:span text:style-name="T27">"user"</text:span></text:span><text:span text:style-name="Source_20_Text"><text:span text:style-name="T21">)</text:span></text:span></text:p>
      <text:p text:style-name="P216"><text:span text:style-name="Source_20_Text"><text:span text:style-name="T23"><text:s text:c="16"/></text:span></text:span><text:span text:style-name="Source_20_Text"><text:span text:style-name="T21">.password(passwordEncoder().encode(</text:span></text:span><text:span text:style-name="Source_20_Text"><text:span text:style-name="T27">"password"</text:span></text:span><text:span text:style-name="Source_20_Text"><text:span text:style-name="T21">))</text:span></text:span></text:p>
      <text:p text:style-name="P216"><text:span text:style-name="Source_20_Text"><text:span text:style-name="T21">...</text:span></text:span></text:p>
      <text:p text:style-name="P217"><text:span text:style-name="T18">This means that to access any protected endpoint (like </text:span><text:span text:style-name="Source_20_Text"><text:span text:style-name="T25">/api/items</text:span></text:span><text:span text:style-name="T18">), you first need to authenticate by submitting a username and password to the </text:span><text:span text:style-name="Source_20_Text"><text:span text:style-name="T25">/login</text:span></text:span><text:span text:style-name="T18"> endpoint. This process establishes a session, and a session cookie (typically </text:span><text:span text:style-name="Source_20_Text"><text:span text:style-name="T25">JSESSIONID</text:span></text:span><text:span text:style-name="T18">) is returned. You must then include this cookie in all subsequent requests to prove you are authenticated.</text:span></text:p>
      <text:p text:style-name="P106">Here are several common tools and methods to do this:</text:p>
      <text:h text:style-name="P103" text:outline-level="3">1. API Clients (like Postman or Insomnia)</text:h>
      <text:p text:style-name="P106">These graphical tools are excellent for manual testing and exploration. They automatically manage cookies for you, making the process straightforward.</text:p>
      <text:p text:style-name="P217"><text:span text:style-name="Strong_20_Emphasis"><text:span text:style-name="T18">Steps for Postman:</text:span></text:span></text:p>
      <text:list text:style-name="L14">
        <text:list-item>
          <text:p text:style-name="P314"><text:span text:style-name="Strong_20_Emphasis"><text:span text:style-name="T18">Authenticate:</text:span></text:span></text:p>
          <text:list>
            <text:list-item>
              <text:p text:style-name="P315"><text:span text:style-name="T18">Create a </text:span><text:span text:style-name="Source_20_Text"><text:span text:style-name="T25">POST</text:span></text:span><text:span text:style-name="T18"> request to </text:span><text:span text:style-name="Source_20_Text"><text:span text:style-name="T25">http://localhost:9090/login</text:span></text:span><text:span text:style-name="T18">.</text:span></text:p>
            </text:list-item>
            <text:list-item>
              <text:p text:style-name="P315"><text:span text:style-name="T18">In the </text:span><text:span text:style-name="Strong_20_Emphasis"><text:span text:style-name="T18">Body</text:span></text:span><text:span text:style-name="T18"> tab, select </text:span><text:span text:style-name="Strong_20_Emphasis"><text:span text:style-name="T18">x-www-form-urlencoded</text:span></text:span><text:span text:style-name="T18">.</text:span></text:p>
            </text:list-item>
            <text:list-item>
              <text:p text:style-name="P320">Add two key-value pairs:</text:p>
              <text:list>
                <text:list-item>
                  <text:p text:style-name="P315"><text:span text:style-name="Source_20_Text"><text:span text:style-name="T25">username</text:span></text:span><text:span text:style-name="T18">: </text:span><text:span text:style-name="Source_20_Text"><text:span text:style-name="T25">user</text:span></text:span></text:p>
                </text:list-item>
                <text:list-item>
                  <text:p text:style-name="P315"><text:span text:style-name="Source_20_Text"><text:span text:style-name="T25">password</text:span></text:span><text:span text:style-name="T18">: </text:span><text:span text:style-name="Source_20_Text"><text:span text:style-name="T25">password</text:span></text:span></text:p>
                </text:list-item>
              </text:list>
            </text:list-item>
            <text:list-item>
              <text:p text:style-name="P315"><text:span text:style-name="T18">Click </text:span><text:span text:style-name="Strong_20_Emphasis"><text:span text:style-name="T18">Send</text:span></text:span><text:span text:style-name="T18">. Postman will automatically receive and store the session cookie from the server's response.</text:span></text:p>
            </text:list-item>
          </text:list>
        </text:list-item>
        <text:list-item>
          <text:p text:style-name="P314"><text:span text:style-name="Strong_20_Emphasis"><text:span text:style-name="T18">Access Protected Endpoint:</text:span></text:span></text:p>
          <text:list>
            <text:list-item>
              <text:p text:style-name="P315"><text:span text:style-name="T18">Now, create a </text:span><text:span text:style-name="Source_20_Text"><text:span text:style-name="T25">GET</text:span></text:span><text:span text:style-name="T18"> request to </text:span><text:span text:style-name="Source_20_Text"><text:span text:style-name="T25">http://localhost:9090/api/items</text:span></text:span><text:span text:style-name="T18">.</text:span></text:p>
            </text:list-item>
            <text:list-item>
              <text:p text:style-name="P315"><text:span text:style-name="T18">Click </text:span><text:span text:style-name="Strong_20_Emphasis"><text:span text:style-name="T18">Send</text:span></text:span><text:span text:style-name="T18">. Postman will automatically attach the session cookie to this request, and you will receive a </text:span><text:span text:style-name="Source_20_Text"><text:span text:style-name="T25">200 OK</text:span></text:span><text:span text:style-name="T18"> response with the list of items.</text:span></text:p>
            </text:list-item>
          </text:list>
        </text:list-item>
      </text:list>
      <text:h text:style-name="P215" text:outline-level="3"><text:span text:style-name="T18">2. Command-Line Tool (</text:span><text:span text:style-name="Source_20_Text"><text:span text:style-name="T25">curl</text:span></text:span><text:span text:style-name="T18">)</text:span></text:h>
      <text:p text:style-name="P217"><text:span text:style-name="Source_20_Text"><text:span text:style-name="T25">curl</text:span></text:span><text:span text:style-name="T18"> is a powerful command-line tool for making HTTP requests. It's ideal for scripting and automation. You need to manually manage the cookies.</text:span></text:p>
      <text:p text:style-name="P217"><text:span text:style-name="Strong_20_Emphasis"><text:span text:style-name="T18">Steps for </text:span></text:span><text:span text:style-name="Strong_20_Emphasis"><text:span text:style-name="Source_20_Text"><text:span text:style-name="T25">curl</text:span></text:span></text:span><text:span text:style-name="Strong_20_Emphasis"><text:span text:style-name="T18">:</text:span></text:span></text:p>
      <text:list text:style-name="L15">
        <text:list-item>
          <text:p text:style-name="P316"><text:span text:style-name="Strong_20_Emphasis"><text:span text:style-name="T18">Authenticate and Save the Cookie:</text:span></text:span><text:span text:style-name="T18"> Run the following command to send a </text:span><text:span text:style-name="Source_20_Text"><text:span text:style-name="T25">POST</text:span></text:span><text:span text:style-name="T18"> request to the </text:span><text:span text:style-name="Source_20_Text"><text:span text:style-name="T25">/login</text:span></text:span><text:span text:style-name="T18"> endpoint. The </text:span><text:span text:style-name="Source_20_Text"><text:span text:style-name="T25">-c cookies.txt</text:span></text:span><text:span text:style-name="T18"> flag tells </text:span><text:span text:style-name="Source_20_Text"><text:span text:style-name="T25">curl</text:span></text:span><text:span text:style-name="T18"> to save the session cookie into a file named </text:span><text:span text:style-name="Source_20_Text"><text:span text:style-name="T25">cookies.txt</text:span></text:span><text:span text:style-name="T18">.</text:span></text:p>
          <text:p text:style-name="P269">bash</text:p>
          <text:p text:style-name="P275"><text:span text:style-name="Source_20_Text"><text:span text:style-name="T21">curl -X POST -c cookies.txt -d </text:span></text:span><text:span text:style-name="Source_20_Text"><text:span text:style-name="T27">"username=user"</text:span></text:span><text:span text:style-name="Source_20_Text"><text:span text:style-name="T21"> -d </text:span></text:span><text:span text:style-name="Source_20_Text"><text:span text:style-name="T27">"password=password"</text:span></text:span><text:span text:style-name="Source_20_Text"><text:span text:style-name="T21"> http://localhost:9090/login</text:span></text:span></text:p>
        </text:list-item>
        <text:list-item>
          <text:p text:style-name="P316"><text:soft-page-break/><text:span text:style-name="Strong_20_Emphasis"><text:span text:style-name="T18">Access Protected Endpoint with the Cookie:</text:span></text:span><text:span text:style-name="T18"> Now, make a request to the protected endpoint using the </text:span><text:span text:style-name="Source_20_Text"><text:span text:style-name="T25">-b cookies.txt</text:span></text:span><text:span text:style-name="T18"> flag, which tells </text:span><text:span text:style-name="Source_20_Text"><text:span text:style-name="T25">curl</text:span></text:span><text:span text:style-name="T18"> to include the cookies from that file in the request.</text:span></text:p>
          <text:p text:style-name="P269">bash</text:p>
          <text:p text:style-name="P275"><text:span text:style-name="Source_20_Text"><text:span text:style-name="T21">curl -b cookies.txt http://localhost:9090/api/items</text:span></text:span></text:p>
          <text:p text:style-name="P321">You will see the JSON response containing the items, as you are now authenticated.</text:p>
        </text:list-item>
      </text:list>
      <text:h text:style-name="P215" text:outline-level="3"><text:span text:style-name="T18">3. Automated Integration Tests (Spring's </text:span><text:span text:style-name="Source_20_Text"><text:span text:style-name="T25">MockMvc</text:span></text:span><text:span text:style-name="T18">)</text:span></text:h>
      <text:p text:style-name="P106">For automated testing, performing a full login for every test is inefficient. Spring Security's testing support provides a much better way.</text:p>
      <text:p text:style-name="P217"><text:span text:style-name="T18">Your existing test file, </text:span><text:a xlink:type="simple" xlink:href="code-assist-path:/home/vj/Desktop/A/backu20/swagger_demo1/src/test/java/com/swagger/demo/SwaggerDemoApplicationTests.java" text:style-name="Internet_20_link" text:visited-style-name="Visited_20_Internet_20_Link"><text:span text:style-name="Source_20_Text"><text:span text:style-name="T29">SwaggerDemoApplicationTests.java</text:span></text:span></text:a><text:span text:style-name="T18">, already demonstrates the best practice using the </text:span><text:span text:style-name="Source_20_Text"><text:span text:style-name="T25">@WithMockUser</text:span></text:span><text:span text:style-name="T18"> annotation. This annotation tells the testing framework to run the test with a mock authenticated user in the security context, completely bypassing the need to perform a login.</text:span></text:p>
      <text:p text:style-name="P104">java</text:p>
      <text:p text:style-name="P216"><text:span text:style-name="Source_20_Text"><text:span text:style-name="T31">// /home/vj/Desktop/A/backu20/swagger_demo1/src/test/java/com/swagger/demo/SwaggerDemoApplicationTests.java</text:span></text:span></text:p>
      <text:p text:style-name="P216"><text:span text:style-name="Source_20_Text"><text:span text:style-name="T21">...</text:span></text:span></text:p>
      <text:p text:style-name="P216"><text:span text:style-name="Source_20_Text"><text:span text:style-name="T35">@Test</text:span></text:span></text:p>
      <text:p text:style-name="P216"><text:span text:style-name="Source_20_Text"><text:span text:style-name="T35">@WithMockUser</text:span></text:span><text:span text:style-name="Source_20_Text"><text:span text:style-name="T21"> </text:span></text:span><text:span text:style-name="Source_20_Text"><text:span text:style-name="T31">// This annotation provides an authenticated user for the test</text:span></text:span></text:p>
      <text:p text:style-name="P216"><text:span text:style-name="Source_20_Text"><text:span text:style-name="T34">void</text:span></text:span><text:span text:style-name="Source_20_Text"><text:span text:style-name="T21"> </text:span></text:span><text:span text:style-name="Source_20_Text"><text:span text:style-name="T27">getAllItems_shouldReturnInitialItems</text:span></text:span><text:span text:style-name="Source_20_Text"><text:span text:style-name="T21">() </text:span></text:span><text:span text:style-name="Source_20_Text"><text:span text:style-name="T34">throws</text:span></text:span><text:span text:style-name="Source_20_Text"><text:span text:style-name="T21"> Exception {</text:span></text:span></text:p>
      <text:p text:style-name="P216"><text:span text:style-name="Source_20_Text"><text:span text:style-name="T23"><text:s text:c="4"/></text:span></text:span><text:span text:style-name="Source_20_Text"><text:span text:style-name="T21">mockMvc.perform(get(</text:span></text:span><text:span text:style-name="Source_20_Text"><text:span text:style-name="T27">"/api/items"</text:span></text:span><text:span text:style-name="Source_20_Text"><text:span text:style-name="T21">))</text:span></text:span></text:p>
      <text:p text:style-name="P216"><text:span text:style-name="Source_20_Text"><text:span text:style-name="T23"><text:s text:c="12"/></text:span></text:span><text:span text:style-name="Source_20_Text"><text:span text:style-name="T21">.andExpect(status().isOk())</text:span></text:span></text:p>
      <text:p text:style-name="P216"><text:span text:style-name="Source_20_Text"><text:span text:style-name="T23"><text:s text:c="12"/></text:span></text:span><text:span text:style-name="Source_20_Text"><text:span text:style-name="T21">...</text:span></text:span></text:p>
      <text:p text:style-name="P216"><text:span text:style-name="Source_20_Text"><text:span text:style-name="T21">}</text:span></text:span></text:p>
      <text:p text:style-name="P216"><text:span text:style-name="Source_20_Text"><text:span text:style-name="T21">...</text:span></text:span></text:p>
      <text:p text:style-name="P106">This is the preferred method for writing integration tests for secured endpoints in a Spring application.</text:p>
      <text:h text:style-name="P103" text:outline-level="3">Code Improvement Suggestion</text:h>
      <text:p text:style-name="P217"><text:span text:style-name="T18">In your main application class, the </text:span><text:span text:style-name="Source_20_Text"><text:span text:style-name="T25">@EnableWebSecurity</text:span></text:span><text:span text:style-name="T18"> annotation is redundant. </text:span><text:span text:style-name="Source_20_Text"><text:span text:style-name="T25">spring-boot-starter-security</text:span></text:span><text:span text:style-name="T18"> automatically enables web security when it's on the classpath, and your </text:span><text:span text:style-name="Source_20_Text"><text:span text:style-name="T25">SecurityConfig</text:span></text:span><text:span text:style-name="T18"> class already correctly contains this annotation. You can safely remove it from the main class for better clarity.</text:span></text:p>
      <text:p text:style-name="P112">SwaggerDemoApplication.java</text:p>
      <text:p text:style-name="P105"><text:span text:style-name="T92">-2</text:span><text:span text:style-name="T93">+0</text:span></text:p>
      <text:p text:style-name="P216"/>
      <text:p text:style-name="P216"><text:span text:style-name="Source_20_Text"><text:span text:style-name="T34">import</text:span></text:span><text:span text:style-name="Source_20_Text"><text:span text:style-name="T21"> org.springframework.boot.SpringApplication;</text:span></text:span></text:p>
      <text:p text:style-name="P216"><text:span text:style-name="Source_20_Text"><text:span text:style-name="T34">import</text:span></text:span><text:span text:style-name="Source_20_Text"><text:span text:style-name="T21"> org.springframework.boot.autoconfigure.SpringBootApplication;</text:span></text:span></text:p>
      <text:p text:style-name="P216"><text:span text:style-name="Source_20_Text"><text:span text:style-name="T34">import</text:span></text:span><text:span text:style-name="Source_20_Text"><text:span text:style-name="T21"> org.springframework.security.config.annotation.web.configuration.EnableWebSecurity;</text:span></text:span></text:p>
      <text:p text:style-name="P216"/>
      <text:p text:style-name="P216"><text:span text:style-name="Source_20_Text"><text:span text:style-name="T35">@EnableWebSecurity</text:span></text:span></text:p>
      <text:p text:style-name="P216"><text:span text:style-name="Source_20_Text"><text:span text:style-name="T35">@SpringBootApplication</text:span></text:span></text:p>
      <text:p text:style-name="P216"><text:span text:style-name="Source_20_Text"><text:span text:style-name="T34">public</text:span></text:span><text:span text:style-name="Source_20_Text"><text:span text:style-name="T21"> </text:span></text:span><text:span text:style-name="Source_20_Text"><text:span text:style-name="T34">class</text:span></text:span><text:span text:style-name="Source_20_Text"><text:span text:style-name="T21"> </text:span></text:span><text:span text:style-name="Source_20_Text"><text:span text:style-name="T27">SwaggerDemoApplication</text:span></text:span><text:span text:style-name="Source_20_Text"><text:span text:style-name="T21"> {</text:span></text:span></text:p>
      <text:p text:style-name="P216"/>
      <text:p text:style-name="P106">I hope this helps you understand how to work with your secured endpoints!</text:p>
      <text:p text:style-name="P229">1 file to review.</text:p>
      <text:p text:style-name="P232">Reject</text:p>
      <text:p text:style-name="P230">SwaggerDemoApplication.java<text:span text:style-name="T92">-2</text:span><text:span text:style-name="T93">+0</text:span></text:p>
      <text:p text:style-name="Horizontal_20_Line"/>
      <text:p text:style-name="P227"><text:soft-page-break/>1 context item</text:p>
      <text:h text:style-name="P226" text:outline-level="2">Context items</text:h>
      <text:p text:style-name="P231">Current fileSwaggerDemoApplication.java</text:p>
      <text:section text:style-name="Sect1" text:name="cdk-describedby-message-ng-1-2">
        <text:p text:style-name="P228"/>
      </text:section>
      <text:section text:style-name="Sect1" text:name="cdk-describedby-message-ng-1-3">
        <text:p text:style-name="P228"/>
      </text:section>
      <text:section text:style-name="Sect1" text:name="cdk-describedby-message-ng-1-4">
        <text:p text:style-name="P228"/>
      </text:section>
      <text:section text:style-name="Sect1" text:name="cdk-describedby-message-ng-1-5">
        <text:p text:style-name="P228"/>
      </text:section>
      <text:section text:style-name="Sect1" text:name="cdk-describedby-message-ng-1-6">
        <text:p text:style-name="P228"/>
      </text:section>
      <text:section text:style-name="Sect1" text:name="cdk-describedby-message-ng-1-7">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76">CSRF TOKEN</text:p>
        <text:p text:style-name="P100">where to put _csrf parameter in http REST request in Postman?</text:p>
        <text:h text:style-name="P110" text:outline-level="1">Gemini</text:h>
        <text:p text:style-name="P118">Thinking</text:p>
        <text:p text:style-name="P209"><text:soft-page-break/><text:span text:style-name="T17">Of course! You've run into a very common and important security feature in Spring Security. The </text:span><text:span text:style-name="Source_20_Text"><text:span text:style-name="T24">_csrf</text:span></text:span><text:span text:style-name="T17"> parameter is required because your application has Cross-Site Request Forgery (CSRF) protection enabled by default, which is excellent for security.</text:span></text:p>
        <text:p text:style-name="P209"><text:span text:style-name="T17">For a traditional form-based login, this </text:span><text:span text:style-name="Source_20_Text"><text:span text:style-name="T24">_csrf</text:span></text:span><text:span text:style-name="T17"> token must be sent in the body of the </text:span><text:span text:style-name="Source_20_Text"><text:span text:style-name="T24">POST</text:span></text:span><text:span text:style-name="T17"> request to </text:span><text:span text:style-name="Source_20_Text"><text:span text:style-name="T24">/login</text:span></text:span><text:span text:style-name="T17">.</text:span></text:p>
        <text:h text:style-name="P210" text:outline-level="3"><text:span text:style-name="T17">Where to Put the </text:span><text:span text:style-name="Source_20_Text"><text:span text:style-name="T24">_csrf</text:span></text:span><text:span text:style-name="T17"> Parameter in Postman</text:span></text:h>
        <text:p text:style-name="P209"><text:span text:style-name="T17">You need to add the </text:span><text:span text:style-name="Source_20_Text"><text:span text:style-name="T24">_csrf</text:span></text:span><text:span text:style-name="T17"> token as a key-value pair in the </text:span><text:span text:style-name="Strong_20_Emphasis"><text:span text:style-name="T17">body</text:span></text:span><text:span text:style-name="T17"> of your request, using the </text:span><text:span text:style-name="Source_20_Text"><text:span text:style-name="T24">x-www-form-urlencoded</text:span></text:span><text:span text:style-name="T17"> format. It goes right alongside your </text:span><text:span text:style-name="Source_20_Text"><text:span text:style-name="T24">username</text:span></text:span><text:span text:style-name="T17"> and </text:span><text:span text:style-name="Source_20_Text"><text:span text:style-name="T24">password</text:span></text:span><text:span text:style-name="T17"> fields.</text:span></text:p>
        <text:list text:style-name="L16">
          <text:list-item>
            <text:p text:style-name="P308"><text:span text:style-name="T17">Set the request method to </text:span><text:span text:style-name="Source_20_Text"><text:span text:style-name="T24">POST</text:span></text:span><text:span text:style-name="T17">.</text:span></text:p>
          </text:list-item>
          <text:list-item>
            <text:p text:style-name="P308"><text:span text:style-name="T17">Set the URL to </text:span><text:span text:style-name="Source_20_Text"><text:span text:style-name="T24">http://localhost:9090/login</text:span></text:span><text:span text:style-name="T17">.</text:span></text:p>
          </text:list-item>
          <text:list-item>
            <text:p text:style-name="P308"><text:span text:style-name="T17">Go to the </text:span><text:span text:style-name="Strong_20_Emphasis"><text:span text:style-name="T17">Body</text:span></text:span><text:span text:style-name="T17"> tab and select the </text:span><text:span text:style-name="Strong_20_Emphasis"><text:span text:style-name="T17">x-www-form-urlencoded</text:span></text:span><text:span text:style-name="T17"> radio button.</text:span></text:p>
          </text:list-item>
          <text:list-item>
            <text:p text:style-name="P322">Add the following key-value pairs in the table:</text:p>
            <text:list>
              <text:list-item>
                <text:p text:style-name="P308"><text:span text:style-name="Source_20_Text"><text:span text:style-name="T24">username</text:span></text:span><text:span text:style-name="T17">: </text:span><text:span text:style-name="Source_20_Text"><text:span text:style-name="T24">user</text:span></text:span></text:p>
              </text:list-item>
              <text:list-item>
                <text:p text:style-name="P308"><text:span text:style-name="Source_20_Text"><text:span text:style-name="T24">password</text:span></text:span><text:span text:style-name="T17">: </text:span><text:span text:style-name="Source_20_Text"><text:span text:style-name="T24">password</text:span></text:span></text:p>
              </text:list-item>
              <text:list-item>
                <text:p text:style-name="P308"><text:span text:style-name="Source_20_Text"><text:span text:style-name="T24">_csrf</text:span></text:span><text:span text:style-name="T17">: </text:span><text:span text:style-name="Source_20_Text"><text:span text:style-name="T24">[THE-ACTUAL-CSRF-TOKEN-VALUE]</text:span></text:span></text:p>
              </text:list-item>
            </text:list>
          </text:list-item>
        </text:list>
        <text:p text:style-name="P95">The main challenge is getting the correct value for the CSRF token, as your current configuration is designed for browser-based forms, not API clients. Here are two ways to handle this.</text:p>
        <text:p text:style-name="P213"/>
        <text:h text:style-name="P92" text:outline-level="3">Option 1: The Easy Way for Development (Disable CSRF)</text:h>
        <text:p text:style-name="P209"><text:span text:style-name="T17">For quick testing and development, the simplest solution is to temporarily disable CSRF protection. This removes the need for the </text:span><text:span text:style-name="Source_20_Text"><text:span text:style-name="T24">_csrf</text:span></text:span><text:span text:style-name="T17"> token entirely.</text:span></text:p>
        <text:p text:style-name="P214"><text:span text:style-name="Strong_20_Emphasis"><text:span text:style-name="T17">Warning:</text:span></text:span><text:span text:style-name="T17"> Do not do this in a production application that will be accessed by browsers, as it opens you up to CSRF attacks.</text:span></text:p>
        <text:h text:style-name="P212" text:outline-level="4"><text:span text:style-name="T17">Change </text:span><text:a xlink:type="simple" xlink:href="code-assist-path:/home/vj/Desktop/A/backu20/swagger_demo1/src/main/java/com/swagger/demo/security/SecurityConfig.java" text:style-name="Internet_20_link" text:visited-style-name="Visited_20_Internet_20_Link"><text:span text:style-name="Source_20_Text"><text:span text:style-name="T28">SecurityConfig.java</text:span></text:span></text:a><text:span text:style-name="T17">:</text:span></text:h>
        <text:p text:style-name="P209"><text:span text:style-name="T17">You can disable CSRF by adding </text:span><text:span text:style-name="Source_20_Text"><text:span text:style-name="T24">.csrf(csrf -&gt; csrf.disable())</text:span></text:span><text:span text:style-name="T17"> to your security filter chain.</text:span></text:p>
        <text:p text:style-name="P113">SecurityConfig.java</text:p>
        <text:p text:style-name="P96"><text:span text:style-name="T92">-0</text:span><text:span text:style-name="T93">+2</text:span></text:p>
        <text:p text:style-name="P211"><text:span text:style-name="Source_20_Text"><text:span text:style-name="T22"><text:s text:c="4"/></text:span></text:span><text:span text:style-name="Source_20_Text"><text:span text:style-name="T36">@Bean</text:span></text:span></text:p>
        <text:p text:style-name="P211"><text:span text:style-name="Source_20_Text"><text:span text:style-name="T22"><text:s text:c="4"/></text:span></text:span><text:span text:style-name="Source_20_Text"><text:span text:style-name="T33">public</text:span></text:span><text:span text:style-name="Source_20_Text"><text:span text:style-name="T20"> SecurityFilterChain </text:span></text:span><text:span text:style-name="Source_20_Text"><text:span text:style-name="T26">securityFilterChain</text:span></text:span><text:span text:style-name="Source_20_Text"><text:span text:style-name="T20">(HttpSecurity http) </text:span></text:span><text:span text:style-name="Source_20_Text"><text:span text:style-name="T33">throws</text:span></text:span><text:span text:style-name="Source_20_Text"><text:span text:style-name="T20"> Exception {</text:span></text:span></text:p>
        <text:p text:style-name="P211"><text:span text:style-name="Source_20_Text"><text:span text:style-name="T22"><text:s text:c="8"/></text:span></text:span><text:span text:style-name="Source_20_Text"><text:span text:style-name="T20">http</text:span></text:span></text:p>
        <text:p text:style-name="P211"><text:span text:style-name="Source_20_Text"><text:span text:style-name="T22"><text:s text:c="16"/></text:span></text:span><text:span text:style-name="Source_20_Text"><text:span text:style-name="T30">// WARNING: Disables CSRF protection. Do not use in production for browser-based clients.</text:span></text:span></text:p>
        <text:p text:style-name="P211"><text:span text:style-name="Source_20_Text"><text:span text:style-name="T22"><text:s text:c="16"/></text:span></text:span><text:span text:style-name="Source_20_Text"><text:span text:style-name="T20">.csrf(csrf -&gt; csrf.disable())</text:span></text:span></text:p>
        <text:p text:style-name="P211"><text:span text:style-name="Source_20_Text"><text:span text:style-name="T22"><text:s text:c="16"/></text:span></text:span><text:span text:style-name="Source_20_Text"><text:span text:style-name="T20">.authorizeHttpRequests(authorize -&gt; authorize</text:span></text:span></text:p>
        <text:p text:style-name="P211"><text:span text:style-name="Source_20_Text"><text:span text:style-name="T22"><text:s text:c="16"/></text:span></text:span><text:span text:style-name="Source_20_Text"><text:span text:style-name="T30">// Allow unauthenticated access to Swagger UI resources</text:span></text:span></text:p>
        <text:p text:style-name="P211"><text:span text:style-name="Source_20_Text"><text:span text:style-name="T22"><text:s text:c="16"/></text:span></text:span><text:span text:style-name="Source_20_Text"><text:span text:style-name="T20">.requestMatchers(SWAGGER_WHITELIST).permitAll()</text:span></text:span></text:p>
        <text:p text:style-name="P211"/>
        <text:p text:style-name="P209"><text:span text:style-name="T17">After this change, restart your application. Your login request in Postman will now succeed with only the </text:span><text:span text:style-name="Source_20_Text"><text:span text:style-name="T24">username</text:span></text:span><text:span text:style-name="T17"> and </text:span><text:span text:style-name="Source_20_Text"><text:span text:style-name="T24">password</text:span></text:span><text:span text:style-name="T17"> fields.</text:span></text:p>
        <text:p text:style-name="P213"/>
        <text:h text:style-name="P92" text:outline-level="3">Option 2: The "Proper" Way for API Clients (Expose Token in a Cookie)</text:h>
        <text:p text:style-name="P95">A more secure and production-friendly approach is to configure Spring Security to send the CSRF token in a cookie. This is the standard practice for applications that will be consumed by Single-Page Applications (SPAs) or other API clients.</text:p>
        <text:h text:style-name="P212" text:outline-level="4"><text:span text:style-name="T17">Change </text:span><text:a xlink:type="simple" xlink:href="code-assist-path:/home/vj/Desktop/A/backu20/swagger_demo1/src/main/java/com/swagger/demo/security/SecurityConfig.java" text:style-name="Internet_20_link" text:visited-style-name="Visited_20_Internet_20_Link"><text:span text:style-name="Source_20_Text"><text:span text:style-name="T28">SecurityConfig.java</text:span></text:span></text:a><text:span text:style-name="T17">:</text:span></text:h>
        <text:p text:style-name="P209"><text:span text:style-name="T17">Modify your security configuration to use </text:span><text:span text:style-name="Source_20_Text"><text:span text:style-name="T24">CookieCsrfTokenRepository</text:span></text:span><text:span text:style-name="T17">. This will cause Spring Security to set a cookie named </text:span><text:span text:style-name="Source_20_Text"><text:span text:style-name="T24">XSRF-TOKEN</text:span></text:span><text:span text:style-name="T17"> on the first </text:span><text:span text:style-name="Source_20_Text"><text:span text:style-name="T24">GET</text:span></text:span><text:span text:style-name="T17"> request.</text:span></text:p>
        <text:p text:style-name="P113"><text:soft-page-break/>SecurityConfig.java</text:p>
        <text:p text:style-name="P96"><text:span text:style-name="T92">-1</text:span><text:span text:style-name="T93">+5</text:span></text:p>
        <text:p text:style-name="P211"><text:span text:style-name="Source_20_Text"><text:span text:style-name="T33">import</text:span></text:span><text:span text:style-name="Source_20_Text"><text:span text:style-name="T20"> org.springframework.security.config.annotation.web.builders.HttpSecurity;</text:span></text:span></text:p>
        <text:p text:style-name="P211"><text:span text:style-name="Source_20_Text"><text:span text:style-name="T33">import</text:span></text:span><text:span text:style-name="Source_20_Text"><text:span text:style-name="T20"> org.springframework.security.config.annotation.web.configuration.EnableWebSecurity;</text:span></text:span></text:p>
        <text:p text:style-name="P211"><text:span text:style-name="Source_20_Text"><text:span text:style-name="T33">import</text:span></text:span><text:span text:style-name="Source_20_Text"><text:span text:style-name="T20"> org.springframework.security.core.userdetails.User;</text:span></text:span></text:p>
        <text:p text:style-name="P211"><text:span text:style-name="Source_20_Text"><text:span text:style-name="T33">import</text:span></text:span><text:span text:style-name="Source_20_Text"><text:span text:style-name="T20"> org.springframework.security.core.userdetails.UserDetails;</text:span></text:span></text:p>
        <text:p text:style-name="P211"><text:span text:style-name="Source_20_Text"><text:span text:style-name="T33">import</text:span></text:span><text:span text:style-name="Source_20_Text"><text:span text:style-name="T20"> org.springframework.security.core.userdetails.UserDetailsService;</text:span></text:span></text:p>
        <text:p text:style-name="P211"><text:span text:style-name="Source_20_Text"><text:span text:style-name="T33">import</text:span></text:span><text:span text:style-name="Source_20_Text"><text:span text:style-name="T20"> org.springframework.security.crypto.bcrypt.BCryptPasswordEncoder;</text:span></text:span></text:p>
        <text:p text:style-name="P211"><text:span text:style-name="Source_20_Text"><text:span text:style-name="T33">import</text:span></text:span><text:span text:style-name="Source_20_Text"><text:span text:style-name="T20"> org.springframework.security.crypto.password.PasswordEncoder;</text:span></text:span></text:p>
        <text:p text:style-name="P211"><text:span text:style-name="Source_20_Text"><text:span text:style-name="T33">import</text:span></text:span><text:span text:style-name="Source_20_Text"><text:span text:style-name="T20"> org.springframework.security.provisioning.InMemoryUserDetailsManager;</text:span></text:span></text:p>
        <text:p text:style-name="P211"><text:span text:style-name="Source_20_Text"><text:span text:style-name="T33">import</text:span></text:span><text:span text:style-name="Source_20_Text"><text:span text:style-name="T20"> org.springframework.security.web.SecurityFilterChain;</text:span></text:span></text:p>
        <text:p text:style-name="P211"><text:span text:style-name="Source_20_Text"><text:span text:style-name="T33">import</text:span></text:span><text:span text:style-name="Source_20_Text"><text:span text:style-name="T20"> org.springframework.security.web.csrf.CookieCsrfTokenRepository;</text:span></text:span></text:p>
        <text:p text:style-name="P211"/>
        <text:p text:style-name="P211"><text:span text:style-name="Source_20_Text"><text:span text:style-name="T36">@Configuration</text:span></text:span></text:p>
        <text:p text:style-name="P211"><text:span text:style-name="Source_20_Text"><text:span text:style-name="T36">@EnableWebSecurity</text:span></text:span></text:p>
        <text:p text:style-name="P211"><text:span text:style-name="Source_20_Text"><text:span text:style-name="T22"><text:s text:c="4"/></text:span></text:span><text:span text:style-name="Source_20_Text"><text:span text:style-name="T36">@Bean</text:span></text:span></text:p>
        <text:p text:style-name="P211"><text:span text:style-name="Source_20_Text"><text:span text:style-name="T22"><text:s text:c="4"/></text:span></text:span><text:span text:style-name="Source_20_Text"><text:span text:style-name="T33">public</text:span></text:span><text:span text:style-name="Source_20_Text"><text:span text:style-name="T20"> SecurityFilterChain </text:span></text:span><text:span text:style-name="Source_20_Text"><text:span text:style-name="T26">securityFilterChain</text:span></text:span><text:span text:style-name="Source_20_Text"><text:span text:style-name="T20">(HttpSecurity http) </text:span></text:span><text:span text:style-name="Source_20_Text"><text:span text:style-name="T33">throws</text:span></text:span><text:span text:style-name="Source_20_Text"><text:span text:style-name="T20"> Exception {</text:span></text:span></text:p>
        <text:p text:style-name="P211"><text:span text:style-name="Source_20_Text"><text:span text:style-name="T22"><text:s text:c="8"/></text:span></text:span><text:span text:style-name="Source_20_Text"><text:span text:style-name="T20">http</text:span></text:span></text:p>
        <text:p text:style-name="P211"><text:span text:style-name="Source_20_Text"><text:span text:style-name="T22"><text:s text:c="16"/></text:span></text:span><text:span text:style-name="Source_20_Text"><text:span text:style-name="T20">.csrf(csrf -&gt; csrf</text:span></text:span></text:p>
        <text:p text:style-name="P211"><text:span text:style-name="Source_20_Text"><text:span text:style-name="T22"><text:s text:c="24"/></text:span></text:span><text:span text:style-name="Source_20_Text"><text:span text:style-name="T30">// Send the CSRF token in a cookie (XSRF-TOKEN) that JavaScript can read.</text:span></text:span></text:p>
        <text:p text:style-name="P211"><text:span text:style-name="Source_20_Text"><text:span text:style-name="T22"><text:s text:c="24"/></text:span></text:span><text:span text:style-name="Source_20_Text"><text:span text:style-name="T20">.csrfTokenRepository(CookieCsrfTokenRepository.withHttpOnlyFalse())</text:span></text:span></text:p>
        <text:p text:style-name="P211"><text:span text:style-name="Source_20_Text"><text:span text:style-name="T22"><text:s text:c="16"/></text:span></text:span><text:span text:style-name="Source_20_Text"><text:span text:style-name="T20">)</text:span></text:span></text:p>
        <text:p text:style-name="P211"><text:span text:style-name="Source_20_Text"><text:span text:style-name="T22"><text:s text:c="16"/></text:span></text:span><text:span text:style-name="Source_20_Text"><text:span text:style-name="T20">.authorizeHttpRequests(authorize -&gt; authorize</text:span></text:span></text:p>
        <text:p text:style-name="P211"><text:span text:style-name="Source_20_Text"><text:span text:style-name="T22"><text:s text:c="16"/></text:span></text:span><text:span text:style-name="Source_20_Text"><text:span text:style-name="T30">// Allow unauthenticated access to Swagger UI resources</text:span></text:span></text:p>
        <text:p text:style-name="P211"><text:span text:style-name="Source_20_Text"><text:span text:style-name="T22"><text:s text:c="16"/></text:span></text:span><text:span text:style-name="Source_20_Text"><text:span text:style-name="T20">.requestMatchers(SWAGGER_WHITELIST).permitAll()</text:span></text:span></text:p>
        <text:p text:style-name="P211"/>
        <text:h text:style-name="P94" text:outline-level="4">New Workflow in Postman:</text:h>
        <text:p text:style-name="P95">After restarting your app with this change, follow these steps:</text:p>
        <text:list text:style-name="L17">
          <text:list-item>
            <text:p text:style-name="P309"><text:span text:style-name="Strong_20_Emphasis"><text:span text:style-name="T17">Get the Token:</text:span></text:span><text:span text:style-name="T17"> Make a </text:span><text:span text:style-name="Source_20_Text"><text:span text:style-name="T24">GET</text:span></text:span><text:span text:style-name="T17"> request to any endpoint, for example, </text:span><text:span text:style-name="Source_20_Text"><text:span text:style-name="T24">http://localhost:9090/api/items</text:span></text:span><text:span text:style-name="T17">. The request will fail with a </text:span><text:span text:style-name="Source_20_Text"><text:span text:style-name="T24">401 Unauthorized</text:span></text:span><text:span text:style-name="T17"> or redirect, but that's expected.</text:span></text:p>
          </text:list-item>
          <text:list-item>
            <text:p text:style-name="P309"><text:span text:style-name="Strong_20_Emphasis"><text:span text:style-name="T17">Inspect Cookies:</text:span></text:span><text:span text:style-name="T17"> In the Postman response viewer, click the </text:span><text:span text:style-name="Strong_20_Emphasis"><text:span text:style-name="T17">Cookies</text:span></text:span><text:span text:style-name="T17"> tab. You will see a cookie named </text:span><text:span text:style-name="Source_20_Text"><text:span text:style-name="T24">XSRF-TOKEN</text:span></text:span><text:span text:style-name="T17">. Copy its </text:span><text:span text:style-name="Source_20_Text"><text:span text:style-name="T24">Value</text:span></text:span><text:span text:style-name="T17">.</text:span></text:p>
          </text:list-item>
          <text:list-item>
            <text:p text:style-name="P309"><text:span text:style-name="Strong_20_Emphasis"><text:span text:style-name="T17">Log In:</text:span></text:span><text:span text:style-name="T17"> Now, build your </text:span><text:span text:style-name="Source_20_Text"><text:span text:style-name="T24">POST</text:span></text:span><text:span text:style-name="T17"> request to </text:span><text:span text:style-name="Source_20_Text"><text:span text:style-name="T24">http://localhost:9090/login</text:span></text:span><text:span text:style-name="T17"> as described at the top, and paste the copied token value into the </text:span><text:span text:style-name="Source_20_Text"><text:span text:style-name="T24">_csrf</text:span></text:span><text:span text:style-name="T17"> field in the request body.</text:span></text:p>
          </text:list-item>
          <text:list-item>
            <text:p text:style-name="P309"><text:span text:style-name="Strong_20_Emphasis"><text:span text:style-name="T17">Send Request:</text:span></text:span><text:span text:style-name="T17"> Click </text:span><text:span text:style-name="Strong_20_Emphasis"><text:span text:style-name="T17">Send</text:span></text:span><text:span text:style-name="T17">. Postman automatically includes the necessary session cookies, and your login will succeed. You can then access your protected endpoints.</text:span></text:p>
          </text:list-item>
        </text:list>
        <text:p text:style-name="P209"><text:span text:style-name="T17">I recommend </text:span><text:span text:style-name="Strong_20_Emphasis"><text:span text:style-name="T17">Option 2</text:span></text:span><text:span text:style-name="T17"> as it maintains security while making your API friendly to other clients.</text:span></text:p>
        <text:p text:style-name="P235"/>
        <text:p text:style-name="P234"><text:soft-page-break/></text:p>
        <text:p text:style-name="P228"/>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text:span text:style-name="T17">The expression </text:span><text:span text:style-name="Source_20_Text"><text:span text:style-name="T24">$[?(@.name == 'Employee')]</text:span></text:span><text:span text:style-name="T17"> is a </text:span><text:span text:style-name="Strong_20_Emphasis"><text:span text:style-name="T17">JSONPath</text:span></text:span><text:span text:style-name="T17"> query. JSONPath is a way to select and extract specific parts of a JSON document. It's very similar in concept to how XPath is used for XML.</text:span></text:p>
        <text:p text:style-name="P209"><text:span text:style-name="T17">This specific expression is used in your test file </text:span><text:a xlink:type="simple" xlink:href="code-assist-path:/home/vj/Desktop/A/backu20/datatables/myapp-mongo-server/src/test/java/com/angular/backend/employees/EmployeeMongoControllerTest.java" text:style-name="Internet_20_link" text:visited-style-name="Visited_20_Internet_20_Link"><text:span text:style-name="Source_20_Text"><text:span text:style-name="T28">EmployeeMongoControllerTest.java</text:span></text:span></text:a><text:span text:style-name="T17"> to find a particular object within a JSON array returned by one of your API endpoints.</text:span></text:p>
        <text:h text:style-name="P92" text:outline-level="3">Explanation of the Expression</text:h>
        <text:p text:style-name="P95">Let's break it down piece by piece:</text:p>
        <text:list text:style-name="L18">
          <text:list-item>
            <text:p text:style-name="P310"><text:span text:style-name="Strong_20_Emphasis"><text:span text:style-name="Source_20_Text"><text:span text:style-name="T24">$</text:span></text:span></text:span><text:span text:style-name="T17">: This represents the </text:span><text:span text:style-name="Strong_20_Emphasis"><text:span text:style-name="T17">root</text:span></text:span><text:span text:style-name="T17"> of the JSON document. In the context of your test, it refers to the entire JSON array returned by the API.</text:span></text:p>
          </text:list-item>
          <text:list-item>
            <text:p text:style-name="P310"><text:span text:style-name="Strong_20_Emphasis"><text:span text:style-name="Source_20_Text"><text:span text:style-name="T24">[...]</text:span></text:span></text:span><text:span text:style-name="T17">: This is the subscript operator. When it contains a </text:span><text:span text:style-name="Source_20_Text"><text:span text:style-name="T24">?()</text:span></text:span><text:span text:style-name="T17">, it acts as a filter.</text:span></text:p>
          </text:list-item>
          <text:list-item>
            <text:p text:style-name="P310"><text:span text:style-name="Strong_20_Emphasis"><text:span text:style-name="Source_20_Text"><text:span text:style-name="T24">?()</text:span></text:span></text:span><text:span text:style-name="T17">: This is the </text:span><text:span text:style-name="Strong_20_Emphasis"><text:span text:style-name="T17">filter operator</text:span></text:span><text:span text:style-name="T17">. It iterates through a collection of elements and selects only those that match a specific condition.</text:span></text:p>
          </text:list-item>
          <text:list-item>
            <text:p text:style-name="P310"><text:span text:style-name="Strong_20_Emphasis"><text:span text:style-name="Source_20_Text"><text:span text:style-name="T24">@</text:span></text:span></text:span><text:span text:style-name="T17">: Inside the filter, the </text:span><text:span text:style-name="Source_20_Text"><text:span text:style-name="T24">@</text:span></text:span><text:span text:style-name="T17"> symbol represents the </text:span><text:span text:style-name="Strong_20_Emphasis"><text:span text:style-name="T17">current element</text:span></text:span><text:span text:style-name="T17"> being processed in the array.</text:span></text:p>
          </text:list-item>
          <text:list-item>
            <text:p text:style-name="P310"><text:span text:style-name="Strong_20_Emphasis"><text:span text:style-name="Source_20_Text"><text:span text:style-name="T24">.name</text:span></text:span></text:span><text:span text:style-name="T17">: This accesses the </text:span><text:span text:style-name="Source_20_Text"><text:span text:style-name="T24">name</text:span></text:span><text:span text:style-name="T17"> property of the current element (</text:span><text:span text:style-name="Source_20_Text"><text:span text:style-name="T24">@</text:span></text:span><text:span text:style-name="T17">).</text:span></text:p>
          </text:list-item>
          <text:list-item>
            <text:p text:style-name="P310"><text:span text:style-name="Strong_20_Emphasis"><text:span text:style-name="Source_20_Text"><text:span text:style-name="T24">== 'Employee'</text:span></text:span></text:span><text:span text:style-name="T17">: This is the comparison. It checks if the value of the </text:span><text:span text:style-name="Source_20_Text"><text:span text:style-name="T24">name</text:span></text:span><text:span text:style-name="T17"> property is exactly equal to the string </text:span><text:span text:style-name="Source_20_Text"><text:span text:style-name="T24">'Employee'</text:span></text:span><text:span text:style-name="T17">.</text:span></text:p>
          </text:list-item>
        </text:list>
        <text:p text:style-name="P209"><text:span text:style-name="T17">Putting it all together, the expression </text:span><text:span text:style-name="Source_20_Text"><text:span text:style-name="T24">$[?(@.name == 'Employee')]</text:span></text:span><text:span text:style-name="T17"> means:</text:span></text:p>
        <text:p text:style-name="P214"><text:span text:style-name="T17">"From the root of the JSON document (</text:span><text:span text:style-name="Source_20_Text"><text:span text:style-name="T24">$</text:span></text:span><text:span text:style-name="T17">), find all elements in the array (</text:span><text:span text:style-name="Source_20_Text"><text:span text:style-name="T24">[...]</text:span></text:span><text:span text:style-name="T17">) where (</text:span><text:span text:style-name="Source_20_Text"><text:span text:style-name="T24">?()</text:span></text:span><text:span text:style-name="T17">) the current element's (</text:span><text:span text:style-name="Source_20_Text"><text:span text:style-name="T24">@</text:span></text:span><text:span text:style-name="T17">) </text:span><text:span text:style-name="Source_20_Text"><text:span text:style-name="T24">name</text:span></text:span><text:span text:style-name="T17"> property is equal to </text:span><text:span text:style-name="Source_20_Text"><text:span text:style-name="T24">'Employee'</text:span></text:span><text:span text:style-name="T17">."</text:span></text:p>
        <text:h text:style-name="P92" text:outline-level="3">In the Context of Your Code</text:h>
        <text:p text:style-name="P209"><text:span text:style-name="T17">In </text:span><text:a xlink:type="simple" xlink:href="code-assist-path:/home/vj/Desktop/A/backu20/datatables/myapp-mongo-server/src/test/java/com/angular/backend/employees/EmployeeMongoControllerTest.java" text:style-name="Internet_20_link" text:visited-style-name="Visited_20_Internet_20_Link"><text:span text:style-name="Source_20_Text"><text:span text:style-name="T28">/home/vj/Desktop/A/backu20/datatables/myapp-mongo-server/src/test/java/com/angular/backend/employees/EmployeeMongoControllerTest.java</text:span></text:span></text:a><text:span text:style-name="T17">, you have this line:</text:span></text:p>
        <text:p text:style-name="P93">java</text:p>
        <text:p text:style-name="P211"><text:span text:style-name="Source_20_Text"><text:span text:style-name="T30">// ...</text:span></text:span></text:p>
        <text:p text:style-name="P211"><text:span text:style-name="Source_20_Text"><text:span text:style-name="T20">.andExpect(jsonPath(</text:span></text:span><text:span text:style-name="Source_20_Text"><text:span text:style-name="T26">"$[?(@.name == 'Employee')].manager.name"</text:span></text:span><text:span text:style-name="Source_20_Text"><text:span text:style-name="T20">, contains(</text:span></text:span><text:span text:style-name="Source_20_Text"><text:span text:style-name="T26">"Manager"</text:span></text:span><text:span text:style-name="Source_20_Text"><text:span text:style-name="T20">)));</text:span></text:span></text:p>
        <text:p text:style-name="P209"><text:span text:style-name="T17">Here, the JSONPath is slightly longer: </text:span><text:span text:style-name="Source_20_Text"><text:span text:style-name="T24">$[?(@.name == 'Employee')].manager.name</text:span></text:span><text:span text:style-name="T17">.</text:span></text:p>
        <text:list text:style-name="L19">
          <text:list-item>
            <text:p text:style-name="P311"><text:span text:style-name="Source_20_Text"><text:span text:style-name="T24">$[?(@.name == 'Employee')]</text:span></text:span><text:span text:style-name="T17">: First, it finds the employee object in the response array whose name is "Employee". This part of the expression returns a new array containing just that one employee object.</text:span></text:p>
          </text:list-item>
          <text:list-item>
            <text:p text:style-name="P311"><text:soft-page-break/><text:span text:style-name="Source_20_Text"><text:span text:style-name="T24">.manager</text:span></text:span><text:span text:style-name="T17">: From that resulting array, it then navigates into the </text:span><text:span text:style-name="Source_20_Text"><text:span text:style-name="T24">manager</text:span></text:span><text:span text:style-name="T17"> object for each element.</text:span></text:p>
          </text:list-item>
          <text:list-item>
            <text:p text:style-name="P311"><text:span text:style-name="Source_20_Text"><text:span text:style-name="T24">.name</text:span></text:span><text:span text:style-name="T17">: Finally, it selects the </text:span><text:span text:style-name="Source_20_Text"><text:span text:style-name="T24">name</text:span></text:span><text:span text:style-name="T17"> property from the </text:span><text:span text:style-name="Source_20_Text"><text:span text:style-name="T24">manager</text:span></text:span><text:span text:style-name="T17"> object.</text:span></text:p>
          </text:list-item>
        </text:list>
        <text:p text:style-name="P95">The test then asserts that the value of the manager's name is "Manager".</text:p>
        <text:p text:style-name="P95">So, that line of code is testing that for the employee named "Employee", their manager's name is correctly set to "Manager" in the API response.</text:p>
        <text:p text:style-name="P218"/>
        <text:p text:style-name="P233"/>
      </text:section>
      <text:section text:style-name="Sect1" text:name="cdk-describedby-message-ng-1-8">
        <text:p text:style-name="P228"/>
      </text:section>
      <text:section text:style-name="Sect1" text:name="cdk-describedby-message-ng-1-9">
        <text:p text:style-name="P228"/>
      </text:section>
      <text:section text:style-name="Sect1" text:name="cdk-describedby-message-ng-1-10">
        <text:p text:style-name="P228"/>
      </text:section>
      <text:section text:style-name="Sect1" text:name="cdk-describedby-message-ng-1-11">
        <text:p text:style-name="P228"/>
      </text:section>
      <text:section text:style-name="Sect1" text:name="cdk-describedby-message-ng-1-12">
        <text:p text:style-name="P228"/>
      </text:section>
      <text:section text:style-name="Sect1" text:name="cdk-describedby-message-ng-1-13">
        <text:p text:style-name="P228"/>
      </text:section>
      <text:section text:style-name="Sect1" text:name="cdk-describedby-message-ng-1-14">
        <text:p text:style-name="P228"/>
      </text:section>
      <text:section text:style-name="Sect1" text:name="cdk-describedby-message-ng-1-15">
        <text:p text:style-name="P228"/>
      </text:section>
      <text:section text:style-name="Sect1" text:name="cdk-describedby-message-ng-1-16">
        <text:p text:style-name="P228"/>
      </text:section>
      <text:p text:style-name="P228"><draw:frame draw:style-name="fr1" draw:name="cdk-live-announcer-0" text:anchor-type="char" svg:x="0in" svg:width="0.0161in" draw:z-index="7"><draw:text-box fo:min-height="0.0161in"><text:p text:style-name="Text_20_body"/></draw:text-box></draw:frame><text:span text:style-name="T96">Install docker compose 2.11</text:span><text:line-break/><text:span text:style-name="T37">mkdir -p ~/.docker/cli-plugins</text:span></text:p>
      <text:p text:style-name="P224"/>
      <text:p text:style-name="P119">curl -sSL https://github.com/docker/compose/releases/download/v2.11.0/docker-compose-linux-x86_64 -o ~/.docker/cli-plugins/docker-compose</text:p>
      <text:p text:style-name="P224"/>
      <text:p text:style-name="P119">chmod +x ~/.docker/cli-plugins/docker-compose</text:p>
      <text:p text:style-name="P224"/>
      <text:p text:style-name="P119">docker compose version</text:p>
      <text:p text:style-name="P119"># Docker Compose version v2.11.0</text:p>
      <text:p text:style-name="P224"/>
      <text:p text:style-name="P119"># This will let you run docker compose in the new form `docker compose .f compose.yaml up`</text:p>
      <text:p text:style-name="P224"/>
      <text:p text:style-name="P120"># References: https://www.rockyourcode.com/how-to-install-docker-compose-v2-on-linux-2021/</text:p>
      <text:p text:style-name="P101">Of course. Scaling your WebSocket-enabled backend is a classic challenge, and you've correctly identified the core issue. When you run multiple instances of your server, each instance manages its own set of WebSocket connections. A message sent to one server instance won't be seen by clients connected to other instances.</text:p>
      <text:h text:style-name="P108" text:outline-level="3">The Problem: Isolated Message Brokers</text:h>
      <text:p text:style-name="P98">By default, Spring's WebSocket support uses a simple, in-memory message broker. This broker is local to each of your backend instances.</text:p>
      <text:p text:style-name="P115">plaintext</text:p>
      <text:p text:style-name="P224"><text:span text:style-name="Source_20_Text"><text:span text:style-name="T20">Client A --ws--&gt; Backend 1 (In-Memory Broker 1)</text:span></text:span></text:p>
      <text:p text:style-name="P224"><text:span text:style-name="Source_20_Text"><text:span text:style-name="T20">Client B --ws--&gt; Backend 2 (In-Memory Broker 2)</text:span></text:span></text:p>
      <text:p text:style-name="P223"><text:span text:style-name="Source_20_Text"><text:span text:style-name="T20">Client C --ws--&gt; Backend 3 (In-Memory Broker 3)</text:span></text:span></text:p>
      <text:p text:style-name="P218"><text:span text:style-name="T16">If </text:span><text:span text:style-name="Source_20_Text"><text:span text:style-name="T24">Client B</text:span></text:span><text:span text:style-name="T16"> sends a message to </text:span><text:span text:style-name="Source_20_Text"><text:span text:style-name="T24">/app/send-log</text:span></text:span><text:span text:style-name="T16"> on </text:span><text:span text:style-name="Source_20_Text"><text:span text:style-name="T24">Backend 2</text:span></text:span><text:span text:style-name="T16">, </text:span><text:span text:style-name="Source_20_Text"><text:span text:style-name="T24">Backend 2</text:span></text:span><text:span text:style-name="T16"> will broadcast it to </text:span><text:span text:style-name="Source_20_Text"><text:span text:style-name="T24">/topic/logs</text:span></text:span><text:span text:style-name="T16">. However, only clients connected to </text:span><text:span text:style-name="Source_20_Text"><text:span text:style-name="T24">Backend 2</text:span></text:span><text:span text:style-name="T16"> will receive it. </text:span><text:span text:style-name="Source_20_Text"><text:span text:style-name="T24">Client A</text:span></text:span><text:span text:style-name="T16"> and </text:span><text:span text:style-name="Source_20_Text"><text:span text:style-name="T24">Client C</text:span></text:span><text:span text:style-name="T16"> will get nothing because their backends know nothing about the message.</text:span></text:p>
      <text:h text:style-name="P108" text:outline-level="3">The Solution: External STOMP Broker Relay</text:h>
      <text:p text:style-name="P218"><text:span text:style-name="T16">To solve this, you need to use an external message broker that all your backend instances can connect to. This creates a central hub for messages. When one backend instance receives a message to be broadcast, it sends it to the external broker, which then relays it to </text:span><text:span text:style-name="Emphasis"><text:span text:style-name="T16">all</text:span></text:span><text:span text:style-name="T16"> connected backend instances. Each backend instance then pushes the message to its own connected clients.</text:span></text:p>
      <text:p text:style-name="P98"><text:soft-page-break/>Since your project is already configured with RabbitMQ for handling employee updates, we can easily leverage it to also manage your WebSocket messages. We'll configure Spring to use RabbitMQ as a STOMP "broker relay".</text:p>
      <text:p text:style-name="P98">Here is the architecture we'll build:</text:p>
      <text:p text:style-name="P115">plaintext</text:p>
      <text:p text:style-name="P224"><text:span text:style-name="Source_20_Text"><text:span text:style-name="T22"><text:s text:c="11"/></text:span></text:span><text:span text:style-name="Source_20_Text"><text:span text:style-name="T20">+--------------------------------+</text:span></text:span></text:p>
      <text:p text:style-name="P224"><text:span text:style-name="Source_20_Text"><text:span text:style-name="T22"><text:s text:c="11"/></text:span></text:span><text:span text:style-name="Source_20_Text"><text:span text:style-name="T20">| <text:s text:c="7"/>RabbitMQ Broker <text:s text:c="8"/>|</text:span></text:span></text:p>
      <text:p text:style-name="P224"><text:span text:style-name="Source_20_Text"><text:span text:style-name="T22"><text:s text:c="11"/></text:span></text:span><text:span text:style-name="Source_20_Text"><text:span text:style-name="T20">+--------------------------------+</text:span></text:span></text:p>
      <text:p text:style-name="P224"><text:span text:style-name="Source_20_Text"><text:span text:style-name="T22"><text:s text:c="11"/></text:span></text:span><text:span text:style-name="Source_20_Text"><text:span text:style-name="T20">/ <text:s text:c="14"/>| <text:s text:c="15"/>\</text:span></text:span></text:p>
      <text:p text:style-name="P224"><text:span text:style-name="Source_20_Text"><text:span text:style-name="T20">STOMP over TCP <text:s text:c="3"/>STOMP over TCP <text:s text:c="4"/>STOMP over TCP</text:span></text:span></text:p>
      <text:p text:style-name="P224"><text:span text:style-name="Source_20_Text"><text:span text:style-name="T22"><text:s text:c="9"/></text:span></text:span><text:span text:style-name="Source_20_Text"><text:span text:style-name="T20">/ <text:s text:c="16"/>| <text:s text:c="17"/>\</text:span></text:span></text:p>
      <text:p text:style-name="P224"><text:span text:style-name="Source_20_Text"><text:span text:style-name="T20">+-----------+ <text:s text:c="6"/>+-----------+ <text:s text:c="7"/>+-----------+</text:span></text:span></text:p>
      <text:p text:style-name="P224"><text:span text:style-name="Source_20_Text"><text:span text:style-name="T20">| Backend 1 |&lt;-----&gt;| Backend 2 |&lt;------&gt;| Backend 3 |</text:span></text:span></text:p>
      <text:p text:style-name="P224"><text:span text:style-name="Source_20_Text"><text:span text:style-name="T20">+-----------+ <text:s text:c="6"/>+-----------+ <text:s text:c="7"/>+-----------+</text:span></text:span></text:p>
      <text:p text:style-name="P224"><text:span text:style-name="Source_20_Text"><text:span text:style-name="T22"><text:s text:c="6"/></text:span></text:span><text:span text:style-name="Source_20_Text"><text:span text:style-name="T20">^ <text:s text:c="18"/>^ <text:s text:c="19"/>^</text:span></text:span></text:p>
      <text:p text:style-name="P224"><text:span text:style-name="Source_20_Text"><text:span text:style-name="T22"><text:s text:c="6"/></text:span></text:span><text:span text:style-name="Source_20_Text"><text:span text:style-name="T20">| ws <text:s text:c="15"/>| ws <text:s text:c="16"/>| ws</text:span></text:span></text:p>
      <text:p text:style-name="P224"><text:span text:style-name="Source_20_Text"><text:span text:style-name="T20">+----------+ <text:s text:c="7"/>+----------+ <text:s text:c="8"/>+----------+</text:span></text:span></text:p>
      <text:p text:style-name="P224"><text:span text:style-name="Source_20_Text"><text:span text:style-name="T20">| Client A | <text:s text:c="7"/>| Client B | <text:s text:c="8"/>| Client C |</text:span></text:span></text:p>
      <text:p text:style-name="P223"><text:span text:style-name="Source_20_Text"><text:span text:style-name="T20">+----------+ <text:s text:c="7"/>+----------+ <text:s text:c="8"/>+----------+</text:span></text:span></text:p>
      <text:h text:style-name="P108" text:outline-level="3">Implementation Steps</text:h>
      <text:p text:style-name="P98">I'll create a new configuration file to enable the STOMP broker relay with RabbitMQ.</text:p>
      <text:h text:style-name="P220" text:outline-level="4"><text:span text:style-name="T16">1. Create </text:span><text:a xlink:type="simple" xlink:href="code-assist-path:/home/vj/Desktop/FINAL/datatables/myapp-mongo-server/src/main/java/com/angular/backend/config/WebSocketConfig.java" text:style-name="Internet_20_link" text:visited-style-name="Visited_20_Internet_20_Link"><text:span text:style-name="Source_20_Text"><text:span text:style-name="T28">WebSocketConfig.java</text:span></text:span></text:a></text:h>
      <text:p text:style-name="P98">This new configuration class will set up your WebSocket endpoints and configure the message broker to use RabbitMQ.</text:p>
      <text:p text:style-name="P114">New file: WebSocketConfig.java</text:p>
      <text:p text:style-name="P122">+40</text:p>
      <text:p text:style-name="P224"><text:span text:style-name="Source_20_Text"><text:span text:style-name="T33">package</text:span></text:span><text:span text:style-name="Source_20_Text"><text:span text:style-name="T20"> com.angular.backend.config;</text:span></text:span></text:p>
      <text:p text:style-name="P224"/>
      <text:p text:style-name="P224"><text:span text:style-name="Source_20_Text"><text:span text:style-name="T33">import</text:span></text:span><text:span text:style-name="Source_20_Text"><text:span text:style-name="T20"> org.springframework.context.annotation.Configuration;</text:span></text:span></text:p>
      <text:p text:style-name="P224"><text:span text:style-name="Source_20_Text"><text:span text:style-name="T33">import</text:span></text:span><text:span text:style-name="Source_20_Text"><text:span text:style-name="T20"> org.springframework.messaging.simp.config.MessageBrokerRegistry;</text:span></text:span></text:p>
      <text:p text:style-name="P224"><text:span text:style-name="Source_20_Text"><text:span text:style-name="T33">import</text:span></text:span><text:span text:style-name="Source_20_Text"><text:span text:style-name="T20"> org.springframework.web.socket.config.annotation.EnableWebSocketMessageBroker;</text:span></text:span></text:p>
      <text:p text:style-name="P224"><text:span text:style-name="Source_20_Text"><text:span text:style-name="T33">import</text:span></text:span><text:span text:style-name="Source_20_Text"><text:span text:style-name="T20"> org.springframework.web.socket.config.annotation.StompEndpointRegistry;</text:span></text:span></text:p>
      <text:p text:style-name="P224"><text:span text:style-name="Source_20_Text"><text:span text:style-name="T33">import</text:span></text:span><text:span text:style-name="Source_20_Text"><text:span text:style-name="T20"> org.springframework.web.socket.config.annotation.WebSocketMessageBrokerConfigurer;</text:span></text:span></text:p>
      <text:p text:style-name="P224"/>
      <text:p text:style-name="P224"><text:span text:style-name="Source_20_Text"><text:span text:style-name="T36">@Configuration</text:span></text:span></text:p>
      <text:p text:style-name="P224"><text:span text:style-name="Source_20_Text"><text:span text:style-name="T36">@EnableWebSocketMessageBroker</text:span></text:span></text:p>
      <text:p text:style-name="P224"><text:span text:style-name="Source_20_Text"><text:span text:style-name="T33">public</text:span></text:span><text:span text:style-name="Source_20_Text"><text:span text:style-name="T20"> </text:span></text:span><text:span text:style-name="Source_20_Text"><text:span text:style-name="T33">class</text:span></text:span><text:span text:style-name="Source_20_Text"><text:span text:style-name="T20"> </text:span></text:span><text:span text:style-name="Source_20_Text"><text:span text:style-name="T26">WebSocketConfig</text:span></text:span><text:span text:style-name="Source_20_Text"><text:span text:style-name="T20"> </text:span></text:span><text:span text:style-name="Source_20_Text"><text:span text:style-name="T33">implements</text:span></text:span><text:span text:style-name="Source_20_Text"><text:span text:style-name="T20"> </text:span></text:span><text:span text:style-name="Source_20_Text"><text:span text:style-name="T26">WebSocketMessageBrokerConfigurer</text:span></text:span><text:span text:style-name="Source_20_Text"><text:span text:style-name="T20"> {</text:span></text:span></text:p>
      <text:p text:style-name="P224"/>
      <text:p text:style-name="P224"><text:span text:style-name="Source_20_Text"><text:span text:style-name="T22"><text:s text:c="4"/></text:span></text:span><text:span text:style-name="Source_20_Text"><text:span text:style-name="T36">@Override</text:span></text:span></text:p>
      <text:p text:style-name="P224"><text:span text:style-name="Source_20_Text"><text:span text:style-name="T22"><text:s text:c="4"/></text:span></text:span><text:span text:style-name="Source_20_Text"><text:span text:style-name="T33">public</text:span></text:span><text:span text:style-name="Source_20_Text"><text:span text:style-name="T20"> </text:span></text:span><text:span text:style-name="Source_20_Text"><text:span text:style-name="T33">void</text:span></text:span><text:span text:style-name="Source_20_Text"><text:span text:style-name="T20"> </text:span></text:span><text:span text:style-name="Source_20_Text"><text:span text:style-name="T26">configureMessageBroker</text:span></text:span><text:span text:style-name="Source_20_Text"><text:span text:style-name="T20">(MessageBrokerRegistry config) {</text:span></text:span></text:p>
      <text:p text:style-name="P224"><text:span text:style-name="Source_20_Text"><text:span text:style-name="T22"><text:s text:c="8"/></text:span></text:span><text:span text:style-name="Source_20_Text"><text:span text:style-name="T30">// These are prefixes for messages that are bound for @MessageMapping-annotated methods.</text:span></text:span></text:p>
      <text:p text:style-name="P224"><text:span text:style-name="Source_20_Text"><text:span text:style-name="T22"><text:s text:c="8"/></text:span></text:span><text:span text:style-name="Source_20_Text"><text:span text:style-name="T30">// A client would send a message to a destination like "/app/send-log".</text:span></text:span></text:p>
      <text:p text:style-name="P224"><text:span text:style-name="Source_20_Text"><text:span text:style-name="T22"><text:s text:c="8"/></text:span></text:span><text:span text:style-name="Source_20_Text"><text:span text:style-name="T20">config.setApplicationDestinationPrefixes(</text:span></text:span><text:span text:style-name="Source_20_Text"><text:span text:style-name="T26">"/app"</text:span></text:span><text:span text:style-name="Source_20_Text"><text:span text:style-name="T20">);</text:span></text:span></text:p>
      <text:p text:style-name="P224"/>
      <text:p text:style-name="P224"><text:span text:style-name="Source_20_Text"><text:span text:style-name="T22"><text:s text:c="8"/></text:span></text:span><text:span text:style-name="Source_20_Text"><text:span text:style-name="T30">// Use the STOMP broker relay.</text:span></text:span></text:p>
      <text:p text:style-name="P224"><text:span text:style-name="Source_20_Text"><text:span text:style-name="T22"><text:s text:c="8"/></text:span></text:span><text:span text:style-name="Source_20_Text"><text:span text:style-name="T30">// This configures a broker relay that connects to an external STOMP broker (RabbitMQ).</text:span></text:span></text:p>
      <text:p text:style-name="P224"><text:span text:style-name="Source_20_Text"><text:span text:style-name="T22"><text:s text:c="8"/></text:span></text:span><text:span text:style-name="Source_20_Text"><text:span text:style-name="T30">// It will forward messages to the broker for destinations prefixed with "/topic".</text:span></text:span></text:p>
      <text:p text:style-name="P224"><text:span text:style-name="Source_20_Text"><text:span text:style-name="T22"><text:s text:c="8"/></text:span></text:span><text:span text:style-name="Source_20_Text"><text:span text:style-name="T20">config.enableStompBrokerRelay(</text:span></text:span><text:span text:style-name="Source_20_Text"><text:span text:style-name="T26">"/topic"</text:span></text:span><text:span text:style-name="Source_20_Text"><text:span text:style-name="T20">)</text:span></text:span></text:p>
      <text:p text:style-name="P224"><text:span text:style-name="Source_20_Text"><text:span text:style-name="T22"><text:s text:c="16"/></text:span></text:span><text:span text:style-name="Source_20_Text"><text:span text:style-name="T30">// Default RabbitMQ STOMP port is 61613</text:span></text:span></text:p>
      <text:p text:style-name="P224"><text:span text:style-name="Source_20_Text"><text:span text:style-name="T22"><text:s text:c="16"/></text:span></text:span><text:span text:style-name="Source_20_Text"><text:span text:style-name="T20">.setRelayHost(</text:span></text:span><text:span text:style-name="Source_20_Text"><text:span text:style-name="T26">"localhost"</text:span></text:span><text:span text:style-name="Source_20_Text"><text:span text:style-name="T20">)</text:span></text:span></text:p>
      <text:p text:style-name="P224"><text:span text:style-name="Source_20_Text"><text:span text:style-name="T22"><text:s text:c="16"/></text:span></text:span><text:span text:style-name="Source_20_Text"><text:span text:style-name="T20">.setRelayPort(61613)</text:span></text:span></text:p>
      <text:p text:style-name="P224"><text:span text:style-name="Source_20_Text"><text:span text:style-name="T22"><text:s text:c="16"/></text:span></text:span><text:span text:style-name="Source_20_Text"><text:span text:style-name="T30">// Default guest credentials</text:span></text:span></text:p>
      <text:p text:style-name="P224"><text:span text:style-name="Source_20_Text"><text:span text:style-name="T22"><text:s text:c="16"/></text:span></text:span><text:span text:style-name="Source_20_Text"><text:span text:style-name="T20">.setClientLogin(</text:span></text:span><text:span text:style-name="Source_20_Text"><text:span text:style-name="T26">"guest"</text:span></text:span><text:span text:style-name="Source_20_Text"><text:span text:style-name="T20">)</text:span></text:span></text:p>
      <text:p text:style-name="P224"><text:span text:style-name="Source_20_Text"><text:span text:style-name="T22"><text:s text:c="16"/></text:span></text:span><text:span text:style-name="Source_20_Text"><text:span text:style-name="T20">.setClientPassword(</text:span></text:span><text:span text:style-name="Source_20_Text"><text:span text:style-name="T26">"guest"</text:span></text:span><text:span text:style-name="Source_20_Text"><text:span text:style-name="T20">);</text:span></text:span></text:p>
      <text:p text:style-name="P224"><text:span text:style-name="Source_20_Text"><text:span text:style-name="T22"><text:s text:c="4"/></text:span></text:span><text:span text:style-name="Source_20_Text"><text:span text:style-name="T20">}</text:span></text:span></text:p>
      <text:p text:style-name="P224"/>
      <text:p text:style-name="P224"><text:span text:style-name="Source_20_Text"><text:span text:style-name="T22"><text:s text:c="4"/></text:span></text:span><text:span text:style-name="Source_20_Text"><text:span text:style-name="T36">@Override</text:span></text:span></text:p>
      <text:p text:style-name="P224"><text:span text:style-name="Source_20_Text"><text:span text:style-name="T22"><text:s text:c="4"/></text:span></text:span><text:span text:style-name="Source_20_Text"><text:span text:style-name="T33">public</text:span></text:span><text:span text:style-name="Source_20_Text"><text:span text:style-name="T20"> </text:span></text:span><text:span text:style-name="Source_20_Text"><text:span text:style-name="T33">void</text:span></text:span><text:span text:style-name="Source_20_Text"><text:span text:style-name="T20"> </text:span></text:span><text:span text:style-name="Source_20_Text"><text:span text:style-name="T26">registerStompEndpoints</text:span></text:span><text:span text:style-name="Source_20_Text"><text:span text:style-name="T20">(StompEndpointRegistry registry) {</text:span></text:span></text:p>
      <text:p text:style-name="P224"><text:span text:style-name="Source_20_Text"><text:span text:style-name="T22"><text:s text:c="8"/></text:span></text:span><text:span text:style-name="Source_20_Text"><text:span text:style-name="T30">// This registers the "/ws" endpoint, enabling SockJS fallback options so that a</text:span></text:span></text:p>
      <text:p text:style-name="P224"><text:span text:style-name="Source_20_Text"><text:span text:style-name="T22"><text:s text:c="8"/></text:span></text:span><text:span text:style-name="Source_20_Text"><text:span text:style-name="T30">// WebSocket-like connection can be used even if the browser doesn't support it.</text:span></text:span></text:p>
      <text:p text:style-name="P224"><text:span text:style-name="Source_20_Text"><text:span text:style-name="T22"><text:s text:c="8"/></text:span></text:span><text:span text:style-name="Source_20_Text"><text:span text:style-name="T30">// SockJS is recommended for broader browser compatibility.</text:span></text:span></text:p>
      <text:p text:style-name="P224"><text:span text:style-name="Source_20_Text"><text:span text:style-name="T22"><text:s text:c="8"/></text:span></text:span><text:span text:style-name="Source_20_Text"><text:span text:style-name="T20">registry.addEndpoint(</text:span></text:span><text:span text:style-name="Source_20_Text"><text:span text:style-name="T26">"/ws"</text:span></text:span><text:span text:style-name="Source_20_Text"><text:span text:style-name="T20">)</text:span></text:span></text:p>
      <text:p text:style-name="P224"><text:span text:style-name="Source_20_Text"><text:span text:style-name="T22"><text:s text:c="16"/></text:span></text:span><text:span text:style-name="Source_20_Text"><text:span text:style-name="T20">.setAllowedOriginPatterns(</text:span></text:span><text:span text:style-name="Source_20_Text"><text:span text:style-name="T26">"*"</text:span></text:span><text:span text:style-name="Source_20_Text"><text:span text:style-name="T20">) </text:span></text:span><text:span text:style-name="Source_20_Text"><text:span text:style-name="T30">// Allow all origins for development</text:span></text:span></text:p>
      <text:p text:style-name="P224"><text:span text:style-name="Source_20_Text"><text:span text:style-name="T22"><text:s text:c="16"/></text:span></text:span><text:span text:style-name="Source_20_Text"><text:span text:style-name="T20">.withSockJS();</text:span></text:span></text:p>
      <text:p text:style-name="P224"><text:soft-page-break/><text:span text:style-name="Source_20_Text"><text:span text:style-name="T22"><text:s text:c="4"/></text:span></text:span><text:span text:style-name="Source_20_Text"><text:span text:style-name="T20">}</text:span></text:span></text:p>
      <text:p text:style-name="P224"><text:span text:style-name="Source_20_Text"><text:span text:style-name="T20">}</text:span></text:span></text:p>
      <text:p text:style-name="P223"/>
      <text:h text:style-name="P97" text:outline-level="4">2. Ensure RabbitMQ STOMP Plugin is Enabled</text:h>
      <text:p text:style-name="P98">For this to work, your RabbitMQ instance must have the STOMP plugin enabled. If you are using Docker for RabbitMQ, you can often use an image with management tools, which usually includes the STOMP plugin.</text:p>
      <text:p text:style-name="P98">If you need to enable it manually, you can run this command on your RabbitMQ server:</text:p>
      <text:p text:style-name="P115">sh</text:p>
      <text:p text:style-name="P223"><text:span text:style-name="Source_20_Text"><text:span text:style-name="T20">rabbitmq-plugins </text:span></text:span><text:span text:style-name="Source_20_Text"><text:span text:style-name="T33">enable</text:span></text:span><text:span text:style-name="Source_20_Text"><text:span text:style-name="T20"> rabbitmq_stomp</text:span></text:span></text:p>
      <text:p text:style-name="P218"><text:span text:style-name="T16">This will make RabbitMQ listen for STOMP connections on port </text:span><text:span text:style-name="Source_20_Text"><text:span text:style-name="T24">61613</text:span></text:span><text:span text:style-name="T16">.</text:span></text:p>
      <text:h text:style-name="P108" text:outline-level="3">How It Works Now</text:h>
      <text:list text:style-name="L20">
        <text:list-item>
          <text:p text:style-name="P298"><text:span text:style-name="Strong_20_Emphasis"><text:span text:style-name="T16">Client Connection</text:span></text:span><text:span text:style-name="T16">: Your Angular client connects to </text:span><text:span text:style-name="Source_20_Text"><text:span text:style-name="T24">http://&lt;your-load-balancer&gt;/ws</text:span></text:span><text:span text:style-name="T16">. The load balancer routes this to one of the backend instances (e.g., </text:span><text:span text:style-name="Source_20_Text"><text:span text:style-name="T24">Backend 2</text:span></text:span><text:span text:style-name="T16">). A WebSocket (or SockJS) connection is established.</text:span></text:p>
        </text:list-item>
        <text:list-item>
          <text:p text:style-name="P298"><text:span text:style-name="Strong_20_Emphasis"><text:span text:style-name="T16">Client Subscription</text:span></text:span><text:span text:style-name="T16">: The client subscribes to the </text:span><text:span text:style-name="Source_20_Text"><text:span text:style-name="T24">/topic/logs</text:span></text:span><text:span text:style-name="T16"> destination. </text:span><text:span text:style-name="Source_20_Text"><text:span text:style-name="T24">Backend 2</text:span></text:span><text:span text:style-name="T16"> sees this subscription and, because it's a </text:span><text:span text:style-name="Source_20_Text"><text:span text:style-name="T24">/topic</text:span></text:span><text:span text:style-name="T16"> prefix, it establishes a connection to the RabbitMQ broker and subscribes to the </text:span><text:span text:style-name="Source_20_Text"><text:span text:style-name="T24">/topic/logs</text:span></text:span><text:span text:style-name="T16"> queue on behalf of the client. All other backend instances do the same for their connected clients.</text:span></text:p>
        </text:list-item>
        <text:list-item>
          <text:p text:style-name="P298"><text:span text:style-name="Strong_20_Emphasis"><text:span text:style-name="T16">Sending a Message</text:span></text:span><text:span text:style-name="T16">: A client sends a message to </text:span><text:span text:style-name="Source_20_Text"><text:span text:style-name="T24">/app/send-log</text:span></text:span><text:span text:style-name="T16">. The load balancer routes it to any instance, say </text:span><text:span text:style-name="Source_20_Text"><text:span text:style-name="T24">Backend 1</text:span></text:span><text:span text:style-name="T16">.</text:span></text:p>
        </text:list-item>
        <text:list-item>
          <text:p text:style-name="P298"><text:span text:style-name="Strong_20_Emphasis"><text:span text:style-name="T16">Server Handling</text:span></text:span><text:span text:style-name="T16">: </text:span><text:span text:style-name="Source_20_Text"><text:span text:style-name="T24">Backend 1</text:span></text:span><text:span text:style-name="T16">'s </text:span><text:span text:style-name="Source_20_Text"><text:span text:style-name="T24">LogController</text:span></text:span><text:span text:style-name="T16"> handles the message. It returns the message, which Spring automatically sends to the </text:span><text:span text:style-name="Source_20_Text"><text:span text:style-name="T24">/topic/logs</text:span></text:span><text:span text:style-name="T16"> destination.</text:span></text:p>
        </text:list-item>
        <text:list-item>
          <text:p text:style-name="P298"><text:span text:style-name="Strong_20_Emphasis"><text:span text:style-name="T16">Broker Relay</text:span></text:span><text:span text:style-name="T16">: Because </text:span><text:span text:style-name="Source_20_Text"><text:span text:style-name="T24">/topic/logs</text:span></text:span><text:span text:style-name="T16"> is configured for the broker relay, </text:span><text:span text:style-name="Source_20_Text"><text:span text:style-name="T24">Backend 1</text:span></text:span><text:span text:style-name="T16"> sends this message to the RabbitMQ broker.</text:span></text:p>
        </text:list-item>
        <text:list-item>
          <text:p text:style-name="P298"><text:span text:style-name="Strong_20_Emphasis"><text:span text:style-name="T16">Broadcasting</text:span></text:span><text:span text:style-name="T16">: RabbitMQ receives the message on the </text:span><text:span text:style-name="Source_20_Text"><text:span text:style-name="T24">/topic/logs</text:span></text:span><text:span text:style-name="T16"> exchange and broadcasts it to all backend instances that have subscriptions for that topic (</text:span><text:span text:style-name="Source_20_Text"><text:span text:style-name="T24">Backend 1</text:span></text:span><text:span text:style-name="T16">, </text:span><text:span text:style-name="Source_20_Text"><text:span text:style-name="T24">Backend 2</text:span></text:span><text:span text:style-name="T16">, and </text:span><text:span text:style-name="Source_20_Text"><text:span text:style-name="T24">Backend 3</text:span></text:span><text:span text:style-name="T16">).</text:span></text:p>
        </text:list-item>
        <text:list-item>
          <text:p text:style-name="P299"><text:span text:style-name="Strong_20_Emphasis"><text:span text:style-name="T16">Client Delivery</text:span></text:span><text:span text:style-name="T16">: Each backend instance receives the message from RabbitMQ and sends it down the appropriate WebSocket connection to its subscribed clients.</text:span></text:p>
        </text:list-item>
      </text:list>
      <text:p text:style-name="P218"><text:span text:style-name="T16">Now, </text:span><text:span text:style-name="Source_20_Text"><text:span text:style-name="T24">Client A</text:span></text:span><text:span text:style-name="T16">, </text:span><text:span text:style-name="Source_20_Text"><text:span text:style-name="T24">Client B</text:span></text:span><text:span text:style-name="T16">, and </text:span><text:span text:style-name="Source_20_Text"><text:span text:style-name="T24">Client C</text:span></text:span><text:span text:style-name="T16"> will all receive the log message, regardless of which backend instance they are connected to or which instance originally processed the message. Your WebSocket communication is now successfully scaled!</text:span></text:p>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74">Rabbitmq STOMP configuration <text:span text:style-name="T103">via docker desktop</text:span></text:p>
      <text:p text:style-name="P228"># rabbitmq-plugins enable rabbitmq_stomp <text:s text:c="67"/></text:p>
      <text:p text:style-name="P228">Enabling plugins on node rabbit@add9ecb37d37:</text:p>
      <text:p text:style-name="P228">rabbitmq_stomp</text:p>
      <text:p text:style-name="P228">The following plugins have been configured:</text:p>
      <text:p text:style-name="P228"><text:s text:c="2"/>rabbitmq_management</text:p>
      <text:p text:style-name="P228"><text:soft-page-break/><text:s text:c="2"/>rabbitmq_management_agent</text:p>
      <text:p text:style-name="P228"><text:s text:c="2"/>rabbitmq_prometheus</text:p>
      <text:p text:style-name="P228"><text:s text:c="2"/>rabbitmq_stomp</text:p>
      <text:p text:style-name="P228"><text:s text:c="2"/>rabbitmq_web_dispatch</text:p>
      <text:p text:style-name="P228">Applying plugin configuration to rabbit@add9ecb37d37...</text:p>
      <text:p text:style-name="P228">The following plugins have been enabled:</text:p>
      <text:p text:style-name="P228"><text:s text:c="2"/>rabbitmq_stomp</text:p>
      <text:p text:style-name="P228"/>
      <text:p text:style-name="P228">started 1 plugins.</text:p>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text:span text:style-name="T16">Of course! Hardcoding configuration values like hostnames and credentials directly in your Java code is not ideal for production environments. It's much better to externalize them into your </text:span><text:a xlink:type="simple" xlink:href="code-assist-path:/home/vj/Desktop/FINAL/datatables/myapp-jpa-server/target/classes/application.properties" text:style-name="Internet_20_link" text:visited-style-name="Visited_20_Internet_20_Link"><text:span text:style-name="Source_20_Text"><text:span text:style-name="T28">application.properties</text:span></text:span></text:a><text:span text:style-name="T16"> file. This allows you to change the configuration for different environments (development, staging, production) without rebuilding your application.</text:span></text:p>
      <text:p text:style-name="P218"><text:span text:style-name="T16">Here’s how you can configure the RabbitMQ connection details using </text:span><text:a xlink:type="simple" xlink:href="code-assist-path:/home/vj/Desktop/FINAL/datatables/myapp-jpa-server/target/classes/application.properties" text:style-name="Internet_20_link" text:visited-style-name="Visited_20_Internet_20_Link"><text:span text:style-name="Source_20_Text"><text:span text:style-name="T28">application.properties</text:span></text:span></text:a><text:span text:style-name="T16">.</text:span></text:p>
      <text:h text:style-name="P108" text:outline-level="3">Which Port to Use?</text:h>
      <text:p text:style-name="P98">You should use the port that RabbitMQ exposes for the STOMP protocol.</text:p>
      <text:list text:style-name="L21">
        <text:list-item>
          <text:p text:style-name="P300"><text:span text:style-name="Strong_20_Emphasis"><text:span text:style-name="T16">Default STOMP Port: </text:span></text:span><text:span text:style-name="Strong_20_Emphasis"><text:span text:style-name="Source_20_Text"><text:span text:style-name="T24">61613</text:span></text:span></text:span></text:p>
        </text:list-item>
      </text:list>
      <text:p text:style-name="P218"><text:soft-page-break/><text:span text:style-name="T16">This is the standard, unencrypted port for STOMP connections. For this to work, you must have the </text:span><text:span text:style-name="Source_20_Text"><text:span text:style-name="T24">rabbitmq_stomp</text:span></text:span><text:span text:style-name="T16"> plugin enabled on your RabbitMQ server. You can enable it with the command: </text:span><text:span text:style-name="Source_20_Text"><text:span text:style-name="T24">rabbitmq-plugins enable rabbitmq_stomp</text:span></text:span><text:span text:style-name="T16">.</text:span></text:p>
      <text:h text:style-name="P219" text:outline-level="3"><text:span text:style-name="T19">Step 1: Add Configuration to </text:span><text:a xlink:type="simple" xlink:href="code-assist-path:/home/vj/Desktop/FINAL/datatables/myapp-jpa-server/target/classes/application.properties" text:style-name="Internet_20_link" text:visited-style-name="Visited_20_Internet_20_Link"><text:span text:style-name="Source_20_Text"><text:span text:style-name="T28">application.properties</text:span></text:span></text:a></text:h>
      <text:p text:style-name="P218"><text:span text:style-name="T16">First, let's define the properties for the STOMP relay in your </text:span><text:span text:style-name="Source_20_Text"><text:span text:style-name="T24">src/main/resources/application.properties</text:span></text:span><text:span text:style-name="T16"> file. Using a custom prefix like </text:span><text:span text:style-name="Source_20_Text"><text:span text:style-name="T24">stomp.relay</text:span></text:span><text:span text:style-name="T16"> keeps these settings nicely organized.</text:span></text:p>
      <text:p text:style-name="P115">properties</text:p>
      <text:p text:style-name="P224"><text:span text:style-name="Source_20_Text"><text:span text:style-name="T30"># ===============================================</text:span></text:span></text:p>
      <text:p text:style-name="P224"><text:span text:style-name="Source_20_Text"><text:span text:style-name="T30"># STOMP Broker Relay (RabbitMQ) Configuration</text:span></text:span></text:p>
      <text:p text:style-name="P224"><text:span text:style-name="Source_20_Text"><text:span text:style-name="T30"># ===============================================</text:span></text:span></text:p>
      <text:p text:style-name="P224"><text:span text:style-name="Source_20_Text"><text:span text:style-name="T36">stomp.relay.host</text:span></text:span><text:span text:style-name="Source_20_Text"><text:span text:style-name="T20">=</text:span></text:span><text:span text:style-name="Source_20_Text"><text:span text:style-name="T26">localhost</text:span></text:span></text:p>
      <text:p text:style-name="P224"><text:span text:style-name="Source_20_Text"><text:span text:style-name="T36">stomp.relay.port</text:span></text:span><text:span text:style-name="Source_20_Text"><text:span text:style-name="T20">=</text:span></text:span><text:span text:style-name="Source_20_Text"><text:span text:style-name="T26">61613</text:span></text:span></text:p>
      <text:p text:style-name="P224"><text:span text:style-name="Source_20_Text"><text:span text:style-name="T26"/></text:span></text:p>
      <text:p text:style-name="P224"><text:span text:style-name="Source_20_Text"><text:span text:style-name="T26"/></text:span></text:p>
      <text:p text:style-name="P224"><text:span text:style-name="Source_20_Text"><text:span text:style-name="T36">stomp.relay.username</text:span></text:span><text:span text:style-name="Source_20_Text"><text:span text:style-name="T20">=</text:span></text:span><text:span text:style-name="Source_20_Text"><text:span text:style-name="T26">guest</text:span></text:span></text:p>
      <text:p text:style-name="P223"><text:span text:style-name="Source_20_Text"><text:span text:style-name="T36">stomp.relay.password</text:span></text:span><text:span text:style-name="Source_20_Text"><text:span text:style-name="T20">=</text:span></text:span><text:span text:style-name="Source_20_Text"><text:span text:style-name="T26">guest</text:span></text:span></text:p>
      <text:list text:style-name="L22">
        <text:list-item>
          <text:p text:style-name="P301"><text:span text:style-name="Source_20_Text"><text:span text:style-name="T24">stomp.relay.host</text:span></text:span><text:span text:style-name="T16">: The hostname or IP address of your RabbitMQ server. For Docker, this might be </text:span><text:span text:style-name="Source_20_Text"><text:span text:style-name="T24">rabbitmq</text:span></text:span><text:span text:style-name="T16"> if they are on the same Docker network, or </text:span><text:span text:style-name="Source_20_Text"><text:span text:style-name="T24">localhost</text:span></text:span><text:span text:style-name="T16"> if you're running it locally.</text:span></text:p>
        </text:list-item>
        <text:list-item>
          <text:p text:style-name="P301"><text:span text:style-name="Source_20_Text"><text:span text:style-name="T24">stomp.relay.port</text:span></text:span><text:span text:style-name="T16">: The STOMP port, which is </text:span><text:span text:style-name="Source_20_Text"><text:span text:style-name="T24">61613</text:span></text:span><text:span text:style-name="T16"> by default.</text:span></text:p>
        </text:list-item>
        <text:list-item>
          <text:p text:style-name="P302"><text:span text:style-name="Source_20_Text"><text:span text:style-name="T24">stomp.relay.username</text:span></text:span><text:span text:style-name="T16"> &amp; </text:span><text:span text:style-name="Source_20_Text"><text:span text:style-name="T24">stomp.relay.password</text:span></text:span><text:span text:style-name="T16">: The credentials for connecting to RabbitMQ. The default is </text:span><text:span text:style-name="Source_20_Text"><text:span text:style-name="T24">guest</text:span></text:span><text:span text:style-name="T16">/</text:span><text:span text:style-name="Source_20_Text"><text:span text:style-name="T24">guest</text:span></text:span><text:span text:style-name="T16">.</text:span></text:p>
        </text:list-item>
      </text:list>
      <text:h text:style-name="P219" text:outline-level="3"><text:span text:style-name="T19">Step 2: Update </text:span><text:a xlink:type="simple" xlink:href="code-assist-path:/home/vj/Desktop/FINAL/datatables/myapp-jpa-server/src/main/java/com/angular/backend/config/WebSocketConfig.java" text:style-name="Internet_20_link" text:visited-style-name="Visited_20_Internet_20_Link"><text:span text:style-name="Source_20_Text"><text:span text:style-name="T28">WebSocketConfig.java</text:span></text:span></text:a><text:span text:style-name="T19"> to Use Properties</text:span></text:h>
      <text:p text:style-name="P218"><text:span text:style-name="T16">Now, we'll modify </text:span><text:a xlink:type="simple" xlink:href="code-assist-path:/home/vj/Desktop/FINAL/datatables/myapp-jpa-server/src/main/java/com/angular/backend/config/WebSocketConfig.java" text:style-name="Internet_20_link" text:visited-style-name="Visited_20_Internet_20_Link"><text:span text:style-name="Source_20_Text"><text:span text:style-name="T28">WebSocketConfig.java</text:span></text:span></text:a><text:span text:style-name="T16"> to read these values from the properties file using Spring's </text:span><text:span text:style-name="Source_20_Text"><text:span text:style-name="T24">@Value</text:span></text:span><text:span text:style-name="T16"> annotation. This injects the property values directly into your configuration class.</text:span></text:p>
      <text:p text:style-name="P218"><text:span text:style-name="T16">Here are the required changes for </text:span><text:a xlink:type="simple" xlink:href="code-assist-path:/home/vj/Desktop/FINAL/datatables/myapp-jpa-server/src/main/java/com/angular/backend/config/WebSocketConfig.java" text:style-name="Internet_20_link" text:visited-style-name="Visited_20_Internet_20_Link"><text:span text:style-name="Source_20_Text"><text:span text:style-name="T28">/home/vj/Desktop/FINAL/datatables/myapp-jpa-server/src/main/java/com/angular/backend/config/WebSocketConfig.java</text:span></text:span></text:a><text:span text:style-name="T16">:</text:span></text:p>
      <text:p text:style-name="P114">WebSocketConfig.java</text:p>
      <text:p text:style-name="P116"><text:span text:style-name="T92">-6</text:span><text:span text:style-name="T93">+17</text:span></text:p>
      <text:p text:style-name="P224"><text:span text:style-name="Source_20_Text"><text:span text:style-name="T33">package</text:span></text:span><text:span text:style-name="Source_20_Text"><text:span text:style-name="T20"> com.angular.backend.config;</text:span></text:span></text:p>
      <text:p text:style-name="P224"/>
      <text:p text:style-name="P224"><text:span text:style-name="Source_20_Text"><text:span text:style-name="T33">import</text:span></text:span><text:span text:style-name="Source_20_Text"><text:span text:style-name="T20"> org.springframework.beans.factory.annotation.Value;</text:span></text:span></text:p>
      <text:p text:style-name="P224"><text:span text:style-name="Source_20_Text"><text:span text:style-name="T33">import</text:span></text:span><text:span text:style-name="Source_20_Text"><text:span text:style-name="T20"> org.springframework.context.annotation.Configuration;</text:span></text:span></text:p>
      <text:p text:style-name="P224"><text:span text:style-name="Source_20_Text"><text:span text:style-name="T33">import</text:span></text:span><text:span text:style-name="Source_20_Text"><text:span text:style-name="T20"> org.springframework.messaging.simp.config.MessageBrokerRegistry;</text:span></text:span></text:p>
      <text:p text:style-name="P224"><text:span text:style-name="Source_20_Text"><text:span text:style-name="T33">import</text:span></text:span><text:span text:style-name="Source_20_Text"><text:span text:style-name="T20"> org.springframework.web.socket.config.annotation.EnableWebSocketMessageBroker;</text:span></text:span></text:p>
      <text:p text:style-name="P224"><text:span text:style-name="Source_20_Text"><text:span text:style-name="T36">@EnableWebSocketMessageBroker</text:span></text:span></text:p>
      <text:p text:style-name="P224"><text:span text:style-name="Source_20_Text"><text:span text:style-name="T33">public</text:span></text:span><text:span text:style-name="Source_20_Text"><text:span text:style-name="T20"> </text:span></text:span><text:span text:style-name="Source_20_Text"><text:span text:style-name="T33">class</text:span></text:span><text:span text:style-name="Source_20_Text"><text:span text:style-name="T20"> </text:span></text:span><text:span text:style-name="Source_20_Text"><text:span text:style-name="T26">WebSocketConfig</text:span></text:span><text:span text:style-name="Source_20_Text"><text:span text:style-name="T20"> </text:span></text:span><text:span text:style-name="Source_20_Text"><text:span text:style-name="T33">implements</text:span></text:span><text:span text:style-name="Source_20_Text"><text:span text:style-name="T20"> </text:span></text:span><text:span text:style-name="Source_20_Text"><text:span text:style-name="T26">WebSocketMessageBrokerConfigurer</text:span></text:span><text:span text:style-name="Source_20_Text"><text:span text:style-name="T20"> {</text:span></text:span></text:p>
      <text:p text:style-name="P224"/>
      <text:p text:style-name="P224"><text:span text:style-name="Source_20_Text"><text:span text:style-name="T22"><text:s text:c="4"/></text:span></text:span><text:span text:style-name="Source_20_Text"><text:span text:style-name="T36">@Value("${stomp.relay.host}")</text:span></text:span></text:p>
      <text:p text:style-name="P224"><text:span text:style-name="Source_20_Text"><text:span text:style-name="T22"><text:s text:c="4"/></text:span></text:span><text:span text:style-name="Source_20_Text"><text:span text:style-name="T33">private</text:span></text:span><text:span text:style-name="Source_20_Text"><text:span text:style-name="T20"> String relayHost;</text:span></text:span></text:p>
      <text:p text:style-name="P224"/>
      <text:p text:style-name="P224"><text:span text:style-name="Source_20_Text"><text:span text:style-name="T22"><text:s text:c="4"/></text:span></text:span><text:span text:style-name="Source_20_Text"><text:span text:style-name="T36">@Value("${stomp.relay.port}")</text:span></text:span></text:p>
      <text:p text:style-name="P224"><text:span text:style-name="Source_20_Text"><text:span text:style-name="T22"><text:s text:c="4"/></text:span></text:span><text:span text:style-name="Source_20_Text"><text:span text:style-name="T33">private</text:span></text:span><text:span text:style-name="Source_20_Text"><text:span text:style-name="T20"> </text:span></text:span><text:span text:style-name="Source_20_Text"><text:span text:style-name="T33">int</text:span></text:span><text:span text:style-name="Source_20_Text"><text:span text:style-name="T20"> relayPort;</text:span></text:span></text:p>
      <text:p text:style-name="P224"/>
      <text:p text:style-name="P224"><text:span text:style-name="Source_20_Text"><text:span text:style-name="T22"><text:s text:c="4"/></text:span></text:span><text:span text:style-name="Source_20_Text"><text:span text:style-name="T36">@Value("${stomp.relay.username}")</text:span></text:span></text:p>
      <text:p text:style-name="P224"><text:span text:style-name="Source_20_Text"><text:span text:style-name="T22"><text:s text:c="4"/></text:span></text:span><text:span text:style-name="Source_20_Text"><text:span text:style-name="T33">private</text:span></text:span><text:span text:style-name="Source_20_Text"><text:span text:style-name="T20"> String clientLogin;</text:span></text:span></text:p>
      <text:p text:style-name="P224"/>
      <text:p text:style-name="P224"><text:span text:style-name="Source_20_Text"><text:span text:style-name="T22"><text:s text:c="4"/></text:span></text:span><text:span text:style-name="Source_20_Text"><text:span text:style-name="T36">@Value("${stomp.relay.password}")</text:span></text:span></text:p>
      <text:p text:style-name="P224"><text:span text:style-name="Source_20_Text"><text:span text:style-name="T22"><text:s text:c="4"/></text:span></text:span><text:span text:style-name="Source_20_Text"><text:span text:style-name="T33">private</text:span></text:span><text:span text:style-name="Source_20_Text"><text:span text:style-name="T20"> String clientPasscode;</text:span></text:span></text:p>
      <text:p text:style-name="P224"/>
      <text:p text:style-name="P224"><text:span text:style-name="Source_20_Text"><text:span text:style-name="T22"><text:s text:c="4"/></text:span></text:span><text:span text:style-name="Source_20_Text"><text:span text:style-name="T36">@Override</text:span></text:span></text:p>
      <text:p text:style-name="P224"><text:span text:style-name="Source_20_Text"><text:span text:style-name="T22"><text:s text:c="4"/></text:span></text:span><text:span text:style-name="Source_20_Text"><text:span text:style-name="T33">public</text:span></text:span><text:span text:style-name="Source_20_Text"><text:span text:style-name="T20"> </text:span></text:span><text:span text:style-name="Source_20_Text"><text:span text:style-name="T33">void</text:span></text:span><text:span text:style-name="Source_20_Text"><text:span text:style-name="T20"> </text:span></text:span><text:span text:style-name="Source_20_Text"><text:span text:style-name="T26">configureMessageBroker</text:span></text:span><text:span text:style-name="Source_20_Text"><text:span text:style-name="T20">(MessageBrokerRegistry config) {</text:span></text:span></text:p>
      <text:p text:style-name="P224"><text:span text:style-name="Source_20_Text"><text:span text:style-name="T22"><text:s text:c="8"/></text:span></text:span><text:span text:style-name="Source_20_Text"><text:span text:style-name="T30">// These are prefixes for messages that are bound for @MessageMapping-annotated methods.</text:span></text:span></text:p>
      <text:p text:style-name="P224"><text:span text:style-name="Source_20_Text"><text:span text:style-name="T22"><text:s text:c="8"/></text:span></text:span><text:span text:style-name="Source_20_Text"><text:span text:style-name="T30">// This configures a broker relay that connects to an external STOMP broker (RabbitMQ).</text:span></text:span></text:p>
      <text:p text:style-name="P224"><text:span text:style-name="Source_20_Text"><text:span text:style-name="T22"><text:s text:c="8"/></text:span></text:span><text:span text:style-name="Source_20_Text"><text:span text:style-name="T30">// It will forward messages to the broker for destinations prefixed with "/topic".</text:span></text:span></text:p>
      <text:p text:style-name="P224"><text:span text:style-name="Source_20_Text"><text:span text:style-name="T22"><text:s text:c="8"/></text:span></text:span><text:span text:style-name="Source_20_Text"><text:span text:style-name="T20">config.enableStompBrokerRelay(</text:span></text:span><text:span text:style-name="Source_20_Text"><text:span text:style-name="T26">"/topic"</text:span></text:span><text:span text:style-name="Source_20_Text"><text:span text:style-name="T20">)</text:span></text:span></text:p>
      <text:p text:style-name="P224"><text:span text:style-name="Source_20_Text"><text:span text:style-name="T22"><text:s text:c="16"/></text:span></text:span><text:span text:style-name="Source_20_Text"><text:span text:style-name="T30">// Default RabbitMQ STOMP port is 61613</text:span></text:span></text:p>
      <text:p text:style-name="P224"><text:span text:style-name="Source_20_Text"><text:span text:style-name="T22"><text:s text:c="16"/></text:span></text:span><text:span text:style-name="Source_20_Text"><text:span text:style-name="T20">.setRelayHost(</text:span></text:span><text:span text:style-name="Source_20_Text"><text:span text:style-name="T26">"localhost"</text:span></text:span><text:span text:style-name="Source_20_Text"><text:span text:style-name="T20">)</text:span></text:span></text:p>
      <text:p text:style-name="P224"><text:span text:style-name="Source_20_Text"><text:span text:style-name="T22"><text:s text:c="16"/></text:span></text:span><text:span text:style-name="Source_20_Text"><text:span text:style-name="T20">.setRelayPort(61613)</text:span></text:span></text:p>
      <text:p text:style-name="P224"><text:span text:style-name="Source_20_Text"><text:span text:style-name="T22"><text:s text:c="16"/></text:span></text:span><text:span text:style-name="Source_20_Text"><text:span text:style-name="T30">// Default guest credentials</text:span></text:span></text:p>
      <text:p text:style-name="P224"><text:span text:style-name="Source_20_Text"><text:span text:style-name="T22"><text:s text:c="16"/></text:span></text:span><text:span text:style-name="Source_20_Text"><text:span text:style-name="T20">.setClientLogin(</text:span></text:span><text:span text:style-name="Source_20_Text"><text:span text:style-name="T26">"guest"</text:span></text:span><text:span text:style-name="Source_20_Text"><text:span text:style-name="T20">)</text:span></text:span></text:p>
      <text:p text:style-name="P224"><text:span text:style-name="Source_20_Text"><text:span text:style-name="T22"><text:s text:c="16"/></text:span></text:span><text:span text:style-name="Source_20_Text"><text:span text:style-name="T20">.setClientPasscode(</text:span></text:span><text:span text:style-name="Source_20_Text"><text:span text:style-name="T26">"guest"</text:span></text:span><text:span text:style-name="Source_20_Text"><text:span text:style-name="T20">);</text:span></text:span></text:p>
      <text:p text:style-name="P224"><text:span text:style-name="Source_20_Text"><text:span text:style-name="T22"><text:s text:c="16"/></text:span></text:span><text:span text:style-name="Source_20_Text"><text:span text:style-name="T20">.setRelayHost(relayHost)</text:span></text:span></text:p>
      <text:p text:style-name="P224"><text:soft-page-break/><text:span text:style-name="Source_20_Text"><text:span text:style-name="T22"><text:s text:c="16"/></text:span></text:span><text:span text:style-name="Source_20_Text"><text:span text:style-name="T20">.setRelayPort(relayPort)</text:span></text:span></text:p>
      <text:p text:style-name="P224"><text:span text:style-name="Source_20_Text"><text:span text:style-name="T22"><text:s text:c="16"/></text:span></text:span><text:span text:style-name="Source_20_Text"><text:span text:style-name="T20">.setClientLogin(clientLogin)</text:span></text:span></text:p>
      <text:p text:style-name="P224"><text:span text:style-name="Source_20_Text"><text:span text:style-name="T22"><text:s text:c="16"/></text:span></text:span><text:span text:style-name="Source_20_Text"><text:span text:style-name="T20">.setClientPasscode(clientPasscode);</text:span></text:span></text:p>
      <text:p text:style-name="P224"><text:span text:style-name="Source_20_Text"><text:span text:style-name="T22"><text:s text:c="4"/></text:span></text:span><text:span text:style-name="Source_20_Text"><text:span text:style-name="T20">}</text:span></text:span></text:p>
      <text:p text:style-name="P224"/>
      <text:p text:style-name="P224"><text:span text:style-name="Source_20_Text"><text:span text:style-name="T22"><text:s text:c="4"/></text:span></text:span><text:span text:style-name="Source_20_Text"><text:span text:style-name="T36">@Override</text:span></text:span></text:p>
      <text:p text:style-name="P223"/>
      <text:h text:style-name="P108" text:outline-level="3">Summary of Changes</text:h>
      <text:list text:style-name="L23">
        <text:list-item>
          <text:p text:style-name="P303"><text:span text:style-name="Strong_20_Emphasis"><text:span text:style-name="Source_20_Text"><text:span text:style-name="T24">@Value</text:span></text:span></text:span><text:span text:style-name="Strong_20_Emphasis"><text:span text:style-name="T16"> Annotations</text:span></text:span><text:span text:style-name="T16">: We've added fields to the </text:span><text:span text:style-name="Source_20_Text"><text:span text:style-name="T24">WebSocketConfig</text:span></text:span><text:span text:style-name="T16"> class to hold the connection details. Each field is annotated with </text:span><text:span text:style-name="Source_20_Text"><text:span text:style-name="T24">@Value("${property.name}")</text:span></text:span><text:span text:style-name="T16"> to tell Spring to inject the corresponding value from </text:span><text:a xlink:type="simple" xlink:href="code-assist-path:/home/vj/Desktop/FINAL/datatables/myapp-jpa-server/target/classes/application.properties" text:style-name="Internet_20_link" text:visited-style-name="Visited_20_Internet_20_Link"><text:span text:style-name="Source_20_Text"><text:span text:style-name="T28">application.properties</text:span></text:span></text:a><text:span text:style-name="T16">.</text:span></text:p>
        </text:list-item>
        <text:list-item>
          <text:p text:style-name="P304"><text:span text:style-name="Strong_20_Emphasis"><text:span text:style-name="T16">Dynamic Configuration</text:span></text:span><text:span text:style-name="T16">: The </text:span><text:span text:style-name="Source_20_Text"><text:span text:style-name="T24">configureMessageBroker</text:span></text:span><text:span text:style-name="T16"> method now uses these fields instead of hardcoded strings and numbers.</text:span></text:p>
        </text:list-item>
      </text:list>
      <text:p text:style-name="P218"><text:span text:style-name="T16">Your application is now much more flexible. You can easily point it to a different RabbitMQ instance by simply changing the values in </text:span><text:a xlink:type="simple" xlink:href="code-assist-path:/home/vj/Desktop/FINAL/datatables/myapp-jpa-server/target/classes/application.properties" text:style-name="Internet_20_link" text:visited-style-name="Visited_20_Internet_20_Link"><text:span text:style-name="Source_20_Text"><text:span text:style-name="T28">application.properties</text:span></text:span></text:a><text:span text:style-name="T16"> and restarting the server.</text:span></text:p>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107">How do I configure the RabbitMQ connection details (host, port, credentials) using application.properties? Which port should i use?</text:p>
      <text:h text:style-name="P109" text:outline-level="1">Gemini</text:h>
      <text:p text:style-name="P117">Thinking</text:p>
      <text:p text:style-name="P217"><text:span text:style-name="T18">Of course! Hardcoding configuration values like hostnames and credentials directly in your Java code is not ideal for production environments. It's much better to externalize them into your </text:span><text:a xlink:type="simple" xlink:href="code-assist-path:/home/vj/Desktop/FINAL/datatables/myapp-jpa-server/target/classes/application.properties" text:style-name="Internet_20_link" text:visited-style-name="Visited_20_Internet_20_Link"><text:span text:style-name="Source_20_Text"><text:span text:style-name="T29">application.properties</text:span></text:span></text:a><text:span text:style-name="T18"> file. This allows you to change the configuration for different environments (development, staging, production) without rebuilding your application.</text:span></text:p>
      <text:p text:style-name="P217"><text:span text:style-name="T18">Here’s how you can configure the RabbitMQ connection details using </text:span><text:a xlink:type="simple" xlink:href="code-assist-path:/home/vj/Desktop/FINAL/datatables/myapp-jpa-server/target/classes/application.properties" text:style-name="Internet_20_link" text:visited-style-name="Visited_20_Internet_20_Link"><text:span text:style-name="Source_20_Text"><text:span text:style-name="T29">application.properties</text:span></text:span></text:a><text:span text:style-name="T18">.</text:span></text:p>
      <text:h text:style-name="P103" text:outline-level="3">Which Port to Use?</text:h>
      <text:p text:style-name="P106">You should use the port that RabbitMQ exposes for the STOMP protocol.</text:p>
      <text:list text:style-name="L24">
        <text:list-item>
          <text:p text:style-name="P317"><text:span text:style-name="Strong_20_Emphasis"><text:span text:style-name="T18">Default STOMP Port: </text:span></text:span><text:span text:style-name="Strong_20_Emphasis"><text:span text:style-name="Source_20_Text"><text:span text:style-name="T25">61613</text:span></text:span></text:span></text:p>
        </text:list-item>
      </text:list>
      <text:p text:style-name="P217"><text:span text:style-name="T18">This is the standard, unencrypted port for STOMP connections. For this to work, you must have the </text:span><text:span text:style-name="Source_20_Text"><text:span text:style-name="T25">rabbitmq_stomp</text:span></text:span><text:span text:style-name="T18"> plugin enabled on your RabbitMQ server. You can enable it with the command: </text:span><text:span text:style-name="Source_20_Text"><text:span text:style-name="T25">rabbitmq-plugins enable rabbitmq_stomp</text:span></text:span><text:span text:style-name="T18">.</text:span></text:p>
      <text:h text:style-name="P215" text:outline-level="3"><text:soft-page-break/><text:span text:style-name="T18">Step 1: Add Configuration to </text:span><text:a xlink:type="simple" xlink:href="code-assist-path:/home/vj/Desktop/FINAL/datatables/myapp-jpa-server/target/classes/application.properties" text:style-name="Internet_20_link" text:visited-style-name="Visited_20_Internet_20_Link"><text:span text:style-name="Source_20_Text"><text:span text:style-name="T29">application.properties</text:span></text:span></text:a></text:h>
      <text:p text:style-name="P217"><text:span text:style-name="T18">First, let's define the properties for the STOMP relay in your </text:span><text:span text:style-name="Source_20_Text"><text:span text:style-name="T25">src/main/resources/application.properties</text:span></text:span><text:span text:style-name="T18"> file. Using a custom prefix like </text:span><text:span text:style-name="Source_20_Text"><text:span text:style-name="T25">stomp.relay</text:span></text:span><text:span text:style-name="T18"> keeps these settings nicely organized.</text:span></text:p>
      <text:p text:style-name="P104">properties</text:p>
      <text:p text:style-name="P216"><text:span text:style-name="Source_20_Text"><text:span text:style-name="T31"># ===============================================</text:span></text:span></text:p>
      <text:p text:style-name="P216"><text:span text:style-name="Source_20_Text"><text:span text:style-name="T31"># STOMP Broker Relay (RabbitMQ) Configuration</text:span></text:span></text:p>
      <text:p text:style-name="P216"><text:span text:style-name="Source_20_Text"><text:span text:style-name="T31"># ===============================================</text:span></text:span></text:p>
      <text:p text:style-name="P216"><text:span text:style-name="Source_20_Text"><text:span text:style-name="T35">stomp.relay.host</text:span></text:span><text:span text:style-name="Source_20_Text"><text:span text:style-name="T21">=</text:span></text:span><text:span text:style-name="Source_20_Text"><text:span text:style-name="T27">localhost</text:span></text:span></text:p>
      <text:p text:style-name="P216"><text:span text:style-name="Source_20_Text"><text:span text:style-name="T35">stomp.relay.port</text:span></text:span><text:span text:style-name="Source_20_Text"><text:span text:style-name="T21">=</text:span></text:span><text:span text:style-name="Source_20_Text"><text:span text:style-name="T27">61613</text:span></text:span></text:p>
      <text:p text:style-name="P216"><text:span text:style-name="Source_20_Text"><text:span text:style-name="T35">stomp.relay.username</text:span></text:span><text:span text:style-name="Source_20_Text"><text:span text:style-name="T21">=</text:span></text:span><text:span text:style-name="Source_20_Text"><text:span text:style-name="T27">guest</text:span></text:span></text:p>
      <text:p text:style-name="P216"><text:span text:style-name="Source_20_Text"><text:span text:style-name="T35">stomp.relay.password</text:span></text:span><text:span text:style-name="Source_20_Text"><text:span text:style-name="T21">=</text:span></text:span><text:span text:style-name="Source_20_Text"><text:span text:style-name="T27">guest</text:span></text:span></text:p>
      <text:list text:style-name="L25">
        <text:list-item>
          <text:p text:style-name="P318"><text:span text:style-name="Source_20_Text"><text:span text:style-name="T25">stomp.relay.host</text:span></text:span><text:span text:style-name="T18">: The hostname or IP address of your RabbitMQ server. For Docker, this might be </text:span><text:span text:style-name="Source_20_Text"><text:span text:style-name="T25">rabbitmq</text:span></text:span><text:span text:style-name="T18"> if they are on the same Docker network, or </text:span><text:span text:style-name="Source_20_Text"><text:span text:style-name="T25">localhost</text:span></text:span><text:span text:style-name="T18"> if you're running it locally.</text:span></text:p>
        </text:list-item>
        <text:list-item>
          <text:p text:style-name="P318"><text:span text:style-name="Source_20_Text"><text:span text:style-name="T25">stomp.relay.port</text:span></text:span><text:span text:style-name="T18">: The STOMP port, which is </text:span><text:span text:style-name="Source_20_Text"><text:span text:style-name="T25">61613</text:span></text:span><text:span text:style-name="T18"> by default.</text:span></text:p>
        </text:list-item>
        <text:list-item>
          <text:p text:style-name="P318"><text:span text:style-name="Source_20_Text"><text:span text:style-name="T25">stomp.relay.username</text:span></text:span><text:span text:style-name="T18"> &amp; </text:span><text:span text:style-name="Source_20_Text"><text:span text:style-name="T25">stomp.relay.password</text:span></text:span><text:span text:style-name="T18">: The credentials for connecting to RabbitMQ. The default is </text:span><text:span text:style-name="Source_20_Text"><text:span text:style-name="T25">guest</text:span></text:span><text:span text:style-name="T18">/</text:span><text:span text:style-name="Source_20_Text"><text:span text:style-name="T25">guest</text:span></text:span><text:span text:style-name="T18">.</text:span></text:p>
        </text:list-item>
      </text:list>
      <text:h text:style-name="P215" text:outline-level="3"><text:span text:style-name="T18">Step 2: Update </text:span><text:a xlink:type="simple" xlink:href="code-assist-path:/home/vj/Desktop/FINAL/datatables/myapp-jpa-server/src/main/java/com/angular/backend/config/WebSocketConfig.java" text:style-name="Internet_20_link" text:visited-style-name="Visited_20_Internet_20_Link"><text:span text:style-name="Source_20_Text"><text:span text:style-name="T29">WebSocketConfig.java</text:span></text:span></text:a><text:span text:style-name="T18"> to Use Properties</text:span></text:h>
      <text:p text:style-name="P217"><text:span text:style-name="T18">Now, we'll modify </text:span><text:a xlink:type="simple" xlink:href="code-assist-path:/home/vj/Desktop/FINAL/datatables/myapp-jpa-server/src/main/java/com/angular/backend/config/WebSocketConfig.java" text:style-name="Internet_20_link" text:visited-style-name="Visited_20_Internet_20_Link"><text:span text:style-name="Source_20_Text"><text:span text:style-name="T29">WebSocketConfig.java</text:span></text:span></text:a><text:span text:style-name="T18"> to read these values from the properties file using Spring's </text:span><text:span text:style-name="Source_20_Text"><text:span text:style-name="T25">@Value</text:span></text:span><text:span text:style-name="T18"> annotation. This injects the property values directly into your configuration class.</text:span></text:p>
      <text:p text:style-name="P217"><text:span text:style-name="T18">Here are the required changes for </text:span><text:a xlink:type="simple" xlink:href="code-assist-path:/home/vj/Desktop/FINAL/datatables/myapp-jpa-server/src/main/java/com/angular/backend/config/WebSocketConfig.java" text:style-name="Internet_20_link" text:visited-style-name="Visited_20_Internet_20_Link"><text:span text:style-name="Source_20_Text"><text:span text:style-name="T29">/home/vj/Desktop/FINAL/datatables/myapp-jpa-server/src/main/java/com/angular/backend/config/WebSocketConfig.java</text:span></text:span></text:a><text:span text:style-name="T18">:</text:span></text:p>
      <text:p text:style-name="P112">WebSocketConfig.java</text:p>
      <text:p text:style-name="P105"><text:span text:style-name="T92">-6</text:span><text:span text:style-name="T93">+17</text:span></text:p>
      <text:p text:style-name="P216"><text:span text:style-name="Source_20_Text"><text:span text:style-name="T34">package</text:span></text:span><text:span text:style-name="Source_20_Text"><text:span text:style-name="T21"> com.angular.backend.config;</text:span></text:span></text:p>
      <text:p text:style-name="P216"/>
      <text:p text:style-name="P216"><text:span text:style-name="Source_20_Text"><text:span text:style-name="T34">import</text:span></text:span><text:span text:style-name="Source_20_Text"><text:span text:style-name="T21"> org.springframework.beans.factory.annotation.Value;</text:span></text:span></text:p>
      <text:p text:style-name="P216"><text:span text:style-name="Source_20_Text"><text:span text:style-name="T34">import</text:span></text:span><text:span text:style-name="Source_20_Text"><text:span text:style-name="T21"> org.springframework.context.annotation.Configuration;</text:span></text:span></text:p>
      <text:p text:style-name="P216"><text:span text:style-name="Source_20_Text"><text:span text:style-name="T34">import</text:span></text:span><text:span text:style-name="Source_20_Text"><text:span text:style-name="T21"> org.springframework.messaging.simp.config.MessageBrokerRegistry;</text:span></text:span></text:p>
      <text:p text:style-name="P216"><text:span text:style-name="Source_20_Text"><text:span text:style-name="T34">import</text:span></text:span><text:span text:style-name="Source_20_Text"><text:span text:style-name="T21"> org.springframework.web.socket.config.annotation.EnableWebSocketMessageBroker;</text:span></text:span></text:p>
      <text:p text:style-name="P216"><text:span text:style-name="Source_20_Text"><text:span text:style-name="T35">@EnableWebSocketMessageBroker</text:span></text:span></text:p>
      <text:p text:style-name="P216"><text:span text:style-name="Source_20_Text"><text:span text:style-name="T34">public</text:span></text:span><text:span text:style-name="Source_20_Text"><text:span text:style-name="T21"> </text:span></text:span><text:span text:style-name="Source_20_Text"><text:span text:style-name="T34">class</text:span></text:span><text:span text:style-name="Source_20_Text"><text:span text:style-name="T21"> </text:span></text:span><text:span text:style-name="Source_20_Text"><text:span text:style-name="T27">WebSocketConfig</text:span></text:span><text:span text:style-name="Source_20_Text"><text:span text:style-name="T21"> </text:span></text:span><text:span text:style-name="Source_20_Text"><text:span text:style-name="T34">implements</text:span></text:span><text:span text:style-name="Source_20_Text"><text:span text:style-name="T21"> </text:span></text:span><text:span text:style-name="Source_20_Text"><text:span text:style-name="T27">WebSocketMessageBrokerConfigurer</text:span></text:span><text:span text:style-name="Source_20_Text"><text:span text:style-name="T21"> {</text:span></text:span></text:p>
      <text:p text:style-name="P216"/>
      <text:p text:style-name="P216"><text:span text:style-name="Source_20_Text"><text:span text:style-name="T23"><text:s text:c="4"/></text:span></text:span><text:span text:style-name="Source_20_Text"><text:span text:style-name="T35">@Value("${stomp.relay.host}")</text:span></text:span></text:p>
      <text:p text:style-name="P216"><text:span text:style-name="Source_20_Text"><text:span text:style-name="T23"><text:s text:c="4"/></text:span></text:span><text:span text:style-name="Source_20_Text"><text:span text:style-name="T34">private</text:span></text:span><text:span text:style-name="Source_20_Text"><text:span text:style-name="T21"> String relayHost;</text:span></text:span></text:p>
      <text:p text:style-name="P216"/>
      <text:p text:style-name="P216"><text:span text:style-name="Source_20_Text"><text:span text:style-name="T23"><text:s text:c="4"/></text:span></text:span><text:span text:style-name="Source_20_Text"><text:span text:style-name="T35">@Value("${stomp.relay.port}")</text:span></text:span></text:p>
      <text:p text:style-name="P216"><text:span text:style-name="Source_20_Text"><text:span text:style-name="T23"><text:s text:c="4"/></text:span></text:span><text:span text:style-name="Source_20_Text"><text:span text:style-name="T34">private</text:span></text:span><text:span text:style-name="Source_20_Text"><text:span text:style-name="T21"> </text:span></text:span><text:span text:style-name="Source_20_Text"><text:span text:style-name="T34">int</text:span></text:span><text:span text:style-name="Source_20_Text"><text:span text:style-name="T21"> relayPort;</text:span></text:span></text:p>
      <text:p text:style-name="P216"/>
      <text:p text:style-name="P216"><text:span text:style-name="Source_20_Text"><text:span text:style-name="T23"><text:s text:c="4"/></text:span></text:span><text:span text:style-name="Source_20_Text"><text:span text:style-name="T35">@Value("${stomp.relay.username}")</text:span></text:span></text:p>
      <text:p text:style-name="P216"><text:span text:style-name="Source_20_Text"><text:span text:style-name="T23"><text:s text:c="4"/></text:span></text:span><text:span text:style-name="Source_20_Text"><text:span text:style-name="T34">private</text:span></text:span><text:span text:style-name="Source_20_Text"><text:span text:style-name="T21"> String clientLogin;</text:span></text:span></text:p>
      <text:p text:style-name="P216"/>
      <text:p text:style-name="P216"><text:soft-page-break/><text:span text:style-name="Source_20_Text"><text:span text:style-name="T23"><text:s text:c="4"/></text:span></text:span><text:span text:style-name="Source_20_Text"><text:span text:style-name="T35">@Value("${stomp.relay.password}")</text:span></text:span></text:p>
      <text:p text:style-name="P216"><text:span text:style-name="Source_20_Text"><text:span text:style-name="T23"><text:s text:c="4"/></text:span></text:span><text:span text:style-name="Source_20_Text"><text:span text:style-name="T34">private</text:span></text:span><text:span text:style-name="Source_20_Text"><text:span text:style-name="T21"> String clientPasscode;</text:span></text:span></text:p>
      <text:p text:style-name="P216"/>
      <text:p text:style-name="P216"><text:span text:style-name="Source_20_Text"><text:span text:style-name="T23"><text:s text:c="4"/></text:span></text:span><text:span text:style-name="Source_20_Text"><text:span text:style-name="T35">@Override</text:span></text:span></text:p>
      <text:p text:style-name="P216"><text:span text:style-name="Source_20_Text"><text:span text:style-name="T23"><text:s text:c="4"/></text:span></text:span><text:span text:style-name="Source_20_Text"><text:span text:style-name="T34">public</text:span></text:span><text:span text:style-name="Source_20_Text"><text:span text:style-name="T21"> </text:span></text:span><text:span text:style-name="Source_20_Text"><text:span text:style-name="T34">void</text:span></text:span><text:span text:style-name="Source_20_Text"><text:span text:style-name="T21"> </text:span></text:span><text:span text:style-name="Source_20_Text"><text:span text:style-name="T27">configureMessageBroker</text:span></text:span><text:span text:style-name="Source_20_Text"><text:span text:style-name="T21">(MessageBrokerRegistry config) {</text:span></text:span></text:p>
      <text:p text:style-name="P216"><text:span text:style-name="Source_20_Text"><text:span text:style-name="T23"><text:s text:c="8"/></text:span></text:span><text:span text:style-name="Source_20_Text"><text:span text:style-name="T31">// These are prefixes for messages that are bound for @MessageMapping-annotated methods.</text:span></text:span></text:p>
      <text:p text:style-name="P216"><text:span text:style-name="Source_20_Text"><text:span text:style-name="T23"><text:s text:c="8"/></text:span></text:span><text:span text:style-name="Source_20_Text"><text:span text:style-name="T31">// This configures a broker relay that connects to an external STOMP broker (RabbitMQ).</text:span></text:span></text:p>
      <text:p text:style-name="P216"><text:span text:style-name="Source_20_Text"><text:span text:style-name="T23"><text:s text:c="8"/></text:span></text:span><text:span text:style-name="Source_20_Text"><text:span text:style-name="T31">// It will forward messages to the broker for destinations prefixed with "/topic".</text:span></text:span></text:p>
      <text:p text:style-name="P216"><text:span text:style-name="Source_20_Text"><text:span text:style-name="T23"><text:s text:c="8"/></text:span></text:span><text:span text:style-name="Source_20_Text"><text:span text:style-name="T21">config.enableStompBrokerRelay(</text:span></text:span><text:span text:style-name="Source_20_Text"><text:span text:style-name="T27">"/topic"</text:span></text:span><text:span text:style-name="Source_20_Text"><text:span text:style-name="T21">)</text:span></text:span></text:p>
      <text:p text:style-name="P216"><text:span text:style-name="Source_20_Text"><text:span text:style-name="T23"><text:s text:c="16"/></text:span></text:span><text:span text:style-name="Source_20_Text"><text:span text:style-name="T31">// Default RabbitMQ STOMP port is 61613</text:span></text:span></text:p>
      <text:p text:style-name="P216"><text:span text:style-name="Source_20_Text"><text:span text:style-name="T23"><text:s text:c="16"/></text:span></text:span><text:span text:style-name="Source_20_Text"><text:span text:style-name="T21">.setRelayHost(</text:span></text:span><text:span text:style-name="Source_20_Text"><text:span text:style-name="T27">"localhost"</text:span></text:span><text:span text:style-name="Source_20_Text"><text:span text:style-name="T21">)</text:span></text:span></text:p>
      <text:p text:style-name="P216"><text:span text:style-name="Source_20_Text"><text:span text:style-name="T23"><text:s text:c="16"/></text:span></text:span><text:span text:style-name="Source_20_Text"><text:span text:style-name="T21">.setRelayPort(61613)</text:span></text:span></text:p>
      <text:p text:style-name="P216"><text:span text:style-name="Source_20_Text"><text:span text:style-name="T23"><text:s text:c="16"/></text:span></text:span><text:span text:style-name="Source_20_Text"><text:span text:style-name="T31">// Default guest credentials</text:span></text:span></text:p>
      <text:p text:style-name="P216"><text:span text:style-name="Source_20_Text"><text:span text:style-name="T23"><text:s text:c="16"/></text:span></text:span><text:span text:style-name="Source_20_Text"><text:span text:style-name="T21">.setClientLogin(</text:span></text:span><text:span text:style-name="Source_20_Text"><text:span text:style-name="T27">"guest"</text:span></text:span><text:span text:style-name="Source_20_Text"><text:span text:style-name="T21">)</text:span></text:span></text:p>
      <text:p text:style-name="P216"><text:span text:style-name="Source_20_Text"><text:span text:style-name="T23"><text:s text:c="16"/></text:span></text:span><text:span text:style-name="Source_20_Text"><text:span text:style-name="T21">.setClientPasscode(</text:span></text:span><text:span text:style-name="Source_20_Text"><text:span text:style-name="T27">"guest"</text:span></text:span><text:span text:style-name="Source_20_Text"><text:span text:style-name="T21">);</text:span></text:span></text:p>
      <text:p text:style-name="P216"><text:span text:style-name="Source_20_Text"><text:span text:style-name="T23"><text:s text:c="16"/></text:span></text:span><text:span text:style-name="Source_20_Text"><text:span text:style-name="T21">.setRelayHost(relayHost)</text:span></text:span></text:p>
      <text:p text:style-name="P216"><text:span text:style-name="Source_20_Text"><text:span text:style-name="T23"><text:s text:c="16"/></text:span></text:span><text:span text:style-name="Source_20_Text"><text:span text:style-name="T21">.setRelayPort(relayPort)</text:span></text:span></text:p>
      <text:p text:style-name="P216"><text:span text:style-name="Source_20_Text"><text:span text:style-name="T23"><text:s text:c="16"/></text:span></text:span><text:span text:style-name="Source_20_Text"><text:span text:style-name="T21">.setClientLogin(clientLogin)</text:span></text:span></text:p>
      <text:p text:style-name="P216"><text:span text:style-name="Source_20_Text"><text:span text:style-name="T23"><text:s text:c="16"/></text:span></text:span><text:span text:style-name="Source_20_Text"><text:span text:style-name="T21">.setClientPasscode(clientPasscode);</text:span></text:span></text:p>
      <text:p text:style-name="P216"><text:span text:style-name="Source_20_Text"><text:span text:style-name="T23"><text:s text:c="4"/></text:span></text:span><text:span text:style-name="Source_20_Text"><text:span text:style-name="T21">}</text:span></text:span></text:p>
      <text:p text:style-name="P216"/>
      <text:p text:style-name="P216"><text:span text:style-name="Source_20_Text"><text:span text:style-name="T23"><text:s text:c="4"/></text:span></text:span><text:span text:style-name="Source_20_Text"><text:span text:style-name="T35">@Override</text:span></text:span></text:p>
      <text:p text:style-name="P216"/>
      <text:h text:style-name="P103" text:outline-level="3">Summary of Changes</text:h>
      <text:list text:style-name="L26">
        <text:list-item>
          <text:p text:style-name="P319"><text:span text:style-name="Strong_20_Emphasis"><text:span text:style-name="Source_20_Text"><text:span text:style-name="T25">@Value</text:span></text:span></text:span><text:span text:style-name="Strong_20_Emphasis"><text:span text:style-name="T18"> Annotations</text:span></text:span><text:span text:style-name="T18">: We've added fields to the </text:span><text:span text:style-name="Source_20_Text"><text:span text:style-name="T25">WebSocketConfig</text:span></text:span><text:span text:style-name="T18"> class to hold the connection details. Each field is annotated with </text:span><text:span text:style-name="Source_20_Text"><text:span text:style-name="T25">@Value("${property.name}")</text:span></text:span><text:span text:style-name="T18"> to tell Spring to inject the corresponding value from </text:span><text:a xlink:type="simple" xlink:href="code-assist-path:/home/vj/Desktop/FINAL/datatables/myapp-jpa-server/target/classes/application.properties" text:style-name="Internet_20_link" text:visited-style-name="Visited_20_Internet_20_Link"><text:span text:style-name="Source_20_Text"><text:span text:style-name="T29">application.properties</text:span></text:span></text:a><text:span text:style-name="T18">.</text:span></text:p>
        </text:list-item>
        <text:list-item>
          <text:p text:style-name="P319"><text:span text:style-name="Strong_20_Emphasis"><text:span text:style-name="T18">Dynamic Configuration</text:span></text:span><text:span text:style-name="T18">: The </text:span><text:span text:style-name="Source_20_Text"><text:span text:style-name="T25">configureMessageBroker</text:span></text:span><text:span text:style-name="T18"> method now uses these fields instead of hardcoded strings and numbers.</text:span></text:p>
        </text:list-item>
      </text:list>
      <text:p text:style-name="P217"><text:span text:style-name="T18">Your application is now much more flexible. You can easily point it to a different RabbitMQ instance by simply changing the values in </text:span><text:a xlink:type="simple" xlink:href="code-assist-path:/home/vj/Desktop/FINAL/datatables/myapp-jpa-server/target/classes/application.properties" text:style-name="Internet_20_link" text:visited-style-name="Visited_20_Internet_20_Link"><text:span text:style-name="Source_20_Text"><text:span text:style-name="T29">application.properties</text:span></text:span></text:a><text:span text:style-name="T18"> and restarting the server.</text:span></text:p>
      <text:p text:style-name="P70">DOCKER NGINX LOAD BALLANCING</text:p>
      <text:p text:style-name="P102">Of course! I can certainly help you with that. It's a common issue when using Nginx for load balancing with services discovered via DNS, like in a Docker environment.</text:p>
      <text:p text:style-name="P209"><text:span text:style-name="T17">The problem you're facing is that Nginx resolves the DNS for the </text:span><text:span text:style-name="Source_20_Text"><text:span text:style-name="T24">backend</text:span></text:span><text:span text:style-name="T17"> service only once when it starts up. It then caches that IP address and sends all subsequent requests to that single IP, which defeats the purpose of round-robin load balancing across your different backend containers.</text:span></text:p>
      <text:h text:style-name="P210" text:outline-level="3"><text:span text:style-name="T17">The Solution: Using a </text:span><text:span text:style-name="Source_20_Text"><text:span text:style-name="T24">resolver</text:span></text:span></text:h>
      <text:p text:style-name="P209"><text:span text:style-name="T17">To fix this, you need to tell Nginx to re-resolve the DNS records periodically. You can do this by adding a </text:span><text:span text:style-name="Source_20_Text"><text:span text:style-name="T24">resolver</text:span></text:span><text:span text:style-name="T17"> directive inside your </text:span><text:span text:style-name="Source_20_Text"><text:span text:style-name="T24">upstream</text:span></text:span><text:span text:style-name="T17"> block. Docker provides a built-in DNS resolver at </text:span><text:span text:style-name="Source_20_Text"><text:span text:style-name="T24">127.0.0.11</text:span></text:span><text:span text:style-name="T17">.</text:span></text:p>
      <text:p text:style-name="P209"><text:span text:style-name="T17">Here are the changes for your </text:span><text:a xlink:type="simple" xlink:href="code-assist-path:/home/vj/Desktop/data/datatables/myapp-jpa-server/nginx.conf" text:style-name="Internet_20_link" text:visited-style-name="Visited_20_Internet_20_Link"><text:span text:style-name="Source_20_Text"><text:span text:style-name="T28">nginx.conf</text:span></text:span></text:a><text:span text:style-name="T17">:</text:span></text:p>
      <text:p text:style-name="P113"><text:soft-page-break/>nginx.conf</text:p>
      <text:p text:style-name="P96"><text:span text:style-name="T92">-3</text:span><text:span text:style-name="T93">+5</text:span></text:p>
      <text:p text:style-name="P211"><text:span text:style-name="Source_20_Text"><text:span text:style-name="T7">upstream</text:span></text:span><text:span text:style-name="Source_20_Text"><text:span text:style-name="T20"> </text:span></text:span><text:span text:style-name="Source_20_Text"><text:span text:style-name="T26">backend_servers {</text:span></text:span></text:p>
      <text:p text:style-name="P211"><text:span text:style-name="Source_20_Text"><text:span text:style-name="T32"><text:s text:c="4"/></text:span></text:span><text:span text:style-name="Source_20_Text"><text:span text:style-name="T30"># Use Docker's internal DNS resolver.</text:span></text:span></text:p>
      <text:p text:style-name="P211"><text:span text:style-name="Source_20_Text"><text:span text:style-name="T22"><text:s text:c="4"/></text:span></text:span><text:span text:style-name="Source_20_Text"><text:span text:style-name="T7">resolver</text:span></text:span><text:span text:style-name="Source_20_Text"><text:span text:style-name="T20"> </text:span></text:span><text:span text:style-name="Source_20_Text"><text:span text:style-name="T26">127.0.0.11 valid=5s;</text:span></text:span></text:p>
      <text:p text:style-name="P211"/>
      <text:p text:style-name="P211"><text:span text:style-name="Source_20_Text"><text:span text:style-name="T32"><text:s text:c="4"/></text:span></text:span><text:span text:style-name="Source_20_Text"><text:span text:style-name="T30"># Docker's internal DNS will resolve 'backend' to the IPs of your backend service containers.</text:span></text:span></text:p>
      <text:p text:style-name="P211"><text:span text:style-name="Source_20_Text"><text:span text:style-name="T32"><text:s text:c="4"/></text:span></text:span><text:span text:style-name="Source_20_Text"><text:span text:style-name="T30"># Nginx will load balance requests between them.</text:span></text:span></text:p>
      <text:p text:style-name="P211"><text:span text:style-name="Source_20_Text"><text:span text:style-name="T22"><text:s text:c="4"/></text:span></text:span><text:span text:style-name="Source_20_Text"><text:span text:style-name="T7">server</text:span></text:span><text:span text:style-name="Source_20_Text"><text:span text:style-name="T20"> </text:span></text:span><text:span text:style-name="Source_20_Text"><text:span text:style-name="T26">backend:9090;</text:span></text:span></text:p>
      <text:p text:style-name="P211"><text:span text:style-name="Source_20_Text"><text:span text:style-name="T22"><text:s text:c="4"/></text:span></text:span><text:span text:style-name="Source_20_Text"><text:span text:style-name="T7">server</text:span></text:span><text:span text:style-name="Source_20_Text"><text:span text:style-name="T20"> </text:span></text:span><text:span text:style-name="Source_20_Text"><text:span text:style-name="T26">backend:9090;</text:span></text:span></text:p>
      <text:p text:style-name="P211"><text:span text:style-name="Source_20_Text"><text:span text:style-name="T22"><text:s text:c="4"/></text:span></text:span><text:span text:style-name="Source_20_Text"><text:span text:style-name="T7">server</text:span></text:span><text:span text:style-name="Source_20_Text"><text:span text:style-name="T20"> </text:span></text:span><text:span text:style-name="Source_20_Text"><text:span text:style-name="T26">backend:9090;</text:span></text:span></text:p>
      <text:p text:style-name="P211"><text:span text:style-name="Source_20_Text"><text:span text:style-name="T32"><text:s text:c="4"/></text:span></text:span><text:span text:style-name="Source_20_Text"><text:span text:style-name="T30"># The 'resolve' parameter tells Nginx to re-resolve the DNS.</text:span></text:span></text:p>
      <text:p text:style-name="P211"><text:span text:style-name="Source_20_Text"><text:span text:style-name="T22"><text:s text:c="4"/></text:span></text:span><text:span text:style-name="Source_20_Text"><text:span text:style-name="T7">server</text:span></text:span><text:span text:style-name="Source_20_Text"><text:span text:style-name="T20"> </text:span></text:span><text:span text:style-name="Source_20_Text"><text:span text:style-name="T26">backend:9090 resolve;</text:span></text:span></text:p>
      <text:p text:style-name="P211"><text:span text:style-name="Source_20_Text"><text:span text:style-name="T7">}</text:span></text:span></text:p>
      <text:p text:style-name="P211"/>
      <text:p text:style-name="P211"><text:span text:style-name="Source_20_Text"><text:span text:style-name="T7">server</text:span></text:span><text:span text:style-name="Source_20_Text"><text:span text:style-name="T20"> </text:span></text:span><text:span text:style-name="Source_20_Text"><text:span text:style-name="T26">{</text:span></text:span></text:p>
      <text:p text:style-name="P211"/>
      <text:h text:style-name="P92" text:outline-level="3">Explanation of Changes</text:h>
      <text:list text:style-name="L27">
        <text:list-item>
          <text:p text:style-name="P312"><text:span text:style-name="Strong_20_Emphasis"><text:span text:style-name="Source_20_Text"><text:span text:style-name="T24">resolver 127.0.0.11 valid=5s;</text:span></text:span></text:span><text:span text:style-name="T17">:</text:span></text:p>
          <text:list>
            <text:list-item>
              <text:p text:style-name="P313"><text:span text:style-name="T17">This tells Nginx to use Docker's internal DNS server, which is always available at </text:span><text:span text:style-name="Source_20_Text"><text:span text:style-name="T24">127.0.0.11</text:span></text:span><text:span text:style-name="T17"> from within a container.</text:span></text:p>
            </text:list-item>
            <text:list-item>
              <text:p text:style-name="P313"><text:span text:style-name="Source_20_Text"><text:span text:style-name="T24">valid=5s</text:span></text:span><text:span text:style-name="T17"> instructs Nginx to consider the resolved IP addresses valid for 5 seconds, after which it will query the DNS server again. This ensures it picks up on any changes in your backend containers (like scaling up or down).</text:span></text:p>
            </text:list-item>
          </text:list>
        </text:list-item>
        <text:list-item>
          <text:p text:style-name="P312"><text:span text:style-name="Strong_20_Emphasis"><text:span text:style-name="Source_20_Text"><text:span text:style-name="T24">server backend:9090 resolve;</text:span></text:span></text:span><text:span text:style-name="T17">:</text:span></text:p>
          <text:list>
            <text:list-item>
              <text:p text:style-name="P313"><text:span text:style-name="T17">The </text:span><text:span text:style-name="Source_20_Text"><text:span text:style-name="T24">resolve</text:span></text:span><text:span text:style-name="T17"> parameter on the </text:span><text:span text:style-name="Source_20_Text"><text:span text:style-name="T24">server</text:span></text:span><text:span text:style-name="T17"> directive is crucial. It tells Nginx that </text:span><text:span text:style-name="Source_20_Text"><text:span text:style-name="T24">backend</text:span></text:span><text:span text:style-name="T17"> is a domain name that should be periodically re-resolved to a list of IP addresses.</text:span></text:p>
            </text:list-item>
            <text:list-item>
              <text:p text:style-name="P313"><text:span text:style-name="T17">You only need </text:span><text:span text:style-name="Strong_20_Emphasis"><text:span text:style-name="T17">one</text:span></text:span><text:span text:style-name="T17"> </text:span><text:span text:style-name="Source_20_Text"><text:span text:style-name="T24">server</text:span></text:span><text:span text:style-name="T17"> line with the </text:span><text:span text:style-name="Source_20_Text"><text:span text:style-name="T24">resolve</text:span></text:span><text:span text:style-name="T17"> parameter. Nginx will get the list of all IPs for the </text:span><text:span text:style-name="Source_20_Text"><text:span text:style-name="T24">backend</text:span></text:span><text:span text:style-name="T17"> service from the DNS resolver and will then perform round-robin load balancing across them.</text:span></text:p>
            </text:list-item>
          </text:list>
        </text:list-item>
      </text:list>
      <text:p text:style-name="P95">With these changes, Nginx will correctly discover all of your backend service containers and distribute traffic among them in a round-robin fashion.</text:p>
      <text:h text:style-name="P210" text:outline-level="3"><text:span text:style-name="T17">A Note on Your </text:span><text:a xlink:type="simple" xlink:href="code-assist-path:/home/vj/Desktop/data/datatables/myapp-jpa-server/docker-compose.yml" text:style-name="Internet_20_link" text:visited-style-name="Visited_20_Internet_20_Link"><text:span text:style-name="Source_20_Text"><text:span text:style-name="T28">docker-compose.yml</text:span></text:span></text:a></text:h>
      <text:p text:style-name="P209"><text:span text:style-name="T17">I noticed in your </text:span><text:a xlink:type="simple" xlink:href="code-assist-path:/home/vj/Desktop/data/datatables/myapp-jpa-server/docker-compose.yml" text:style-name="Internet_20_link" text:visited-style-name="Visited_20_Internet_20_Link"><text:span text:style-name="Source_20_Text"><text:span text:style-name="T28">docker-compose.yml</text:span></text:span></text:a><text:span text:style-name="T17"> that you have a single backend service defined:</text:span></text:p>
      <text:p text:style-name="P93">yaml</text:p>
      <text:p text:style-name="P211"><text:span text:style-name="Source_20_Text"><text:span text:style-name="T7">services:</text:span></text:span></text:p>
      <text:p text:style-name="P211"><text:span text:style-name="Source_20_Text"><text:span text:style-name="T22"><text:s text:c="2"/></text:span></text:span><text:span text:style-name="Source_20_Text"><text:span text:style-name="T7">myapp-backend-development:</text:span></text:span></text:p>
      <text:p text:style-name="P211"><text:span text:style-name="Source_20_Text"><text:span text:style-name="T22"><text:s text:c="4"/></text:span></text:span><text:span text:style-name="Source_20_Text"><text:span text:style-name="T7">build:</text:span></text:span><text:span text:style-name="Source_20_Text"><text:span text:style-name="T20"> </text:span></text:span><text:span text:style-name="Source_20_Text"><text:span text:style-name="T26">.</text:span></text:span></text:p>
      <text:p text:style-name="P211"><text:span text:style-name="Source_20_Text"><text:span text:style-name="T22"><text:s text:c="4"/></text:span></text:span><text:span text:style-name="Source_20_Text"><text:span text:style-name="T7">container_name:</text:span></text:span><text:span text:style-name="Source_20_Text"><text:span text:style-name="T20"> </text:span></text:span><text:span text:style-name="Source_20_Text"><text:span text:style-name="T26">myapp-backend-development</text:span></text:span></text:p>
      <text:p text:style-name="P211"><text:span text:style-name="Source_20_Text"><text:span text:style-name="T22"><text:s text:c="4"/></text:span></text:span><text:span text:style-name="Source_20_Text"><text:span text:style-name="T7">ports:</text:span></text:span></text:p>
      <text:p text:style-name="P211"><text:span text:style-name="Source_20_Text"><text:span text:style-name="T22"><text:s text:c="6"/></text:span></text:span><text:span text:style-name="Source_20_Text"><text:span text:style-name="T38">-</text:span></text:span><text:span text:style-name="Source_20_Text"><text:span text:style-name="T20"> </text:span></text:span><text:span text:style-name="Source_20_Text"><text:span text:style-name="T26">"9090:9090"</text:span></text:span></text:p>
      <text:p text:style-name="P209"><text:span text:style-name="T17">For load balancing to work, you need to run multiple instances (replicas) of your backend service. You can achieve this using the </text:span><text:span text:style-name="Source_20_Text"><text:span text:style-name="T24">deploy</text:span></text:span><text:span text:style-name="T17"> key or by defining multiple services.</text:span></text:p>
      <text:p text:style-name="P209"><text:soft-page-break/><text:span text:style-name="T17">Also, for Nginx to resolve the service name </text:span><text:span text:style-name="Source_20_Text"><text:span text:style-name="T24">backend</text:span></text:span><text:span text:style-name="T17">, your backend service in </text:span><text:a xlink:type="simple" xlink:href="code-assist-path:/home/vj/Desktop/data/datatables/myapp-jpa-server/docker-compose.yml" text:style-name="Internet_20_link" text:visited-style-name="Visited_20_Internet_20_Link"><text:span text:style-name="Source_20_Text"><text:span text:style-name="T28">docker-compose.yml</text:span></text:span></text:a><text:span text:style-name="T17"> should be named </text:span><text:span text:style-name="Source_20_Text"><text:span text:style-name="T24">backend</text:span></text:span><text:span text:style-name="T17">.</text:span></text:p>
      <text:p text:style-name="P209"><text:span text:style-name="T17">Here is an example of how you could modify your </text:span><text:a xlink:type="simple" xlink:href="code-assist-path:/home/vj/Desktop/data/datatables/myapp-jpa-server/docker-compose.yml" text:style-name="Internet_20_link" text:visited-style-name="Visited_20_Internet_20_Link"><text:span text:style-name="Source_20_Text"><text:span text:style-name="T28">docker-compose.yml</text:span></text:span></text:a><text:span text:style-name="T17"> to run 3 replicas of your backend service, which Nginx can then load balance across.</text:span></text:p>
      <text:p text:style-name="P93">yaml</text:p>
      <text:p text:style-name="P211"><text:span text:style-name="Source_20_Text"><text:span text:style-name="T7">services:</text:span></text:span></text:p>
      <text:p text:style-name="P211"><text:span text:style-name="Source_20_Text"><text:span text:style-name="T22"><text:s text:c="2"/></text:span></text:span><text:span text:style-name="Source_20_Text"><text:span text:style-name="T7">backend:</text:span></text:span><text:span text:style-name="Source_20_Text"><text:span text:style-name="T20"> </text:span></text:span><text:span text:style-name="Source_20_Text"><text:span text:style-name="T30"># Renamed from myapp-backend-development</text:span></text:span></text:p>
      <text:p text:style-name="P211"><text:span text:style-name="Source_20_Text"><text:span text:style-name="T22"><text:s text:c="4"/></text:span></text:span><text:span text:style-name="Source_20_Text"><text:span text:style-name="T7">build:</text:span></text:span><text:span text:style-name="Source_20_Text"><text:span text:style-name="T20"> </text:span></text:span><text:span text:style-name="Source_20_Text"><text:span text:style-name="T26">.</text:span></text:span></text:p>
      <text:p text:style-name="P211"><text:span text:style-name="Source_20_Text"><text:span text:style-name="T22"><text:s text:c="4"/></text:span></text:span><text:span text:style-name="Source_20_Text"><text:span text:style-name="T30"># container_name should not be used with multiple replicas</text:span></text:span></text:p>
      <text:p text:style-name="P211"><text:span text:style-name="Source_20_Text"><text:span text:style-name="T22"><text:s text:c="4"/></text:span></text:span><text:span text:style-name="Source_20_Text"><text:span text:style-name="T7">deploy:</text:span></text:span></text:p>
      <text:p text:style-name="P211"><text:span text:style-name="Source_20_Text"><text:span text:style-name="T22"><text:s text:c="6"/></text:span></text:span><text:span text:style-name="Source_20_Text"><text:span text:style-name="T7">replicas:</text:span></text:span><text:span text:style-name="Source_20_Text"><text:span text:style-name="T20"> 3 </text:span></text:span><text:span text:style-name="Source_20_Text"><text:span text:style-name="T30"># This will create 3 instances of your backend</text:span></text:span></text:p>
      <text:p text:style-name="P211"><text:span text:style-name="Source_20_Text"><text:span text:style-name="T22"><text:s text:c="4"/></text:span></text:span><text:span text:style-name="Source_20_Text"><text:span text:style-name="T7">ports:</text:span></text:span></text:p>
      <text:p text:style-name="P211"><text:span text:style-name="Source_20_Text"><text:span text:style-name="T22"><text:s text:c="6"/></text:span></text:span><text:span text:style-name="Source_20_Text"><text:span text:style-name="T38">-</text:span></text:span><text:span text:style-name="Source_20_Text"><text:span text:style-name="T20"> </text:span></text:span><text:span text:style-name="Source_20_Text"><text:span text:style-name="T26">"9090"</text:span></text:span><text:span text:style-name="Source_20_Text"><text:span text:style-name="T20"> </text:span></text:span><text:span text:style-name="Source_20_Text"><text:span text:style-name="T30"># Port mapping is handled by the swarm, not one-to-one</text:span></text:span></text:p>
      <text:p text:style-name="P211"/>
      <text:p text:style-name="P211"><text:span text:style-name="Source_20_Text"><text:span text:style-name="T22"><text:s text:c="2"/></text:span></text:span><text:span text:style-name="Source_20_Text"><text:span text:style-name="T30"># ... your myapp-jpa-client-release service</text:span></text:span></text:p>
      <text:p text:style-name="P209"><text:span text:style-name="T17">To use the </text:span><text:span text:style-name="Source_20_Text"><text:span text:style-name="T24">deploy</text:span></text:span><text:span text:style-name="T17"> key, you would typically run your services using </text:span><text:span text:style-name="Source_20_Text"><text:span text:style-name="T24">docker-compose up</text:span></text:span><text:span text:style-name="T17"> or </text:span><text:span text:style-name="Source_20_Text"><text:span text:style-name="T24">docker stack deploy</text:span></text:span><text:span text:style-name="T17">.</text:span></text:p>
      <text:p text:style-name="P95">Let me know if you have any more questions!</text:p>
      <text:p text:style-name="P218"/>
      <text:p text:style-name="P77"/>
      <text:p text:style-name="P77"/>
      <text:p text:style-name="P77"/>
      <text:p text:style-name="P77"/>
      <text:p text:style-name="P77"/>
      <text:p text:style-name="P77"/>
      <text:p text:style-name="P77"/>
      <text:p text:style-name="P182">Redirect from 4200 to 80 port</text:p>
      <text:p text:style-name="P181">ng serve --proxy-config proxy.conf.json</text:p>
      <text:p text:style-name="P181"/>
      <text:p text:style-name="P181"/>
      <text:p text:style-name="P181"/>
      <text:p text:style-name="P183">Kill docker container inside it</text:p>
      <text:p text:style-name="P183">sh -c 'exit 1'</text:p>
      <text:p text:style-name="P183"/>
      <text:p text:style-name="P183"/>
      <text:p text:style-name="P184">TO run elasticsearch add the following line to elastic file</text:p>
      <text:p text:style-name="P185">ES_JAVA_OPTS="-Xms512m -Xmx512</text:p>
      <text:p text:style-name="P185"/>
      <text:p text:style-name="P185"/>
      <text:p text:style-name="P187">Logstash needs to run at least one pipeline</text:p>
      <text:p text:style-name="P185"># create a simple pipelines.yml that references config/logstash.conf</text:p>
      <text:p text:style-name="P185">cat &gt; config/pipelines.yml &lt;&lt;'YAML'</text:p>
      <text:p text:style-name="P185">- pipeline.id: main</text:p>
      <text:p text:style-name="P185"><text:s text:c="2"/>path.config: "config/logstash.conf"</text:p>
      <text:p text:style-name="P185">YAML</text:p>
      <text:p text:style-name="P185"/>
      <text:p text:style-name="P185"># create a very small pipeline config (input + stdout) so Logstash has something to run</text:p>
      <text:p text:style-name="P240">cat &gt; config/logstash.conf &lt;&lt;'CONF'</text:p>
      <text:p text:style-name="P240">input {</text:p>
      <text:p text:style-name="P240"><text:soft-page-break/><text:s text:c="2"/>stdin { }</text:p>
      <text:p text:style-name="P240">}</text:p>
      <text:p text:style-name="P240">output {</text:p>
      <text:p text:style-name="P240"><text:s text:c="2"/>stdout { codec =&gt; rubydebug }</text:p>
      <text:p text:style-name="P240">}</text:p>
      <text:p text:style-name="P240">CONF</text:p>
      <text:p text:style-name="P240"/>
      <text:p text:style-name="P240"/>
      <text:p text:style-name="P240"/>
      <text:p text:style-name="P186">RUN logstash</text:p>
      <text:p text:style-name="P204">./bin/logstash</text:p>
      <text:p text:style-name="P241"/>
      <text:p text:style-name="P241"/>
      <text:p text:style-name="P71">how to setup passwords in elasticsearch</text:p>
      <text:p text:style-name="P242"><text:s text:c="4"/>bin/elasticsearch-keystore add "bootstrap.password"</text:p>
      <text:p text:style-name="P242"><text:s text:c="4"/>bin/elasticsearch-setup-passwords interactive</text:p>
      <text:p text:style-name="P241"/>
      <text:p text:style-name="P241"/>
      <text:p text:style-name="P241"/>
      <text:p text:style-name="P241"/>
      <text:p text:style-name="P241"/>
      <text:p text:style-name="P241"/>
      <text:p text:style-name="P241"/>
      <text:p text:style-name="P241"/>
      <text:p text:style-name="P241"/>
      <text:p text:style-name="P244"><draw:frame draw:style-name="fr5" draw:name="Image8" text:anchor-type="char" svg:width="6.6929in" svg:height="3.5201in" draw:z-index="10"><draw:image xlink:href="Pictures/1000000100000780000003F28D6F220B.png" xlink:type="simple" xlink:show="embed" xlink:actuate="onLoad" draw:mime-type="image/png"/></draw:frame><text:soft-page-break/><text:line-break/><text:line-break/><text:line-break/><text:line-break/><text:line-break/><text:line-break/><text:line-break/><text:line-break/><text:line-break/><text:line-break/><text:line-break/><text:line-break/><text:line-break/><text:line-break/><text:line-break/><text:line-break/><text:line-break/><text:soft-page-break/><text:line-break/>Grok parsing</text:p>
      <text:p text:style-name="P251"><text:span text:style-name="T112">\"</text:span><text:span text:style-name="T109">%{</text:span><text:span text:style-name="T111">GREEDYDATA</text:span><text:span text:style-name="T109">:</text:span><text:span text:style-name="T111">agent</text:span><text:span text:style-name="T109">}</text:span><text:span text:style-name="T112">\"</text:span></text:p>
      <text:p text:style-name="P244"/>
      <text:p text:style-name="P72">Elasticsearch</text:p>
      <text:p text:style-name="P245"><text:a xlink:type="simple" xlink:href="http://localhost:5601/app/dev_tools#/console/shell" text:style-name="Internet_20_link" text:visited-style-name="Visited_20_Internet_20_Link">http://localhost:5601/app/dev_tools#/console/shell</text:a></text:p>
      <text:p text:style-name="P245"/>
      <text:p text:style-name="P72">Elasticsearch materials</text:p>
      <text:p text:style-name="P244"><text:a xlink:type="simple" xlink:href="https://github.com/LisaHJung/Beginners-Crash-Course-to-Elastic-Stack-Series-Table-of-Contents?tab=readme-ov-file" text:style-name="Internet_20_link" text:visited-style-name="Visited_20_Internet_20_Link">https://github.com/LisaHJung/Beginners-Crash-Course-to-Elastic-Stack-Series-Table-of-Contents?tab=readme-ov-file</text:a></text:p>
      <text:p text:style-name="P244"/>
      <text:p text:style-name="P188">PARSING APACHE DATA</text:p>
      <text:p text:style-name="P255">128.39.24.23 - - [25/Dec/2021:12:16:50 +0000] "GET /category/electronics HTTP/1.1" 200 61 "/category/finance" "Mozilla/5.0 (compatible; MSIE 9.0; Windows NT 6.1; Trident/5.0)"</text:p>
      <text:p text:style-name="P244"/>
      <text:p text:style-name="P244"/>
      <text:p text:style-name="P252"><text:span text:style-name="T108">%{</text:span><text:span text:style-name="T110">IP</text:span><text:span text:style-name="T108">:</text:span><text:span text:style-name="T110">clientip</text:span><text:span text:style-name="T108">}</text:span> - - <text:span text:style-name="T108">\</text:span>[<text:span text:style-name="T108">%{</text:span><text:span text:style-name="T110">HTTPDATE</text:span><text:span text:style-name="T108">:</text:span><text:span text:style-name="T110">timestamp</text:span><text:span text:style-name="T108">}\</text:span>] \"<text:span text:style-name="T108">%{</text:span><text:span text:style-name="T110">WORD</text:span><text:span text:style-name="T108">:</text:span><text:span text:style-name="T110">verb</text:span><text:span text:style-name="T108">}</text:span> <text:span text:style-name="T108">%{</text:span><text:span text:style-name="T110">URIPATHPARAM</text:span><text:span text:style-name="T108">:</text:span><text:span text:style-name="T110">request</text:span><text:span text:style-name="T108">}</text:span> HTTP/<text:span text:style-name="T108">%{</text:span><text:span text:style-name="T110">NUMBER</text:span><text:span text:style-name="T108">:</text:span><text:span text:style-name="T110">httpversion</text:span><text:span text:style-name="T108">}</text:span>\" <text:span text:style-name="T108">%{</text:span><text:span text:style-name="T110">NUMBER</text:span><text:span text:style-name="T108">:</text:span><text:span text:style-name="T110">response</text:span><text:span text:style-name="T108">}</text:span> <text:span text:style-name="T108">%{</text:span><text:span text:style-name="T110">NUMBER</text:span><text:span text:style-name="T108">:</text:span><text:span text:style-name="T110">bytes</text:span><text:span text:style-name="T108">}</text:span> \"<text:span text:style-name="T108">%{</text:span><text:span text:style-name="T110">GREEDYDATA</text:span><text:span text:style-name="T108">:</text:span><text:span text:style-name="T110">referrer</text:span><text:span text:style-name="T108">}</text:span>\" \"<text:span text:style-name="T108">%{</text:span><text:span text:style-name="T110">GREEDYDATA</text:span><text:span text:style-name="T108">:</text:span><text:span text:style-name="T110">agent</text:span><text:span text:style-name="T108">}</text:span>\"</text:p>
      <text:p text:style-name="P244"/>
      <text:p text:style-name="P244"/>
      <text:p text:style-name="P244"><text:span text:style-name="T39">{ "request": </text:span><text:span text:style-name="T40">"/category/electronics"</text:span><text:span text:style-name="T39">, "referrer": </text:span><text:span text:style-name="T40">"/category/finance"</text:span><text:span text:style-name="T39">, "agent": </text:span><text:span text:style-name="T40">"Mozilla/5.0 (compatible; MSIE 9.0; Windows NT 6.1; Trident/5.0)"</text:span><text:span text:style-name="T39">, "response": </text:span><text:span text:style-name="T40">"200"</text:span><text:span text:style-name="T39">, "bytes": </text:span><text:span text:style-name="T40">"61"</text:span><text:span text:style-name="T39">, "clientip": </text:span><text:span text:style-name="T40">"128.39.24.23"</text:span><text:span text:style-name="T39">, "verb": </text:span><text:span text:style-name="T40">"GET"</text:span><text:span text:style-name="T39">, "httpversion": </text:span><text:span text:style-name="T40">"1.1"</text:span><text:span text:style-name="T39">, "timestamp": </text:span><text:span text:style-name="T40">"25/Dec/2021:12:16:50 +0000"</text:span><text:span text:style-name="T39"> }</text:span></text:p>
      <text:p text:style-name="P243"><draw:frame draw:style-name="fr6" draw:name="Image9" text:anchor-type="char" svg:width="6.6929in" svg:height="4.0752in" draw:z-index="11"><draw:image xlink:href="Pictures/100000010000078000000491EA532244.png" xlink:type="simple" xlink:show="embed" xlink:actuate="onLoad" draw:mime-type="image/png"/></draw:frame><text:line-break/><draw:frame draw:style-name="fr5" draw:name="Image13" text:anchor-type="char" svg:width="6.6929in" svg:height="4.0752in" draw:z-index="15"><draw:image xlink:href="Pictures/100000010000078000000491B53DBFB6.png" xlink:type="simple" xlink:show="embed" xlink:actuate="onLoad" draw:mime-type="image/png"/></draw:frame><text:line-break/></text:p>
      <text:p text:style-name="P244"/>
      <text:p text:style-name="P246"><draw:frame draw:style-name="fr5" draw:name="Image11" text:anchor-type="char" svg:width="6.6929in" svg:height="4.0752in" draw:z-index="13"><draw:image xlink:href="Pictures/100000010000078000000491ABBEFE99.png" xlink:type="simple" xlink:show="embed" xlink:actuate="onLoad" draw:mime-type="image/png"/></draw:frame><draw:frame draw:style-name="fr6" draw:name="Image10" text:anchor-type="char" svg:width="6.6929in" svg:height="4.0752in" draw:z-index="12"><draw:image xlink:href="Pictures/10000001000007800000049117582E66.png" xlink:type="simple" xlink:show="embed" xlink:actuate="onLoad" draw:mime-type="image/png"/></draw:frame><draw:frame draw:style-name="fr5" draw:name="Image12" text:anchor-type="char" svg:width="6.6929in" svg:height="4.0752in" draw:z-index="14"><draw:image xlink:href="Pictures/10000001000007800000049129B0DCA8.png" xlink:type="simple" xlink:show="embed" xlink:actuate="onLoad" draw:mime-type="image/png"/></draw:frame><text:line-break/><text:line-break/></text:p>
      <text:p text:style-name="P69"><draw:frame draw:style-name="fr5" draw:name="Image14" text:anchor-type="char" svg:width="6.6929in" svg:height="4.1008in" draw:z-index="16"><draw:image xlink:href="Pictures/10000001000007740000049179F2953A.png" xlink:type="simple" xlink:show="embed" xlink:actuate="onLoad" draw:mime-type="image/png"/></draw:frame>parsing backend log</text:p>
      <text:p text:style-name="P247"/>
      <text:p text:style-name="P247"/>
      <text:p text:style-name="P256">example log message</text:p>
      <text:p text:style-name="P250">2025-12-07T18:06:31.353+01:00 <text:s/>INFO 22697 --- [ <text:s text:c="10"/>main] com.angular.backend.BackendApplication <text:s text:c="2"/>: Starting BackendApplication v1.0.0 using Java 21.0.9 with PID 22697 (/home/ahanys/Desktop/zaloha2/datatables/myapp-jpa-server/target/myapp-jpa-server-1.0.0.jar started by ahanys in /home/ahanys/Desktop/zaloha2/datatables/myapp-jpa-server)</text:p>
      <text:p text:style-name="P248"/>
      <text:p text:style-name="P249">log parser</text:p>
      <text:p text:style-name="P253"><text:span text:style-name="T108">%{</text:span><text:span text:style-name="T110">TIMESTAMP_ISO8601</text:span><text:span text:style-name="T108">:</text:span><text:span text:style-name="T110">timestamp</text:span><text:span text:style-name="T108">}%{</text:span><text:span text:style-name="T110">SPACE</text:span><text:span text:style-name="T108">}%{</text:span><text:span text:style-name="T110">LOGLEVEL</text:span><text:span text:style-name="T108">:</text:span><text:span text:style-name="T110">log_level</text:span><text:span text:style-name="T108">}</text:span> <text:span text:style-name="T108">%{</text:span><text:span text:style-name="T110">INT</text:span><text:span text:style-name="T108">:</text:span><text:span text:style-name="T110">process_id</text:span><text:span text:style-name="T108">}</text:span> --- <text:span text:style-name="T108">\</text:span>[<text:span text:style-name="T108">%{</text:span><text:span text:style-name="T110">DATA</text:span><text:span text:style-name="T108">:</text:span><text:span text:style-name="T110">thread_name</text:span><text:span text:style-name="T108">}\</text:span>] <text:span text:style-name="T108">%{</text:span><text:span text:style-name="T110">DATA</text:span><text:span text:style-name="T108">:</text:span><text:span text:style-name="T110">class_name</text:span><text:span text:style-name="T108">}%{</text:span><text:span text:style-name="T110">SPACE</text:span><text:span text:style-name="T108">}:%{</text:span><text:span text:style-name="T110">SPACE</text:span><text:span text:style-name="T108">}%{</text:span><text:span text:style-name="T110">GREEDYDATA</text:span><text:span text:style-name="T108">:</text:span><text:span text:style-name="T110">log_message</text:span><text:span text:style-name="T108">}</text:span></text:p>
      <text:p text:style-name="P247"/>
      <text:p text:style-name="P247"/>
      <text:p text:style-name="P247"/>
      <text:p text:style-name="P247"/>
      <text:p text:style-name="P247"/>
      <text:p text:style-name="P247"><text:soft-page-break/></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53"><text:span text:style-name="T108">%{</text:span><text:span text:style-name="T110">TIMESTAMP_ISO8601</text:span><text:span text:style-name="T108">:</text:span><text:span text:style-name="T110">timestamp</text:span><text:span text:style-name="T108">}%{</text:span><text:span text:style-name="T110">SPACE</text:span><text:span text:style-name="T108">}%{</text:span><text:span text:style-name="T110">LOGLEVEL</text:span><text:span text:style-name="T108">:</text:span><text:span text:style-name="T110">log_level</text:span><text:span text:style-name="T108">}%{</text:span><text:span text:style-name="T110">SPACE</text:span><text:span text:style-name="T108">}%{</text:span><text:span text:style-name="T110">INT</text:span><text:span text:style-name="T108">:</text:span><text:span text:style-name="T110">pid</text:span><text:span text:style-name="T108">}%{</text:span><text:span text:style-name="T110">SPACE</text:span><text:span text:style-name="T108">}</text:span>---<text:span text:style-name="T108">%{</text:span><text:span text:style-name="T110">SPACE</text:span><text:span text:style-name="T108">}\</text:span>[<text:span text:style-name="T108">%{</text:span><text:span text:style-name="T110">%{SPACE</text:span><text:span text:style-name="T108">}</text:span>NOTSPACE<text:span text:style-name="T108">:</text:span>thread}<text:span text:style-name="T108">\</text:span>]<text:span text:style-name="T108">%{</text:span><text:span text:style-name="T110">SPACE</text:span><text:span text:style-name="T108">}%{</text:span><text:span text:style-name="T110">DATA</text:span><text:span text:style-name="T108">:</text:span><text:span text:style-name="T110">logger</text:span><text:span text:style-name="T108">}%{</text:span><text:span text:style-name="T110">SPACE</text:span><text:span text:style-name="T108">}:%{</text:span><text:span text:style-name="T110">SPACE</text:span><text:span text:style-name="T108">}%{</text:span><text:span text:style-name="T110">GREEDYDATA</text:span><text:span text:style-name="T108">:</text:span><text:span text:style-name="T110">message</text:span><text:span text:style-name="T108">}</text:span></text:p>
      <text:p text:style-name="P254"><draw:frame draw:style-name="fr4" draw:name="Image15" text:anchor-type="char" svg:x="0.7874in" svg:y="-0.3146in" svg:width="6.6929in" svg:height="4.1327in" draw:z-index="17"><draw:image xlink:href="Pictures/10000001000007650000049116AFD0DE.png" xlink:type="simple" xlink:show="embed" xlink:actuate="onLoad" draw:mime-type="image/png"/></draw:frame><text:soft-page-break/></text:p>
      <text:p text:style-name="P247"/>
      <text:p text:style-name="P253"><text:span text:style-name="T108">%{</text:span><text:span text:style-name="T110">TIMESTAMP_ISO8601</text:span><text:span text:style-name="T108">:</text:span><text:span text:style-name="T110">timestamp</text:span><text:span text:style-name="T108">}%{</text:span><text:span text:style-name="T110">SPACE</text:span><text:span text:style-name="T108">}%{</text:span><text:span text:style-name="T110">LOGLEVEL</text:span><text:span text:style-name="T108">:</text:span><text:span text:style-name="T110">level</text:span><text:span text:style-name="T108">}%{</text:span><text:span text:style-name="T110">SPACE</text:span><text:span text:style-name="T108">}%{</text:span><text:span text:style-name="T110">INT</text:span><text:span text:style-name="T108">:</text:span><text:span text:style-name="T110">pid</text:span><text:span text:style-name="T108">}%{</text:span><text:span text:style-name="T110">SPACE</text:span><text:span text:style-name="T108">}</text:span>---<text:span text:style-name="T108">%{</text:span><text:span text:style-name="T110">SPACE</text:span><text:span text:style-name="T108">}\</text:span>[<text:span text:style-name="T108">%{</text:span><text:span text:style-name="T110">SPACE</text:span><text:span text:style-name="T108">}%{</text:span><text:span text:style-name="T110">NOTSPACE</text:span><text:span text:style-name="T108">:</text:span><text:span text:style-name="T110">thread</text:span><text:span text:style-name="T108">}\</text:span>]<text:span text:style-name="T108">%{</text:span><text:span text:style-name="T110">SPACE</text:span><text:span text:style-name="T108">}%{</text:span><text:span text:style-name="T110">DATA</text:span><text:span text:style-name="T108">:</text:span><text:span text:style-name="T110">className</text:span><text:span text:style-name="T108">}%{</text:span><text:span text:style-name="T110">SPACE</text:span><text:span text:style-name="T108">}:%{</text:span><text:span text:style-name="T110">SPACE</text:span><text:span text:style-name="T108">}%{</text:span><text:span text:style-name="T110">GREEDYDATA</text:span><text:span text:style-name="T108">:</text:span><text:span text:style-name="T110">msg</text:span><text:span text:style-name="T108">}</text:span></text:p>
      <text:p text:style-name="P253"><text:span text:style-name="T108"/></text:p>
      <text:p text:style-name="P253"/>
      <text:p text:style-name="P247"/>
      <text:p text:style-name="P258">2025-12-07T18:06:33.543+01:00 <text:s/>WARN 22697 --- [ <text:s text:c="10"/>main] ConfigServletWebServerApplicationContext : Exception encountered during context initialization - cancelling refresh attempt: org.springframework.beans.factory.BeanCreationException: Error creating bean with name 'entityManagerFactory' defined in class path resource [org/springframework/boot/autoconfigure/orm/jpa/HibernateJpaConfiguration.class]: Failed to initialize dependency 'flywayInitializer' of LoadTimeWeaverAware bean 'entityManagerFactory': Error creating bean with name 'flywayInitializer' defined in class path resource [org/springframework/boot/autoconfigure/flyway/FlywayAutoConfiguration$FlywayConfiguration.class]: Unable to obtain connection from database: Connection to localhost:5432 refused. Check that the hostname and port are correct and that the postmaster is accepting TCP/IP connections.</text:p>
      <text:p text:style-name="P258"/>
      <text:p text:style-name="P258"/>
      <text:p text:style-name="P258"/>
      <text:p text:style-name="P258"/>
      <text:p text:style-name="P258"/>
      <text:p text:style-name="P258"/>
      <text:p text:style-name="P262"><text:soft-page-break/>Restore postgresql db in docker container</text:p>
      <text:p text:style-name="P261"><text:s/>docker cp /home/ahanys/Desktop/sample 5ac46fff7c95:/sample</text:p>
      <text:p text:style-name="P261"/>
      <text:p text:style-name="P63">LOGIN TO CONTAINER</text:p>
      <text:p text:style-name="P64">postgres=# docker exec -it -u postgres 5ac46fff7c95 psql -U postgres -W password -d mywebshop</text:p>
      <text:p text:style-name="P64"/>
      <text:p text:style-name="P67">su postgres</text:p>
      <text:p text:style-name="P65"><text:tab/></text:p>
      <text:p text:style-name="P65"/>
      <text:p text:style-name="P66">CREATE DATABASE dvdrental;</text:p>
      <text:p text:style-name="P65"/>
      <text:p text:style-name="P66">connect to database dvdrental</text:p>
      <text:p text:style-name="P66">\c dvdrental</text:p>
      <text:p text:style-name="P66"/>
      <text:p text:style-name="P66">import data to dvdrental database</text:p>
      <text:p text:style-name="P259"><text:span text:style-name="Source_20_Text"><text:span text:style-name="T11">pg_restore -c -U postgres -d dvdrental -v "/dvdrental.tar" -W</text:span></text:span></text:p>
      <text:p text:style-name="P259"><text:span text:style-name="Source_20_Text"><text:span text:style-name="T11"/></text:span></text:p>
      <text:p text:style-name="P259"><text:span text:style-name="Source_20_Text"><text:span text:style-name="T11"/></text:span></text:p>
      <text:p text:style-name="P66">postgres=# psql -U postgres -W password -d dvdrental</text:p>
      <text:p text:style-name="P66">postgres-# \c dvdrental</text:p>
      <text:p text:style-name="P66">You are now connected to database "dvdrental" as user "postgres".</text:p>
      <text:p text:style-name="P66"/>
      <text:p text:style-name="P66"/>
      <text:p text:style-name="P66"/>
      <text:p text:style-name="P260"/>
      <text:p text:style-name="P260"/>
      <text:p text:style-name="P260"/>
      <text:p text:style-name="P260"/>
      <text:p text:style-name="P260"/>
      <text:p text:style-name="P260"/>
      <text:p text:style-name="P260"/>
      <text:p text:style-name="P260"/>
      <text:p text:style-name="P287"><text:span text:style-name="T99">Where is stored information about installed software?</text:span><text:span text:style-name="T125"><text:line-break/></text:span>/var/lib/dpkg/status</text:p>
      <text:p text:style-name="P287"/>
      <text:p text:style-name="P287"/>
      <text:p text:style-name="P278">SWAGGER URL:<text:line-break/><text:a xlink:type="simple" xlink:href="http://localhost:9090/swagger-ui/index.html" text:style-name="Internet_20_link" text:visited-style-name="Visited_20_Internet_20_Link">http://localhost:9090/swagger-ui/index.html</text:a></text:p>
      <text:p text:style-name="P278"/>
      <text:p text:style-name="P278"><text:soft-page-break/></text:p>
      <text:p text:style-name="P279">Restore database dvdrental</text:p>
      <text:p text:style-name="P288"><text:span text:style-name="T95">root@comp:/# sudo -u postgres psql -d dvdrental -f /dvdrental.tar</text:span></text:p>
      <text:p text:style-name="P288"><text:span text:style-name="T95"/></text:p>
      <text:p text:style-name="P288"><text:span text:style-name="T95"/></text:p>
      <text:p text:style-name="P28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handas" svg:font-family="Chandas" style:font-pitch="variable"/>
    <style:font-face style:name="Droid Sans Mono" svg:font-family="'Droid Sans Mono', monospace, monospac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ystem-ui, sans-serif"/>
    <style:font-face style:name="Roboto Mono" svg:font-family="'Roboto Mono', 'Droid Sans Mono', monospace, monospace"/>
    <style:font-face style:name="Roboto Mono1" svg:font-family="'Roboto Mono', Menlo, Courier, monospace"/>
    <style:font-face style:name="Roboto Mono2" svg:font-family="'Roboto Mono', monospace"/>
    <style:font-face style:name="Roboto Mono3" svg:font-family="'Roboto Mono', ui-monospace, monospace"/>
    <style:font-face style:name="SFMono-Regular" svg:font-family="SFMono-Regular, Menlo, Monaco, Consolas, 'Liberation Mono', 'Courier New', monospace"/>
    <style:font-face style:name="Times New Roman" svg:font-family="'Times New Roman'"/>
    <style:font-face style:name="WarpMono" svg:font-family="WarpMono, 'WarpMono Fallback'"/>
    <style:font-face style:name="inherit" svg:font-family="inherit"/>
    <style:font-face style:name="system-ui" svg:font-family="system-ui, Ubuntu, 'Droid Sans', sans-serif"/>
    <style:font-face style:name="ui-monospace" svg:font-family="ui-monospace, 'Cascadia Mono', 'Segoe UI Mono', 'Liberation Mono', Menlo, Monaco, Consolas,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color="#069a2e" loext:opacity="100%" fo:font-size="18pt" style:font-size-asian="15.75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5T01:32:16.868983571</meta:creation-date>
    <dc:date>2025-12-17T22:03:45.270939683</dc:date>
    <meta:editing-duration>P7DT23H13M59S</meta:editing-duration>
    <meta:editing-cycles>182</meta:editing-cycles>
    <meta:generator>LibreOffice/24.2.7.2$Linux_X86_64 LibreOffice_project/420$Build-2</meta:generator>
    <meta:document-statistic meta:table-count="2" meta:image-count="15" meta:object-count="0" meta:page-count="54" meta:paragraph-count="1009" meta:word-count="7619" meta:character-count="59102" meta:non-whitespace-character-count="50629"/>
  </office:meta>
</office:document-meta>
</file>