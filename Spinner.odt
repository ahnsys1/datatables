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4000000644A4C3A3412E482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stem-ui" svg:font-family="system-ui, Ubuntu, 'Droid Sans', sans-serif"/>
  </office:font-face-decls>
  <office:automatic-styles>
    <style:style style:name="P1" style:family="paragraph" style:parent-style-name="Heading_20_1">
      <style:paragraph-properties fo:margin-left="0.152cm" fo:margin-right="0cm" fo:margin-top="0cm" fo:margin-bottom="0cm" style:contextual-spacing="false" fo:text-indent="0cm" style:auto-text-indent="false"/>
      <style:text-properties fo:font-variant="normal" fo:text-transform="none" fo:color="#616161" loext:opacity="100%" style:font-name="system-ui" fo:font-size="7.5pt" fo:font-style="normal" fo:font-weight="bold" fo:background-color="#ffffff" loext:padding-left="0cm" loext:padding-right="0cm" loext:padding-top="0.049cm" loext:padding-bottom="0.049cm" loext:border-left="none" loext:border-right="none" loext:border-top="0.06pt solid #c8c8c8" loext:border-bottom="0.06pt solid #c8c8c8"/>
    </style:style>
    <style:style style:name="P2" style:family="paragraph" style:parent-style-name="Heading_20_1">
      <style:paragraph-properties fo:margin-left="0.152cm" fo:margin-right="0cm" fo:margin-top="0cm" fo:margin-bottom="0cm" style:contextual-spacing="false" fo:text-indent="0cm" style:auto-text-indent="false"/>
      <style:text-properties fo:font-variant="normal" fo:text-transform="none" fo:color="#616161" loext:opacity="100%" style:font-name="system-ui" fo:font-size="7.5pt" fo:font-style="normal" fo:font-weight="bold" loext:padding="0cm" loext:border="none"/>
    </style:style>
    <style:style style:name="P3" style:family="paragraph" style:parent-style-name="Heading_20_3">
      <style:paragraph-properties fo:margin-top="0.076cm" fo:margin-bottom="0.247cm" style:contextual-spacing="false" style:line-height-at-least="0.379cm"/>
      <style:text-properties fo:font-variant="normal" fo:text-transform="none" fo:color="#616161" loext:opacity="100%" style:font-name="system-ui" fo:font-size="7pt" fo:font-style="normal" fo:font-weight="normal" loext:padding="0cm" loext:border="none"/>
    </style:style>
    <style:style style:name="P4" style:family="paragraph" style:parent-style-name="Heading_20_4">
      <style:paragraph-properties fo:margin-top="0.076cm" fo:margin-bottom="0.247cm" style:contextual-spacing="false" style:line-height-at-least="0.379cm"/>
      <style:text-properties fo:font-variant="normal" fo:text-transform="none" fo:color="#616161" loext:opacity="100%" style:font-name="system-ui" fo:font-size="7pt" fo:font-style="normal" fo:font-weight="normal" loext:padding="0cm" loext:border="none"/>
    </style:style>
    <style:style style:name="P5" style:family="paragraph" style:parent-style-name="Preformatted_20_Text">
      <style:paragraph-properties fo:margin-top="0.076cm" fo:margin-bottom="0.247cm" style:contextual-spacing="false" style:line-height-at-least="0.379cm"/>
      <style:text-properties fo:font-variant="normal" fo:text-transform="none" fo:color="#616161" loext:opacity="100%" style:font-name="system-ui" fo:font-size="7pt" fo:font-style="normal" fo:font-weight="normal" loext:padding="0cm" loext:border="none"/>
    </style:style>
    <style:style style:name="P6" style:family="paragraph" style:parent-style-name="Preformatted_20_Text">
      <style:paragraph-properties fo:margin-left="0.095cm" fo:margin-right="0.095cm" fo:margin-top="0cm" fo:margin-bottom="0cm" style:contextual-spacing="false" style:line-height-at-least="0.379cm" fo:text-indent="0cm" style:auto-text-indent="false"/>
      <style:text-properties fo:font-variant="normal" fo:text-transform="none" fo:color="#616161" loext:opacity="100%" style:font-name="system-ui" fo:font-size="7pt" fo:font-style="normal" fo:font-weight="normal" loext:padding="0cm" loext:border="none"/>
    </style:style>
    <style:style style:name="P7" style:family="paragraph" style:parent-style-name="Text_20_body">
      <style:paragraph-properties fo:margin-top="0.076cm" fo:margin-bottom="0cm" style:contextual-spacing="false" style:line-height-at-least="0.379cm"/>
      <style:text-properties fo:font-variant="normal" fo:text-transform="none" fo:color="#616161" loext:opacity="100%" style:font-name="system-ui" fo:font-size="7pt" fo:font-style="normal" fo:font-weight="normal" loext:padding="0cm" loext:border="none"/>
    </style:style>
    <style:style style:name="P8" style:family="paragraph" style:parent-style-name="Preformatted_20_Text">
      <style:paragraph-properties fo:margin-top="0.076cm" fo:margin-bottom="0.247cm" style:contextual-spacing="false" style:line-height-at-least="0.379cm"/>
      <style:text-properties fo:font-variant="normal" fo:text-transform="none" fo:color="#616161" loext:opacity="100%" style:font-name="system-ui" fo:font-size="7pt" fo:font-style="normal" fo:font-weight="normal" fo:background-color="#ffffff" loext:padding-left="0cm" loext:padding-right="0cm" loext:padding-top="0.049cm" loext:padding-bottom="0.049cm" loext:border-left="none" loext:border-right="none" loext:border-top="0.06pt solid #c8c8c8" loext:border-bottom="0.06pt solid #c8c8c8"/>
    </style:style>
    <style:style style:name="P9" style:family="paragraph" style:parent-style-name="Text_20_body">
      <style:paragraph-properties fo:margin-top="0.076cm" fo:margin-bottom="0cm" style:contextual-spacing="false" style:line-height-at-least="0.379cm"/>
      <style:text-properties fo:font-variant="normal" fo:text-transform="none" fo:color="#616161" loext:opacity="100%" style:font-name="system-ui" fo:font-size="7pt" fo:font-style="normal" fo:font-weight="normal" fo:background-color="#ffffff" loext:padding-left="0cm" loext:padding-right="0cm" loext:padding-top="0.049cm" loext:padding-bottom="0.049cm" loext:border-left="none" loext:border-right="none" loext:border-top="0.06pt solid #c8c8c8" loext:border-bottom="0.06pt solid #c8c8c8"/>
    </style:style>
    <style:style style:name="P10" style:family="paragraph" style:parent-style-name="Text_20_body">
      <style:text-properties fo:font-variant="normal" fo:text-transform="none" fo:color="#616161" loext:opacity="100%" style:font-name="system-ui" fo:font-size="7pt" fo:font-style="normal" fo:font-weight="normal" officeooo:rsid="0016a51e" officeooo:paragraph-rsid="0016a51e" fo:background-color="#ffffff" style:font-size-asian="19.25pt" style:font-size-complex="22pt" loext:padding-left="0cm" loext:padding-right="0cm" loext:padding-top="0.049cm" loext:padding-bottom="0.049cm" loext:border-left="none" loext:border-right="none" loext:border-top="0.06pt solid #c8c8c8" loext:border-bottom="0.06pt solid #c8c8c8"/>
    </style:style>
    <style:style style:name="P11" style:family="paragraph" style:parent-style-name="Preformatted_20_Text">
      <style:paragraph-properties fo:margin-top="0.076cm" fo:margin-bottom="0.247cm" style:contextual-spacing="false" style:line-height-at-least="0.379cm"/>
      <style:text-properties fo:font-variant="normal" fo:text-transform="none" fo:color="#616161" loext:opacity="100%" style:font-name="Google Sans Text" fo:font-size="7.5pt" fo:font-style="normal" fo:font-weight="normal" loext:padding="0cm" loext:border="none"/>
    </style:style>
    <style:style style:name="P12" style:family="paragraph" style:parent-style-name="Preformatted_20_Text">
      <style:paragraph-properties fo:margin-top="0.076cm" fo:margin-bottom="0.247cm" style:contextual-spacing="false" style:line-height-at-least="0.379cm"/>
      <style:text-properties fo:font-variant="normal" fo:text-transform="none" fo:color="#616161" loext:opacity="100%" style:font-name="Google Sans Text" fo:font-size="7.5pt" fo:font-style="normal" fo:font-weight="normal" fo:background-color="#ffffff" loext:padding-left="0cm" loext:padding-right="0cm" loext:padding-top="0.049cm" loext:padding-bottom="0.049cm" loext:border-left="none" loext:border-right="none" loext:border-top="0.06pt solid #c8c8c8" loext:border-bottom="0.06pt solid #c8c8c8"/>
    </style:style>
    <style:style style:name="P13" style:family="paragraph" style:parent-style-name="Text_20_body">
      <style:paragraph-properties fo:margin-top="0cm" fo:margin-bottom="0.189cm" style:contextual-spacing="false"/>
      <style:text-properties fo:font-variant="normal" fo:text-transform="none" fo:color="#616161" loext:opacity="100%" style:font-name="Google Sans Text" fo:font-size="6.44999980926514pt" fo:font-style="normal" fo:font-weight="normal" loext:padding="0cm" loext:border="none"/>
    </style:style>
    <style:style style:name="P14" style:family="paragraph" style:parent-style-name="Text_20_body">
      <style:paragraph-properties fo:margin-top="0.076cm" fo:margin-bottom="0cm" style:contextual-spacing="false" style:line-height-at-least="0.379cm"/>
      <style:text-properties fo:font-variant="normal" fo:text-transform="none" fo:color="#616161" loext:opacity="100%" fo:background-color="#ffffff" loext:padding-left="0cm" loext:padding-right="0cm" loext:padding-top="0.049cm" loext:padding-bottom="0.049cm" loext:border-left="none" loext:border-right="none" loext:border-top="0.06pt solid #c8c8c8" loext:border-bottom="0.06pt solid #c8c8c8"/>
    </style:style>
    <style:style style:name="P15" style:family="paragraph" style:parent-style-name="Preformatted_20_Text">
      <style:paragraph-properties fo:margin-left="0.095cm" fo:margin-right="0.095cm" fo:margin-top="0cm" fo:margin-bottom="0cm" style:contextual-spacing="false" style:line-height-at-least="0.379cm" fo:text-indent="0cm" style:auto-text-indent="false"/>
      <style:text-properties fo:font-variant="normal" fo:text-transform="none" fo:color="#48985d" loext:opacity="100%" style:font-name="system-ui" fo:font-size="7pt" fo:font-style="normal" fo:font-weight="normal" loext:padding="0cm" loext:border="none"/>
    </style:style>
    <style:style style:name="P16" style:family="paragraph" style:parent-style-name="Heading_20_3">
      <style:paragraph-properties fo:margin-top="0.076cm" fo:margin-bottom="0.247cm" style:contextual-spacing="false" style:line-height-at-least="0.379cm"/>
    </style:style>
    <style:style style:name="P17" style:family="paragraph" style:parent-style-name="Heading_20_4">
      <style:paragraph-properties fo:margin-top="0.076cm" fo:margin-bottom="0.247cm" style:contextual-spacing="false" style:line-height-at-least="0.379cm"/>
    </style:style>
    <style:style style:name="P18" style:family="paragraph" style:parent-style-name="Preformatted_20_Text">
      <style:paragraph-properties fo:margin-top="0.076cm" fo:margin-bottom="0.247cm" style:contextual-spacing="false" style:line-height-at-least="0.379cm"/>
    </style:style>
    <style:style style:name="P19" style:family="paragraph" style:parent-style-name="Preformatted_20_Text">
      <style:paragraph-properties fo:margin-top="0.076cm" fo:margin-bottom="0.247cm" style:contextual-spacing="false" style:line-height-at-least="0.379cm" fo:orphans="0"/>
    </style:style>
    <style:style style:name="P20" style:family="paragraph" style:parent-style-name="Text_20_body">
      <style:paragraph-properties fo:margin-left="0cm" fo:margin-right="0cm" fo:margin-top="0.076cm" fo:margin-bottom="0cm" style:contextual-spacing="false" style:line-height-at-least="0.379cm" fo:text-indent="0cm" style:auto-text-indent="false"/>
    </style:style>
    <style:style style:name="P21" style:family="paragraph" style:parent-style-name="Text_20_body">
      <style:paragraph-properties fo:margin-top="0.076cm" fo:margin-bottom="0cm" style:contextual-spacing="false" style:line-height-at-least="0.379cm"/>
    </style:style>
    <style:style style:name="P22" style:family="paragraph" style:parent-style-name="Text_20_body">
      <style:paragraph-properties fo:margin-left="0cm" fo:margin-right="0cm" fo:margin-top="0cm" fo:margin-bottom="0cm" style:contextual-spacing="false" fo:text-indent="0cm" style:auto-text-indent="false"/>
    </style:style>
    <style:style style:name="P23" style:family="paragraph" style:parent-style-name="Standard">
      <style:text-properties fo:font-size="22pt" officeooo:rsid="0016a51e" officeooo:paragraph-rsid="0016a51e" style:font-size-asian="19.25pt" style:font-size-complex="22pt"/>
    </style:style>
    <style:style style:name="P24" style:family="paragraph" style:parent-style-name="Text_20_body">
      <style:paragraph-properties fo:margin-top="0cm" fo:margin-bottom="0cm" style:contextual-spacing="false"/>
    </style:style>
    <style:style style:name="P25" style:family="paragraph" style:parent-style-name="Text_20_body">
      <style:paragraph-properties fo:margin-left="0cm" fo:margin-right="0cm" fo:margin-top="0cm" fo:margin-bottom="0.076cm" style:contextual-spacing="false" fo:text-indent="0cm" style:auto-text-indent="false"/>
      <style:text-properties fo:color="#767676" loext:opacity="100%" fo:font-weight="normal" loext:padding="0cm" loext:border="none"/>
    </style:style>
    <style:style style:name="P26" style:family="paragraph" style:parent-style-name="Preformatted_20_Text" style:list-style-name="L3">
      <style:paragraph-properties fo:margin-top="0.076cm" fo:margin-bottom="0.247cm" style:contextual-spacing="false" style:line-height-at-least="0.379cm"/>
      <style:text-properties fo:font-variant="normal" fo:text-transform="none" fo:color="#616161" loext:opacity="100%" style:font-name="system-ui" fo:font-size="7pt" fo:font-style="normal" fo:font-weight="normal" loext:padding="0cm" loext:border="none"/>
    </style:style>
    <style:style style:name="P27" style:family="paragraph" style:parent-style-name="Preformatted_20_Text" style:list-style-name="L3">
      <style:paragraph-properties fo:margin-top="0.076cm" fo:margin-bottom="0.247cm" style:contextual-spacing="false" style:line-height-at-least="0.379cm"/>
    </style:style>
    <style:style style:name="P28" style:family="paragraph" style:parent-style-name="Standard">
      <style:text-properties fo:font-size="22pt" officeooo:rsid="0016a51e" officeooo:paragraph-rsid="0016a51e" style:font-size-asian="19.25pt" style:font-size-complex="22pt"/>
    </style:style>
    <style:style style:name="P29" style:family="paragraph" style:parent-style-name="Standard">
      <style:text-properties fo:font-size="22pt" officeooo:rsid="0016a51e" officeooo:paragraph-rsid="0019ac33" style:font-size-asian="19.25pt" style:font-size-complex="22pt"/>
    </style:style>
    <style:style style:name="P30" style:family="paragraph" style:parent-style-name="Standard">
      <style:text-properties fo:font-size="15pt" officeooo:rsid="0016a51e" officeooo:paragraph-rsid="0016a51e" style:font-size-asian="15pt" style:font-size-complex="15pt"/>
    </style:style>
    <style:style style:name="P31" style:family="paragraph" style:parent-style-name="Standard">
      <style:text-properties fo:font-size="14pt" officeooo:rsid="0016a51e" officeooo:paragraph-rsid="0016a51e" style:font-size-asian="14pt" style:font-size-complex="14pt"/>
    </style:style>
    <style:style style:name="P32" style:family="paragraph" style:parent-style-name="Text_20_body" style:list-style-name="L1">
      <style:paragraph-properties fo:margin-top="0.076cm" fo:margin-bottom="0.247cm" style:contextual-spacing="false" style:line-height-at-least="0.379cm"/>
    </style:style>
    <style:style style:name="P33" style:family="paragraph" style:parent-style-name="Text_20_body" style:list-style-name="L2">
      <style:paragraph-properties fo:margin-top="0.076cm" fo:margin-bottom="0cm" style:contextual-spacing="false" style:line-height-at-least="0.379cm"/>
    </style:style>
    <style:style style:name="P34" style:family="paragraph" style:parent-style-name="Text_20_body" style:list-style-name="L3">
      <style:paragraph-properties fo:margin-top="0.076cm" fo:margin-bottom="0cm" style:contextual-spacing="false" style:line-height-at-least="0.379cm"/>
    </style:style>
    <style:style style:name="T1" style:family="text">
      <style:text-properties style:font-name="system-ui" fo:font-size="7pt" fo:font-style="normal" fo:font-weight="normal"/>
    </style:style>
    <style:style style:name="T2" style:family="text">
      <style:text-properties fo:font-variant="normal" fo:text-transform="none" fo:color="#616161" loext:opacity="100%" style:font-name="system-ui" fo:font-size="7pt" fo:font-style="normal" fo:font-weight="normal" loext:padding="0cm" loext:border="none"/>
    </style:style>
    <style:style style:name="T3" style:family="text">
      <style:text-properties fo:font-variant="normal" fo:text-transform="none" fo:color="#616161" loext:opacity="100%" fo:background-color="transparent" loext:char-shading-value="0" loext:padding="0cm" loext:border="none"/>
    </style:style>
    <style:style style:name="T4" style:family="text">
      <style:text-properties fo:font-variant="normal" fo:text-transform="none" fo:color="#616161" loext:opacity="100%" style:font-name="Droid Sans Mono" fo:font-size="7.5pt" fo:font-style="normal" fo:font-weight="normal" fo:background-color="transparent" loext:char-shading-value="0" loext:padding="0cm" loext:border="none"/>
    </style:style>
    <style:style style:name="T5" style:family="text">
      <style:text-properties fo:font-variant="normal" fo:text-transform="none" fo:color="#a31515" loext:opacity="100%" style:font-name="system-ui" fo:font-size="7.5pt" fo:font-style="normal" fo:font-weight="normal" loext:padding="0cm" loext:border="none"/>
    </style:style>
    <style:style style:name="T6" style:family="text">
      <style:text-properties fo:font-variant="normal" fo:text-transform="none" fo:color="#a31515" loext:opacity="100%" style:font-name="Droid Sans Mono" fo:font-size="7.5pt" fo:font-style="normal" fo:font-weight="normal" fo:background-color="transparent" loext:char-shading-value="0" loext:padding="0cm" loext:border="none"/>
    </style:style>
    <style:style style:name="T7" style:family="text">
      <style:text-properties fo:font-variant="normal" fo:text-transform="none" fo:color="#006ab1" loext:opacity="100%" style:text-line-through-style="none" style:text-line-through-type="none" style:font-name="system-ui" fo:font-size="7.5pt" fo:font-style="normal" style:text-underline-style="none" fo:font-weight="normal" style:text-blinking="false" loext:padding="0cm" loext:border="none"/>
    </style:style>
    <style:style style:name="T8" style:family="text">
      <style:text-properties fo:font-variant="normal" fo:text-transform="none" fo:color="#006ab1" loext:opacity="100%" style:text-line-through-style="none" style:text-line-through-type="none" style:font-name="system-ui" fo:font-size="7pt" fo:font-style="normal" style:text-underline-style="none" fo:font-weight="normal" style:text-blinking="false" loext:padding="0cm" loext:border="none"/>
    </style:style>
    <style:style style:name="T9" style:family="text">
      <style:text-properties fo:font-variant="normal" fo:text-transform="none" fo:color="#0000ff" loext:opacity="100%" style:font-name="Droid Sans Mono" fo:font-size="7.5pt" fo:font-style="normal" fo:font-weight="normal" fo:background-color="transparent" loext:char-shading-value="0" loext:padding="0cm" loext:border="none"/>
    </style:style>
    <style:style style:name="T10" style:family="text">
      <style:text-properties fo:font-variant="normal" fo:text-transform="none" fo:color="#ff0000" loext:opacity="100%" style:font-name="Droid Sans Mono" fo:font-size="7.5pt" fo:font-style="normal" fo:font-weight="normal" fo:background-color="transparent" loext:char-shading-value="0" loext:padding="0cm" loext:border="none"/>
    </style:style>
    <style:style style:name="T11" style:family="text">
      <style:text-properties fo:font-variant="normal" fo:text-transform="none" fo:color="#008000" loext:opacity="100%" style:font-name="Droid Sans Mono" fo:font-size="7.5pt" fo:font-style="normal" fo:font-weight="normal" fo:background-color="transparent" loext:char-shading-value="0" loext:padding="0cm" loext:border="none"/>
    </style:style>
    <style:style style:name="T12" style:family="text">
      <style:text-properties fo:font-variant="normal" fo:text-transform="none" fo:color="#008000" loext:opacity="100%" fo:background-color="transparent" loext:char-shading-value="0" loext:padding="0cm" loext:border="none"/>
    </style:style>
    <style:style style:name="T13" style:family="text">
      <style:text-properties fo:font-variant="normal" fo:text-transform="none" fo:color="#2b91af" loext:opacity="100%" style:font-name="Droid Sans Mono" fo:font-size="7.5pt" fo:font-style="normal" fo:font-weight="normal" fo:background-color="transparent" loext:char-shading-value="0" loext:padding="0cm" loext:border="none"/>
    </style:style>
    <style:style style:name="T14" style:family="text">
      <style:text-properties fo:color="#e51400" loext:opacity="100%"/>
    </style:style>
    <style:style style:name="T15" style:family="text">
      <style:text-properties fo:color="#48985d" loext:opacity="100%"/>
    </style:style>
    <style:style style:name="T16" style:family="text">
      <style:text-properties fo:font-size="15pt" style:font-size-asian="15pt" style:font-size-complex="15pt"/>
    </style:style>
    <style:style style:name="T17" style:family="text">
      <style:text-properties fo:font-size="14pt" style:font-size-asian="14pt" style:font-size-complex="14pt"/>
    </style:style>
    <style:style style:name="T18" style:family="text">
      <style:text-properties fo:font-size="14pt" officeooo:rsid="0019ac33" style:font-size-asian="14pt" style:font-size-complex="14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fo:margin-left="0.056cm" fo:margin-right="0.056cm" fo:margin-top="0.056cm" fo:margin-bottom="0.05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8" text:anchor-type="page" text:anchor-page-number="1" svg:x="0cm" svg:y="0cm" svg:width="0.568cm" draw:z-index="8">
        <draw:text-box fo:min-height="0.568cm">
          <text:p text:style-name="Text_20_body"><draw:frame draw:style-name="fr2" draw:name="Image8" text:anchor-type="as-char" svg:width="0.455cm" svg:height="0.455cm" draw:z-index="9"><draw:image xlink:href="https://file+.vscode-resource.vscode-cdn.net/home/vj/.vscode/extensions/google.geminicodeassist-2.49.0/images/gemini_color.svg" xlink:type="simple" xlink:show="embed" xlink:actuate="onLoad"/></draw:frame></text:p>
        </draw:text-box>
      </draw:frame>
      <draw:frame draw:style-name="fr1" draw:name="Frame7" text:anchor-type="page" text:anchor-page-number="1" svg:x="0cm" svg:y="0cm" svg:width="0.568cm" draw:z-index="7">
        <draw:text-box fo:min-height="0.568cm">
          <text:p text:style-name="Text_20_body"><draw:frame draw:style-name="fr2" draw:name="Image7" text:anchor-type="as-char" svg:width="0.455cm" svg:height="0.455cm" draw:z-index="10"><draw:image xlink:href="Pictures/1000000000000064000000644A4C3A3412E482E9.png" xlink:type="simple" xlink:show="embed" xlink:actuate="onLoad" draw:mime-type="image/png"/></draw:frame></text:p>
        </draw:text-box>
      </draw:frame>
      <draw:frame draw:style-name="fr1" draw:name="Frame6" text:anchor-type="page" text:anchor-page-number="1" svg:x="0cm" svg:y="0cm" svg:width="0.568cm" draw:z-index="6">
        <draw:text-box fo:min-height="0.568cm">
          <text:p text:style-name="Text_20_body"><draw:frame draw:style-name="fr2" draw:name="Image6" text:anchor-type="as-char" svg:width="0.455cm" svg:height="0.455cm" draw:z-index="11"><draw:image xlink:href="https://file+.vscode-resource.vscode-cdn.net/home/vj/.vscode/extensions/google.geminicodeassist-2.49.0/images/gemini_color.svg" xlink:type="simple" xlink:show="embed" xlink:actuate="onLoad"/></draw:frame></text:p>
        </draw:text-box>
      </draw:frame>
      <draw:frame draw:style-name="fr1" draw:name="Frame5" text:anchor-type="page" text:anchor-page-number="1" svg:x="0cm" svg:y="0cm" svg:width="0.568cm" draw:z-index="5">
        <draw:text-box fo:min-height="0.568cm">
          <text:p text:style-name="Text_20_body"><draw:frame draw:style-name="fr2" draw:name="Image5" text:anchor-type="as-char" svg:width="0.455cm" svg:height="0.455cm" draw:z-index="12"><draw:image xlink:href="Pictures/1000000000000064000000644A4C3A3412E482E9.png" xlink:type="simple" xlink:show="embed" xlink:actuate="onLoad" draw:mime-type="image/png"/></draw:frame></text:p>
        </draw:text-box>
      </draw:frame>
      <draw:frame draw:style-name="fr1" draw:name="Frame4" text:anchor-type="page" text:anchor-page-number="1" svg:x="0cm" svg:y="0cm" svg:width="0.568cm" draw:z-index="4">
        <draw:text-box fo:min-height="0.568cm">
          <text:p text:style-name="Text_20_body"><draw:frame draw:style-name="fr2" draw:name="Image4" text:anchor-type="as-char" svg:width="0.455cm" svg:height="0.455cm" draw:z-index="13"><draw:image xlink:href="https://file+.vscode-resource.vscode-cdn.net/home/vj/.vscode/extensions/google.geminicodeassist-2.49.0/images/gemini_color.svg" xlink:type="simple" xlink:show="embed" xlink:actuate="onLoad"/></draw:frame></text:p>
        </draw:text-box>
      </draw:frame>
      <draw:frame draw:style-name="fr1" draw:name="Frame3" text:anchor-type="page" text:anchor-page-number="1" svg:x="0cm" svg:y="0cm" svg:width="0.568cm" draw:z-index="3">
        <draw:text-box fo:min-height="0.568cm">
          <text:p text:style-name="Text_20_body"><draw:frame draw:style-name="fr2" draw:name="Image3" text:anchor-type="as-char" svg:width="0.455cm" svg:height="0.455cm" draw:z-index="14"><draw:image xlink:href="Pictures/1000000000000064000000644A4C3A3412E482E9.png" xlink:type="simple" xlink:show="embed" xlink:actuate="onLoad" draw:mime-type="image/png"/></draw:frame></text:p>
        </draw:text-box>
      </draw:frame>
      <draw:frame draw:style-name="fr1" draw:name="Frame2" text:anchor-type="page" text:anchor-page-number="1" svg:x="0cm" svg:y="0cm" svg:width="0.568cm" draw:z-index="2">
        <draw:text-box fo:min-height="0.568cm">
          <text:p text:style-name="Text_20_body"><draw:frame draw:style-name="fr2" draw:name="Image2" text:anchor-type="as-char" svg:width="0.455cm" svg:height="0.455cm" draw:z-index="15"><draw:image xlink:href="https://file+.vscode-resource.vscode-cdn.net/home/vj/.vscode/extensions/google.geminicodeassist-2.49.0/images/gemini_color.svg" xlink:type="simple" xlink:show="embed" xlink:actuate="onLoad"/></draw:frame></text:p>
        </draw:text-box>
      </draw:frame>
      <draw:frame draw:style-name="fr1" draw:name="Frame1" text:anchor-type="page" text:anchor-page-number="1" svg:x="0cm" svg:y="0cm" svg:width="0.568cm" draw:z-index="0">
        <draw:text-box fo:min-height="0.568cm">
          <text:p text:style-name="Text_20_body"><draw:frame draw:style-name="fr2" draw:name="Image1" text:anchor-type="as-char" svg:width="0.455cm" svg:height="0.455cm" draw:z-index="1"><draw:image xlink:href="Pictures/1000000000000064000000644A4C3A3412E482E9.png" xlink:type="simple" xlink:show="embed" xlink:actuate="onLoad" draw:mime-type="image/png"/></draw:frame></text:p>
        </draw:text-box>
      </draw:frame>
      <draw:frame draw:style-name="fr1" draw:name="Frame9" text:anchor-type="page" text:anchor-page-number="1" svg:x="0cm" svg:y="0cm" svg:width="0.568cm" draw:z-index="16">
        <draw:text-box fo:min-height="0.568cm">
          <text:p text:style-name="Text_20_body"><draw:frame draw:style-name="fr2" draw:name="Image9" text:anchor-type="as-char" svg:width="0.455cm" svg:height="0.455cm" draw:z-index="17"><draw:image xlink:href="https://file+.vscode-resource.vscode-cdn.net/home/vj/.vscode/extensions/google.geminicodeassist-2.49.0/images/gemini_color.svg" xlink:type="simple" xlink:show="embed" xlink:actuate="onLoad"/></draw:frame></text:p>
        </draw:text-box>
      </draw:frame>
      <text:p text:style-name="P20"><text:span text:style-name="T2">Of course! I can help you implement a loading spinner that appears in the middle of the screen for your </text:span><text:span text:style-name="Source_20_Text"><text:span text:style-name="T5">DataTables3Component</text:span></text:span><text:span text:style-name="T2">.</text:span></text:p>
      <text:p text:style-name="P21"><text:span text:style-name="T2">Based on the files you've provided, you already have a great setup for a global spinner using an </text:span><text:span text:style-name="Source_20_Text"><text:span text:style-name="T5">HTTP_INTERCEPTOR</text:span></text:span><text:span text:style-name="T2"> (</text:span><text:span text:style-name="Source_20_Text"><text:span text:style-name="T5">SpinnerInterceptor</text:span></text:span><text:span text:style-name="T2">) and a </text:span><text:span text:style-name="Source_20_Text"><text:span text:style-name="T5">SpinnerService</text:span></text:span><text:span text:style-name="T2">. This is an excellent pattern because it automatically shows the spinner for any ongoing HTTP requests, like the ones in your </text:span><text:span text:style-name="Source_20_Text"><text:span text:style-name="T5">EmployeeService</text:span></text:span><text:span text:style-name="T2">.</text:span></text:p>
      <text:p text:style-name="P21"><text:span text:style-name="T2">The main tasks are to provide the correct styling to center the spinner and to remove the redundant, manual loading logic from your </text:span><text:span text:style-name="Source_20_Text"><text:span text:style-name="T5">DataTables3Component</text:span></text:span><text:span text:style-name="T2"> to rely solely on the global interceptor.</text:span></text:p>
      <text:p text:style-name="P7">Here are the steps and code changes to achieve this:</text:p>
      <text:h text:style-name="P3" text:outline-level="3">1. Center the Spinner with HTML and CSS</text:h>
      <text:p text:style-name="P21"><text:span text:style-name="T2">First, we need to create the HTML and CSS for your </text:span><text:span text:style-name="Source_20_Text"><text:span text:style-name="T5">SpinnerComponent</text:span></text:span><text:span text:style-name="T2"> to make it a full-screen overlay with the spinner in the center.</text:span></text:p>
      <text:p text:style-name="P7">I'll create these two files for you.</text:p>
      <text:p text:style-name="P21"><text:span text:style-name="Strong_20_Emphasis"><text:span text:style-name="T2">New File: </text:span></text:span><text:a xlink:type="simple" xlink:href="code-assist-path:/home/vj/Desktop/A/__myapp/datatables3/datatables/myapp-client/src/app/shared/spinner/spinner.component.html" text:style-name="Internet_20_link" text:visited-style-name="Visited_20_Internet_20_Link"><text:span text:style-name="Strong_20_Emphasis"><text:span text:style-name="Source_20_Text"><text:span text:style-name="T7">spinner.component.html</text:span></text:span></text:span></text:a><text:span text:style-name="T2"> This file will contain the Material Progress Spinner inside a container div.</text:span></text:p>
      <text:p text:style-name="P11">New file: spinner.component.html</text:p>
      <text:p text:style-name="P15">+3</text:p>
      <text:p text:style-name="P18"><text:span text:style-name="Source_20_Text"><text:span text:style-name="T9">&lt;div *</text:span></text:span><text:span text:style-name="Source_20_Text"><text:span text:style-name="T10">ngIf</text:span></text:span><text:span text:style-name="Source_20_Text"><text:span text:style-name="T9">=</text:span></text:span><text:span text:style-name="Source_20_Text"><text:span text:style-name="T6">"isLoading$ | async"</text:span></text:span><text:span text:style-name="Source_20_Text"><text:span text:style-name="T9"> </text:span></text:span><text:span text:style-name="Source_20_Text"><text:span text:style-name="T10">class</text:span></text:span><text:span text:style-name="Source_20_Text"><text:span text:style-name="T9">=</text:span></text:span><text:span text:style-name="Source_20_Text"><text:span text:style-name="T6">"spinner-overlay"</text:span></text:span><text:span text:style-name="Source_20_Text"><text:span text:style-name="T9">&gt;</text:span></text:span></text:p>
      <text:p text:style-name="P18"><text:span text:style-name="Source_20_Text"><text:span text:style-name="T3"><text:s text:c="2"/></text:span></text:span><text:span text:style-name="Source_20_Text"><text:span text:style-name="T9">&lt;mat-progress-spinner </text:span></text:span><text:span text:style-name="Source_20_Text"><text:span text:style-name="T10">color</text:span></text:span><text:span text:style-name="Source_20_Text"><text:span text:style-name="T9">=</text:span></text:span><text:span text:style-name="Source_20_Text"><text:span text:style-name="T6">"primary"</text:span></text:span><text:span text:style-name="Source_20_Text"><text:span text:style-name="T9"> </text:span></text:span><text:span text:style-name="Source_20_Text"><text:span text:style-name="T10">mode</text:span></text:span><text:span text:style-name="Source_20_Text"><text:span text:style-name="T9">=</text:span></text:span><text:span text:style-name="Source_20_Text"><text:span text:style-name="T6">"indeterminate"</text:span></text:span><text:span text:style-name="Source_20_Text"><text:span text:style-name="T9">&gt;&lt;/mat-progress-spinner&gt;</text:span></text:span></text:p>
      <text:p text:style-name="P18"><text:span text:style-name="Source_20_Text"><text:span text:style-name="T9">&lt;/div&gt;</text:span></text:span></text:p>
      <text:p text:style-name="P21"><text:span text:style-name="Strong_20_Emphasis"><text:span text:style-name="T2">New File: </text:span></text:span><text:a xlink:type="simple" xlink:href="code-assist-path:/home/vj/Desktop/A/__myapp/datatables3/datatables/myapp-client/src/app/shared/spinner/spinner.component.css" text:style-name="Internet_20_link" text:visited-style-name="Visited_20_Internet_20_Link"><text:span text:style-name="Strong_20_Emphasis"><text:span text:style-name="Source_20_Text"><text:span text:style-name="T7">spinner.component.css</text:span></text:span></text:span></text:a><text:span text:style-name="T2"> This CSS will style the overlay to cover the screen and center the spinner.</text:span></text:p>
      <text:p text:style-name="P11">New file: spinner.component.css</text:p>
      <text:p text:style-name="P15">+12</text:p>
      <text:p text:style-name="P18"><text:span text:style-name="Source_20_Text"><text:span text:style-name="T4">.spinner-overlay {</text:span></text:span></text:p>
      <text:p text:style-name="P18"><text:span text:style-name="Source_20_Text"><text:span text:style-name="T3"><text:s text:c="2"/></text:span></text:span><text:span text:style-name="Source_20_Text"><text:span text:style-name="T6">position</text:span></text:span><text:span text:style-name="Source_20_Text"><text:span text:style-name="T4">: fixed;</text:span></text:span></text:p>
      <text:p text:style-name="P18"><text:span text:style-name="Source_20_Text"><text:span text:style-name="T3"><text:s text:c="2"/></text:span></text:span><text:span text:style-name="Source_20_Text"><text:span text:style-name="T6">top</text:span></text:span><text:span text:style-name="Source_20_Text"><text:span text:style-name="T4">: 0;</text:span></text:span></text:p>
      <text:p text:style-name="P18"><text:span text:style-name="Source_20_Text"><text:span text:style-name="T3"><text:s text:c="2"/></text:span></text:span><text:span text:style-name="Source_20_Text"><text:span text:style-name="T6">left</text:span></text:span><text:span text:style-name="Source_20_Text"><text:span text:style-name="T4">: 0;</text:span></text:span></text:p>
      <text:p text:style-name="P18"><text:span text:style-name="Source_20_Text"><text:span text:style-name="T3"><text:s text:c="2"/></text:span></text:span><text:span text:style-name="Source_20_Text"><text:span text:style-name="T6">width</text:span></text:span><text:span text:style-name="Source_20_Text"><text:span text:style-name="T4">: 100%;</text:span></text:span></text:p>
      <text:p text:style-name="P18"><text:span text:style-name="Source_20_Text"><text:span text:style-name="T3"><text:s text:c="2"/></text:span></text:span><text:span text:style-name="Source_20_Text"><text:span text:style-name="T6">height</text:span></text:span><text:span text:style-name="Source_20_Text"><text:span text:style-name="T4">: 100%;</text:span></text:span></text:p>
      <text:p text:style-name="P18"><text:span text:style-name="Source_20_Text"><text:span text:style-name="T3"><text:s text:c="2"/></text:span></text:span><text:span text:style-name="Source_20_Text"><text:span text:style-name="T6">background-color</text:span></text:span><text:span text:style-name="Source_20_Text"><text:span text:style-name="T4">: </text:span></text:span><text:span text:style-name="Source_20_Text"><text:span text:style-name="T9">rgba</text:span></text:span><text:span text:style-name="Source_20_Text"><text:span text:style-name="T4">(0, 0, 0, 0.5); </text:span></text:span><text:span text:style-name="Source_20_Text"><text:span text:style-name="T11">/* Semi-transparent background */</text:span></text:span></text:p>
      <text:p text:style-name="P18"><text:span text:style-name="Source_20_Text"><text:span text:style-name="T3"><text:s text:c="2"/></text:span></text:span><text:span text:style-name="Source_20_Text"><text:span text:style-name="T6">display</text:span></text:span><text:span text:style-name="Source_20_Text"><text:span text:style-name="T4">: flex;</text:span></text:span></text:p>
      <text:p text:style-name="P18"><text:span text:style-name="Source_20_Text"><text:span text:style-name="T3"><text:s text:c="2"/></text:span></text:span><text:span text:style-name="Source_20_Text"><text:span text:style-name="T6">justify-content</text:span></text:span><text:span text:style-name="Source_20_Text"><text:span text:style-name="T4">: center;</text:span></text:span></text:p>
      <text:p text:style-name="P18"><text:span text:style-name="Source_20_Text"><text:span text:style-name="T3"><text:s text:c="2"/></text:span></text:span><text:span text:style-name="Source_20_Text"><text:span text:style-name="T6">align-items</text:span></text:span><text:span text:style-name="Source_20_Text"><text:span text:style-name="T4">: center;</text:span></text:span></text:p>
      <text:p text:style-name="P18"><text:span text:style-name="Source_20_Text"><text:span text:style-name="T3"><text:s text:c="2"/></text:span></text:span><text:span text:style-name="Source_20_Text"><text:span text:style-name="T6">z-index</text:span></text:span><text:span text:style-name="Source_20_Text"><text:span text:style-name="T4">: 9999; </text:span></text:span><text:span text:style-name="Source_20_Text"><text:span text:style-name="T11">/* High z-index to be on top of everything */</text:span></text:span></text:p>
      <text:p text:style-name="P18"><text:span text:style-name="Source_20_Text"><text:span text:style-name="T4">}</text:span></text:span></text:p>
      <text:h text:style-name="P3" text:outline-level="3">2. Update Component and Service Files</text:h>
      <text:p text:style-name="P7">Let's make a few quick fixes and cleanups to ensure everything works together smoothly.</text:p>
      <text:p text:style-name="P21"><text:span text:style-name="Strong_20_Emphasis"><text:span text:style-name="T2">Fix </text:span></text:span><text:span text:style-name="Strong_20_Emphasis"><text:span text:style-name="Source_20_Text"><text:span text:style-name="T5">SpinnerComponent</text:span></text:span></text:span><text:span text:style-name="Strong_20_Emphasis"><text:span text:style-name="T2"> Import</text:span></text:span><text:span text:style-name="T2"> The import for </text:span><text:span text:style-name="Source_20_Text"><text:span text:style-name="T5">SpinnerService</text:span></text:span><text:span text:style-name="T2"> in your </text:span><text:a xlink:type="simple" xlink:href="code-assist-path:/home/vj/Desktop/A/__myapp/datatables3/datatables/myapp-client/src/app/shared/spinner/spinner.component.ts" text:style-name="Internet_20_link" text:visited-style-name="Visited_20_Internet_20_Link"><text:span text:style-name="Source_20_Text"><text:span text:style-name="T7">spinner.component.ts</text:span></text:span></text:a><text:span text:style-name="T2"> has a typo in the filename. Let's correct it.</text:span></text:p>
      <text:p text:style-name="P11">spinner.component.ts</text:p>
      <text:p text:style-name="P6"><text:span text:style-name="T14">-1</text:span><text:span text:style-name="T15">+1</text:span></text:p>
      <text:p text:style-name="P18"><text:span text:style-name="Source_20_Text"><text:span text:style-name="T9">import</text:span></text:span><text:span text:style-name="Source_20_Text"><text:span text:style-name="T4"> { Component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CommonModule } </text:span></text:span><text:span text:style-name="Source_20_Text"><text:span text:style-name="T9">from</text:span></text:span><text:span text:style-name="Source_20_Text"><text:span text:style-name="T4"> </text:span></text:span><text:span text:style-name="Source_20_Text"><text:span text:style-name="T6">'@angular/common'</text:span></text:span><text:span text:style-name="Source_20_Text"><text:span text:style-name="T4">;</text:span></text:span></text:p>
      <text:p text:style-name="P18"><text:span text:style-name="Source_20_Text"><text:span text:style-name="T9">import</text:span></text:span><text:span text:style-name="Source_20_Text"><text:span text:style-name="T4"> { MatProgressSpinnerModule } </text:span></text:span><text:span text:style-name="Source_20_Text"><text:span text:style-name="T9">from</text:span></text:span><text:span text:style-name="Source_20_Text"><text:span text:style-name="T4"> </text:span></text:span><text:span text:style-name="Source_20_Text"><text:span text:style-name="T6">'@angular/material/progress-spinner'</text:span></text:span><text:span text:style-name="Source_20_Text"><text:span text:style-name="T4">;</text:span></text:span></text:p>
      <text:p text:style-name="P18"><text:span text:style-name="Source_20_Text"><text:span text:style-name="T9">import</text:span></text:span><text:span text:style-name="Source_20_Text"><text:span text:style-name="T4"> { SpinnerService } </text:span></text:span><text:span text:style-name="Source_20_Text"><text:span text:style-name="T9">from</text:span></text:span><text:span text:style-name="Source_20_Text"><text:span text:style-name="T4"> </text:span></text:span><text:span text:style-name="Source_20_Text"><text:span text:style-name="T6">'../../service/servicespinner.service'</text:span></text:span></text:p>
      <text:p text:style-name="P18"><text:span text:style-name="Source_20_Text"><text:span text:style-name="T9">import</text:span></text:span><text:span text:style-name="Source_20_Text"><text:span text:style-name="T4"> { SpinnerService } </text:span></text:span><text:span text:style-name="Source_20_Text"><text:span text:style-name="T9">from</text:span></text:span><text:span text:style-name="Source_20_Text"><text:span text:style-name="T4"> </text:span></text:span><text:span text:style-name="Source_20_Text"><text:span text:style-name="T6">'../../service/spinner.service'</text:span></text:span><text:span text:style-name="Source_20_Text"><text:span text:style-name="T4">;</text:span></text:span></text:p>
      <text:p text:style-name="P18"><text:span text:style-name="Source_20_Text"><text:span text:style-name="T13">@Component</text:span></text:span><text:span text:style-name="Source_20_Text"><text:span text:style-name="T4">({</text:span></text:span></text:p>
      <text:p text:style-name="P18"><text:soft-page-break/><text:span text:style-name="Source_20_Text"><text:span text:style-name="T3"><text:s text:c="4"/></text:span></text:span><text:span text:style-name="Source_20_Text"><text:span text:style-name="T10">selector</text:span></text:span><text:span text:style-name="Source_20_Text"><text:span text:style-name="T4">: </text:span></text:span><text:span text:style-name="Source_20_Text"><text:span text:style-name="T6">'app-spinner'</text:span></text:span><text:span text:style-name="Source_20_Text"><text:span text:style-name="T4">,</text:span></text:span></text:p>
      <text:p text:style-name="P18"><text:span text:style-name="Source_20_Text"><text:span text:style-name="T3"><text:s text:c="4"/></text:span></text:span><text:span text:style-name="Source_20_Text"><text:span text:style-name="T10">standalone</text:span></text:span><text:span text:style-name="Source_20_Text"><text:span text:style-name="T4">: </text:span></text:span><text:span text:style-name="Source_20_Text"><text:span text:style-name="T6">true</text:span></text:span><text:span text:style-name="Source_20_Text"><text:span text:style-name="T4">,</text:span></text:span></text:p>
      <text:p text:style-name="P18"/>
      <text:p text:style-name="P21"><text:span text:style-name="Strong_20_Emphasis"><text:span text:style-name="T2">Clean up </text:span></text:span><text:a xlink:type="simple" xlink:href="code-assist-path:/home/vj/Desktop/A/__myapp/datatables3/datatables/myapp-client/src/app/app.config.ts" text:style-name="Internet_20_link" text:visited-style-name="Visited_20_Internet_20_Link"><text:span text:style-name="Strong_20_Emphasis"><text:span text:style-name="Source_20_Text"><text:span text:style-name="T7">app.config.ts</text:span></text:span></text:span></text:a><text:span text:style-name="T2"> You have a duplicate </text:span><text:span text:style-name="Source_20_Text"><text:span text:style-name="T5">provideHttpClient()</text:span></text:span><text:span text:style-name="T2"> call in your application config. We can remove one.</text:span></text:p>
      <text:p text:style-name="P11">app.config.ts</text:p>
      <text:p text:style-name="P6"><text:span text:style-name="T14">-3</text:span><text:span text:style-name="T15">+1</text:span></text:p>
      <text:p text:style-name="P18"><text:span text:style-name="Source_20_Text"><text:span text:style-name="T9">export</text:span></text:span><text:span text:style-name="Source_20_Text"><text:span text:style-name="T4"> </text:span></text:span><text:span text:style-name="Source_20_Text"><text:span text:style-name="T9">const</text:span></text:span><text:span text:style-name="Source_20_Text"><text:span text:style-name="T4"> appConfig: ApplicationConfig = {</text:span></text:span></text:p>
      <text:p text:style-name="P18"><text:span text:style-name="Source_20_Text"><text:span text:style-name="T3"><text:s text:c="2"/></text:span></text:span><text:span text:style-name="Source_20_Text"><text:span text:style-name="T10">providers</text:span></text:span><text:span text:style-name="Source_20_Text"><text:span text:style-name="T4">: [</text:span></text:span></text:p>
      <text:p text:style-name="P18"><text:span text:style-name="Source_20_Text"><text:span text:style-name="T3"><text:s text:c="4"/></text:span></text:span><text:span text:style-name="Source_20_Text"><text:span text:style-name="T4">provideRouter(routes),</text:span></text:span></text:p>
      <text:p text:style-name="P18"><text:span text:style-name="Source_20_Text"><text:span text:style-name="T3"><text:s text:c="4"/></text:span></text:span><text:span text:style-name="Source_20_Text"><text:span text:style-name="T4">provideHttpClient(), </text:span></text:span><text:span text:style-name="Source_20_Text"><text:span text:style-name="T11">// or importProvidersFrom(HttpClientModule)</text:span></text:span></text:p>
      <text:p text:style-name="P18"/>
      <text:p text:style-name="P18"><text:span text:style-name="Source_20_Text"><text:span text:style-name="T3"><text:s text:c="4"/></text:span></text:span><text:span text:style-name="Source_20_Text"><text:span text:style-name="T4">provideHttpClient(),</text:span></text:span></text:p>
      <text:p text:style-name="P18"><text:span text:style-name="Source_20_Text"><text:span text:style-name="T3"><text:s text:c="4"/></text:span></text:span><text:span text:style-name="Source_20_Text"><text:span text:style-name="T4">provideHttpClient(), </text:span></text:span><text:span text:style-name="Source_20_Text"><text:span text:style-name="T11">// or importProvidersFrom(HttpClientModule) is also an option</text:span></text:span></text:p>
      <text:p text:style-name="P18"><text:span text:style-name="Source_20_Text"><text:span text:style-name="T3"><text:s text:c="4"/></text:span></text:span><text:span text:style-name="Source_20_Text"><text:span text:style-name="T4">provideTranslateService({</text:span></text:span></text:p>
      <text:p text:style-name="P18"><text:span text:style-name="Source_20_Text"><text:span text:style-name="T3"><text:s text:c="6"/></text:span></text:span><text:span text:style-name="Source_20_Text"><text:span text:style-name="T10">loader</text:span></text:span><text:span text:style-name="Source_20_Text"><text:span text:style-name="T4">: provideTranslateHttpLoader({</text:span></text:span></text:p>
      <text:p text:style-name="P18"><text:span text:style-name="Source_20_Text"><text:span text:style-name="T3"><text:s text:c="8"/></text:span></text:span><text:span text:style-name="Source_20_Text"><text:span text:style-name="T10">prefix</text:span></text:span><text:span text:style-name="Source_20_Text"><text:span text:style-name="T4">: </text:span></text:span><text:span text:style-name="Source_20_Text"><text:span text:style-name="T6">'/i18n/'</text:span></text:span><text:span text:style-name="Source_20_Text"><text:span text:style-name="T4">,</text:span></text:span></text:p>
      <text:p text:style-name="P18"/>
      <text:h text:style-name="P16" text:outline-level="3"><text:span text:style-name="T2">3. Simplify </text:span><text:span text:style-name="Source_20_Text"><text:span text:style-name="T5">DataTables3Component</text:span></text:span></text:h>
      <text:p text:style-name="P21"><text:span text:style-name="T2">Now, let's remove the manual loading logic from </text:span><text:span text:style-name="Source_20_Text"><text:span text:style-name="T5">DataTables3Component</text:span></text:span><text:span text:style-name="T2">. The </text:span><text:span text:style-name="Source_20_Text"><text:span text:style-name="T5">SpinnerInterceptor</text:span></text:span><text:span text:style-name="T2"> will handle showing and hiding the spinner automatically for all calls made via </text:span><text:span text:style-name="Source_20_Text"><text:span text:style-name="T5">EmployeeService</text:span></text:span><text:span text:style-name="T2">.</text:span></text:p>
      <text:p text:style-name="P11">data-tables3.component.ts</text:p>
      <text:p text:style-name="P6"><text:span text:style-name="T14">-22</text:span><text:span text:style-name="T15">+1</text:span></text:p>
      <text:p text:style-name="P18"><text:span text:style-name="Source_20_Text"><text:span text:style-name="T9">import</text:span></text:span><text:span text:style-name="Source_20_Text"><text:span text:style-name="T4"> { Component, OnInit, WritableSignal, signal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Component, OnInit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MatDialog, MatDialogRef } </text:span></text:span><text:span text:style-name="Source_20_Text"><text:span text:style-name="T9">from</text:span></text:span><text:span text:style-name="Source_20_Text"><text:span text:style-name="T4"> </text:span></text:span><text:span text:style-name="Source_20_Text"><text:span text:style-name="T6">'@angular/material/dialog'</text:span></text:span><text:span text:style-name="Source_20_Text"><text:span text:style-name="T4">;</text:span></text:span></text:p>
      <text:p text:style-name="P18"><text:span text:style-name="Source_20_Text"><text:span text:style-name="T9">import</text:span></text:span><text:span text:style-name="Source_20_Text"><text:span text:style-name="T4"> { Config } </text:span></text:span><text:span text:style-name="Source_20_Text"><text:span text:style-name="T9">from</text:span></text:span><text:span text:style-name="Source_20_Text"><text:span text:style-name="T4"> </text:span></text:span><text:span text:style-name="Source_20_Text"><text:span text:style-name="T6">'datatables.net'</text:span></text:span><text:span text:style-name="Source_20_Text"><text:span text:style-name="T4">;</text:span></text:span></text:p>
      <text:p text:style-name="P18"><text:span text:style-name="Source_20_Text"><text:span text:style-name="T9">import</text:span></text:span><text:span text:style-name="Source_20_Text"><text:span text:style-name="T4"> </text:span></text:span><text:span text:style-name="Source_20_Text"><text:span text:style-name="T6">'datatables.net-buttons-dt'</text:span></text:span><text:span text:style-name="Source_20_Text"><text:span text:style-name="T4">;</text:span></text:span></text:p>
      <text:p text:style-name="P18"><text:span text:style-name="Source_20_Text"><text:span text:style-name="T9">import</text:span></text:span><text:span text:style-name="Source_20_Text"><text:span text:style-name="T4"> </text:span></text:span><text:span text:style-name="Source_20_Text"><text:span text:style-name="T6">'datatables.net-select-dt'</text:span></text:span><text:span text:style-name="Source_20_Text"><text:span text:style-name="T4">;</text:span></text:span></text:p>
      <text:p text:style-name="P18"><text:span text:style-name="Source_20_Text"><text:span text:style-name="T9">import</text:span></text:span><text:span text:style-name="Source_20_Text"><text:span text:style-name="T4"> DataTable </text:span></text:span><text:span text:style-name="Source_20_Text"><text:span text:style-name="T9">from</text:span></text:span><text:span text:style-name="Source_20_Text"><text:span text:style-name="T4"> </text:span></text:span><text:span text:style-name="Source_20_Text"><text:span text:style-name="T6">'datatables.net-dt'</text:span></text:span><text:span text:style-name="Source_20_Text"><text:span text:style-name="T4">;</text:span></text:span></text:p>
      <text:p text:style-name="P18"><text:span text:style-name="Source_20_Text"><text:span text:style-name="T9">import</text:span></text:span><text:span text:style-name="Source_20_Text"><text:span text:style-name="T4"> { MatProgressSpinnerModule } </text:span></text:span><text:span text:style-name="Source_20_Text"><text:span text:style-name="T9">from</text:span></text:span><text:span text:style-name="Source_20_Text"><text:span text:style-name="T4"> </text:span></text:span><text:span text:style-name="Source_20_Text"><text:span text:style-name="T6">'@angular/material/progress-spinner'</text:span></text:span><text:span text:style-name="Source_20_Text"><text:span text:style-name="T4">;</text:span></text:span></text:p>
      <text:p text:style-name="P18"><text:span text:style-name="Source_20_Text"><text:span text:style-name="T9">import</text:span></text:span><text:span text:style-name="Source_20_Text"><text:span text:style-name="T4"> { AddEmployeeComponent } </text:span></text:span><text:span text:style-name="Source_20_Text"><text:span text:style-name="T9">from</text:span></text:span><text:span text:style-name="Source_20_Text"><text:span text:style-name="T4"> </text:span></text:span><text:span text:style-name="Source_20_Text"><text:span text:style-name="T6">'../add-employee/add-employee.component'</text:span></text:span><text:span text:style-name="Source_20_Text"><text:span text:style-name="T4">;</text:span></text:span></text:p>
      <text:p text:style-name="P18"><text:span text:style-name="Source_20_Text"><text:span text:style-name="T9">import</text:span></text:span><text:span text:style-name="Source_20_Text"><text:span text:style-name="T4"> { EmployeeService } </text:span></text:span><text:span text:style-name="Source_20_Text"><text:span text:style-name="T9">from</text:span></text:span><text:span text:style-name="Source_20_Text"><text:span text:style-name="T4"> </text:span></text:span><text:span text:style-name="Source_20_Text"><text:span text:style-name="T6">'../service/EmployeeService'</text:span></text:span><text:span text:style-name="Source_20_Text"><text:span text:style-name="T4">;</text:span></text:span></text:p>
      <text:p text:style-name="P18"><text:span text:style-name="Source_20_Text"><text:span text:style-name="T9">import</text:span></text:span><text:span text:style-name="Source_20_Text"><text:span text:style-name="T4"> { Employee } </text:span></text:span><text:span text:style-name="Source_20_Text"><text:span text:style-name="T9">from</text:span></text:span><text:span text:style-name="Source_20_Text"><text:span text:style-name="T4"> </text:span></text:span><text:span text:style-name="Source_20_Text"><text:span text:style-name="T6">'../shared/model/Employee'</text:span></text:span><text:span text:style-name="Source_20_Text"><text:span text:style-name="T4">;</text:span></text:span></text:p>
      <text:p text:style-name="P18"><text:span text:style-name="Source_20_Text"><text:span text:style-name="T13">@Component</text:span></text:span><text:span text:style-name="Source_20_Text"><text:span text:style-name="T4">({</text:span></text:span></text:p>
      <text:p text:style-name="P18"><text:span text:style-name="Source_20_Text"><text:span text:style-name="T3"><text:s text:c="2"/></text:span></text:span><text:span text:style-name="Source_20_Text"><text:span text:style-name="T10">selector</text:span></text:span><text:span text:style-name="Source_20_Text"><text:span text:style-name="T4">: </text:span></text:span><text:span text:style-name="Source_20_Text"><text:span text:style-name="T6">'app-data-tables3'</text:span></text:span><text:span text:style-name="Source_20_Text"><text:span text:style-name="T4">,</text:span></text:span></text:p>
      <text:p text:style-name="P18"><text:span text:style-name="Source_20_Text"><text:span text:style-name="T3"><text:s text:c="2"/></text:span></text:span><text:span text:style-name="Source_20_Text"><text:span text:style-name="T10">templateUrl</text:span></text:span><text:span text:style-name="Source_20_Text"><text:span text:style-name="T4">: </text:span></text:span><text:span text:style-name="Source_20_Text"><text:span text:style-name="T6">'./data-tables3.component.html'</text:span></text:span><text:span text:style-name="Source_20_Text"><text:span text:style-name="T4">,</text:span></text:span></text:p>
      <text:p text:style-name="P18"><text:span text:style-name="Source_20_Text"><text:span text:style-name="T3"><text:s text:c="2"/></text:span></text:span><text:span text:style-name="Source_20_Text"><text:span text:style-name="T10">imports</text:span></text:span><text:span text:style-name="Source_20_Text"><text:span text:style-name="T4">: [MatProgressSpinnerModule],</text:span></text:span></text:p>
      <text:p text:style-name="P18"><text:span text:style-name="Source_20_Text"><text:span text:style-name="T3"><text:s text:c="2"/></text:span></text:span><text:span text:style-name="Source_20_Text"><text:span text:style-name="T10">styleUrl</text:span></text:span><text:span text:style-name="Source_20_Text"><text:span text:style-name="T4">: </text:span></text:span><text:span text:style-name="Source_20_Text"><text:span text:style-name="T6">'./data-tables3.component.scss'</text:span></text:span></text:p>
      <text:p text:style-name="P18"><text:soft-page-break/><text:span text:style-name="Source_20_Text"><text:span text:style-name="T4">})</text:span></text:span></text:p>
      <text:p text:style-name="P18"><text:span text:style-name="Source_20_Text"><text:span text:style-name="T9">export</text:span></text:span><text:span text:style-name="Source_20_Text"><text:span text:style-name="T4"> </text:span></text:span><text:span text:style-name="Source_20_Text"><text:span text:style-name="T9">class</text:span></text:span><text:span text:style-name="Source_20_Text"><text:span text:style-name="T4"> </text:span></text:span><text:span text:style-name="Source_20_Text"><text:span text:style-name="T6">DataTables3Component</text:span></text:span><text:span text:style-name="Source_20_Text"><text:span text:style-name="T4"> </text:span></text:span><text:span text:style-name="Source_20_Text"><text:span text:style-name="T6">implements</text:span></text:span><text:span text:style-name="Source_20_Text"><text:span text:style-name="T4"> </text:span></text:span><text:span text:style-name="Source_20_Text"><text:span text:style-name="T6">OnInit</text:span></text:span><text:span text:style-name="Source_20_Text"><text:span text:style-name="T4"> {</text:span></text:span></text:p>
      <text:p text:style-name="P18"/>
      <text:p text:style-name="P18"><text:span text:style-name="Source_20_Text"><text:span text:style-name="T3"><text:s text:c="2"/></text:span></text:span><text:span text:style-name="Source_20_Text"><text:span text:style-name="T9">private</text:span></text:span><text:span text:style-name="Source_20_Text"><text:span text:style-name="T4"> table!: </text:span></text:span><text:span text:style-name="Source_20_Text"><text:span text:style-name="T9">any</text:span></text:span><text:span text:style-name="Source_20_Text"><text:span text:style-name="T4">;</text:span></text:span></text:p>
      <text:p text:style-name="P18"><text:span text:style-name="Source_20_Text"><text:span text:style-name="T3"><text:s text:c="2"/></text:span></text:span><text:span text:style-name="Source_20_Text"><text:span text:style-name="T9">private</text:span></text:span><text:span text:style-name="Source_20_Text"><text:span text:style-name="T4"> employeeIdToEmployeeMap: </text:span></text:span><text:span text:style-name="Source_20_Text"><text:span text:style-name="T9">Map</text:span></text:span><text:span text:style-name="Source_20_Text"><text:span text:style-name="T4">&lt;</text:span></text:span><text:span text:style-name="Source_20_Text"><text:span text:style-name="T9">string</text:span></text:span><text:span text:style-name="Source_20_Text"><text:span text:style-name="T4">, Employee&gt; = </text:span></text:span><text:span text:style-name="Source_20_Text"><text:span text:style-name="T9">new</text:span></text:span><text:span text:style-name="Source_20_Text"><text:span text:style-name="T4"> </text:span></text:span><text:span text:style-name="Source_20_Text"><text:span text:style-name="T9">Map</text:span></text:span><text:span text:style-name="Source_20_Text"><text:span text:style-name="T4">();</text:span></text:span></text:p>
      <text:p text:style-name="P18"><text:span text:style-name="Source_20_Text"><text:span text:style-name="T3"><text:s text:c="2"/></text:span></text:span><text:span text:style-name="Source_20_Text"><text:span text:style-name="T9">public</text:span></text:span><text:span text:style-name="Source_20_Text"><text:span text:style-name="T4"> dtOptions: Config = {};</text:span></text:span></text:p>
      <text:p text:style-name="P18"><text:span text:style-name="Source_20_Text"><text:span text:style-name="T3"><text:s text:c="2"/></text:span></text:span><text:span text:style-name="Source_20_Text"><text:span text:style-name="T11">// Create a writable signal for the loading state, initialized to false.</text:span></text:span></text:p>
      <text:p text:style-name="P18"><text:span text:style-name="Source_20_Text"><text:span text:style-name="T3"><text:s text:c="2"/></text:span></text:span><text:span text:style-name="Source_20_Text"><text:span text:style-name="T4">loading: WritableSignal&lt;</text:span></text:span><text:span text:style-name="Source_20_Text"><text:span text:style-name="T9">boolean</text:span></text:span><text:span text:style-name="Source_20_Text"><text:span text:style-name="T4">&gt; = signal(</text:span></text:span><text:span text:style-name="Source_20_Text"><text:span text:style-name="T6">false</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6">constructor</text:span></text:span><text:span text:style-name="Source_20_Text"><text:span text:style-name="T4">(</text:span></text:span><text:span text:style-name="Source_20_Text"><text:span text:style-name="T9">private</text:span></text:span><text:span text:style-name="Source_20_Text"><text:span text:style-name="T4"> dialog: MatDialog, </text:span></text:span><text:span text:style-name="Source_20_Text"><text:span text:style-name="T9">private</text:span></text:span><text:span text:style-name="Source_20_Text"><text:span text:style-name="T4"> employeeService: EmployeeService, </text:span></text:span><text:span text:style-name="Source_20_Text"><text:span text:style-name="T9">private</text:span></text:span><text:span text:style-name="Source_20_Text"><text:span text:style-name="T4"> translate: TranslateService) { }</text:span></text:span></text:p>
      <text:p text:style-name="P18"><text:span text:style-name="Source_20_Text"><text:span text:style-name="T3"><text:s text:c="2"/></text:span></text:span><text:span text:style-name="Source_20_Text"><text:span text:style-name="T4">ngOnInit(): </text:span></text:span><text:span text:style-name="Source_20_Text"><text:span text:style-name="T9">void</text:span></text:span><text:span text:style-name="Source_20_Text"><text:span text:style-name="T4"> {</text:span></text:span></text:p>
      <text:p text:style-name="P18"/>
      <text:p text:style-name="P18"/>
      <text:p text:style-name="P18"><text:span text:style-name="Source_20_Text"><text:span text:style-name="T3"><text:s text:c="2"/></text:span></text:span><text:span text:style-name="Source_20_Text"><text:span text:style-name="T4">addEmployee(emp: Employee): </text:span></text:span><text:span text:style-name="Source_20_Text"><text:span text:style-name="T9">void</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
      <text:p text:style-name="P18"/>
      <text:p text:style-name="P18"/>
      <text:p text:style-name="P18"><text:span text:style-name="Source_20_Text"><text:span text:style-name="T3"><text:s text:c="4"/></text:span></text:span><text:span text:style-name="Source_20_Text"><text:span text:style-name="T9">this</text:span></text:span><text:span text:style-name="Source_20_Text"><text:span text:style-name="T4">.employeeService.createEmployee(emp).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res: Employee) =&gt; {</text:span></text:span></text:p>
      <text:p text:style-name="P18"><text:span text:style-name="Source_20_Text"><text:span text:style-name="T3"><text:s text:c="8"/></text:span></text:span><text:span text:style-name="Source_20_Text"><text:span text:style-name="T9">this</text:span></text:span><text:span text:style-name="Source_20_Text"><text:span text:style-name="T4">.employeeIdToEmployeeMap.set(res.id, res);</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add(res).draw();</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4">alert(</text:span></text:span><text:span text:style-name="Source_20_Text"><text:span text:style-name="T9">this</text:span></text:span><text:span text:style-name="Source_20_Text"><text:span text:style-name="T4">.translate.instant(</text:span></text:span><text:span text:style-name="Source_20_Text"><text:span text:style-name="T6">'failed-to-add-employee'</text:span></text:span><text:span text:style-name="Source_20_Text"><text:span text:style-name="T4">) + </text:span></text:span><text:span text:style-name="Source_20_Text"><text:span text:style-name="T6">': '</text:span></text:span><text:span text:style-name="Source_20_Text"><text:span text:style-name="T4"> + err.message);</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text:span text:style-name="Source_20_Text"><text:span text:style-name="T3"><text:s text:c="2"/></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4">editEmployee(emp: Employee): </text:span></text:span><text:span text:style-name="Source_20_Text"><text:span text:style-name="T9">void</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Service.updateEmployee(emp).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res: Employee) =&gt; {</text:span></text:span></text:p>
      <text:p text:style-name="P18"><text:span text:style-name="Source_20_Text"><text:span text:style-name="T3"><text:s text:c="8"/></text:span></text:span><text:span text:style-name="Source_20_Text"><text:span text:style-name="T9">const</text:span></text:span><text:span text:style-name="Source_20_Text"><text:span text:style-name="T4"> rowToUpdate = </text:span></text:span><text:span text:style-name="Source_20_Text"><text:span text:style-name="T9">this</text:span></text:span><text:span text:style-name="Source_20_Text"><text:span text:style-name="T4">.table.row(</text:span></text:span><text:span text:style-name="Source_20_Text"><text:span text:style-name="T6">'.selected'</text:span></text:span><text:span text:style-name="Source_20_Text"><text:span text:style-name="T4">);</text:span></text:span></text:p>
      <text:p text:style-name="P18"><text:soft-page-break/></text:p>
      <text:p text:style-name="P18"><text:span text:style-name="Source_20_Text"><text:span text:style-name="T3"><text:s text:c="8"/></text:span></text:span><text:span text:style-name="Source_20_Text"><text:span text:style-name="T11">// Invalidate all rows to re-run render functions (e.g., for manager names) and redraw.</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s().invalidate().draw(</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const</text:span></text:span><text:span text:style-name="Source_20_Text"><text:span text:style-name="T4"> dialogRef = </text:span></text:span><text:span text:style-name="Source_20_Text"><text:span text:style-name="T9">this</text:span></text:span><text:span text:style-name="Source_20_Text"><text:span text:style-name="T4">.dialog.open(ErrorDialogComponent, {</text:span></text:span></text:p>
      <text:p text:style-name="P18"><text:span text:style-name="Source_20_Text"><text:span text:style-name="T3"><text:s text:c="10"/></text:span></text:span><text:span text:style-name="Source_20_Text"><text:span text:style-name="T10">data</text:span></text:span><text:span text:style-name="Source_20_Text"><text:span text:style-name="T4">: {</text:span></text:span></text:p>
      <text:p text:style-name="P18"><text:span text:style-name="Source_20_Text"><text:span text:style-name="T3"><text:s text:c="12"/></text:span></text:span><text:span text:style-name="Source_20_Text"><text:span text:style-name="T10">title</text:span></text:span><text:span text:style-name="Source_20_Text"><text:span text:style-name="T4">: </text:span></text:span><text:span text:style-name="Source_20_Text"><text:span text:style-name="T9">this</text:span></text:span><text:span text:style-name="Source_20_Text"><text:span text:style-name="T4">.translate.instant(</text:span></text:span><text:span text:style-name="Source_20_Text"><text:span text:style-name="T6">'cycle-detected'</text:span></text:span><text:span text:style-name="Source_20_Text"><text:span text:style-name="T4">),</text:span></text:span></text:p>
      <text:p text:style-name="P18"/>
      <text:p text:style-name="P18"/>
      <text:p text:style-name="P18"><text:span text:style-name="Source_20_Text"><text:span text:style-name="T3"><text:s text:c="2"/></text:span></text:span><text:span text:style-name="Source_20_Text"><text:span text:style-name="T6">deleteEmployee</text:span></text:span><text:span text:style-name="Source_20_Text"><text:span text:style-name="T4">(empId: </text:span></text:span><text:span text:style-name="Source_20_Text"><text:span text:style-name="T9">string</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Service.deleteEmployee(empId).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 =&gt; {</text:span></text:span></text:p>
      <text:p text:style-name="P18"><text:span text:style-name="Source_20_Text"><text:span text:style-name="T3"><text:s text:c="8"/></text:span></text:span><text:span text:style-name="Source_20_Text"><text:span text:style-name="T9">this</text:span></text:span><text:span text:style-name="Source_20_Text"><text:span text:style-name="T4">.employeeIdToEmployeeMap.delete(empId);</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text:span></text:span><text:span text:style-name="Source_20_Text"><text:span text:style-name="T6">".selected"</text:span></text:span><text:span text:style-name="Source_20_Text"><text:span text:style-name="T4">).remove();</text:span></text:span></text:p>
      <text:p text:style-name="P18"><text:span text:style-name="Source_20_Text"><text:span text:style-name="T3"><text:s text:c="8"/></text:span></text:span><text:span text:style-name="Source_20_Text"><text:span text:style-name="T11">// Invalidate all rows to re-run render functions (e.g., for manager names)</text:span></text:span></text:p>
      <text:p text:style-name="P18"><text:span text:style-name="Source_20_Text"><text:span text:style-name="T3"><text:s text:c="8"/></text:span></text:span><text:span text:style-name="Source_20_Text"><text:span text:style-name="T11">// and redraw the table without changing pagination.</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s().invalidate().draw(</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this</text:span></text:span><text:span text:style-name="Source_20_Text"><text:span text:style-name="T4">.translate.get([</text:span></text:span><text:span text:style-name="Source_20_Text"><text:span text:style-name="T6">'manager-cannot-be-deleted'</text:span></text:span><text:span text:style-name="Source_20_Text"><text:span text:style-name="T4">, </text:span></text:span><text:span text:style-name="Source_20_Text"><text:span text:style-name="T6">'employee-cannot-be-deleted-has-subordinates'</text:span></text:span><text:span text:style-name="Source_20_Text"><text:span text:style-name="T4">])</text:span></text:span></text:p>
      <text:p text:style-name="P18"><text:span text:style-name="Source_20_Text"><text:span text:style-name="T3"><text:s text:c="10"/></text:span></text:span><text:span text:style-name="Source_20_Text"><text:span text:style-name="T4">.subscribe(translations =&gt; {</text:span></text:span></text:p>
      <text:p text:style-name="P18"><text:span text:style-name="Source_20_Text"><text:span text:style-name="T3"><text:s text:c="12"/></text:span></text:span><text:span text:style-name="Source_20_Text"><text:span text:style-name="T9">this</text:span></text:span><text:span text:style-name="Source_20_Text"><text:span text:style-name="T4">.dialog.open(ErrorDialogComponent, {</text:span></text:span></text:p>
      <text:p text:style-name="P18"><text:span text:style-name="Source_20_Text"><text:span text:style-name="T3"><text:s text:c="2"/></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4">getEmployees(): </text:span></text:span><text:span text:style-name="Source_20_Text"><text:span text:style-name="T9">void</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IdToEmployeeMap.clear();</text:span></text:span></text:p>
      <text:p text:style-name="P18"><text:span text:style-name="Source_20_Text"><text:span text:style-name="T3"><text:s text:c="4"/></text:span></text:span><text:span text:style-name="Source_20_Text"><text:span text:style-name="T9">this</text:span></text:span><text:span text:style-name="Source_20_Text"><text:span text:style-name="T4">.table.clear();</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Service.getEmployeesWithManagers().subscribe({</text:span></text:span></text:p>
      <text:p text:style-name="P18"><text:soft-page-break/><text:span text:style-name="Source_20_Text"><text:span text:style-name="T3"><text:s text:c="6"/></text:span></text:span><text:span text:style-name="Source_20_Text"><text:span text:style-name="T10">next</text:span></text:span><text:span text:style-name="Source_20_Text"><text:span text:style-name="T4">: (res: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if</text:span></text:span><text:span text:style-name="Source_20_Text"><text:span text:style-name="T4"> (!res || res.length </text:span></text:span><text:span text:style-name="Source_20_Text"><text:span text:style-name="T11">=== 0) {</text:span></text:span></text:p>
      <text:p text:style-name="P18"><text:span text:style-name="Source_20_Text"><text:span text:style-name="T3"><text:s text:c="10"/></text:span></text:span><text:span text:style-name="Source_20_Text"><text:span text:style-name="T9">this</text:span></text:span><text:span text:style-name="Source_20_Text"><text:span text:style-name="T4">.table.draw();</text:span></text:span></text:p>
      <text:p text:style-name="P18"><text:span text:style-name="Source_20_Text"><text:span text:style-name="T3"><text:s text:c="10"/></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10"/></text:span></text:span><text:span text:style-name="Source_20_Text"><text:span text:style-name="T9">return</text:span></text:span><text:span text:style-name="Source_20_Text"><text:span text:style-name="T4">;</text:span></text:span></text:p>
      <text:p text:style-name="P18"><text:span text:style-name="Source_20_Text"><text:span text:style-name="T3"><text:s text:c="8"/></text:span></text:span><text:span text:style-name="Source_20_Text"><text:span text:style-name="T4">}</text:span></text:span></text:p>
      <text:p text:style-name="P18"/>
      <text:p text:style-name="P18"><text:span text:style-name="Source_20_Text"><text:span text:style-name="T3"><text:s text:c="12"/></text:span></text:span><text:span text:style-name="Source_20_Text"><text:span text:style-name="T11">// Invalidate all rows to force re-running render functions (e.g., for manager names)</text:span></text:span></text:p>
      <text:p text:style-name="P18"><text:span text:style-name="Source_20_Text"><text:span text:style-name="T3"><text:s text:c="12"/></text:span></text:span><text:span text:style-name="Source_20_Text"><text:span text:style-name="T11">// and then draw the table. This is the most reliable way to handle renderers with dependencies.</text:span></text:span></text:p>
      <text:p text:style-name="P18"><text:span text:style-name="Source_20_Text"><text:span text:style-name="T3"><text:s text:c="12"/></text:span></text:span><text:span text:style-name="Source_20_Text"><text:span text:style-name="T9">this</text:span></text:span><text:span text:style-name="Source_20_Text"><text:span text:style-name="T4">.table.rows().invalidate().draw();</text:span></text:span></text:p>
      <text:p text:style-name="P18"><text:span text:style-name="Source_20_Text"><text:span text:style-name="T3"><text:s text:c="12"/></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10"/></text:span></text:span><text:span text:style-name="Source_20_Text"><text:span text:style-name="T4">},</text:span></text:span></text:p>
      <text:p text:style-name="P18"><text:span text:style-name="Source_20_Text"><text:span text:style-name="T3"><text:s text:c="10"/></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12"/></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12"/></text:span></text:span><text:span text:style-name="Source_20_Text"><text:span text:style-name="T4">alert(</text:span></text:span><text:span text:style-name="Source_20_Text"><text:span text:style-name="T9">this</text:span></text:span><text:span text:style-name="Source_20_Text"><text:span text:style-name="T4">.translate.instant(</text:span></text:span><text:span text:style-name="Source_20_Text"><text:span text:style-name="T6">'failed-to-get-employees'</text:span></text:span><text:span text:style-name="Source_20_Text"><text:span text:style-name="T4">) + </text:span></text:span><text:span text:style-name="Source_20_Text"><text:span text:style-name="T6">': '</text:span></text:span><text:span text:style-name="Source_20_Text"><text:span text:style-name="T4"> + err.message);</text:span></text:span></text:p>
      <text:p text:style-name="P18"><text:span text:style-name="Source_20_Text"><text:span text:style-name="T3"><text:s text:c="10"/></text:span></text:span><text:span text:style-name="Source_20_Text"><text:span text:style-name="T4">}</text:span></text:span></text:p>
      <text:p text:style-name="P18"><text:span text:style-name="Source_20_Text"><text:span text:style-name="T3"><text:s text:c="8"/></text:span></text:span><text:span text:style-name="Source_20_Text"><text:span text:style-name="T4">});</text:span></text:span></text:p>
      <text:p text:style-name="P18"/>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4">alert(</text:span></text:span><text:span text:style-name="Source_20_Text"><text:span text:style-name="T9">this</text:span></text:span><text:span text:style-name="Source_20_Text"><text:span text:style-name="T4">.translate.instant(</text:span></text:span><text:span text:style-name="Source_20_Text"><text:span text:style-name="T6">'failed-to-get-employees'</text:span></text:span><text:span text:style-name="Source_20_Text"><text:span text:style-name="T4">) + </text:span></text:span><text:span text:style-name="Source_20_Text"><text:span text:style-name="T6">': '</text:span></text:span><text:span text:style-name="Source_20_Text"><text:span text:style-name="T4"> + err.message);</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
      <text:h text:style-name="P3" text:outline-level="3">4. Final Step: Use the Spinner Component</text:h>
      <text:p text:style-name="P21"><text:span text:style-name="T2">Finally, make sure you have placed the </text:span><text:span text:style-name="Source_20_Text"><text:span text:style-name="T5">&lt;app-spinner&gt;</text:span></text:span><text:span text:style-name="T2"> selector in your main </text:span><text:a xlink:type="simple" xlink:href="code-assist-path:/home/vj/Desktop/A/__myapp/datatables3/datatables/myapp-client/src/app/app.component.html" text:style-name="Internet_20_link" text:visited-style-name="Visited_20_Internet_20_Link"><text:span text:style-name="Source_20_Text"><text:span text:style-name="T7">app.component.html</text:span></text:span></text:a><text:span text:style-name="T2"> file. It should be placed at the root level, outside the </text:span><text:span text:style-name="Source_20_Text"><text:span text:style-name="T5">&lt;router-outlet&gt;</text:span></text:span><text:span text:style-name="T2">, so it can overlay your entire application.</text:span></text:p>
      <text:p text:style-name="P21"><text:span text:style-name="T2">Your </text:span><text:a xlink:type="simple" xlink:href="code-assist-path:/home/vj/Desktop/A/__myapp/datatables3/datatables/myapp-client/src/app/app.component.html" text:style-name="Internet_20_link" text:visited-style-name="Visited_20_Internet_20_Link"><text:span text:style-name="Source_20_Text"><text:span text:style-name="T7">/home/vj/Desktop/A/__myapp/datatables3/datatables/myapp-client/src/app/app.component.html</text:span></text:span></text:a><text:span text:style-name="T2"> should look something like this:</text:span></text:p>
      <text:p text:style-name="P5">html</text:p>
      <text:p text:style-name="P18"><text:span text:style-name="Source_20_Text"><text:span text:style-name="T9">&lt;router-outlet&gt;&lt;/router-outlet&gt;</text:span></text:span></text:p>
      <text:p text:style-name="P18"><text:span text:style-name="Source_20_Text"><text:span text:style-name="T9">&lt;app-spinner&gt;&lt;/app-spinner&gt;</text:span></text:span></text:p>
      <text:p text:style-name="P21"><text:span text:style-name="T2">With these changes, your application will now display a centered, full-screen spinner during all data operations in the </text:span><text:span text:style-name="Source_20_Text"><text:span text:style-name="T5">DataTables3Component</text:span></text:span><text:span text:style-name="T2"> and any other component that triggers HTTP requests.</text:span></text:p>
      <text:p text:style-name="P7">Let me know if you have any other questions!</text:p>
      <text:h text:style-name="P1" text:outline-level="1">Jan</text:h>
      <text:p text:style-name="P9">how to add spinner in the middle of the screen. Use datatable3</text:p>
      <text:h text:style-name="P2" text:outline-level="1">Gemini</text:h>
      <text:p text:style-name="P13">Thinking</text:p>
      <text:p text:style-name="P21"><text:soft-page-break/><text:span text:style-name="T2">Of course! I can help you implement a loading spinner that appears in the middle of the screen for your </text:span><text:span text:style-name="Source_20_Text"><text:span text:style-name="T5">DataTables3Component</text:span></text:span><text:span text:style-name="T2">.</text:span></text:p>
      <text:p text:style-name="P21"><text:span text:style-name="T2">Based on the files you've provided, you already have a great setup for a global spinner using an </text:span><text:span text:style-name="Source_20_Text"><text:span text:style-name="T5">HTTP_INTERCEPTOR</text:span></text:span><text:span text:style-name="T2"> (</text:span><text:span text:style-name="Source_20_Text"><text:span text:style-name="T5">SpinnerInterceptor</text:span></text:span><text:span text:style-name="T2">) and a </text:span><text:span text:style-name="Source_20_Text"><text:span text:style-name="T5">SpinnerService</text:span></text:span><text:span text:style-name="T2">. This is an excellent pattern because it automatically shows the spinner for any ongoing HTTP requests, like the ones in your </text:span><text:span text:style-name="Source_20_Text"><text:span text:style-name="T5">EmployeeService</text:span></text:span><text:span text:style-name="T2">.</text:span></text:p>
      <text:p text:style-name="P21"><text:span text:style-name="T2">The main tasks are to remove the redundant, manual loading logic from your </text:span><text:span text:style-name="Source_20_Text"><text:span text:style-name="T5">DataTables3Component</text:span></text:span><text:span text:style-name="T2"> to rely solely on the global interceptor and to clean up a few related files.</text:span></text:p>
      <text:p text:style-name="P7">Here are the steps and code changes to achieve this:</text:p>
      <text:h text:style-name="P16" text:outline-level="3"><text:span text:style-name="T2">1. Clean up </text:span><text:a xlink:type="simple" xlink:href="code-assist-path:/home/vj/Desktop/A/__myapp/datatables3/datatables/myapp-client/src/app/app.config.ts" text:style-name="Internet_20_link" text:visited-style-name="Visited_20_Internet_20_Link"><text:span text:style-name="Source_20_Text"><text:span text:style-name="T7">app.config.ts</text:span></text:span></text:a></text:h>
      <text:p text:style-name="P21"><text:span text:style-name="T2">You have several duplicate </text:span><text:span text:style-name="Source_20_Text"><text:span text:style-name="T5">provideHttpClient()</text:span></text:span><text:span text:style-name="T2"> calls in your application config. We can remove the extras.</text:span></text:p>
      <text:p text:style-name="P11">app.config.ts</text:p>
      <text:p text:style-name="P6"><text:span text:style-name="T14">-3</text:span><text:span text:style-name="T15">+1</text:span></text:p>
      <text:p text:style-name="P18"><text:span text:style-name="Source_20_Text"><text:span text:style-name="T9">export</text:span></text:span><text:span text:style-name="Source_20_Text"><text:span text:style-name="T4"> </text:span></text:span><text:span text:style-name="Source_20_Text"><text:span text:style-name="T9">const</text:span></text:span><text:span text:style-name="Source_20_Text"><text:span text:style-name="T4"> appConfig: ApplicationConfig = {</text:span></text:span></text:p>
      <text:p text:style-name="P18"><text:span text:style-name="Source_20_Text"><text:span text:style-name="T3"><text:s text:c="2"/></text:span></text:span><text:span text:style-name="Source_20_Text"><text:span text:style-name="T10">providers</text:span></text:span><text:span text:style-name="Source_20_Text"><text:span text:style-name="T4">: [</text:span></text:span></text:p>
      <text:p text:style-name="P18"><text:span text:style-name="Source_20_Text"><text:span text:style-name="T3"><text:s text:c="4"/></text:span></text:span><text:span text:style-name="Source_20_Text"><text:span text:style-name="T4">provideRouter(routes),</text:span></text:span></text:p>
      <text:p text:style-name="P18"><text:span text:style-name="Source_20_Text"><text:span text:style-name="T3"><text:s text:c="4"/></text:span></text:span><text:span text:style-name="Source_20_Text"><text:span text:style-name="T4">provideHttpClient(), </text:span></text:span><text:span text:style-name="Source_20_Text"><text:span text:style-name="T11">// or importProvidersFrom(HttpClientModule)</text:span></text:span></text:p>
      <text:p text:style-name="P18"/>
      <text:p text:style-name="P18"><text:span text:style-name="Source_20_Text"><text:span text:style-name="T3"><text:s text:c="4"/></text:span></text:span><text:span text:style-name="Source_20_Text"><text:span text:style-name="T4">provideHttpClient(),</text:span></text:span></text:p>
      <text:p text:style-name="P18"><text:span text:style-name="Source_20_Text"><text:span text:style-name="T3"><text:s text:c="4"/></text:span></text:span><text:span text:style-name="Source_20_Text"><text:span text:style-name="T4">provideHttpClient(), </text:span></text:span><text:span text:style-name="Source_20_Text"><text:span text:style-name="T11">// or importProvidersFrom(HttpClientModule) is also an option</text:span></text:span></text:p>
      <text:p text:style-name="P18"><text:span text:style-name="Source_20_Text"><text:span text:style-name="T3"><text:s text:c="4"/></text:span></text:span><text:span text:style-name="Source_20_Text"><text:span text:style-name="T11">// or importProvidersFrom(HttpClientModule) is also an option</text:span></text:span></text:p>
      <text:p text:style-name="P18"><text:span text:style-name="Source_20_Text"><text:span text:style-name="T3"><text:s text:c="4"/></text:span></text:span><text:span text:style-name="Source_20_Text"><text:span text:style-name="T4">provideTranslateService({</text:span></text:span></text:p>
      <text:p text:style-name="P18"><text:span text:style-name="Source_20_Text"><text:span text:style-name="T3"><text:s text:c="6"/></text:span></text:span><text:span text:style-name="Source_20_Text"><text:span text:style-name="T10">loader</text:span></text:span><text:span text:style-name="Source_20_Text"><text:span text:style-name="T4">: provideTranslateHttpLoader({</text:span></text:span></text:p>
      <text:p text:style-name="P18"><text:span text:style-name="Source_20_Text"><text:span text:style-name="T3"><text:s text:c="8"/></text:span></text:span><text:span text:style-name="Source_20_Text"><text:span text:style-name="T10">prefix</text:span></text:span><text:span text:style-name="Source_20_Text"><text:span text:style-name="T4">: </text:span></text:span><text:span text:style-name="Source_20_Text"><text:span text:style-name="T6">'/i18n/'</text:span></text:span><text:span text:style-name="Source_20_Text"><text:span text:style-name="T4">,</text:span></text:span></text:p>
      <text:p text:style-name="P18"/>
      <text:h text:style-name="P16" text:outline-level="3"><text:span text:style-name="T2">2. Fix </text:span><text:span text:style-name="Source_20_Text"><text:span text:style-name="T5">SpinnerComponent</text:span></text:span><text:span text:style-name="T2"> Import</text:span></text:h>
      <text:p text:style-name="P21"><text:span text:style-name="T2">The import for </text:span><text:span text:style-name="Source_20_Text"><text:span text:style-name="T5">SpinnerService</text:span></text:span><text:span text:style-name="T2"> in your </text:span><text:a xlink:type="simple" xlink:href="code-assist-path:/home/vj/Desktop/A/__myapp/datatables3/datatables/myapp-client/src/app/shared/spinner/spinner.component.ts" text:style-name="Internet_20_link" text:visited-style-name="Visited_20_Internet_20_Link"><text:span text:style-name="Source_20_Text"><text:span text:style-name="T7">spinner.component.ts</text:span></text:span></text:a><text:span text:style-name="T2"> has a typo in the filename (</text:span><text:span text:style-name="Source_20_Text"><text:span text:style-name="T5">servicespinner.service</text:span></text:span><text:span text:style-name="T2">). Let's correct it to </text:span><text:span text:style-name="Source_20_Text"><text:span text:style-name="T5">spinner.service</text:span></text:span><text:span text:style-name="T2">.</text:span></text:p>
      <text:p text:style-name="P11">spinner.component.ts</text:p>
      <text:p text:style-name="P6"><text:span text:style-name="T14">-1</text:span><text:span text:style-name="T15">+1</text:span></text:p>
      <text:p text:style-name="P18"><text:span text:style-name="Source_20_Text"><text:span text:style-name="T9">import</text:span></text:span><text:span text:style-name="Source_20_Text"><text:span text:style-name="T4"> { Component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CommonModule } </text:span></text:span><text:span text:style-name="Source_20_Text"><text:span text:style-name="T9">from</text:span></text:span><text:span text:style-name="Source_20_Text"><text:span text:style-name="T4"> </text:span></text:span><text:span text:style-name="Source_20_Text"><text:span text:style-name="T6">'@angular/common'</text:span></text:span><text:span text:style-name="Source_20_Text"><text:span text:style-name="T4">;</text:span></text:span></text:p>
      <text:p text:style-name="P18"><text:span text:style-name="Source_20_Text"><text:span text:style-name="T9">import</text:span></text:span><text:span text:style-name="Source_20_Text"><text:span text:style-name="T4"> { MatProgressSpinnerModule } </text:span></text:span><text:span text:style-name="Source_20_Text"><text:span text:style-name="T9">from</text:span></text:span><text:span text:style-name="Source_20_Text"><text:span text:style-name="T4"> </text:span></text:span><text:span text:style-name="Source_20_Text"><text:span text:style-name="T6">'@angular/material/progress-spinner'</text:span></text:span><text:span text:style-name="Source_20_Text"><text:span text:style-name="T4">;</text:span></text:span></text:p>
      <text:p text:style-name="P18"><text:span text:style-name="Source_20_Text"><text:span text:style-name="T9">import</text:span></text:span><text:span text:style-name="Source_20_Text"><text:span text:style-name="T4"> { SpinnerService } </text:span></text:span><text:span text:style-name="Source_20_Text"><text:span text:style-name="T9">from</text:span></text:span><text:span text:style-name="Source_20_Text"><text:span text:style-name="T4"> </text:span></text:span><text:span text:style-name="Source_20_Text"><text:span text:style-name="T6">'../../service/servicespinner.service'</text:span></text:span></text:p>
      <text:p text:style-name="P18"><text:span text:style-name="Source_20_Text"><text:span text:style-name="T9">import</text:span></text:span><text:span text:style-name="Source_20_Text"><text:span text:style-name="T4"> { SpinnerService } </text:span></text:span><text:span text:style-name="Source_20_Text"><text:span text:style-name="T9">from</text:span></text:span><text:span text:style-name="Source_20_Text"><text:span text:style-name="T4"> </text:span></text:span><text:span text:style-name="Source_20_Text"><text:span text:style-name="T6">'../../service/spinner.service'</text:span></text:span><text:span text:style-name="Source_20_Text"><text:span text:style-name="T4">;</text:span></text:span></text:p>
      <text:p text:style-name="P18"><text:span text:style-name="Source_20_Text"><text:span text:style-name="T13">@Component</text:span></text:span><text:span text:style-name="Source_20_Text"><text:span text:style-name="T4">({</text:span></text:span></text:p>
      <text:p text:style-name="P18"><text:span text:style-name="Source_20_Text"><text:span text:style-name="T3"><text:s text:c="4"/></text:span></text:span><text:span text:style-name="Source_20_Text"><text:span text:style-name="T10">selector</text:span></text:span><text:span text:style-name="Source_20_Text"><text:span text:style-name="T4">: </text:span></text:span><text:span text:style-name="Source_20_Text"><text:span text:style-name="T6">'app-spinner'</text:span></text:span><text:span text:style-name="Source_20_Text"><text:span text:style-name="T4">,</text:span></text:span></text:p>
      <text:p text:style-name="P18"><text:span text:style-name="Source_20_Text"><text:span text:style-name="T3"><text:s text:c="4"/></text:span></text:span><text:span text:style-name="Source_20_Text"><text:span text:style-name="T10">standalone</text:span></text:span><text:span text:style-name="Source_20_Text"><text:span text:style-name="T4">: </text:span></text:span><text:span text:style-name="Source_20_Text"><text:span text:style-name="T6">true</text:span></text:span><text:span text:style-name="Source_20_Text"><text:span text:style-name="T4">,</text:span></text:span></text:p>
      <text:p text:style-name="P18"/>
      <text:h text:style-name="P16" text:outline-level="3"><text:span text:style-name="T2">3. Simplify </text:span><text:span text:style-name="Source_20_Text"><text:span text:style-name="T5">DataTables3Component</text:span></text:span></text:h>
      <text:p text:style-name="P21"><text:span text:style-name="T2">Now, let's remove the manual loading logic from </text:span><text:span text:style-name="Source_20_Text"><text:span text:style-name="T5">DataTables3Component</text:span></text:span><text:span text:style-name="T2">. The </text:span><text:span text:style-name="Source_20_Text"><text:span text:style-name="T5">SpinnerInterceptor</text:span></text:span><text:span text:style-name="T2"> will handle showing and hiding the spinner automatically for all calls made via </text:span><text:span text:style-name="Source_20_Text"><text:span text:style-name="T5">EmployeeService</text:span></text:span><text:span text:style-name="T2">.</text:span></text:p>
      <text:p text:style-name="P7">First, remove the local spinner from the HTML template.</text:p>
      <text:p text:style-name="P11">data-tables3.component.html</text:p>
      <text:p text:style-name="P6"><text:soft-page-break/><text:span text:style-name="T14">-10</text:span><text:span text:style-name="T15">+0</text:span></text:p>
      <text:p text:style-name="P18"><text:span text:style-name="Source_20_Text"><text:span text:style-name="T11">&lt;!-- Spinner container, shown when loading() is true --&gt;</text:span></text:span></text:p>
      <text:p text:style-name="P18"><text:span text:style-name="Source_20_Text"><text:span text:style-name="T4">@if (loading()) {</text:span></text:span></text:p>
      <text:p text:style-name="P18"><text:span text:style-name="Source_20_Text"><text:span text:style-name="T9">&lt;mat-spinner&gt;&lt;/mat-spinner&gt;</text:span></text:span></text:p>
      <text:p text:style-name="P18"><text:span text:style-name="Source_20_Text"><text:span text:style-name="T9">&lt;div </text:span></text:span><text:span text:style-name="Source_20_Text"><text:span text:style-name="T10">class</text:span></text:span><text:span text:style-name="Source_20_Text"><text:span text:style-name="T9">=</text:span></text:span><text:span text:style-name="Source_20_Text"><text:span text:style-name="T6">"spinner-overlay"</text:span></text:span><text:span text:style-name="Source_20_Text"><text:span text:style-name="T9">&gt;</text:span></text:span></text:p>
      <text:p text:style-name="P18"><text:span text:style-name="Source_20_Text"><text:span text:style-name="T3"><text:s text:c="4"/></text:span></text:span><text:span text:style-name="Source_20_Text"><text:span text:style-name="T9">&lt;mat-progress-spinner </text:span></text:span><text:span text:style-name="Source_20_Text"><text:span text:style-name="T10">color</text:span></text:span><text:span text:style-name="Source_20_Text"><text:span text:style-name="T9">=</text:span></text:span><text:span text:style-name="Source_20_Text"><text:span text:style-name="T6">"primary"</text:span></text:span><text:span text:style-name="Source_20_Text"><text:span text:style-name="T9"> </text:span></text:span><text:span text:style-name="Source_20_Text"><text:span text:style-name="T10">mode</text:span></text:span><text:span text:style-name="Source_20_Text"><text:span text:style-name="T9">=</text:span></text:span><text:span text:style-name="Source_20_Text"><text:span text:style-name="T6">"indeterminate"</text:span></text:span><text:span text:style-name="Source_20_Text"><text:span text:style-name="T9">&gt;</text:span></text:span></text:p>
      <text:p text:style-name="P18"><text:span text:style-name="Source_20_Text"><text:span text:style-name="T3"><text:s text:c="4"/></text:span></text:span><text:span text:style-name="Source_20_Text"><text:span text:style-name="T9">&lt;/mat-progress-spinner&gt;</text:span></text:span></text:p>
      <text:p text:style-name="P18"><text:span text:style-name="Source_20_Text"><text:span text:style-name="T9">&lt;/div&gt;</text:span></text:span><text:span text:style-name="Source_20_Text"><text:span text:style-name="T4">}</text:span></text:span></text:p>
      <text:p text:style-name="P18"/>
      <text:p text:style-name="P18"><text:span text:style-name="Source_20_Text"><text:span text:style-name="T11">&lt;!-- Table container, shown when loading() is false </text:span></text:span></text:p>
      <text:p text:style-name="P18"><text:span text:style-name="Source_20_Text"><text:span text:style-name="T11">@if (!loading()) {--&gt;</text:span></text:span></text:p>
      <text:p text:style-name="P18"><text:span text:style-name="Source_20_Text"><text:span text:style-name="T9">&lt;table </text:span></text:span><text:span text:style-name="Source_20_Text"><text:span text:style-name="T10">id</text:span></text:span><text:span text:style-name="Source_20_Text"><text:span text:style-name="T9">=</text:span></text:span><text:span text:style-name="Source_20_Text"><text:span text:style-name="T6">"jsonTable3"</text:span></text:span><text:span text:style-name="Source_20_Text"><text:span text:style-name="T9"> </text:span></text:span><text:span text:style-name="Source_20_Text"><text:span text:style-name="T10">datatable</text:span></text:span><text:span text:style-name="Source_20_Text"><text:span text:style-name="T9"> </text:span></text:span><text:span text:style-name="Source_20_Text"><text:span text:style-name="T10">class</text:span></text:span><text:span text:style-name="Source_20_Text"><text:span text:style-name="T9">=</text:span></text:span><text:span text:style-name="Source_20_Text"><text:span text:style-name="T6">"display table table-striped table-hover table-bordered"</text:span></text:span><text:span text:style-name="Source_20_Text"><text:span text:style-name="T9">&gt;</text:span></text:span></text:p>
      <text:p text:style-name="P18"><text:span text:style-name="Source_20_Text"><text:span text:style-name="T3"><text:s text:c="4"/></text:span></text:span><text:span text:style-name="Source_20_Text"><text:span text:style-name="T11">&lt;!-- The table header and body will be generated by DataTables based on dtOptions --&gt;</text:span></text:span></text:p>
      <text:p text:style-name="P18"><text:span text:style-name="Source_20_Text"><text:span text:style-name="T9">&lt;/table&gt;</text:span></text:span></text:p>
      <text:p text:style-name="P21"><text:span text:style-name="T2">Next, update the component's TypeScript file to remove the duplicate imports and all the manual </text:span><text:span text:style-name="Source_20_Text"><text:span text:style-name="T5">loading</text:span></text:span><text:span text:style-name="T2"> signal logic.</text:span></text:p>
      <text:p text:style-name="P11">data-tables3.component.ts</text:p>
      <text:p text:style-name="P6"><text:span text:style-name="T14">-23</text:span><text:span text:style-name="T15">+0</text:span></text:p>
      <text:p text:style-name="P18"><text:span text:style-name="Source_20_Text"><text:span text:style-name="T9">import</text:span></text:span><text:span text:style-name="Source_20_Text"><text:span text:style-name="T4"> { Component, OnInit, WritableSignal, signal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Component, OnInit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MatDialog, MatDialogRef } </text:span></text:span><text:span text:style-name="Source_20_Text"><text:span text:style-name="T9">from</text:span></text:span><text:span text:style-name="Source_20_Text"><text:span text:style-name="T4"> </text:span></text:span><text:span text:style-name="Source_20_Text"><text:span text:style-name="T6">'@angular/material/dialog'</text:span></text:span><text:span text:style-name="Source_20_Text"><text:span text:style-name="T4">;</text:span></text:span></text:p>
      <text:p text:style-name="P18"><text:span text:style-name="Source_20_Text"><text:span text:style-name="T9">import</text:span></text:span><text:span text:style-name="Source_20_Text"><text:span text:style-name="T4"> { Config } </text:span></text:span><text:span text:style-name="Source_20_Text"><text:span text:style-name="T9">from</text:span></text:span><text:span text:style-name="Source_20_Text"><text:span text:style-name="T4"> </text:span></text:span><text:span text:style-name="Source_20_Text"><text:span text:style-name="T6">'datatables.net'</text:span></text:span><text:span text:style-name="Source_20_Text"><text:span text:style-name="T4">;</text:span></text:span></text:p>
      <text:p text:style-name="P18"><text:span text:style-name="Source_20_Text"><text:span text:style-name="T13">@Component</text:span></text:span><text:span text:style-name="Source_20_Text"><text:span text:style-name="T4">({</text:span></text:span></text:p>
      <text:p text:style-name="P18"><text:span text:style-name="Source_20_Text"><text:span text:style-name="T3"><text:s text:c="2"/></text:span></text:span><text:span text:style-name="Source_20_Text"><text:span text:style-name="T10">selector</text:span></text:span><text:span text:style-name="Source_20_Text"><text:span text:style-name="T4">: </text:span></text:span><text:span text:style-name="Source_20_Text"><text:span text:style-name="T6">'app-data-tables3'</text:span></text:span><text:span text:style-name="Source_20_Text"><text:span text:style-name="T4">,</text:span></text:span></text:p>
      <text:p text:style-name="P18"><text:span text:style-name="Source_20_Text"><text:span text:style-name="T3"><text:s text:c="2"/></text:span></text:span><text:span text:style-name="Source_20_Text"><text:span text:style-name="T10">templateUrl</text:span></text:span><text:span text:style-name="Source_20_Text"><text:span text:style-name="T4">: </text:span></text:span><text:span text:style-name="Source_20_Text"><text:span text:style-name="T6">'./data-tables3.component.html'</text:span></text:span><text:span text:style-name="Source_20_Text"><text:span text:style-name="T4">,</text:span></text:span></text:p>
      <text:p text:style-name="P18"><text:span text:style-name="Source_20_Text"><text:span text:style-name="T3"><text:s text:c="2"/></text:span></text:span><text:span text:style-name="Source_20_Text"><text:span text:style-name="T10">imports</text:span></text:span><text:span text:style-name="Source_20_Text"><text:span text:style-name="T4">: [MatProgressSpinnerModule],</text:span></text:span></text:p>
      <text:p text:style-name="P18"><text:span text:style-name="Source_20_Text"><text:span text:style-name="T3"><text:s text:c="2"/></text:span></text:span><text:span text:style-name="Source_20_Text"><text:span text:style-name="T10">styleUrl</text:span></text:span><text:span text:style-name="Source_20_Text"><text:span text:style-name="T4">: </text:span></text:span><text:span text:style-name="Source_20_Text"><text:span text:style-name="T6">'./data-tables3.component.scss'</text:span></text:span></text:p>
      <text:p text:style-name="P18"><text:span text:style-name="Source_20_Text"><text:span text:style-name="T4">})</text:span></text:span></text:p>
      <text:p text:style-name="P18"><text:span text:style-name="Source_20_Text"><text:span text:style-name="T9">export</text:span></text:span><text:span text:style-name="Source_20_Text"><text:span text:style-name="T4"> </text:span></text:span><text:span text:style-name="Source_20_Text"><text:span text:style-name="T9">class</text:span></text:span><text:span text:style-name="Source_20_Text"><text:span text:style-name="T4"> </text:span></text:span><text:span text:style-name="Source_20_Text"><text:span text:style-name="T6">DataTables3Component</text:span></text:span><text:span text:style-name="Source_20_Text"><text:span text:style-name="T4"> </text:span></text:span><text:span text:style-name="Source_20_Text"><text:span text:style-name="T6">implements</text:span></text:span><text:span text:style-name="Source_20_Text"><text:span text:style-name="T4"> </text:span></text:span><text:span text:style-name="Source_20_Text"><text:span text:style-name="T6">OnInit</text:span></text:span><text:span text:style-name="Source_20_Text"><text:span text:style-name="T4"> {</text:span></text:span></text:p>
      <text:p text:style-name="P18"/>
      <text:p text:style-name="P18"><text:span text:style-name="Source_20_Text"><text:span text:style-name="T3"><text:s text:c="2"/></text:span></text:span><text:span text:style-name="Source_20_Text"><text:span text:style-name="T9">private</text:span></text:span><text:span text:style-name="Source_20_Text"><text:span text:style-name="T4"> table!: </text:span></text:span><text:span text:style-name="Source_20_Text"><text:span text:style-name="T9">any</text:span></text:span><text:span text:style-name="Source_20_Text"><text:span text:style-name="T4">;</text:span></text:span></text:p>
      <text:p text:style-name="P18"><text:span text:style-name="Source_20_Text"><text:span text:style-name="T3"><text:s text:c="2"/></text:span></text:span><text:span text:style-name="Source_20_Text"><text:span text:style-name="T9">private</text:span></text:span><text:span text:style-name="Source_20_Text"><text:span text:style-name="T4"> employeeIdToEmployeeMap: </text:span></text:span><text:span text:style-name="Source_20_Text"><text:span text:style-name="T9">Map</text:span></text:span><text:span text:style-name="Source_20_Text"><text:span text:style-name="T4">&lt;</text:span></text:span><text:span text:style-name="Source_20_Text"><text:span text:style-name="T9">string</text:span></text:span><text:span text:style-name="Source_20_Text"><text:span text:style-name="T4">, Employee&gt; = </text:span></text:span><text:span text:style-name="Source_20_Text"><text:span text:style-name="T9">new</text:span></text:span><text:span text:style-name="Source_20_Text"><text:span text:style-name="T4"> </text:span></text:span><text:span text:style-name="Source_20_Text"><text:span text:style-name="T9">Map</text:span></text:span><text:span text:style-name="Source_20_Text"><text:span text:style-name="T4">();</text:span></text:span></text:p>
      <text:p text:style-name="P18"><text:span text:style-name="Source_20_Text"><text:span text:style-name="T3"><text:s text:c="2"/></text:span></text:span><text:span text:style-name="Source_20_Text"><text:span text:style-name="T9">public</text:span></text:span><text:span text:style-name="Source_20_Text"><text:span text:style-name="T4"> dtOptions: Config = {};</text:span></text:span></text:p>
      <text:p text:style-name="P18"><text:span text:style-name="Source_20_Text"><text:span text:style-name="T3"><text:s text:c="2"/></text:span></text:span><text:span text:style-name="Source_20_Text"><text:span text:style-name="T11">// Create a writable signal for the loading state, initialized to false.</text:span></text:span></text:p>
      <text:p text:style-name="P18"><text:span text:style-name="Source_20_Text"><text:span text:style-name="T3"><text:s text:c="2"/></text:span></text:span><text:span text:style-name="Source_20_Text"><text:span text:style-name="T4">loading: WritableSignal&lt;</text:span></text:span><text:span text:style-name="Source_20_Text"><text:span text:style-name="T9">boolean</text:span></text:span><text:span text:style-name="Source_20_Text"><text:span text:style-name="T4">&gt; = signal(</text:span></text:span><text:span text:style-name="Source_20_Text"><text:span text:style-name="T6">false</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6">constructor</text:span></text:span><text:span text:style-name="Source_20_Text"><text:span text:style-name="T4">(</text:span></text:span><text:span text:style-name="Source_20_Text"><text:span text:style-name="T9">private</text:span></text:span><text:span text:style-name="Source_20_Text"><text:span text:style-name="T4"> dialog: MatDialog, </text:span></text:span><text:span text:style-name="Source_20_Text"><text:span text:style-name="T9">private</text:span></text:span><text:span text:style-name="Source_20_Text"><text:span text:style-name="T4"> employeeService: EmployeeService, </text:span></text:span><text:span text:style-name="Source_20_Text"><text:span text:style-name="T9">private</text:span></text:span><text:span text:style-name="Source_20_Text"><text:span text:style-name="T4"> translate: TranslateService) { }</text:span></text:span></text:p>
      <text:p text:style-name="P18"><text:span text:style-name="Source_20_Text"><text:span text:style-name="T3"><text:s text:c="2"/></text:span></text:span><text:span text:style-name="Source_20_Text"><text:span text:style-name="T4">ngOnInit(): </text:span></text:span><text:span text:style-name="Source_20_Text"><text:span text:style-name="T9">void</text:span></text:span><text:span text:style-name="Source_20_Text"><text:span text:style-name="T4"> {</text:span></text:span></text:p>
      <text:p text:style-name="P18"><text:soft-page-break/><text:span text:style-name="Source_20_Text"><text:span text:style-name="T3"><text:s text:c="4"/></text:span></text:span><text:span text:style-name="Source_20_Text"><text:span text:style-name="T11">// Using `get` ensures that the translations are loaded before we try to use them.</text:span></text:span></text:p>
      <text:p text:style-name="P18"><text:span text:style-name="Source_20_Text"><text:span text:style-name="T3"><text:s text:c="4"/></text:span></text:span><text:span text:style-name="Source_20_Text"><text:span text:style-name="T11">// `instant` can fail if the component initializes before the translation file is fetched.</text:span></text:span></text:p>
      <text:p text:style-name="P18"><text:span text:style-name="Source_20_Text"><text:span text:style-name="T3"><text:s text:c="4"/></text:span></text:span><text:span text:style-name="Source_20_Text"><text:span text:style-name="T9">this</text:span></text:span><text:span text:style-name="Source_20_Text"><text:span text:style-name="T4">.translate.get([</text:span></text:span></text:p>
      <text:p text:style-name="P18"><text:span text:style-name="Source_20_Text"><text:span text:style-name="T3"><text:s text:c="6"/></text:span></text:span><text:span text:style-name="Source_20_Text"><text:span text:style-name="T6">'datatables.info'</text:span></text:span><text:span text:style-name="Source_20_Text"><text:span text:style-name="T4">, </text:span></text:span><text:span text:style-name="Source_20_Text"><text:span text:style-name="T6">'new-employee'</text:span></text:span><text:span text:style-name="Source_20_Text"><text:span text:style-name="T4">, </text:span></text:span><text:span text:style-name="Source_20_Text"><text:span text:style-name="T6">'edit-employee'</text:span></text:span><text:span text:style-name="Source_20_Text"><text:span text:style-name="T4">, </text:span></text:span><text:span text:style-name="Source_20_Text"><text:span text:style-name="T6">'remove-employee'</text:span></text:span><text:span text:style-name="Source_20_Text"><text:span text:style-name="T4">, </text:span></text:span><text:span text:style-name="Source_20_Text"><text:span text:style-name="T6">'confirm-delete'</text:span></text:span><text:span text:style-name="Source_20_Text"><text:span text:style-name="T4">,</text:span></text:span></text:p>
      <text:p text:style-name="P18"><text:span text:style-name="Source_20_Text"><text:span text:style-name="T3"><text:s text:c="6"/></text:span></text:span><text:span text:style-name="Source_20_Text"><text:span text:style-name="T6">'confirm-delete-message'</text:span></text:span><text:span text:style-name="Source_20_Text"><text:span text:style-name="T4">, </text:span></text:span><text:span text:style-name="Source_20_Text"><text:span text:style-name="T6">'delete'</text:span></text:span><text:span text:style-name="Source_20_Text"><text:span text:style-name="T4">, </text:span></text:span><text:span text:style-name="Source_20_Text"><text:span text:style-name="T6">'cancel'</text:span></text:span><text:span text:style-name="Source_20_Text"><text:span text:style-name="T4">, </text:span></text:span><text:span text:style-name="Source_20_Text"><text:span text:style-name="T6">'id'</text:span></text:span><text:span text:style-name="Source_20_Text"><text:span text:style-name="T4">, </text:span></text:span><text:span text:style-name="Source_20_Text"><text:span text:style-name="T6">'name'</text:span></text:span><text:span text:style-name="Source_20_Text"><text:span text:style-name="T4">, </text:span></text:span><text:span text:style-name="Source_20_Text"><text:span text:style-name="T6">'manager'</text:span></text:span><text:span text:style-name="Source_20_Text"><text:span text:style-name="T4">, </text:span></text:span><text:span text:style-name="Source_20_Text"><text:span text:style-name="T6">'position'</text:span></text:span><text:span text:style-name="Source_20_Text"><text:span text:style-name="T4">,</text:span></text:span></text:p>
      <text:p text:style-name="P18"/>
      <text:p text:style-name="P18"/>
      <text:p text:style-name="P18"><text:span text:style-name="Source_20_Text"><text:span text:style-name="T3"><text:s text:c="2"/></text:span></text:span><text:span text:style-name="Source_20_Text"><text:span text:style-name="T4">addEmployee(emp: Employee): </text:span></text:span><text:span text:style-name="Source_20_Text"><text:span text:style-name="T9">void</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
      <text:p text:style-name="P18"/>
      <text:p text:style-name="P18"/>
      <text:p text:style-name="P18"><text:span text:style-name="Source_20_Text"><text:span text:style-name="T3"><text:s text:c="4"/></text:span></text:span><text:span text:style-name="Source_20_Text"><text:span text:style-name="T9">this</text:span></text:span><text:span text:style-name="Source_20_Text"><text:span text:style-name="T4">.employeeService.createEmployee(emp).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res: Employee) =&gt; {</text:span></text:span></text:p>
      <text:p text:style-name="P18"><text:span text:style-name="Source_20_Text"><text:span text:style-name="T3"><text:s text:c="8"/></text:span></text:span><text:span text:style-name="Source_20_Text"><text:span text:style-name="T9">this</text:span></text:span><text:span text:style-name="Source_20_Text"><text:span text:style-name="T4">.employeeIdToEmployeeMap.set(res.id, res);</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add(res).draw();</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4">alert(</text:span></text:span><text:span text:style-name="Source_20_Text"><text:span text:style-name="T9">this</text:span></text:span><text:span text:style-name="Source_20_Text"><text:span text:style-name="T4">.translate.instant(</text:span></text:span><text:span text:style-name="Source_20_Text"><text:span text:style-name="T6">'failed-to-add-employee'</text:span></text:span><text:span text:style-name="Source_20_Text"><text:span text:style-name="T4">) + </text:span></text:span><text:span text:style-name="Source_20_Text"><text:span text:style-name="T6">': '</text:span></text:span><text:span text:style-name="Source_20_Text"><text:span text:style-name="T4"> + err.message);</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text:span text:style-name="Source_20_Text"><text:span text:style-name="T3"><text:s text:c="2"/></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4">editEmployee(emp: Employee): </text:span></text:span><text:span text:style-name="Source_20_Text"><text:span text:style-name="T9">void</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Service.updateEmployee(emp).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res: Employee) =&gt; {</text:span></text:span></text:p>
      <text:p text:style-name="P18"><text:span text:style-name="Source_20_Text"><text:span text:style-name="T3"><text:s text:c="8"/></text:span></text:span><text:span text:style-name="Source_20_Text"><text:span text:style-name="T9">const</text:span></text:span><text:span text:style-name="Source_20_Text"><text:span text:style-name="T4"> rowToUpdate = </text:span></text:span><text:span text:style-name="Source_20_Text"><text:span text:style-name="T9">this</text:span></text:span><text:span text:style-name="Source_20_Text"><text:span text:style-name="T4">.table.row(</text:span></text:span><text:span text:style-name="Source_20_Text"><text:span text:style-name="T6">'.selected'</text:span></text:span><text:span text:style-name="Source_20_Text"><text:span text:style-name="T4">);</text:span></text:span></text:p>
      <text:p text:style-name="P18"/>
      <text:p text:style-name="P18"><text:span text:style-name="Source_20_Text"><text:span text:style-name="T3"><text:s text:c="8"/></text:span></text:span><text:span text:style-name="Source_20_Text"><text:span text:style-name="T11">// Invalidate all rows to re-run render functions (e.g., for manager names) and redraw.</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s().invalidate().draw(</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6"/></text:span></text:span><text:span text:style-name="Source_20_Text"><text:span text:style-name="T4">},</text:span></text:span></text:p>
      <text:p text:style-name="P18"><text:soft-page-break/><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const</text:span></text:span><text:span text:style-name="Source_20_Text"><text:span text:style-name="T4"> dialogRef = </text:span></text:span><text:span text:style-name="Source_20_Text"><text:span text:style-name="T9">this</text:span></text:span><text:span text:style-name="Source_20_Text"><text:span text:style-name="T4">.dialog.open(ErrorDialogComponent, {</text:span></text:span></text:p>
      <text:p text:style-name="P18"><text:span text:style-name="Source_20_Text"><text:span text:style-name="T3"><text:s text:c="10"/></text:span></text:span><text:span text:style-name="Source_20_Text"><text:span text:style-name="T10">data</text:span></text:span><text:span text:style-name="Source_20_Text"><text:span text:style-name="T4">: {</text:span></text:span></text:p>
      <text:p text:style-name="P18"><text:span text:style-name="Source_20_Text"><text:span text:style-name="T3"><text:s text:c="12"/></text:span></text:span><text:span text:style-name="Source_20_Text"><text:span text:style-name="T10">title</text:span></text:span><text:span text:style-name="Source_20_Text"><text:span text:style-name="T4">: </text:span></text:span><text:span text:style-name="Source_20_Text"><text:span text:style-name="T9">this</text:span></text:span><text:span text:style-name="Source_20_Text"><text:span text:style-name="T4">.translate.instant(</text:span></text:span><text:span text:style-name="Source_20_Text"><text:span text:style-name="T6">'cycle-detected'</text:span></text:span><text:span text:style-name="Source_20_Text"><text:span text:style-name="T4">),</text:span></text:span></text:p>
      <text:p text:style-name="P18"/>
      <text:p text:style-name="P18"/>
      <text:p text:style-name="P18"><text:span text:style-name="Source_20_Text"><text:span text:style-name="T3"><text:s text:c="2"/></text:span></text:span><text:span text:style-name="Source_20_Text"><text:span text:style-name="T6">deleteEmployee</text:span></text:span><text:span text:style-name="Source_20_Text"><text:span text:style-name="T4">(empId: </text:span></text:span><text:span text:style-name="Source_20_Text"><text:span text:style-name="T9">string</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Service.deleteEmployee(empId).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 =&gt; {</text:span></text:span></text:p>
      <text:p text:style-name="P18"><text:span text:style-name="Source_20_Text"><text:span text:style-name="T3"><text:s text:c="8"/></text:span></text:span><text:span text:style-name="Source_20_Text"><text:span text:style-name="T9">this</text:span></text:span><text:span text:style-name="Source_20_Text"><text:span text:style-name="T4">.employeeIdToEmployeeMap.delete(empId);</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text:span></text:span><text:span text:style-name="Source_20_Text"><text:span text:style-name="T6">".selected"</text:span></text:span><text:span text:style-name="Source_20_Text"><text:span text:style-name="T4">).remove();</text:span></text:span></text:p>
      <text:p text:style-name="P18"><text:span text:style-name="Source_20_Text"><text:span text:style-name="T3"><text:s text:c="8"/></text:span></text:span><text:span text:style-name="Source_20_Text"><text:span text:style-name="T11">// Invalidate all rows to re-run render functions (e.g., for manager names)</text:span></text:span></text:p>
      <text:p text:style-name="P18"><text:span text:style-name="Source_20_Text"><text:span text:style-name="T3"><text:s text:c="8"/></text:span></text:span><text:span text:style-name="Source_20_Text"><text:span text:style-name="T11">// and redraw the table without changing pagination.</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s().invalidate().draw(</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this</text:span></text:span><text:span text:style-name="Source_20_Text"><text:span text:style-name="T4">.translate.get([</text:span></text:span><text:span text:style-name="Source_20_Text"><text:span text:style-name="T6">'manager-cannot-be-deleted'</text:span></text:span><text:span text:style-name="Source_20_Text"><text:span text:style-name="T4">, </text:span></text:span><text:span text:style-name="Source_20_Text"><text:span text:style-name="T6">'employee-cannot-be-deleted-has-subordinates'</text:span></text:span><text:span text:style-name="Source_20_Text"><text:span text:style-name="T4">])</text:span></text:span></text:p>
      <text:p text:style-name="P18"><text:span text:style-name="Source_20_Text"><text:span text:style-name="T3"><text:s text:c="10"/></text:span></text:span><text:span text:style-name="Source_20_Text"><text:span text:style-name="T4">.subscribe(translations =&gt; {</text:span></text:span></text:p>
      <text:p text:style-name="P18"><text:span text:style-name="Source_20_Text"><text:span text:style-name="T3"><text:s text:c="12"/></text:span></text:span><text:span text:style-name="Source_20_Text"><text:span text:style-name="T9">this</text:span></text:span><text:span text:style-name="Source_20_Text"><text:span text:style-name="T4">.dialog.open(ErrorDialogComponent, {</text:span></text:span></text:p>
      <text:p text:style-name="P18"><text:span text:style-name="Source_20_Text"><text:span text:style-name="T3"><text:s text:c="2"/></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4">getEmployees(): </text:span></text:span><text:span text:style-name="Source_20_Text"><text:span text:style-name="T9">void</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IdToEmployeeMap.clear();</text:span></text:span></text:p>
      <text:p text:style-name="P18"><text:span text:style-name="Source_20_Text"><text:span text:style-name="T3"><text:s text:c="4"/></text:span></text:span><text:span text:style-name="Source_20_Text"><text:span text:style-name="T9">this</text:span></text:span><text:span text:style-name="Source_20_Text"><text:span text:style-name="T4">.table.clear();</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Service.getEmployeesWithManagers().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res: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if</text:span></text:span><text:span text:style-name="Source_20_Text"><text:span text:style-name="T4"> (!res || res.length </text:span></text:span><text:span text:style-name="Source_20_Text"><text:span text:style-name="T11">=== 0) {</text:span></text:span></text:p>
      <text:p text:style-name="P18"><text:span text:style-name="Source_20_Text"><text:span text:style-name="T3"><text:s text:c="10"/></text:span></text:span><text:span text:style-name="Source_20_Text"><text:span text:style-name="T9">this</text:span></text:span><text:span text:style-name="Source_20_Text"><text:span text:style-name="T4">.table.draw();</text:span></text:span></text:p>
      <text:p text:style-name="P18"><text:span text:style-name="Source_20_Text"><text:span text:style-name="T3"><text:s text:c="10"/></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10"/></text:span></text:span><text:span text:style-name="Source_20_Text"><text:span text:style-name="T9">return</text:span></text:span><text:span text:style-name="Source_20_Text"><text:span text:style-name="T4">;</text:span></text:span></text:p>
      <text:p text:style-name="P18"><text:soft-page-break/><text:span text:style-name="Source_20_Text"><text:span text:style-name="T3"><text:s text:c="8"/></text:span></text:span><text:span text:style-name="Source_20_Text"><text:span text:style-name="T4">}</text:span></text:span></text:p>
      <text:p text:style-name="P18"/>
      <text:p text:style-name="P18"><text:span text:style-name="Source_20_Text"><text:span text:style-name="T3"><text:s text:c="12"/></text:span></text:span><text:span text:style-name="Source_20_Text"><text:span text:style-name="T11">// Invalidate all rows to force re-running render functions (e.g., for manager names)</text:span></text:span></text:p>
      <text:p text:style-name="P18"><text:span text:style-name="Source_20_Text"><text:span text:style-name="T3"><text:s text:c="12"/></text:span></text:span><text:span text:style-name="Source_20_Text"><text:span text:style-name="T11">// and then draw the table. This is the most reliable way to handle renderers with dependencies.</text:span></text:span></text:p>
      <text:p text:style-name="P18"><text:span text:style-name="Source_20_Text"><text:span text:style-name="T3"><text:s text:c="12"/></text:span></text:span><text:span text:style-name="Source_20_Text"><text:span text:style-name="T9">this</text:span></text:span><text:span text:style-name="Source_20_Text"><text:span text:style-name="T4">.table.rows().invalidate().draw();</text:span></text:span></text:p>
      <text:p text:style-name="P18"><text:span text:style-name="Source_20_Text"><text:span text:style-name="T3"><text:s text:c="12"/></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10"/></text:span></text:span><text:span text:style-name="Source_20_Text"><text:span text:style-name="T4">},</text:span></text:span></text:p>
      <text:p text:style-name="P18"><text:span text:style-name="Source_20_Text"><text:span text:style-name="T3"><text:s text:c="10"/></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12"/></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12"/></text:span></text:span><text:span text:style-name="Source_20_Text"><text:span text:style-name="T4">alert(</text:span></text:span><text:span text:style-name="Source_20_Text"><text:span text:style-name="T9">this</text:span></text:span><text:span text:style-name="Source_20_Text"><text:span text:style-name="T4">.translate.instant(</text:span></text:span><text:span text:style-name="Source_20_Text"><text:span text:style-name="T6">'failed-to-get-employees'</text:span></text:span><text:span text:style-name="Source_20_Text"><text:span text:style-name="T4">) + </text:span></text:span><text:span text:style-name="Source_20_Text"><text:span text:style-name="T6">': '</text:span></text:span><text:span text:style-name="Source_20_Text"><text:span text:style-name="T4"> + err.message);</text:span></text:span></text:p>
      <text:p text:style-name="P18"><text:span text:style-name="Source_20_Text"><text:span text:style-name="T3"><text:s text:c="10"/></text:span></text:span><text:span text:style-name="Source_20_Text"><text:span text:style-name="T4">}</text:span></text:span></text:p>
      <text:p text:style-name="P18"><text:span text:style-name="Source_20_Text"><text:span text:style-name="T3"><text:s text:c="8"/></text:span></text:span><text:span text:style-name="Source_20_Text"><text:span text:style-name="T4">});</text:span></text:span></text:p>
      <text:p text:style-name="P18"/>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4">alert(</text:span></text:span><text:span text:style-name="Source_20_Text"><text:span text:style-name="T9">this</text:span></text:span><text:span text:style-name="Source_20_Text"><text:span text:style-name="T4">.translate.instant(</text:span></text:span><text:span text:style-name="Source_20_Text"><text:span text:style-name="T6">'failed-to-get-employees'</text:span></text:span><text:span text:style-name="Source_20_Text"><text:span text:style-name="T4">) + </text:span></text:span><text:span text:style-name="Source_20_Text"><text:span text:style-name="T6">': '</text:span></text:span><text:span text:style-name="Source_20_Text"><text:span text:style-name="T4"> + err.message);</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
      <text:h text:style-name="P3" text:outline-level="3">4. Final Step: Verify the Spinner Component Placement</text:h>
      <text:p text:style-name="P21"><text:span text:style-name="T2">You have already placed the </text:span><text:span text:style-name="Source_20_Text"><text:span text:style-name="T5">&lt;app-spinner&gt;</text:span></text:span><text:span text:style-name="T2"> selector in your main </text:span><text:a xlink:type="simple" xlink:href="code-assist-path:/home/vj/Desktop/A/__myapp/datatables3/datatables/myapp-client/src/app/app.component.html" text:style-name="Internet_20_link" text:visited-style-name="Visited_20_Internet_20_Link"><text:span text:style-name="Source_20_Text"><text:span text:style-name="T7">app.component.html</text:span></text:span></text:a><text:span text:style-name="T2"> file. It's correctly positioned at the root level so it can overlay your entire application.</text:span></text:p>
      <text:p text:style-name="P21"><text:span text:style-name="T2">Your </text:span><text:a xlink:type="simple" xlink:href="code-assist-path:/home/vj/Desktop/A/__myapp/datatables3/datatables/myapp-client/src/app/app.component.html" text:style-name="Internet_20_link" text:visited-style-name="Visited_20_Internet_20_Link"><text:span text:style-name="Source_20_Text"><text:span text:style-name="T7">/home/vj/Desktop/A/__myapp/datatables3/datatables/myapp-client/src/app/app.component.html</text:span></text:span></text:a><text:span text:style-name="T2"> is set up correctly:</text:span></text:p>
      <text:p text:style-name="P5">html</text:p>
      <text:p text:style-name="P18"><text:span text:style-name="Source_20_Text"><text:span text:style-name="T4">...</text:span></text:span></text:p>
      <text:p text:style-name="P18"><text:span text:style-name="Source_20_Text"><text:span text:style-name="T3"><text:s text:c="8"/></text:span></text:span><text:span text:style-name="Source_20_Text"><text:span text:style-name="T9">&lt;div </text:span></text:span><text:span text:style-name="Source_20_Text"><text:span text:style-name="T10">class</text:span></text:span><text:span text:style-name="Source_20_Text"><text:span text:style-name="T9">=</text:span></text:span><text:span text:style-name="Source_20_Text"><text:span text:style-name="T6">"col"</text:span></text:span><text:span text:style-name="Source_20_Text"><text:span text:style-name="T9">&gt;</text:span></text:span></text:p>
      <text:p text:style-name="P18"><text:span text:style-name="Source_20_Text"><text:span text:style-name="T3"><text:s text:c="12"/></text:span></text:span><text:span text:style-name="Source_20_Text"><text:span text:style-name="T9">&lt;router-outlet /&gt;</text:span></text:span></text:p>
      <text:p text:style-name="P18"><text:span text:style-name="Source_20_Text"><text:span text:style-name="T3"><text:s text:c="12"/></text:span></text:span><text:span text:style-name="Source_20_Text"><text:span text:style-name="T9">&lt;app-spinner&gt;&lt;/app-spinner&gt;</text:span></text:span></text:p>
      <text:p text:style-name="P18"><text:span text:style-name="Source_20_Text"><text:span text:style-name="T3"><text:s text:c="8"/></text:span></text:span><text:span text:style-name="Source_20_Text"><text:span text:style-name="T9">&lt;/div&gt;</text:span></text:span></text:p>
      <text:p text:style-name="P18"><text:span text:style-name="Source_20_Text"><text:span text:style-name="T4">...</text:span></text:span></text:p>
      <text:p text:style-name="P21"><text:span text:style-name="T2">With these changes, your application will now correctly display a centered, full-screen spinner during all data operations in the </text:span><text:span text:style-name="Source_20_Text"><text:span text:style-name="T5">DataTables3Component</text:span></text:span><text:span text:style-name="T2"> and any other component that triggers HTTP requests.</text:span></text:p>
      <text:h text:style-name="P1" text:outline-level="1">Jan</text:h>
      <text:p text:style-name="P9">create HTTP_INTERCEPTOR (SpinnerInterceptor)</text:p>
      <text:h text:style-name="P2" text:outline-level="1">Gemini</text:h>
      <text:p text:style-name="P21"><text:span text:style-name="T2">Okay, I can help you create an </text:span><text:span text:style-name="Source_20_Text"><text:span text:style-name="T5">HTTP_INTERCEPTOR</text:span></text:span><text:span text:style-name="T2"> called </text:span><text:span text:style-name="Source_20_Text"><text:span text:style-name="T5">SpinnerInterceptor</text:span></text:span><text:span text:style-name="T2">. This interceptor will be responsible for showing and hiding a loading spinner during HTTP requests.</text:span></text:p>
      <text:p text:style-name="P21"><text:span text:style-name="T2">Given the context, it seems like you want to use this interceptor to manage a global spinner using a </text:span><text:span text:style-name="Source_20_Text"><text:span text:style-name="T5">SpinnerService</text:span></text:span><text:span text:style-name="T2">.</text:span></text:p>
      <text:p text:style-name="P7">Here are the steps and code changes to achieve this:</text:p>
      <text:list xml:id="list1435447830" text:style-name="L1">
        <text:list-item>
          <text:p text:style-name="P32"><text:soft-page-break/><text:span text:style-name="Strong_20_Emphasis"><text:span text:style-name="T2">Create the </text:span></text:span><text:span text:style-name="Strong_20_Emphasis"><text:span text:style-name="Source_20_Text"><text:span text:style-name="T5">SpinnerInterceptor</text:span></text:span></text:span></text:p>
        </text:list-item>
      </text:list>
      <text:p text:style-name="P21"><text:span text:style-name="T2">Let's create the </text:span><text:span text:style-name="Source_20_Text"><text:span text:style-name="T5">SpinnerInterceptor</text:span></text:span><text:span text:style-name="T2"> which intercepts HTTP requests and controls the spinner's visibility.</text:span></text:p>
      <text:p text:style-name="P11">New file: spinner.interceptor.ts</text:p>
      <text:p text:style-name="P15">+35</text:p>
      <text:p text:style-name="P18"><text:span text:style-name="Source_20_Text"><text:span text:style-name="T9">import</text:span></text:span><text:span text:style-name="Source_20_Text"><text:span text:style-name="T4"> { Injectable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text:span></text:span></text:p>
      <text:p text:style-name="P18"><text:span text:style-name="Source_20_Text"><text:span text:style-name="T3"><text:s text:c="2"/></text:span></text:span><text:span text:style-name="Source_20_Text"><text:span text:style-name="T4">HttpRequest,</text:span></text:span></text:p>
      <text:p text:style-name="P18"><text:span text:style-name="Source_20_Text"><text:span text:style-name="T3"><text:s text:c="2"/></text:span></text:span><text:span text:style-name="Source_20_Text"><text:span text:style-name="T4">HttpHandler,</text:span></text:span></text:p>
      <text:p text:style-name="P18"><text:span text:style-name="Source_20_Text"><text:span text:style-name="T3"><text:s text:c="2"/></text:span></text:span><text:span text:style-name="Source_20_Text"><text:span text:style-name="T4">HttpInterceptor,</text:span></text:span></text:p>
      <text:p text:style-name="P18"><text:span text:style-name="Source_20_Text"><text:span text:style-name="T4">} </text:span></text:span><text:span text:style-name="Source_20_Text"><text:span text:style-name="T9">from</text:span></text:span><text:span text:style-name="Source_20_Text"><text:span text:style-name="T4"> </text:span></text:span><text:span text:style-name="Source_20_Text"><text:span text:style-name="T6">'@angular/common/http'</text:span></text:span><text:span text:style-name="Source_20_Text"><text:span text:style-name="T4">;</text:span></text:span></text:p>
      <text:p text:style-name="P18"><text:span text:style-name="Source_20_Text"><text:span text:style-name="T9">import</text:span></text:span><text:span text:style-name="Source_20_Text"><text:span text:style-name="T4"> { finalize } </text:span></text:span><text:span text:style-name="Source_20_Text"><text:span text:style-name="T9">from</text:span></text:span><text:span text:style-name="Source_20_Text"><text:span text:style-name="T4"> </text:span></text:span><text:span text:style-name="Source_20_Text"><text:span text:style-name="T6">'rxjs/operators'</text:span></text:span><text:span text:style-name="Source_20_Text"><text:span text:style-name="T4">;</text:span></text:span></text:p>
      <text:p text:style-name="P18"><text:span text:style-name="Source_20_Text"><text:span text:style-name="T9">import</text:span></text:span><text:span text:style-name="Source_20_Text"><text:span text:style-name="T4"> { SpinnerService } </text:span></text:span><text:span text:style-name="Source_20_Text"><text:span text:style-name="T9">from</text:span></text:span><text:span text:style-name="Source_20_Text"><text:span text:style-name="T4"> </text:span></text:span><text:span text:style-name="Source_20_Text"><text:span text:style-name="T6">'../../service/spinner.service'</text:span></text:span><text:span text:style-name="Source_20_Text"><text:span text:style-name="T4">;</text:span></text:span></text:p>
      <text:p text:style-name="P18"/>
      <text:p text:style-name="P18"><text:span text:style-name="Source_20_Text"><text:span text:style-name="T13">@Injectable</text:span></text:span><text:span text:style-name="Source_20_Text"><text:span text:style-name="T4">()</text:span></text:span></text:p>
      <text:p text:style-name="P18"><text:span text:style-name="Source_20_Text"><text:span text:style-name="T9">export</text:span></text:span><text:span text:style-name="Source_20_Text"><text:span text:style-name="T4"> </text:span></text:span><text:span text:style-name="Source_20_Text"><text:span text:style-name="T9">class</text:span></text:span><text:span text:style-name="Source_20_Text"><text:span text:style-name="T4"> </text:span></text:span><text:span text:style-name="Source_20_Text"><text:span text:style-name="T6">SpinnerInterceptor</text:span></text:span><text:span text:style-name="Source_20_Text"><text:span text:style-name="T4"> </text:span></text:span><text:span text:style-name="Source_20_Text"><text:span text:style-name="T6">implements</text:span></text:span><text:span text:style-name="Source_20_Text"><text:span text:style-name="T4"> </text:span></text:span><text:span text:style-name="Source_20_Text"><text:span text:style-name="T6">HttpInterceptor</text:span></text:span><text:span text:style-name="Source_20_Text"><text:span text:style-name="T4"> {</text:span></text:span></text:p>
      <text:p text:style-name="P18"><text:span text:style-name="Source_20_Text"><text:span text:style-name="T3"><text:s text:c="2"/></text:span></text:span><text:span text:style-name="Source_20_Text"><text:span text:style-name="T6">constructor</text:span></text:span><text:span text:style-name="Source_20_Text"><text:span text:style-name="T4">(</text:span></text:span><text:span text:style-name="Source_20_Text"><text:span text:style-name="T9">private</text:span></text:span><text:span text:style-name="Source_20_Text"><text:span text:style-name="T4"> spinnerService: SpinnerService) {}</text:span></text:span></text:p>
      <text:p text:style-name="P18"/>
      <text:p text:style-name="P18"><text:span text:style-name="Source_20_Text"><text:span text:style-name="T3"><text:s text:c="2"/></text:span></text:span><text:span text:style-name="Source_20_Text"><text:span text:style-name="T6">intercept</text:span></text:span><text:span text:style-name="Source_20_Text"><text:span text:style-name="T4">(request: HttpRequest&lt;</text:span></text:span><text:span text:style-name="Source_20_Text"><text:span text:style-name="T9">any</text:span></text:span><text:span text:style-name="Source_20_Text"><text:span text:style-name="T4">&gt;, next: HttpHandler) {</text:span></text:span></text:p>
      <text:p text:style-name="P18"><text:span text:style-name="Source_20_Text"><text:span text:style-name="T3"><text:s text:c="4"/></text:span></text:span><text:span text:style-name="Source_20_Text"><text:span text:style-name="T9">this</text:span></text:span><text:span text:style-name="Source_20_Text"><text:span text:style-name="T4">.spinnerService.show();</text:span></text:span></text:p>
      <text:p text:style-name="P18"/>
      <text:p text:style-name="P18"><text:span text:style-name="Source_20_Text"><text:span text:style-name="T3"><text:s text:c="4"/></text:span></text:span><text:span text:style-name="Source_20_Text"><text:span text:style-name="T9">return</text:span></text:span><text:span text:style-name="Source_20_Text"><text:span text:style-name="T4"> next.handle(request).pipe(</text:span></text:span></text:p>
      <text:p text:style-name="P18"><text:span text:style-name="Source_20_Text"><text:span text:style-name="T3"><text:s text:c="6"/></text:span></text:span><text:span text:style-name="Source_20_Text"><text:span text:style-name="T4">finalize(() =&gt; {</text:span></text:span></text:p>
      <text:p text:style-name="P18"><text:span text:style-name="Source_20_Text"><text:span text:style-name="T3"><text:s text:c="8"/></text:span></text:span><text:span text:style-name="Source_20_Text"><text:span text:style-name="T9">this</text:span></text:span><text:span text:style-name="Source_20_Text"><text:span text:style-name="T4">.spinnerService.hide();</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text:span text:style-name="Source_20_Text"><text:span text:style-name="T3"><text:s text:c="2"/></text:span></text:span><text:span text:style-name="Source_20_Text"><text:span text:style-name="T4">}</text:span></text:span></text:p>
      <text:p text:style-name="P18"><text:span text:style-name="Source_20_Text"><text:span text:style-name="T4">}</text:span></text:span></text:p>
      <text:p text:style-name="P18"/>
      <text:p text:style-name="P18"/>
      <text:p text:style-name="P18"><text:span text:style-name="Source_20_Text"><text:span text:style-name="T11">/*</text:span></text:span></text:p>
      <text:p text:style-name="P18"><text:span text:style-name="Source_20_Text"><text:span text:style-name="T11">To use the interceptor, you need to provide it in your app.config.ts:</text:span></text:span></text:p>
      <text:p text:style-name="P18"/>
      <text:p text:style-name="P18"><text:span text:style-name="Source_20_Text"><text:span text:style-name="T11">{</text:span></text:span></text:p>
      <text:p text:style-name="P18"><text:span text:style-name="Source_20_Text"><text:span text:style-name="T12"><text:s text:c="2"/></text:span></text:span><text:span text:style-name="Source_20_Text"><text:span text:style-name="T11">provide: HTTP_INTERCEPTORS,</text:span></text:span></text:p>
      <text:p text:style-name="P18"><text:span text:style-name="Source_20_Text"><text:span text:style-name="T12"><text:s text:c="2"/></text:span></text:span><text:span text:style-name="Source_20_Text"><text:span text:style-name="T11">useClass: SpinnerInterceptor,</text:span></text:span></text:p>
      <text:p text:style-name="P18"><text:span text:style-name="Source_20_Text"><text:span text:style-name="T12"><text:s text:c="2"/></text:span></text:span><text:span text:style-name="Source_20_Text"><text:span text:style-name="T11">multi: true,</text:span></text:span></text:p>
      <text:p text:style-name="P18"><text:span text:style-name="Source_20_Text"><text:span text:style-name="T11">},</text:span></text:span></text:p>
      <text:p text:style-name="P18"><text:soft-page-break/><text:span text:style-name="Source_20_Text"><text:span text:style-name="T11">*/</text:span></text:span></text:p>
      <text:p text:style-name="P18"/>
      <text:p text:style-name="P19"><text:span text:style-name="T2">Use code with care. </text:span><text:a xlink:type="simple" xlink:href="https://developers.google.com/gemini-code-assist/ui/how-it-works" text:style-name="Internet_20_link" text:visited-style-name="Visited_20_Internet_20_Link"><text:span text:style-name="T8">Learn more</text:span></text:a></text:p>
      <text:p text:style-name="P7">With these changes, your application will now automatically display a spinner during HTTP requests.</text:p>
      <text:h text:style-name="P1" text:outline-level="1">Jan</text:h>
      <text:p text:style-name="P14">✘ <text:span text:style-name="T1">[ERROR] TS-992012: Component imports must be standalone components, directives, pipes, or must be NgModules. [plugin angular-compiler]</text:span></text:p>
      <text:p text:style-name="P12">spinner.interceptor.ts</text:p>
      <text:p text:style-name="P8">: 3 lines selected</text:p>
      <text:p text:style-name="P14">✘ <text:span text:style-name="T1">[ERROR] TS2307: Cannot find module '../../service/servicespinner.service' or its corresponding type declarations. [plugin angular-compiler]</text:span></text:p>
      <text:p text:style-name="P12">spinner.interceptor.ts</text:p>
      <text:p text:style-name="P8">: 3 lines selected</text:p>
      <text:p text:style-name="P14">✘ <text:span text:style-name="T1">[ERROR] TS-992003: No suitable injection token for parameter 'spinnerService' of class 'SpinnerComponent'. Consider using the @Inject decorator to specify an injection token. [plugin angular-compiler]</text:span></text:p>
      <text:p text:style-name="P12">spinner.interceptor.ts</text:p>
      <text:p text:style-name="P8">: 3 lines selected</text:p>
      <text:p text:style-name="P9">This type does not have a value, so it cannot be used as injection token.</text:p>
      <text:p text:style-name="P12">spinner.interceptor.ts</text:p>
      <text:p text:style-name="P8">: 3 lines selected</text:p>
      <text:p text:style-name="P14">✘ <text:span text:style-name="T1">[ERROR] TS2729: Property 'spinnerService' is used before its initialization. [plugin angular-compiler]</text:span></text:p>
      <text:p text:style-name="P12">spinner.interceptor.ts</text:p>
      <text:p text:style-name="P8">: 3 lines selected</text:p>
      <text:p text:style-name="P9">'spinnerService' is declared here.</text:p>
      <text:p text:style-name="P12">spinner.interceptor.ts</text:p>
      <text:p text:style-name="P8">: 3 lines selected</text:p>
      <text:h text:style-name="P2" text:outline-level="1">Gemini</text:h>
      <text:p text:style-name="P13">Thinking</text:p>
      <text:p text:style-name="P7">Of course! It looks like you're encountering a few compilation errors related to moving to a standalone component architecture and setting up the global spinner. I can definitely help you resolve these issues.</text:p>
      <text:p text:style-name="P7">Here are the step-by-step fixes for the errors you're seeing:</text:p>
      <text:h text:style-name="P16" text:outline-level="3"><text:span text:style-name="T2">1. Create the </text:span><text:span text:style-name="Source_20_Text"><text:span text:style-name="T5">SpinnerService</text:span></text:span></text:h>
      <text:p text:style-name="P21"><text:span text:style-name="T2">The errors indicate that </text:span><text:span text:style-name="Source_20_Text"><text:span text:style-name="T5">SpinnerService</text:span></text:span><text:span text:style-name="T2"> is being injected but doesn't exist or isn't injectable. Let's create this service. It will manage the loading state for your entire application.</text:span></text:p>
      <text:p text:style-name="P21"><text:span text:style-name="Strong_20_Emphasis"><text:span text:style-name="T2">New File: </text:span></text:span><text:a xlink:type="simple" xlink:href="code-assist-path:/home/vj/Desktop/A/__myapp/datatables3/datatables/myapp-client/src/app/service/spinner.service.ts" text:style-name="Internet_20_link" text:visited-style-name="Visited_20_Internet_20_Link"><text:span text:style-name="Strong_20_Emphasis"><text:span text:style-name="Source_20_Text"><text:span text:style-name="T7">/home/vj/Desktop/A/__myapp/datatables3/datatables/myapp-client/src/app/service/spinner.service.ts</text:span></text:span></text:span></text:a></text:p>
      <text:p text:style-name="P11">New file: spinner.service.ts</text:p>
      <text:p text:style-name="P15">+18</text:p>
      <text:p text:style-name="P18"><text:span text:style-name="Source_20_Text"><text:span text:style-name="T9">import</text:span></text:span><text:span text:style-name="Source_20_Text"><text:span text:style-name="T4"> { Injectable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BehaviorSubject } </text:span></text:span><text:span text:style-name="Source_20_Text"><text:span text:style-name="T9">from</text:span></text:span><text:span text:style-name="Source_20_Text"><text:span text:style-name="T4"> </text:span></text:span><text:span text:style-name="Source_20_Text"><text:span text:style-name="T6">'rxjs'</text:span></text:span><text:span text:style-name="Source_20_Text"><text:span text:style-name="T4">;</text:span></text:span></text:p>
      <text:p text:style-name="P18"/>
      <text:p text:style-name="P18"><text:span text:style-name="Source_20_Text"><text:span text:style-name="T13">@Injectable</text:span></text:span><text:span text:style-name="Source_20_Text"><text:span text:style-name="T4">({</text:span></text:span></text:p>
      <text:p text:style-name="P18"><text:span text:style-name="Source_20_Text"><text:span text:style-name="T3"><text:s text:c="2"/></text:span></text:span><text:span text:style-name="Source_20_Text"><text:span text:style-name="T10">providedIn</text:span></text:span><text:span text:style-name="Source_20_Text"><text:span text:style-name="T4">: </text:span></text:span><text:span text:style-name="Source_20_Text"><text:span text:style-name="T6">'root'</text:span></text:span><text:span text:style-name="Source_20_Text"><text:span text:style-name="T4">,</text:span></text:span></text:p>
      <text:p text:style-name="P18"><text:span text:style-name="Source_20_Text"><text:span text:style-name="T4">})</text:span></text:span></text:p>
      <text:p text:style-name="P18"><text:soft-page-break/><text:span text:style-name="Source_20_Text"><text:span text:style-name="T9">export</text:span></text:span><text:span text:style-name="Source_20_Text"><text:span text:style-name="T4"> </text:span></text:span><text:span text:style-name="Source_20_Text"><text:span text:style-name="T9">class</text:span></text:span><text:span text:style-name="Source_20_Text"><text:span text:style-name="T4"> </text:span></text:span><text:span text:style-name="Source_20_Text"><text:span text:style-name="T6">SpinnerService</text:span></text:span><text:span text:style-name="Source_20_Text"><text:span text:style-name="T4"> {</text:span></text:span></text:p>
      <text:p text:style-name="P18"><text:span text:style-name="Source_20_Text"><text:span text:style-name="T3"><text:s text:c="2"/></text:span></text:span><text:span text:style-name="Source_20_Text"><text:span text:style-name="T9">private</text:span></text:span><text:span text:style-name="Source_20_Text"><text:span text:style-name="T4"> isLoadingSubject = </text:span></text:span><text:span text:style-name="Source_20_Text"><text:span text:style-name="T9">new</text:span></text:span><text:span text:style-name="Source_20_Text"><text:span text:style-name="T4"> BehaviorSubject&lt;</text:span></text:span><text:span text:style-name="Source_20_Text"><text:span text:style-name="T9">boolean</text:span></text:span><text:span text:style-name="Source_20_Text"><text:span text:style-name="T4">&gt;(</text:span></text:span><text:span text:style-name="Source_20_Text"><text:span text:style-name="T6">false</text:span></text:span><text:span text:style-name="Source_20_Text"><text:span text:style-name="T4">);</text:span></text:span></text:p>
      <text:p text:style-name="P18"><text:span text:style-name="Source_20_Text"><text:span text:style-name="T3"><text:s text:c="2"/></text:span></text:span><text:span text:style-name="Source_20_Text"><text:span text:style-name="T9">public</text:span></text:span><text:span text:style-name="Source_20_Text"><text:span text:style-name="T4"> </text:span></text:span><text:span text:style-name="Source_20_Text"><text:span text:style-name="T9">readonly</text:span></text:span><text:span text:style-name="Source_20_Text"><text:span text:style-name="T4"> isLoading = </text:span></text:span><text:span text:style-name="Source_20_Text"><text:span text:style-name="T9">this</text:span></text:span><text:span text:style-name="Source_20_Text"><text:span text:style-name="T4">.isLoadingSubject.asObservable();</text:span></text:span></text:p>
      <text:p text:style-name="P18"/>
      <text:p text:style-name="P18"><text:span text:style-name="Source_20_Text"><text:span text:style-name="T3"><text:s text:c="2"/></text:span></text:span><text:span text:style-name="Source_20_Text"><text:span text:style-name="T6">show</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isLoadingSubject.next(</text:span></text:span><text:span text:style-name="Source_20_Text"><text:span text:style-name="T6">true</text:span></text:span><text:span text:style-name="Source_20_Text"><text:span text:style-name="T4">);</text:span></text:span></text:p>
      <text:p text:style-name="P18"><text:span text:style-name="Source_20_Text"><text:span text:style-name="T3"><text:s text:c="2"/></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6">hide</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isLoadingSubject.next(</text:span></text:span><text:span text:style-name="Source_20_Text"><text:span text:style-name="T6">false</text:span></text:span><text:span text:style-name="Source_20_Text"><text:span text:style-name="T4">);</text:span></text:span></text:p>
      <text:p text:style-name="P18"><text:span text:style-name="Source_20_Text"><text:span text:style-name="T3"><text:s text:c="2"/></text:span></text:span><text:span text:style-name="Source_20_Text"><text:span text:style-name="T4">}</text:span></text:span></text:p>
      <text:p text:style-name="P18"><text:span text:style-name="Source_20_Text"><text:span text:style-name="T4">}</text:span></text:span></text:p>
      <text:p text:style-name="P18"/>
      <text:h text:style-name="P16" text:outline-level="3"><text:span text:style-name="T2">2. Fix the </text:span><text:span text:style-name="Source_20_Text"><text:span text:style-name="T5">SpinnerComponent</text:span></text:span></text:h>
      <text:p text:style-name="P21"><text:span text:style-name="T2">Next, let's fix </text:span><text:a xlink:type="simple" xlink:href="code-assist-path:/home/vj/Desktop/A/__myapp/datatables3/datatables/myapp-client/src/app/shared/spinner/spinner.component.ts" text:style-name="Internet_20_link" text:visited-style-name="Visited_20_Internet_20_Link"><text:span text:style-name="Source_20_Text"><text:span text:style-name="T7">spinner.component.ts</text:span></text:span></text:a><text:span text:style-name="T2">. We need to correct the import path for </text:span><text:span text:style-name="Source_20_Text"><text:span text:style-name="T5">SpinnerService</text:span></text:span><text:span text:style-name="T2"> and fix how the </text:span><text:span text:style-name="Source_20_Text"><text:span text:style-name="T5">isLoading$</text:span></text:span><text:span text:style-name="T2"> property is initialized.</text:span></text:p>
      <text:p text:style-name="P11">spinner.component.ts</text:p>
      <text:p text:style-name="P6"><text:span text:style-name="T14">-5</text:span><text:span text:style-name="T15">+6</text:span></text:p>
      <text:p text:style-name="P18"><text:span text:style-name="Source_20_Text"><text:span text:style-name="T9">import</text:span></text:span><text:span text:style-name="Source_20_Text"><text:span text:style-name="T4"> { Component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CommonModule } </text:span></text:span><text:span text:style-name="Source_20_Text"><text:span text:style-name="T9">from</text:span></text:span><text:span text:style-name="Source_20_Text"><text:span text:style-name="T4"> </text:span></text:span><text:span text:style-name="Source_20_Text"><text:span text:style-name="T6">'@angular/common'</text:span></text:span><text:span text:style-name="Source_20_Text"><text:span text:style-name="T4">;</text:span></text:span></text:p>
      <text:p text:style-name="P18"><text:span text:style-name="Source_20_Text"><text:span text:style-name="T9">import</text:span></text:span><text:span text:style-name="Source_20_Text"><text:span text:style-name="T4"> { MatProgressSpinnerModule } </text:span></text:span><text:span text:style-name="Source_20_Text"><text:span text:style-name="T9">from</text:span></text:span><text:span text:style-name="Source_20_Text"><text:span text:style-name="T4"> </text:span></text:span><text:span text:style-name="Source_20_Text"><text:span text:style-name="T6">'@angular/material/progress-spinner'</text:span></text:span><text:span text:style-name="Source_20_Text"><text:span text:style-name="T4">;</text:span></text:span></text:p>
      <text:p text:style-name="P18"><text:span text:style-name="Source_20_Text"><text:span text:style-name="T9">import</text:span></text:span><text:span text:style-name="Source_20_Text"><text:span text:style-name="T4"> { SpinnerService } </text:span></text:span><text:span text:style-name="Source_20_Text"><text:span text:style-name="T9">from</text:span></text:span><text:span text:style-name="Source_20_Text"><text:span text:style-name="T4"> </text:span></text:span><text:span text:style-name="Source_20_Text"><text:span text:style-name="T6">'../../service/servicespinner.service'</text:span></text:span></text:p>
      <text:p text:style-name="P18"><text:span text:style-name="Source_20_Text"><text:span text:style-name="T9">import</text:span></text:span><text:span text:style-name="Source_20_Text"><text:span text:style-name="T4"> { SpinnerService } </text:span></text:span><text:span text:style-name="Source_20_Text"><text:span text:style-name="T9">from</text:span></text:span><text:span text:style-name="Source_20_Text"><text:span text:style-name="T4"> </text:span></text:span><text:span text:style-name="Source_20_Text"><text:span text:style-name="T6">'../../service/spinner.service'</text:span></text:span><text:span text:style-name="Source_20_Text"><text:span text:style-name="T4">;</text:span></text:span></text:p>
      <text:p text:style-name="P18"><text:span text:style-name="Source_20_Text"><text:span text:style-name="T9">import</text:span></text:span><text:span text:style-name="Source_20_Text"><text:span text:style-name="T4"> { Observable } </text:span></text:span><text:span text:style-name="Source_20_Text"><text:span text:style-name="T9">from</text:span></text:span><text:span text:style-name="Source_20_Text"><text:span text:style-name="T4"> </text:span></text:span><text:span text:style-name="Source_20_Text"><text:span text:style-name="T6">'rxjs'</text:span></text:span><text:span text:style-name="Source_20_Text"><text:span text:style-name="T4">;</text:span></text:span></text:p>
      <text:p text:style-name="P18"><text:span text:style-name="Source_20_Text"><text:span text:style-name="T13">@Component</text:span></text:span><text:span text:style-name="Source_20_Text"><text:span text:style-name="T4">({</text:span></text:span></text:p>
      <text:p text:style-name="P18"><text:span text:style-name="Source_20_Text"><text:span text:style-name="T3"><text:s text:c="4"/></text:span></text:span><text:span text:style-name="Source_20_Text"><text:span text:style-name="T10">selector</text:span></text:span><text:span text:style-name="Source_20_Text"><text:span text:style-name="T4">: </text:span></text:span><text:span text:style-name="Source_20_Text"><text:span text:style-name="T6">'app-spinner'</text:span></text:span><text:span text:style-name="Source_20_Text"><text:span text:style-name="T4">,</text:span></text:span></text:p>
      <text:p text:style-name="P18"><text:span text:style-name="Source_20_Text"><text:span text:style-name="T3"><text:s text:c="4"/></text:span></text:span><text:span text:style-name="Source_20_Text"><text:span text:style-name="T10">standalone</text:span></text:span><text:span text:style-name="Source_20_Text"><text:span text:style-name="T4">: </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10">imports</text:span></text:span><text:span text:style-name="Source_20_Text"><text:span text:style-name="T4">: [CommonModule, MatProgressSpinnerModule],</text:span></text:span></text:p>
      <text:p text:style-name="P18"><text:span text:style-name="Source_20_Text"><text:span text:style-name="T3"><text:s text:c="4"/></text:span></text:span><text:span text:style-name="Source_20_Text"><text:span text:style-name="T10">templateUrl</text:span></text:span><text:span text:style-name="Source_20_Text"><text:span text:style-name="T4">: </text:span></text:span><text:span text:style-name="Source_20_Text"><text:span text:style-name="T6">'./spinner.component.html'</text:span></text:span><text:span text:style-name="Source_20_Text"><text:span text:style-name="T4">,</text:span></text:span></text:p>
      <text:p text:style-name="P18"><text:span text:style-name="Source_20_Text"><text:span text:style-name="T3"><text:s text:c="4"/></text:span></text:span><text:span text:style-name="Source_20_Text"><text:span text:style-name="T10">styleUrls</text:span></text:span><text:span text:style-name="Source_20_Text"><text:span text:style-name="T4">: [</text:span></text:span><text:span text:style-name="Source_20_Text"><text:span text:style-name="T6">'./spinner.component.css'</text:span></text:span><text:span text:style-name="Source_20_Text"><text:span text:style-name="T4">],</text:span></text:span></text:p>
      <text:p text:style-name="P18"><text:span text:style-name="Source_20_Text"><text:span text:style-name="T4">})</text:span></text:span></text:p>
      <text:p text:style-name="P18"><text:span text:style-name="Source_20_Text"><text:span text:style-name="T9">export</text:span></text:span><text:span text:style-name="Source_20_Text"><text:span text:style-name="T4"> </text:span></text:span><text:span text:style-name="Source_20_Text"><text:span text:style-name="T9">class</text:span></text:span><text:span text:style-name="Source_20_Text"><text:span text:style-name="T4"> </text:span></text:span><text:span text:style-name="Source_20_Text"><text:span text:style-name="T6">SpinnerComponent</text:span></text:span><text:span text:style-name="Source_20_Text"><text:span text:style-name="T4"> {</text:span></text:span></text:p>
      <text:p text:style-name="P18"/>
      <text:p text:style-name="P18"><text:span text:style-name="Source_20_Text"><text:span text:style-name="T3"><text:s text:c="4"/></text:span></text:span><text:span text:style-name="Source_20_Text"><text:span text:style-name="T6">constructor</text:span></text:span><text:span text:style-name="Source_20_Text"><text:span text:style-name="T4">(</text:span></text:span><text:span text:style-name="Source_20_Text"><text:span text:style-name="T9">private</text:span></text:span><text:span text:style-name="Source_20_Text"><text:span text:style-name="T4"> spinnerService: SpinnerService) { }</text:span></text:span></text:p>
      <text:p text:style-name="P18"><text:span text:style-name="Source_20_Text"><text:span text:style-name="T3"><text:s text:c="4"/></text:span></text:span><text:span text:style-name="Source_20_Text"><text:span text:style-name="T4">isLoading$ = </text:span></text:span><text:span text:style-name="Source_20_Text"><text:span text:style-name="T9">this</text:span></text:span><text:span text:style-name="Source_20_Text"><text:span text:style-name="T4">.spinnerService.isLoading;</text:span></text:span></text:p>
      <text:p text:style-name="P18"/>
      <text:p text:style-name="P18"><text:span text:style-name="Source_20_Text"><text:span text:style-name="T3"><text:s text:c="4"/></text:span></text:span><text:span text:style-name="Source_20_Text"><text:span text:style-name="T4">isLoading$: Observable&lt;</text:span></text:span><text:span text:style-name="Source_20_Text"><text:span text:style-name="T9">boolean</text:span></text:span><text:span text:style-name="Source_20_Text"><text:span text:style-name="T4">&gt;;</text:span></text:span></text:p>
      <text:p text:style-name="P18"><text:soft-page-break/><text:span text:style-name="Source_20_Text"><text:span text:style-name="T3"><text:s text:c="4"/></text:span></text:span><text:span text:style-name="Source_20_Text"><text:span text:style-name="T6">constructor</text:span></text:span><text:span text:style-name="Source_20_Text"><text:span text:style-name="T4">(</text:span></text:span><text:span text:style-name="Source_20_Text"><text:span text:style-name="T9">private</text:span></text:span><text:span text:style-name="Source_20_Text"><text:span text:style-name="T4"> spinnerService: SpinnerService) {</text:span></text:span></text:p>
      <text:p text:style-name="P18"><text:span text:style-name="Source_20_Text"><text:span text:style-name="T3"><text:s text:c="8"/></text:span></text:span><text:span text:style-name="Source_20_Text"><text:span text:style-name="T9">this</text:span></text:span><text:span text:style-name="Source_20_Text"><text:span text:style-name="T4">.isLoading$ = </text:span></text:span><text:span text:style-name="Source_20_Text"><text:span text:style-name="T9">this</text:span></text:span><text:span text:style-name="Source_20_Text"><text:span text:style-name="T4">.spinnerService.isLoading;</text:span></text:span></text:p>
      <text:p text:style-name="P18"><text:span text:style-name="Source_20_Text"><text:span text:style-name="T3"><text:s text:c="4"/></text:span></text:span><text:span text:style-name="Source_20_Text"><text:span text:style-name="T4">}</text:span></text:span></text:p>
      <text:p text:style-name="P18"><text:span text:style-name="Source_20_Text"><text:span text:style-name="T4">}</text:span></text:span></text:p>
      <text:p text:style-name="P18"/>
      <text:h text:style-name="P16" text:outline-level="3"><text:span text:style-name="T2">3. Make </text:span><text:span text:style-name="Source_20_Text"><text:span text:style-name="T5">AppComponent</text:span></text:span><text:span text:style-name="T2"> Standalone</text:span></text:h>
      <text:p text:style-name="P21"><text:span text:style-name="T2">Your </text:span><text:span text:style-name="Source_20_Text"><text:span text:style-name="T5">AppComponent</text:span></text:span><text:span text:style-name="T2"> is using an </text:span><text:span text:style-name="Source_20_Text"><text:span text:style-name="T5">imports</text:span></text:span><text:span text:style-name="T2"> array, which means it must be a standalone component. Let's add </text:span><text:span text:style-name="Source_20_Text"><text:span text:style-name="T5">standalone: true</text:span></text:span><text:span text:style-name="T2"> and clean up the imports.</text:span></text:p>
      <text:p text:style-name="P11">app.component.ts</text:p>
      <text:p text:style-name="P6"><text:span text:style-name="T14">-8</text:span><text:span text:style-name="T15">+3</text:span></text:p>
      <text:p text:style-name="P18"><text:span text:style-name="Source_20_Text"><text:span text:style-name="T9">import</text:span></text:span><text:span text:style-name="Source_20_Text"><text:span text:style-name="T4"> { Component, inject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MatDialog } </text:span></text:span><text:span text:style-name="Source_20_Text"><text:span text:style-name="T9">from</text:span></text:span><text:span text:style-name="Source_20_Text"><text:span text:style-name="T4"> </text:span></text:span><text:span text:style-name="Source_20_Text"><text:span text:style-name="T6">'@angular/material/dialog'</text:span></text:span><text:span text:style-name="Source_20_Text"><text:span text:style-name="T4">;</text:span></text:span></text:p>
      <text:p text:style-name="P18"><text:span text:style-name="Source_20_Text"><text:span text:style-name="T9">import</text:span></text:span><text:span text:style-name="Source_20_Text"><text:span text:style-name="T4"> { RouterModule } </text:span></text:span><text:span text:style-name="Source_20_Text"><text:span text:style-name="T9">from</text:span></text:span><text:span text:style-name="Source_20_Text"><text:span text:style-name="T4"> </text:span></text:span><text:span text:style-name="Source_20_Text"><text:span text:style-name="T6">'@angular/router'</text:span></text:span><text:span text:style-name="Source_20_Text"><text:span text:style-name="T4">;</text:span></text:span></text:p>
      <text:p text:style-name="P18"><text:span text:style-name="Source_20_Text"><text:span text:style-name="T9">import</text:span></text:span><text:span text:style-name="Source_20_Text"><text:span text:style-name="T4"> { TranslateModule, TranslateService } </text:span></text:span><text:span text:style-name="Source_20_Text"><text:span text:style-name="T9">from</text:span></text:span><text:span text:style-name="Source_20_Text"><text:span text:style-name="T4"> </text:span></text:span><text:span text:style-name="Source_20_Text"><text:span text:style-name="T6">"@ngx-translate/core"</text:span></text:span><text:span text:style-name="Source_20_Text"><text:span text:style-name="T4">;</text:span></text:span></text:p>
      <text:p text:style-name="P18"><text:span text:style-name="Source_20_Text"><text:span text:style-name="T9">import</text:span></text:span><text:span text:style-name="Source_20_Text"><text:span text:style-name="T4"> {</text:span></text:span></text:p>
      <text:p text:style-name="P18"><text:span text:style-name="Source_20_Text"><text:span text:style-name="T3"><text:s text:c="2"/></text:span></text:span><text:span text:style-name="Source_20_Text"><text:span text:style-name="T4">TranslatePipe,</text:span></text:span></text:p>
      <text:p text:style-name="P18"><text:span text:style-name="Source_20_Text"><text:span text:style-name="T3"><text:s text:c="2"/></text:span></text:span><text:span text:style-name="Source_20_Text"><text:span text:style-name="T4">TranslateDirective</text:span></text:span></text:p>
      <text:p text:style-name="P18"><text:span text:style-name="Source_20_Text"><text:span text:style-name="T4">} </text:span></text:span><text:span text:style-name="Source_20_Text"><text:span text:style-name="T9">from</text:span></text:span><text:span text:style-name="Source_20_Text"><text:span text:style-name="T4"> </text:span></text:span><text:span text:style-name="Source_20_Text"><text:span text:style-name="T6">"@ngx-translate/core"</text:span></text:span><text:span text:style-name="Source_20_Text"><text:span text:style-name="T4">;</text:span></text:span></text:p>
      <text:p text:style-name="P18"><text:span text:style-name="Source_20_Text"><text:span text:style-name="T9">import</text:span></text:span><text:span text:style-name="Source_20_Text"><text:span text:style-name="T4"> { BrowserModule } </text:span></text:span><text:span text:style-name="Source_20_Text"><text:span text:style-name="T9">from</text:span></text:span><text:span text:style-name="Source_20_Text"><text:span text:style-name="T4"> </text:span></text:span><text:span text:style-name="Source_20_Text"><text:span text:style-name="T6">'@angular/platform-browser'</text:span></text:span><text:span text:style-name="Source_20_Text"><text:span text:style-name="T4">;</text:span></text:span></text:p>
      <text:p text:style-name="P18"><text:span text:style-name="Source_20_Text"><text:span text:style-name="T9">import</text:span></text:span><text:span text:style-name="Source_20_Text"><text:span text:style-name="T4"> { RouterOutlet } </text:span></text:span><text:span text:style-name="Source_20_Text"><text:span text:style-name="T9">from</text:span></text:span><text:span text:style-name="Source_20_Text"><text:span text:style-name="T4"> </text:span></text:span><text:span text:style-name="Source_20_Text"><text:span text:style-name="T6">'@angular/router'</text:span></text:span><text:span text:style-name="Source_20_Text"><text:span text:style-name="T4">;</text:span></text:span></text:p>
      <text:p text:style-name="P18"><text:span text:style-name="Source_20_Text"><text:span text:style-name="T9">import</text:span></text:span><text:span text:style-name="Source_20_Text"><text:span text:style-name="T4"> { TranslateService } </text:span></text:span><text:span text:style-name="Source_20_Text"><text:span text:style-name="T9">from</text:span></text:span><text:span text:style-name="Source_20_Text"><text:span text:style-name="T4"> </text:span></text:span><text:span text:style-name="Source_20_Text"><text:span text:style-name="T6">"@ngx-translate/core"</text:span></text:span><text:span text:style-name="Source_20_Text"><text:span text:style-name="T4">;</text:span></text:span></text:p>
      <text:p text:style-name="P18"><text:span text:style-name="Source_20_Text"><text:span text:style-name="T9">import</text:span></text:span><text:span text:style-name="Source_20_Text"><text:span text:style-name="T4"> { SpinnerComponent } </text:span></text:span><text:span text:style-name="Source_20_Text"><text:span text:style-name="T9">from</text:span></text:span><text:span text:style-name="Source_20_Text"><text:span text:style-name="T4"> </text:span></text:span><text:span text:style-name="Source_20_Text"><text:span text:style-name="T6">'./shared/spinner/spinner.component'</text:span></text:span><text:span text:style-name="Source_20_Text"><text:span text:style-name="T4">; </text:span></text:span><text:span text:style-name="Source_20_Text"><text:span text:style-name="T11">// Adjust path if needed</text:span></text:span></text:p>
      <text:p text:style-name="P18"/>
      <text:p text:style-name="P18"><text:span text:style-name="Source_20_Text"><text:span text:style-name="T13">@Component</text:span></text:span><text:span text:style-name="Source_20_Text"><text:span text:style-name="T4">({</text:span></text:span></text:p>
      <text:p text:style-name="P18"><text:span text:style-name="Source_20_Text"><text:span text:style-name="T3"><text:s text:c="2"/></text:span></text:span><text:span text:style-name="Source_20_Text"><text:span text:style-name="T10">selector</text:span></text:span><text:span text:style-name="Source_20_Text"><text:span text:style-name="T4">: </text:span></text:span><text:span text:style-name="Source_20_Text"><text:span text:style-name="T6">'app-root'</text:span></text:span><text:span text:style-name="Source_20_Text"><text:span text:style-name="T4">,</text:span></text:span></text:p>
      <text:p text:style-name="P18"><text:span text:style-name="Source_20_Text"><text:span text:style-name="T3"><text:s text:c="2"/></text:span></text:span><text:span text:style-name="Source_20_Text"><text:span text:style-name="T10">imports</text:span></text:span><text:span text:style-name="Source_20_Text"><text:span text:style-name="T4">: [RouterModule, TranslateModule, SpinnerComponent],</text:span></text:span></text:p>
      <text:p text:style-name="P18"><text:span text:style-name="Source_20_Text"><text:span text:style-name="T3"><text:s text:c="2"/></text:span></text:span><text:span text:style-name="Source_20_Text"><text:span text:style-name="T10">standalone</text:span></text:span><text:span text:style-name="Source_20_Text"><text:span text:style-name="T4">: </text:span></text:span><text:span text:style-name="Source_20_Text"><text:span text:style-name="T6">true</text:span></text:span><text:span text:style-name="Source_20_Text"><text:span text:style-name="T4">,</text:span></text:span></text:p>
      <text:p text:style-name="P18"><text:span text:style-name="Source_20_Text"><text:span text:style-name="T3"><text:s text:c="2"/></text:span></text:span><text:span text:style-name="Source_20_Text"><text:span text:style-name="T10">imports</text:span></text:span><text:span text:style-name="Source_20_Text"><text:span text:style-name="T4">: [RouterModule, SpinnerComponent],</text:span></text:span></text:p>
      <text:p text:style-name="P18"><text:span text:style-name="Source_20_Text"><text:span text:style-name="T3"><text:s text:c="2"/></text:span></text:span><text:span text:style-name="Source_20_Text"><text:span text:style-name="T10">templateUrl</text:span></text:span><text:span text:style-name="Source_20_Text"><text:span text:style-name="T4">: </text:span></text:span><text:span text:style-name="Source_20_Text"><text:span text:style-name="T6">'./app.component.html'</text:span></text:span><text:span text:style-name="Source_20_Text"><text:span text:style-name="T4">,</text:span></text:span></text:p>
      <text:p text:style-name="P18"><text:span text:style-name="Source_20_Text"><text:span text:style-name="T3"><text:s text:c="2"/></text:span></text:span><text:span text:style-name="Source_20_Text"><text:span text:style-name="T10">styleUrls</text:span></text:span><text:span text:style-name="Source_20_Text"><text:span text:style-name="T4">: [</text:span></text:span><text:span text:style-name="Source_20_Text"><text:span text:style-name="T6">'./app.component.scss'</text:span></text:span><text:span text:style-name="Source_20_Text"><text:span text:style-name="T4">]</text:span></text:span></text:p>
      <text:p text:style-name="P18"><text:span text:style-name="Source_20_Text"><text:span text:style-name="T4">})</text:span></text:span></text:p>
      <text:p text:style-name="P18"/>
      <text:h text:style-name="P3" text:outline-level="3">4. Clean Up Application Configuration</text:h>
      <text:p text:style-name="P21"><text:span text:style-name="T2">Your </text:span><text:a xlink:type="simple" xlink:href="code-assist-path:/home/vj/Desktop/A/__myapp/datatables3/datatables/myapp-client/src/app/app.config.ts" text:style-name="Internet_20_link" text:visited-style-name="Visited_20_Internet_20_Link"><text:span text:style-name="Source_20_Text"><text:span text:style-name="T7">app.config.ts</text:span></text:span></text:a><text:span text:style-name="T2"> has a duplicate </text:span><text:span text:style-name="Source_20_Text"><text:span text:style-name="T5">provideHttpClient()</text:span></text:span><text:span text:style-name="T2"> call. Let's remove it.</text:span></text:p>
      <text:p text:style-name="P11">app.config.ts</text:p>
      <text:p text:style-name="P6"><text:span text:style-name="T14">-3</text:span><text:span text:style-name="T15">+1</text:span></text:p>
      <text:p text:style-name="P18"><text:span text:style-name="Source_20_Text"><text:span text:style-name="T9">export</text:span></text:span><text:span text:style-name="Source_20_Text"><text:span text:style-name="T4"> </text:span></text:span><text:span text:style-name="Source_20_Text"><text:span text:style-name="T9">const</text:span></text:span><text:span text:style-name="Source_20_Text"><text:span text:style-name="T4"> appConfig: ApplicationConfig = {</text:span></text:span></text:p>
      <text:p text:style-name="P18"><text:span text:style-name="Source_20_Text"><text:span text:style-name="T3"><text:s text:c="2"/></text:span></text:span><text:span text:style-name="Source_20_Text"><text:span text:style-name="T10">providers</text:span></text:span><text:span text:style-name="Source_20_Text"><text:span text:style-name="T4">: [</text:span></text:span></text:p>
      <text:p text:style-name="P18"><text:soft-page-break/><text:span text:style-name="Source_20_Text"><text:span text:style-name="T3"><text:s text:c="4"/></text:span></text:span><text:span text:style-name="Source_20_Text"><text:span text:style-name="T4">provideRouter(routes),</text:span></text:span></text:p>
      <text:p text:style-name="P18"><text:span text:style-name="Source_20_Text"><text:span text:style-name="T3"><text:s text:c="4"/></text:span></text:span><text:span text:style-name="Source_20_Text"><text:span text:style-name="T4">provideHttpClient(), </text:span></text:span><text:span text:style-name="Source_20_Text"><text:span text:style-name="T11">// or importProvidersFrom(HttpClientModule)</text:span></text:span></text:p>
      <text:p text:style-name="P18"/>
      <text:p text:style-name="P18"><text:span text:style-name="Source_20_Text"><text:span text:style-name="T3"><text:s text:c="4"/></text:span></text:span><text:span text:style-name="Source_20_Text"><text:span text:style-name="T4">provideHttpClient(),</text:span></text:span></text:p>
      <text:p text:style-name="P18"><text:span text:style-name="Source_20_Text"><text:span text:style-name="T3"><text:s text:c="4"/></text:span></text:span><text:span text:style-name="Source_20_Text"><text:span text:style-name="T4">provideHttpClient(), </text:span></text:span><text:span text:style-name="Source_20_Text"><text:span text:style-name="T11">// or importProvidersFrom(HttpClientModule) is also an option</text:span></text:span></text:p>
      <text:p text:style-name="P18"><text:span text:style-name="Source_20_Text"><text:span text:style-name="T3"><text:s text:c="4"/></text:span></text:span><text:span text:style-name="Source_20_Text"><text:span text:style-name="T4">provideTranslateService({</text:span></text:span></text:p>
      <text:p text:style-name="P18"><text:span text:style-name="Source_20_Text"><text:span text:style-name="T3"><text:s text:c="6"/></text:span></text:span><text:span text:style-name="Source_20_Text"><text:span text:style-name="T10">loader</text:span></text:span><text:span text:style-name="Source_20_Text"><text:span text:style-name="T4">: provideTranslateHttpLoader({</text:span></text:span></text:p>
      <text:p text:style-name="P18"><text:span text:style-name="Source_20_Text"><text:span text:style-name="T3"><text:s text:c="8"/></text:span></text:span><text:span text:style-name="Source_20_Text"><text:span text:style-name="T10">prefix</text:span></text:span><text:span text:style-name="Source_20_Text"><text:span text:style-name="T4">: </text:span></text:span><text:span text:style-name="Source_20_Text"><text:span text:style-name="T6">'/i18n/'</text:span></text:span><text:span text:style-name="Source_20_Text"><text:span text:style-name="T4">,</text:span></text:span></text:p>
      <text:p text:style-name="P18"/>
      <text:h text:style-name="P16" text:outline-level="3"><text:span text:style-name="T2">5. Refactor </text:span><text:span text:style-name="Source_20_Text"><text:span text:style-name="T5">DataTables3Component</text:span></text:span><text:span text:style-name="T2"> to Use the Global Spinner</text:span></text:h>
      <text:p text:style-name="P21"><text:span text:style-name="T2">To complete the setup, </text:span><text:span text:style-name="Source_20_Text"><text:span text:style-name="T5">DataTables3Component</text:span></text:span><text:span text:style-name="T2"> should also be a standalone component and use the global spinner. This involves removing its local </text:span><text:span text:style-name="Source_20_Text"><text:span text:style-name="T5">loading</text:span></text:span><text:span text:style-name="T2"> signal and the related HTML.</text:span></text:p>
      <text:p text:style-name="P11">data-tables3.component.html</text:p>
      <text:p text:style-name="P6"><text:span text:style-name="T14">-10</text:span><text:span text:style-name="T15">+0</text:span></text:p>
      <text:p text:style-name="P18"><text:span text:style-name="Source_20_Text"><text:span text:style-name="T11">&lt;!-- Spinner container, shown when loading() is true --&gt;</text:span></text:span></text:p>
      <text:p text:style-name="P18"><text:span text:style-name="Source_20_Text"><text:span text:style-name="T4">@if (loading()) {</text:span></text:span></text:p>
      <text:p text:style-name="P18"><text:span text:style-name="Source_20_Text"><text:span text:style-name="T9">&lt;mat-spinner&gt;&lt;/mat-spinner&gt;</text:span></text:span></text:p>
      <text:p text:style-name="P18"><text:span text:style-name="Source_20_Text"><text:span text:style-name="T9">&lt;div </text:span></text:span><text:span text:style-name="Source_20_Text"><text:span text:style-name="T10">class</text:span></text:span><text:span text:style-name="Source_20_Text"><text:span text:style-name="T9">=</text:span></text:span><text:span text:style-name="Source_20_Text"><text:span text:style-name="T6">"spinner-overlay"</text:span></text:span><text:span text:style-name="Source_20_Text"><text:span text:style-name="T9">&gt;</text:span></text:span></text:p>
      <text:p text:style-name="P18"><text:span text:style-name="Source_20_Text"><text:span text:style-name="T3"><text:s text:c="4"/></text:span></text:span><text:span text:style-name="Source_20_Text"><text:span text:style-name="T9">&lt;mat-progress-spinner </text:span></text:span><text:span text:style-name="Source_20_Text"><text:span text:style-name="T10">color</text:span></text:span><text:span text:style-name="Source_20_Text"><text:span text:style-name="T9">=</text:span></text:span><text:span text:style-name="Source_20_Text"><text:span text:style-name="T6">"primary"</text:span></text:span><text:span text:style-name="Source_20_Text"><text:span text:style-name="T9"> </text:span></text:span><text:span text:style-name="Source_20_Text"><text:span text:style-name="T10">mode</text:span></text:span><text:span text:style-name="Source_20_Text"><text:span text:style-name="T9">=</text:span></text:span><text:span text:style-name="Source_20_Text"><text:span text:style-name="T6">"indeterminate"</text:span></text:span><text:span text:style-name="Source_20_Text"><text:span text:style-name="T9">&gt;</text:span></text:span></text:p>
      <text:p text:style-name="P18"><text:span text:style-name="Source_20_Text"><text:span text:style-name="T3"><text:s text:c="4"/></text:span></text:span><text:span text:style-name="Source_20_Text"><text:span text:style-name="T9">&lt;/mat-progress-spinner&gt;</text:span></text:span></text:p>
      <text:p text:style-name="P18"><text:span text:style-name="Source_20_Text"><text:span text:style-name="T9">&lt;/div&gt;</text:span></text:span><text:span text:style-name="Source_20_Text"><text:span text:style-name="T4">}</text:span></text:span></text:p>
      <text:p text:style-name="P18"/>
      <text:p text:style-name="P18"><text:span text:style-name="Source_20_Text"><text:span text:style-name="T11">&lt;!-- Table container, shown when loading() is false </text:span></text:span></text:p>
      <text:p text:style-name="P18"><text:span text:style-name="Source_20_Text"><text:span text:style-name="T11">@if (!loading()) {--&gt;</text:span></text:span></text:p>
      <text:p text:style-name="P18"><text:span text:style-name="Source_20_Text"><text:span text:style-name="T9">&lt;table </text:span></text:span><text:span text:style-name="Source_20_Text"><text:span text:style-name="T10">id</text:span></text:span><text:span text:style-name="Source_20_Text"><text:span text:style-name="T9">=</text:span></text:span><text:span text:style-name="Source_20_Text"><text:span text:style-name="T6">"jsonTable3"</text:span></text:span><text:span text:style-name="Source_20_Text"><text:span text:style-name="T9"> </text:span></text:span><text:span text:style-name="Source_20_Text"><text:span text:style-name="T10">datatable</text:span></text:span><text:span text:style-name="Source_20_Text"><text:span text:style-name="T9"> </text:span></text:span><text:span text:style-name="Source_20_Text"><text:span text:style-name="T10">class</text:span></text:span><text:span text:style-name="Source_20_Text"><text:span text:style-name="T9">=</text:span></text:span><text:span text:style-name="Source_20_Text"><text:span text:style-name="T6">"display table table-striped table-hover table-bordered"</text:span></text:span><text:span text:style-name="Source_20_Text"><text:span text:style-name="T9">&gt;</text:span></text:span></text:p>
      <text:p text:style-name="P18"><text:span text:style-name="Source_20_Text"><text:span text:style-name="T3"><text:s text:c="4"/></text:span></text:span><text:span text:style-name="Source_20_Text"><text:span text:style-name="T11">&lt;!-- The table header and body will be generated by DataTables based on dtOptions --&gt;</text:span></text:span></text:p>
      <text:p text:style-name="P18"><text:span text:style-name="Source_20_Text"><text:span text:style-name="T9">&lt;/table&gt;</text:span></text:span></text:p>
      <text:p text:style-name="P18"/>
      <text:p text:style-name="P11">data-tables3.component.ts</text:p>
      <text:p text:style-name="P6"><text:span text:style-name="T14">-24</text:span><text:span text:style-name="T15">+3</text:span></text:p>
      <text:p text:style-name="P18"><text:span text:style-name="Source_20_Text"><text:span text:style-name="T9">import</text:span></text:span><text:span text:style-name="Source_20_Text"><text:span text:style-name="T4"> { Component, OnInit, WritableSignal, signal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Component, OnInit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MatDialog, MatDialogRef } </text:span></text:span><text:span text:style-name="Source_20_Text"><text:span text:style-name="T9">from</text:span></text:span><text:span text:style-name="Source_20_Text"><text:span text:style-name="T4"> </text:span></text:span><text:span text:style-name="Source_20_Text"><text:span text:style-name="T6">'@angular/material/dialog'</text:span></text:span><text:span text:style-name="Source_20_Text"><text:span text:style-name="T4">;</text:span></text:span></text:p>
      <text:p text:style-name="P18"><text:span text:style-name="Source_20_Text"><text:span text:style-name="T9">import</text:span></text:span><text:span text:style-name="Source_20_Text"><text:span text:style-name="T4"> { Config } </text:span></text:span><text:span text:style-name="Source_20_Text"><text:span text:style-name="T9">from</text:span></text:span><text:span text:style-name="Source_20_Text"><text:span text:style-name="T4"> </text:span></text:span><text:span text:style-name="Source_20_Text"><text:span text:style-name="T6">'datatables.net'</text:span></text:span><text:span text:style-name="Source_20_Text"><text:span text:style-name="T4">;</text:span></text:span></text:p>
      <text:p text:style-name="P18"><text:span text:style-name="Source_20_Text"><text:span text:style-name="T9">import</text:span></text:span><text:span text:style-name="Source_20_Text"><text:span text:style-name="T4"> </text:span></text:span><text:span text:style-name="Source_20_Text"><text:span text:style-name="T6">'datatables.net-buttons-dt'</text:span></text:span><text:span text:style-name="Source_20_Text"><text:span text:style-name="T4">;</text:span></text:span></text:p>
      <text:p text:style-name="P18"><text:span text:style-name="Source_20_Text"><text:span text:style-name="T9">import</text:span></text:span><text:span text:style-name="Source_20_Text"><text:span text:style-name="T4"> </text:span></text:span><text:span text:style-name="Source_20_Text"><text:span text:style-name="T6">'datatables.net-select-dt'</text:span></text:span><text:span text:style-name="Source_20_Text"><text:span text:style-name="T4">;</text:span></text:span></text:p>
      <text:p text:style-name="P18"><text:span text:style-name="Source_20_Text"><text:span text:style-name="T9">import</text:span></text:span><text:span text:style-name="Source_20_Text"><text:span text:style-name="T4"> DataTable </text:span></text:span><text:span text:style-name="Source_20_Text"><text:span text:style-name="T9">from</text:span></text:span><text:span text:style-name="Source_20_Text"><text:span text:style-name="T4"> </text:span></text:span><text:span text:style-name="Source_20_Text"><text:span text:style-name="T6">'datatables.net-dt'</text:span></text:span><text:span text:style-name="Source_20_Text"><text:span text:style-name="T4">;</text:span></text:span></text:p>
      <text:p text:style-name="P18"><text:span text:style-name="Source_20_Text"><text:span text:style-name="T9">import</text:span></text:span><text:span text:style-name="Source_20_Text"><text:span text:style-name="T4"> { MatProgressSpinnerModule } </text:span></text:span><text:span text:style-name="Source_20_Text"><text:span text:style-name="T9">from</text:span></text:span><text:span text:style-name="Source_20_Text"><text:span text:style-name="T4"> </text:span></text:span><text:span text:style-name="Source_20_Text"><text:span text:style-name="T6">'@angular/material/progress-spinner'</text:span></text:span><text:span text:style-name="Source_20_Text"><text:span text:style-name="T4">;</text:span></text:span></text:p>
      <text:p text:style-name="P18"><text:soft-page-break/><text:span text:style-name="Source_20_Text"><text:span text:style-name="T9">import</text:span></text:span><text:span text:style-name="Source_20_Text"><text:span text:style-name="T4"> { AddEmployeeComponent } </text:span></text:span><text:span text:style-name="Source_20_Text"><text:span text:style-name="T9">from</text:span></text:span><text:span text:style-name="Source_20_Text"><text:span text:style-name="T4"> </text:span></text:span><text:span text:style-name="Source_20_Text"><text:span text:style-name="T6">'../add-employee/add-employee.component'</text:span></text:span><text:span text:style-name="Source_20_Text"><text:span text:style-name="T4">;</text:span></text:span></text:p>
      <text:p text:style-name="P18"><text:span text:style-name="Source_20_Text"><text:span text:style-name="T9">import</text:span></text:span><text:span text:style-name="Source_20_Text"><text:span text:style-name="T4"> { EmployeeService } </text:span></text:span><text:span text:style-name="Source_20_Text"><text:span text:style-name="T9">from</text:span></text:span><text:span text:style-name="Source_20_Text"><text:span text:style-name="T4"> </text:span></text:span><text:span text:style-name="Source_20_Text"><text:span text:style-name="T6">'../service/EmployeeService'</text:span></text:span><text:span text:style-name="Source_20_Text"><text:span text:style-name="T4">;</text:span></text:span></text:p>
      <text:p text:style-name="P18"><text:span text:style-name="Source_20_Text"><text:span text:style-name="T9">import</text:span></text:span><text:span text:style-name="Source_20_Text"><text:span text:style-name="T4"> { Employee } </text:span></text:span><text:span text:style-name="Source_20_Text"><text:span text:style-name="T9">from</text:span></text:span><text:span text:style-name="Source_20_Text"><text:span text:style-name="T4"> </text:span></text:span><text:span text:style-name="Source_20_Text"><text:span text:style-name="T6">'../shared/model/Employee'</text:span></text:span><text:span text:style-name="Source_20_Text"><text:span text:style-name="T4">;</text:span></text:span></text:p>
      <text:p text:style-name="P18"><text:span text:style-name="Source_20_Text"><text:span text:style-name="T9">import</text:span></text:span><text:span text:style-name="Source_20_Text"><text:span text:style-name="T4"> { DatePipe } </text:span></text:span><text:span text:style-name="Source_20_Text"><text:span text:style-name="T9">from</text:span></text:span><text:span text:style-name="Source_20_Text"><text:span text:style-name="T4"> </text:span></text:span><text:span text:style-name="Source_20_Text"><text:span text:style-name="T6">'@angular/common'</text:span></text:span><text:span text:style-name="Source_20_Text"><text:span text:style-name="T4">;</text:span></text:span></text:p>
      <text:p text:style-name="P18"><text:span text:style-name="Source_20_Text"><text:span text:style-name="T9">import</text:span></text:span><text:span text:style-name="Source_20_Text"><text:span text:style-name="T4"> { ConfirmationDialogComponent, ConfirmationDialogData } </text:span></text:span><text:span text:style-name="Source_20_Text"><text:span text:style-name="T9">from</text:span></text:span><text:span text:style-name="Source_20_Text"><text:span text:style-name="T4"> </text:span></text:span><text:span text:style-name="Source_20_Text"><text:span text:style-name="T6">'../shared/confirmation-dialog/confirmation-dialog.component'</text:span></text:span><text:span text:style-name="Source_20_Text"><text:span text:style-name="T4">;</text:span></text:span></text:p>
      <text:p text:style-name="P18"><text:span text:style-name="Source_20_Text"><text:span text:style-name="T9">import</text:span></text:span><text:span text:style-name="Source_20_Text"><text:span text:style-name="T4"> { ErrorDialogComponent, ErrorDialogData } </text:span></text:span><text:span text:style-name="Source_20_Text"><text:span text:style-name="T9">from</text:span></text:span><text:span text:style-name="Source_20_Text"><text:span text:style-name="T4"> </text:span></text:span><text:span text:style-name="Source_20_Text"><text:span text:style-name="T6">'../shared/error-dialog/error-dialog.component'</text:span></text:span><text:span text:style-name="Source_20_Text"><text:span text:style-name="T4">;</text:span></text:span></text:p>
      <text:p text:style-name="P18"><text:span text:style-name="Source_20_Text"><text:span text:style-name="T9">import</text:span></text:span><text:span text:style-name="Source_20_Text"><text:span text:style-name="T4"> { TranslateModule, TranslateService } </text:span></text:span><text:span text:style-name="Source_20_Text"><text:span text:style-name="T9">from</text:span></text:span><text:span text:style-name="Source_20_Text"><text:span text:style-name="T4"> </text:span></text:span><text:span text:style-name="Source_20_Text"><text:span text:style-name="T6">'@ngx-translate/core'</text:span></text:span><text:span text:style-name="Source_20_Text"><text:span text:style-name="T4">;</text:span></text:span></text:p>
      <text:p text:style-name="P18"><text:span text:style-name="Source_20_Text"><text:span text:style-name="T9">import</text:span></text:span><text:span text:style-name="Source_20_Text"><text:span text:style-name="T4"> { TranslatePipe } </text:span></text:span><text:span text:style-name="Source_20_Text"><text:span text:style-name="T9">from</text:span></text:span><text:span text:style-name="Source_20_Text"><text:span text:style-name="T4"> </text:span></text:span><text:span text:style-name="Source_20_Text"><text:span text:style-name="T6">'@ngx-translate/core'</text:span></text:span><text:span text:style-name="Source_20_Text"><text:span text:style-name="T4">;</text:span></text:span></text:p>
      <text:p text:style-name="P18"><text:span text:style-name="Source_20_Text"><text:span text:style-name="T9">import</text:span></text:span><text:span text:style-name="Source_20_Text"><text:span text:style-name="T4"> { TranslateService } </text:span></text:span><text:span text:style-name="Source_20_Text"><text:span text:style-name="T9">from</text:span></text:span><text:span text:style-name="Source_20_Text"><text:span text:style-name="T4"> </text:span></text:span><text:span text:style-name="Source_20_Text"><text:span text:style-name="T6">'@ngx-translate/core'</text:span></text:span><text:span text:style-name="Source_20_Text"><text:span text:style-name="T4">;</text:span></text:span></text:p>
      <text:p text:style-name="P18"><text:span text:style-name="Source_20_Text"><text:span text:style-name="T9">import</text:span></text:span><text:span text:style-name="Source_20_Text"><text:span text:style-name="T4"> { forkJoin, </text:span></text:span><text:span text:style-name="Source_20_Text"><text:span text:style-name="T9">of</text:span></text:span><text:span text:style-name="Source_20_Text"><text:span text:style-name="T4"> } </text:span></text:span><text:span text:style-name="Source_20_Text"><text:span text:style-name="T9">from</text:span></text:span><text:span text:style-name="Source_20_Text"><text:span text:style-name="T4"> </text:span></text:span><text:span text:style-name="Source_20_Text"><text:span text:style-name="T6">'rxjs'</text:span></text:span><text:span text:style-name="Source_20_Text"><text:span text:style-name="T4">;</text:span></text:span></text:p>
      <text:p text:style-name="P18"/>
      <text:p text:style-name="P18"/>
      <text:p text:style-name="P18"><text:span text:style-name="Source_20_Text"><text:span text:style-name="T13">@Component</text:span></text:span><text:span text:style-name="Source_20_Text"><text:span text:style-name="T4">({</text:span></text:span></text:p>
      <text:p text:style-name="P18"><text:span text:style-name="Source_20_Text"><text:span text:style-name="T3"><text:s text:c="2"/></text:span></text:span><text:span text:style-name="Source_20_Text"><text:span text:style-name="T10">selector</text:span></text:span><text:span text:style-name="Source_20_Text"><text:span text:style-name="T4">: </text:span></text:span><text:span text:style-name="Source_20_Text"><text:span text:style-name="T6">'app-data-tables3'</text:span></text:span><text:span text:style-name="Source_20_Text"><text:span text:style-name="T4">,</text:span></text:span></text:p>
      <text:p text:style-name="P18"><text:span text:style-name="Source_20_Text"><text:span text:style-name="T3"><text:s text:c="2"/></text:span></text:span><text:span text:style-name="Source_20_Text"><text:span text:style-name="T10">standalone</text:span></text:span><text:span text:style-name="Source_20_Text"><text:span text:style-name="T4">: </text:span></text:span><text:span text:style-name="Source_20_Text"><text:span text:style-name="T6">true</text:span></text:span><text:span text:style-name="Source_20_Text"><text:span text:style-name="T4">,</text:span></text:span></text:p>
      <text:p text:style-name="P18"><text:span text:style-name="Source_20_Text"><text:span text:style-name="T3"><text:s text:c="2"/></text:span></text:span><text:span text:style-name="Source_20_Text"><text:span text:style-name="T10">templateUrl</text:span></text:span><text:span text:style-name="Source_20_Text"><text:span text:style-name="T4">: </text:span></text:span><text:span text:style-name="Source_20_Text"><text:span text:style-name="T6">'./data-tables3.component.html'</text:span></text:span><text:span text:style-name="Source_20_Text"><text:span text:style-name="T4">,</text:span></text:span></text:p>
      <text:p text:style-name="P18"><text:span text:style-name="Source_20_Text"><text:span text:style-name="T3"><text:s text:c="2"/></text:span></text:span><text:span text:style-name="Source_20_Text"><text:span text:style-name="T10">imports</text:span></text:span><text:span text:style-name="Source_20_Text"><text:span text:style-name="T4">: [MatProgressSpinnerModule],</text:span></text:span></text:p>
      <text:p text:style-name="P18"><text:span text:style-name="Source_20_Text"><text:span text:style-name="T3"><text:s text:c="2"/></text:span></text:span><text:span text:style-name="Source_20_Text"><text:span text:style-name="T10">styleUrl</text:span></text:span><text:span text:style-name="Source_20_Text"><text:span text:style-name="T4">: </text:span></text:span><text:span text:style-name="Source_20_Text"><text:span text:style-name="T6">'./data-tables3.component.scss'</text:span></text:span></text:p>
      <text:p text:style-name="P18"><text:span text:style-name="Source_20_Text"><text:span text:style-name="T4">})</text:span></text:span></text:p>
      <text:p text:style-name="P18"><text:span text:style-name="Source_20_Text"><text:span text:style-name="T9">export</text:span></text:span><text:span text:style-name="Source_20_Text"><text:span text:style-name="T4"> </text:span></text:span><text:span text:style-name="Source_20_Text"><text:span text:style-name="T9">class</text:span></text:span><text:span text:style-name="Source_20_Text"><text:span text:style-name="T4"> </text:span></text:span><text:span text:style-name="Source_20_Text"><text:span text:style-name="T6">DataTables3Component</text:span></text:span><text:span text:style-name="Source_20_Text"><text:span text:style-name="T4"> </text:span></text:span><text:span text:style-name="Source_20_Text"><text:span text:style-name="T6">implements</text:span></text:span><text:span text:style-name="Source_20_Text"><text:span text:style-name="T4"> </text:span></text:span><text:span text:style-name="Source_20_Text"><text:span text:style-name="T6">OnInit</text:span></text:span><text:span text:style-name="Source_20_Text"><text:span text:style-name="T4"> {</text:span></text:span></text:p>
      <text:p text:style-name="P18"><text:span text:style-name="Source_20_Text"><text:span text:style-name="T3"><text:s text:c="2"/></text:span></text:span><text:span text:style-name="Source_20_Text"><text:span text:style-name="T9">private</text:span></text:span><text:span text:style-name="Source_20_Text"><text:span text:style-name="T4"> table!: </text:span></text:span><text:span text:style-name="Source_20_Text"><text:span text:style-name="T9">any</text:span></text:span><text:span text:style-name="Source_20_Text"><text:span text:style-name="T4">;</text:span></text:span></text:p>
      <text:p text:style-name="P18"><text:span text:style-name="Source_20_Text"><text:span text:style-name="T3"><text:s text:c="2"/></text:span></text:span><text:span text:style-name="Source_20_Text"><text:span text:style-name="T9">private</text:span></text:span><text:span text:style-name="Source_20_Text"><text:span text:style-name="T4"> employeeIdToEmployeeMap: </text:span></text:span><text:span text:style-name="Source_20_Text"><text:span text:style-name="T9">Map</text:span></text:span><text:span text:style-name="Source_20_Text"><text:span text:style-name="T4">&lt;</text:span></text:span><text:span text:style-name="Source_20_Text"><text:span text:style-name="T9">string</text:span></text:span><text:span text:style-name="Source_20_Text"><text:span text:style-name="T4">, Employee&gt; = </text:span></text:span><text:span text:style-name="Source_20_Text"><text:span text:style-name="T9">new</text:span></text:span><text:span text:style-name="Source_20_Text"><text:span text:style-name="T4"> </text:span></text:span><text:span text:style-name="Source_20_Text"><text:span text:style-name="T9">Map</text:span></text:span><text:span text:style-name="Source_20_Text"><text:span text:style-name="T4">();</text:span></text:span></text:p>
      <text:p text:style-name="P18"><text:span text:style-name="Source_20_Text"><text:span text:style-name="T3"><text:s text:c="2"/></text:span></text:span><text:span text:style-name="Source_20_Text"><text:span text:style-name="T9">public</text:span></text:span><text:span text:style-name="Source_20_Text"><text:span text:style-name="T4"> dtOptions: Config = {};</text:span></text:span></text:p>
      <text:p text:style-name="P18"><text:span text:style-name="Source_20_Text"><text:span text:style-name="T3"><text:s text:c="2"/></text:span></text:span><text:span text:style-name="Source_20_Text"><text:span text:style-name="T11">// Create a writable signal for the loading state, initialized to false.</text:span></text:span></text:p>
      <text:p text:style-name="P18"><text:span text:style-name="Source_20_Text"><text:span text:style-name="T3"><text:s text:c="2"/></text:span></text:span><text:span text:style-name="Source_20_Text"><text:span text:style-name="T4">loading: WritableSignal&lt;</text:span></text:span><text:span text:style-name="Source_20_Text"><text:span text:style-name="T9">boolean</text:span></text:span><text:span text:style-name="Source_20_Text"><text:span text:style-name="T4">&gt; = signal(</text:span></text:span><text:span text:style-name="Source_20_Text"><text:span text:style-name="T6">false</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6">constructor</text:span></text:span><text:span text:style-name="Source_20_Text"><text:span text:style-name="T4">(</text:span></text:span><text:span text:style-name="Source_20_Text"><text:span text:style-name="T9">private</text:span></text:span><text:span text:style-name="Source_20_Text"><text:span text:style-name="T4"> dialog: MatDialog, </text:span></text:span><text:span text:style-name="Source_20_Text"><text:span text:style-name="T9">private</text:span></text:span><text:span text:style-name="Source_20_Text"><text:span text:style-name="T4"> employeeService: EmployeeService, </text:span></text:span><text:span text:style-name="Source_20_Text"><text:span text:style-name="T9">private</text:span></text:span><text:span text:style-name="Source_20_Text"><text:span text:style-name="T4"> translate: TranslateService) { }</text:span></text:span></text:p>
      <text:p text:style-name="P18"><text:span text:style-name="Source_20_Text"><text:span text:style-name="T3"><text:s text:c="2"/></text:span></text:span><text:span text:style-name="Source_20_Text"><text:span text:style-name="T4">ngOnInit(): </text:span></text:span><text:span text:style-name="Source_20_Text"><text:span text:style-name="T9">void</text:span></text:span><text:span text:style-name="Source_20_Text"><text:span text:style-name="T4"> {</text:span></text:span></text:p>
      <text:p text:style-name="P18"/>
      <text:p text:style-name="P18"/>
      <text:p text:style-name="P18"><text:span text:style-name="Source_20_Text"><text:span text:style-name="T3"><text:s text:c="2"/></text:span></text:span><text:span text:style-name="Source_20_Text"><text:span text:style-name="T4">addEmployee(emp: Employee): </text:span></text:span><text:span text:style-name="Source_20_Text"><text:span text:style-name="T9">void</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
      <text:p text:style-name="P18"/>
      <text:p text:style-name="P18"/>
      <text:p text:style-name="P18"><text:soft-page-break/><text:span text:style-name="Source_20_Text"><text:span text:style-name="T3"><text:s text:c="4"/></text:span></text:span><text:span text:style-name="Source_20_Text"><text:span text:style-name="T9">this</text:span></text:span><text:span text:style-name="Source_20_Text"><text:span text:style-name="T4">.employeeService.createEmployee(emp).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res: Employee) =&gt; {</text:span></text:span></text:p>
      <text:p text:style-name="P18"><text:span text:style-name="Source_20_Text"><text:span text:style-name="T3"><text:s text:c="8"/></text:span></text:span><text:span text:style-name="Source_20_Text"><text:span text:style-name="T9">this</text:span></text:span><text:span text:style-name="Source_20_Text"><text:span text:style-name="T4">.employeeIdToEmployeeMap.set(res.id, res);</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add(res).draw();</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4">alert(</text:span></text:span><text:span text:style-name="Source_20_Text"><text:span text:style-name="T9">this</text:span></text:span><text:span text:style-name="Source_20_Text"><text:span text:style-name="T4">.translate.instant(</text:span></text:span><text:span text:style-name="Source_20_Text"><text:span text:style-name="T6">'failed-to-add-employee'</text:span></text:span><text:span text:style-name="Source_20_Text"><text:span text:style-name="T4">) + </text:span></text:span><text:span text:style-name="Source_20_Text"><text:span text:style-name="T6">': '</text:span></text:span><text:span text:style-name="Source_20_Text"><text:span text:style-name="T4"> + err.message);</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text:span text:style-name="Source_20_Text"><text:span text:style-name="T3"><text:s text:c="2"/></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4">editEmployee(emp: Employee): </text:span></text:span><text:span text:style-name="Source_20_Text"><text:span text:style-name="T9">void</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Service.updateEmployee(emp).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res: Employee) =&gt; {</text:span></text:span></text:p>
      <text:p text:style-name="P18"><text:span text:style-name="Source_20_Text"><text:span text:style-name="T3"><text:s text:c="8"/></text:span></text:span><text:span text:style-name="Source_20_Text"><text:span text:style-name="T9">const</text:span></text:span><text:span text:style-name="Source_20_Text"><text:span text:style-name="T4"> rowToUpdate = </text:span></text:span><text:span text:style-name="Source_20_Text"><text:span text:style-name="T9">this</text:span></text:span><text:span text:style-name="Source_20_Text"><text:span text:style-name="T4">.table.row(</text:span></text:span><text:span text:style-name="Source_20_Text"><text:span text:style-name="T6">'.selected'</text:span></text:span><text:span text:style-name="Source_20_Text"><text:span text:style-name="T4">);</text:span></text:span></text:p>
      <text:p text:style-name="P18"/>
      <text:p text:style-name="P18"><text:span text:style-name="Source_20_Text"><text:span text:style-name="T3"><text:s text:c="8"/></text:span></text:span><text:span text:style-name="Source_20_Text"><text:span text:style-name="T11">// Invalidate all rows to re-run render functions (e.g., for manager names) and redraw.</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s().invalidate().draw(</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const</text:span></text:span><text:span text:style-name="Source_20_Text"><text:span text:style-name="T4"> dialogRef = </text:span></text:span><text:span text:style-name="Source_20_Text"><text:span text:style-name="T9">this</text:span></text:span><text:span text:style-name="Source_20_Text"><text:span text:style-name="T4">.dialog.open(ErrorDialogComponent, {</text:span></text:span></text:p>
      <text:p text:style-name="P18"><text:span text:style-name="Source_20_Text"><text:span text:style-name="T3"><text:s text:c="10"/></text:span></text:span><text:span text:style-name="Source_20_Text"><text:span text:style-name="T10">data</text:span></text:span><text:span text:style-name="Source_20_Text"><text:span text:style-name="T4">: {</text:span></text:span></text:p>
      <text:p text:style-name="P18"><text:span text:style-name="Source_20_Text"><text:span text:style-name="T3"><text:s text:c="12"/></text:span></text:span><text:span text:style-name="Source_20_Text"><text:span text:style-name="T10">title</text:span></text:span><text:span text:style-name="Source_20_Text"><text:span text:style-name="T4">: </text:span></text:span><text:span text:style-name="Source_20_Text"><text:span text:style-name="T9">this</text:span></text:span><text:span text:style-name="Source_20_Text"><text:span text:style-name="T4">.translate.instant(</text:span></text:span><text:span text:style-name="Source_20_Text"><text:span text:style-name="T6">'cycle-detected'</text:span></text:span><text:span text:style-name="Source_20_Text"><text:span text:style-name="T4">),</text:span></text:span></text:p>
      <text:p text:style-name="P18"/>
      <text:p text:style-name="P18"/>
      <text:p text:style-name="P18"><text:span text:style-name="Source_20_Text"><text:span text:style-name="T3"><text:s text:c="2"/></text:span></text:span><text:span text:style-name="Source_20_Text"><text:span text:style-name="T6">deleteEmployee</text:span></text:span><text:span text:style-name="Source_20_Text"><text:span text:style-name="T4">(empId: </text:span></text:span><text:span text:style-name="Source_20_Text"><text:span text:style-name="T9">string</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Service.deleteEmployee(empId).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 =&gt; {</text:span></text:span></text:p>
      <text:p text:style-name="P18"><text:span text:style-name="Source_20_Text"><text:span text:style-name="T3"><text:s text:c="8"/></text:span></text:span><text:span text:style-name="Source_20_Text"><text:span text:style-name="T9">this</text:span></text:span><text:span text:style-name="Source_20_Text"><text:span text:style-name="T4">.employeeIdToEmployeeMap.delete(empId);</text:span></text:span></text:p>
      <text:p text:style-name="P18"><text:soft-page-break/><text:span text:style-name="Source_20_Text"><text:span text:style-name="T3"><text:s text:c="8"/></text:span></text:span><text:span text:style-name="Source_20_Text"><text:span text:style-name="T9">this</text:span></text:span><text:span text:style-name="Source_20_Text"><text:span text:style-name="T4">.table.row(</text:span></text:span><text:span text:style-name="Source_20_Text"><text:span text:style-name="T6">".selected"</text:span></text:span><text:span text:style-name="Source_20_Text"><text:span text:style-name="T4">).remove();</text:span></text:span></text:p>
      <text:p text:style-name="P18"><text:span text:style-name="Source_20_Text"><text:span text:style-name="T3"><text:s text:c="8"/></text:span></text:span><text:span text:style-name="Source_20_Text"><text:span text:style-name="T11">// Invalidate all rows to re-run render functions (e.g., for manager names)</text:span></text:span></text:p>
      <text:p text:style-name="P18"><text:span text:style-name="Source_20_Text"><text:span text:style-name="T3"><text:s text:c="8"/></text:span></text:span><text:span text:style-name="Source_20_Text"><text:span text:style-name="T11">// and redraw the table without changing pagination.</text:span></text:span></text:p>
      <text:p text:style-name="P18"><text:span text:style-name="Source_20_Text"><text:span text:style-name="T3"><text:s text:c="8"/></text:span></text:span><text:span text:style-name="Source_20_Text"><text:span text:style-name="T9">this</text:span></text:span><text:span text:style-name="Source_20_Text"><text:span text:style-name="T4">.table.rows().invalidate().draw(</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9">this</text:span></text:span><text:span text:style-name="Source_20_Text"><text:span text:style-name="T4">.translate.get([</text:span></text:span><text:span text:style-name="Source_20_Text"><text:span text:style-name="T6">'manager-cannot-be-deleted'</text:span></text:span><text:span text:style-name="Source_20_Text"><text:span text:style-name="T4">, </text:span></text:span><text:span text:style-name="Source_20_Text"><text:span text:style-name="T6">'employee-cannot-be-deleted-has-subordinates'</text:span></text:span><text:span text:style-name="Source_20_Text"><text:span text:style-name="T4">])</text:span></text:span></text:p>
      <text:p text:style-name="P18"><text:span text:style-name="Source_20_Text"><text:span text:style-name="T3"><text:s text:c="10"/></text:span></text:span><text:span text:style-name="Source_20_Text"><text:span text:style-name="T4">.subscribe(translations =&gt; {</text:span></text:span></text:p>
      <text:p text:style-name="P18"><text:span text:style-name="Source_20_Text"><text:span text:style-name="T3"><text:s text:c="12"/></text:span></text:span><text:span text:style-name="Source_20_Text"><text:span text:style-name="T9">this</text:span></text:span><text:span text:style-name="Source_20_Text"><text:span text:style-name="T4">.dialog.open(ErrorDialogComponent, {</text:span></text:span></text:p>
      <text:p text:style-name="P18"><text:span text:style-name="Source_20_Text"><text:span text:style-name="T3"><text:s text:c="2"/></text:span></text:span><text:span text:style-name="Source_20_Text"><text:span text:style-name="T4">}</text:span></text:span></text:p>
      <text:p text:style-name="P18"/>
      <text:p text:style-name="P18"><text:span text:style-name="Source_20_Text"><text:span text:style-name="T3"><text:s text:c="2"/></text:span></text:span><text:span text:style-name="Source_20_Text"><text:span text:style-name="T4">getEmployees(): </text:span></text:span><text:span text:style-name="Source_20_Text"><text:span text:style-name="T9">void</text:span></text:span><text:span text:style-name="Source_20_Text"><text:span text:style-name="T4"> {</text:span></text:span></text:p>
      <text:p text:style-name="P18"><text:span text:style-name="Source_20_Text"><text:span text:style-name="T3"><text:s text:c="4"/></text:span></text:span><text:span text:style-name="Source_20_Text"><text:span text:style-name="T9">this</text:span></text:span><text:span text:style-name="Source_20_Text"><text:span text:style-name="T4">.loading.se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IdToEmployeeMap.clear();</text:span></text:span></text:p>
      <text:p text:style-name="P18"><text:span text:style-name="Source_20_Text"><text:span text:style-name="T3"><text:s text:c="4"/></text:span></text:span><text:span text:style-name="Source_20_Text"><text:span text:style-name="T9">this</text:span></text:span><text:span text:style-name="Source_20_Text"><text:span text:style-name="T4">.table.clear();</text:span></text:span></text:p>
      <text:p text:style-name="P18"><text:span text:style-name="Source_20_Text"><text:span text:style-name="T3"><text:s text:c="4"/></text:span></text:span><text:span text:style-name="Source_20_Text"><text:span text:style-name="T9">this</text:span></text:span><text:span text:style-name="Source_20_Text"><text:span text:style-name="T4">.employeeService.getEmployeesWithManagers().subscribe({</text:span></text:span></text:p>
      <text:p text:style-name="P18"><text:span text:style-name="Source_20_Text"><text:span text:style-name="T3"><text:s text:c="6"/></text:span></text:span><text:span text:style-name="Source_20_Text"><text:span text:style-name="T10">next</text:span></text:span><text:span text:style-name="Source_20_Text"><text:span text:style-name="T4">: (res: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if</text:span></text:span><text:span text:style-name="Source_20_Text"><text:span text:style-name="T4"> (!res || res.length </text:span></text:span><text:span text:style-name="Source_20_Text"><text:span text:style-name="T11">=== 0) {</text:span></text:span></text:p>
      <text:p text:style-name="P18"><text:span text:style-name="Source_20_Text"><text:span text:style-name="T3"><text:s text:c="10"/></text:span></text:span><text:span text:style-name="Source_20_Text"><text:span text:style-name="T9">this</text:span></text:span><text:span text:style-name="Source_20_Text"><text:span text:style-name="T4">.table.draw();</text:span></text:span></text:p>
      <text:p text:style-name="P18"><text:span text:style-name="Source_20_Text"><text:span text:style-name="T3"><text:s text:c="10"/></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10"/></text:span></text:span><text:span text:style-name="Source_20_Text"><text:span text:style-name="T9">return</text:span></text:span><text:span text:style-name="Source_20_Text"><text:span text:style-name="T4">;</text:span></text:span></text:p>
      <text:p text:style-name="P18"><text:span text:style-name="Source_20_Text"><text:span text:style-name="T3"><text:s text:c="8"/></text:span></text:span><text:span text:style-name="Source_20_Text"><text:span text:style-name="T4">}</text:span></text:span></text:p>
      <text:p text:style-name="P18"/>
      <text:p text:style-name="P18"><text:span text:style-name="Source_20_Text"><text:span text:style-name="T3"><text:s text:c="12"/></text:span></text:span><text:span text:style-name="Source_20_Text"><text:span text:style-name="T11">// Invalidate all rows to force re-running render functions (e.g., for manager names)</text:span></text:span></text:p>
      <text:p text:style-name="P18"><text:span text:style-name="Source_20_Text"><text:span text:style-name="T3"><text:s text:c="12"/></text:span></text:span><text:span text:style-name="Source_20_Text"><text:span text:style-name="T11">// and then draw the table. This is the most reliable way to handle renderers with dependencies.</text:span></text:span></text:p>
      <text:p text:style-name="P18"><text:span text:style-name="Source_20_Text"><text:span text:style-name="T3"><text:s text:c="12"/></text:span></text:span><text:span text:style-name="Source_20_Text"><text:span text:style-name="T9">this</text:span></text:span><text:span text:style-name="Source_20_Text"><text:span text:style-name="T4">.table.rows().invalidate().draw();</text:span></text:span></text:p>
      <text:p text:style-name="P18"><text:span text:style-name="Source_20_Text"><text:span text:style-name="T3"><text:s text:c="12"/></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10"/></text:span></text:span><text:span text:style-name="Source_20_Text"><text:span text:style-name="T4">},</text:span></text:span></text:p>
      <text:p text:style-name="P18"><text:span text:style-name="Source_20_Text"><text:span text:style-name="T3"><text:s text:c="10"/></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12"/></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12"/></text:span></text:span><text:span text:style-name="Source_20_Text"><text:span text:style-name="T4">alert(</text:span></text:span><text:span text:style-name="Source_20_Text"><text:span text:style-name="T9">this</text:span></text:span><text:span text:style-name="Source_20_Text"><text:span text:style-name="T4">.translate.instant(</text:span></text:span><text:span text:style-name="Source_20_Text"><text:span text:style-name="T6">'failed-to-get-employees'</text:span></text:span><text:span text:style-name="Source_20_Text"><text:span text:style-name="T4">) + </text:span></text:span><text:span text:style-name="Source_20_Text"><text:span text:style-name="T6">': '</text:span></text:span><text:span text:style-name="Source_20_Text"><text:span text:style-name="T4"> + err.message);</text:span></text:span></text:p>
      <text:p text:style-name="P18"><text:span text:style-name="Source_20_Text"><text:span text:style-name="T3"><text:s text:c="10"/></text:span></text:span><text:span text:style-name="Source_20_Text"><text:span text:style-name="T4">}</text:span></text:span></text:p>
      <text:p text:style-name="P18"><text:span text:style-name="Source_20_Text"><text:span text:style-name="T3"><text:s text:c="8"/></text:span></text:span><text:span text:style-name="Source_20_Text"><text:span text:style-name="T4">});</text:span></text:span></text:p>
      <text:p text:style-name="P18"><text:soft-page-break/></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6"/></text:span></text:span><text:span text:style-name="Source_20_Text"><text:span text:style-name="T10">error</text:span></text:span><text:span text:style-name="Source_20_Text"><text:span text:style-name="T4">: (err: </text:span></text:span><text:span text:style-name="Source_20_Text"><text:span text:style-name="T9">any</text:span></text:span><text:span text:style-name="Source_20_Text"><text:span text:style-name="T4">) =&gt; {</text:span></text:span></text:p>
      <text:p text:style-name="P18"><text:span text:style-name="Source_20_Text"><text:span text:style-name="T3"><text:s text:c="8"/></text:span></text:span><text:span text:style-name="Source_20_Text"><text:span text:style-name="T9">this</text:span></text:span><text:span text:style-name="Source_20_Text"><text:span text:style-name="T4">.loading.set(</text:span></text:span><text:span text:style-name="Source_20_Text"><text:span text:style-name="T6">false</text:span></text:span><text:span text:style-name="Source_20_Text"><text:span text:style-name="T4">);</text:span></text:span></text:p>
      <text:p text:style-name="P18"><text:span text:style-name="Source_20_Text"><text:span text:style-name="T3"><text:s text:c="8"/></text:span></text:span><text:span text:style-name="Source_20_Text"><text:span text:style-name="T4">alert(</text:span></text:span><text:span text:style-name="Source_20_Text"><text:span text:style-name="T9">this</text:span></text:span><text:span text:style-name="Source_20_Text"><text:span text:style-name="T4">.translate.instant(</text:span></text:span><text:span text:style-name="Source_20_Text"><text:span text:style-name="T6">'failed-to-get-employees'</text:span></text:span><text:span text:style-name="Source_20_Text"><text:span text:style-name="T4">) + </text:span></text:span><text:span text:style-name="Source_20_Text"><text:span text:style-name="T6">': '</text:span></text:span><text:span text:style-name="Source_20_Text"><text:span text:style-name="T4"> + err.message);</text:span></text:span></text:p>
      <text:p text:style-name="P18"><text:span text:style-name="Source_20_Text"><text:span text:style-name="T3"><text:s text:c="6"/></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
      <text:p text:style-name="P7">After applying these changes, your application should compile successfully and use the global spinner for all HTTP requests. Let me know if you have any other questions!</text:p>
      <text:h text:style-name="P1" text:outline-level="1">Jan</text:h>
      <text:p text:style-name="P9">can you show me previous answers please?</text:p>
      <text:h text:style-name="P2" text:outline-level="1">Gemini</text:h>
      <text:p text:style-name="P13">Thinking</text:p>
      <text:p text:style-name="P7">Of course! Here is a summary of the previous steps we took together to implement a global, centered loading spinner for your application.</text:p>
      <text:h text:style-name="P3" text:outline-level="3">Summary of Previous Steps</text:h>
      <text:p text:style-name="P21"><text:span text:style-name="T2">We accomplished this by creating a </text:span><text:span text:style-name="Source_20_Text"><text:span text:style-name="T5">SpinnerService</text:span></text:span><text:span text:style-name="T2"> to manage the state, a </text:span><text:span text:style-name="Source_20_Text"><text:span text:style-name="T5">SpinnerComponent</text:span></text:span><text:span text:style-name="T2"> to display the UI, and an </text:span><text:span text:style-name="Source_20_Text"><text:span text:style-name="T5">HTTP_INTERCEPTOR</text:span></text:span><text:span text:style-name="T2"> to automatically show and hide the spinner during API calls.</text:span></text:p>
      <text:p text:style-name="P7">Here is the code that reflects the outcome of our previous conversations:</text:p>
      <text:h text:style-name="P17" text:outline-level="4"><text:span text:style-name="T2">1. Created the </text:span><text:span text:style-name="Source_20_Text"><text:span text:style-name="T5">SpinnerService</text:span></text:span></text:h>
      <text:p text:style-name="P21"><text:span text:style-name="T2">This service is the heart of the feature. It uses a </text:span><text:span text:style-name="Source_20_Text"><text:span text:style-name="T5">BehaviorSubject</text:span></text:span><text:span text:style-name="T2"> to keep track of the loading state. Any part of the app can subscribe to its </text:span><text:span text:style-name="Source_20_Text"><text:span text:style-name="T5">isLoading</text:span></text:span><text:span text:style-name="T2"> observable.</text:span></text:p>
      <text:p text:style-name="P21"><text:span text:style-name="Strong_20_Emphasis"><text:span text:style-name="T2">/home/vj/Desktop/A/__myapp/datatables3/datatables/myapp-client/src/app/service/spinner.service.ts</text:span></text:span></text:p>
      <text:p text:style-name="P5">typescript</text:p>
      <text:p text:style-name="P18"><text:span text:style-name="Source_20_Text"><text:span text:style-name="T9">import</text:span></text:span><text:span text:style-name="Source_20_Text"><text:span text:style-name="T4"> { Injectable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BehaviorSubject } </text:span></text:span><text:span text:style-name="Source_20_Text"><text:span text:style-name="T9">from</text:span></text:span><text:span text:style-name="Source_20_Text"><text:span text:style-name="T4"> </text:span></text:span><text:span text:style-name="Source_20_Text"><text:span text:style-name="T6">'rxjs'</text:span></text:span><text:span text:style-name="Source_20_Text"><text:span text:style-name="T4">;</text:span></text:span></text:p>
      <text:p text:style-name="P18"/>
      <text:p text:style-name="P18"><text:span text:style-name="Source_20_Text"><text:span text:style-name="T13">@Injectable</text:span></text:span><text:span text:style-name="Source_20_Text"><text:span text:style-name="T4">({</text:span></text:span></text:p>
      <text:p text:style-name="P18"><text:span text:style-name="Source_20_Text"><text:span text:style-name="T3"><text:s text:c="4"/></text:span></text:span><text:span text:style-name="Source_20_Text"><text:span text:style-name="T10">providedIn</text:span></text:span><text:span text:style-name="Source_20_Text"><text:span text:style-name="T4">: </text:span></text:span><text:span text:style-name="Source_20_Text"><text:span text:style-name="T6">'root'</text:span></text:span><text:span text:style-name="Source_20_Text"><text:span text:style-name="T4">,</text:span></text:span></text:p>
      <text:p text:style-name="P18"><text:span text:style-name="Source_20_Text"><text:span text:style-name="T4">})</text:span></text:span></text:p>
      <text:p text:style-name="P18"><text:span text:style-name="Source_20_Text"><text:span text:style-name="T9">export</text:span></text:span><text:span text:style-name="Source_20_Text"><text:span text:style-name="T4"> </text:span></text:span><text:span text:style-name="Source_20_Text"><text:span text:style-name="T9">class</text:span></text:span><text:span text:style-name="Source_20_Text"><text:span text:style-name="T4"> </text:span></text:span><text:span text:style-name="Source_20_Text"><text:span text:style-name="T6">SpinnerService</text:span></text:span><text:span text:style-name="Source_20_Text"><text:span text:style-name="T4"> {</text:span></text:span></text:p>
      <text:p text:style-name="P18"><text:span text:style-name="Source_20_Text"><text:span text:style-name="T3"><text:s text:c="4"/></text:span></text:span><text:span text:style-name="Source_20_Text"><text:span text:style-name="T9">private</text:span></text:span><text:span text:style-name="Source_20_Text"><text:span text:style-name="T4"> isLoadingSubject = </text:span></text:span><text:span text:style-name="Source_20_Text"><text:span text:style-name="T9">new</text:span></text:span><text:span text:style-name="Source_20_Text"><text:span text:style-name="T4"> BehaviorSubject&lt;</text:span></text:span><text:span text:style-name="Source_20_Text"><text:span text:style-name="T9">boolean</text:span></text:span><text:span text:style-name="Source_20_Text"><text:span text:style-name="T4">&gt;(</text:span></text:span><text:span text:style-name="Source_20_Text"><text:span text:style-name="T6">false</text:span></text:span><text:span text:style-name="Source_20_Text"><text:span text:style-name="T4">);</text:span></text:span></text:p>
      <text:p text:style-name="P18"><text:span text:style-name="Source_20_Text"><text:span text:style-name="T3"><text:s text:c="4"/></text:span></text:span><text:span text:style-name="Source_20_Text"><text:span text:style-name="T9">public</text:span></text:span><text:span text:style-name="Source_20_Text"><text:span text:style-name="T4"> </text:span></text:span><text:span text:style-name="Source_20_Text"><text:span text:style-name="T9">readonly</text:span></text:span><text:span text:style-name="Source_20_Text"><text:span text:style-name="T4"> isLoading = </text:span></text:span><text:span text:style-name="Source_20_Text"><text:span text:style-name="T9">this</text:span></text:span><text:span text:style-name="Source_20_Text"><text:span text:style-name="T4">.isLoadingSubject.asObservable();</text:span></text:span></text:p>
      <text:p text:style-name="P18"/>
      <text:p text:style-name="P18"><text:span text:style-name="Source_20_Text"><text:span text:style-name="T3"><text:s text:c="4"/></text:span></text:span><text:span text:style-name="Source_20_Text"><text:span text:style-name="T6">show</text:span></text:span><text:span text:style-name="Source_20_Text"><text:span text:style-name="T4">() {</text:span></text:span></text:p>
      <text:p text:style-name="P18"><text:span text:style-name="Source_20_Text"><text:span text:style-name="T3"><text:s text:c="8"/></text:span></text:span><text:span text:style-name="Source_20_Text"><text:span text:style-name="T9">this</text:span></text:span><text:span text:style-name="Source_20_Text"><text:span text:style-name="T4">.isLoadingSubject.next(</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
      <text:p text:style-name="P18"><text:span text:style-name="Source_20_Text"><text:span text:style-name="T3"><text:s text:c="4"/></text:span></text:span><text:span text:style-name="Source_20_Text"><text:span text:style-name="T6">hide</text:span></text:span><text:span text:style-name="Source_20_Text"><text:span text:style-name="T4">() {</text:span></text:span></text:p>
      <text:p text:style-name="P18"><text:span text:style-name="Source_20_Text"><text:span text:style-name="T3"><text:s text:c="8"/></text:span></text:span><text:span text:style-name="Source_20_Text"><text:span text:style-name="T9">this</text:span></text:span><text:span text:style-name="Source_20_Text"><text:span text:style-name="T4">.isLoadingSubject.next(</text:span></text:span><text:span text:style-name="Source_20_Text"><text:span text:style-name="T6">false</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text:soft-page-break/><text:span text:style-name="Source_20_Text"><text:span text:style-name="T4">}</text:span></text:span></text:p>
      <text:h text:style-name="P17" text:outline-level="4"><text:span text:style-name="T2">2. Created the </text:span><text:span text:style-name="Source_20_Text"><text:span text:style-name="T5">SpinnerComponent</text:span></text:span></text:h>
      <text:p text:style-name="P21"><text:span text:style-name="T2">This standalone component subscribes to the </text:span><text:span text:style-name="Source_20_Text"><text:span text:style-name="T5">SpinnerService</text:span></text:span><text:span text:style-name="T2"> and displays a full-screen overlay with a centered Material spinner when </text:span><text:span text:style-name="Source_20_Text"><text:span text:style-name="T5">isLoading$</text:span></text:span><text:span text:style-name="T2"> is </text:span><text:span text:style-name="Source_20_Text"><text:span text:style-name="T5">true</text:span></text:span><text:span text:style-name="T2">.</text:span></text:p>
      <text:p text:style-name="P21"><text:span text:style-name="Strong_20_Emphasis"><text:span text:style-name="T2">/home/vj/Desktop/A/__myapp/datatables3/datatables/myapp-client/src/app/shared/spinner/spinner.component.html</text:span></text:span></text:p>
      <text:p text:style-name="P5">html</text:p>
      <text:p text:style-name="P18"><text:span text:style-name="Source_20_Text"><text:span text:style-name="T9">&lt;div </text:span></text:span><text:span text:style-name="Source_20_Text"><text:span text:style-name="T10">class</text:span></text:span><text:span text:style-name="Source_20_Text"><text:span text:style-name="T9">=</text:span></text:span><text:span text:style-name="Source_20_Text"><text:span text:style-name="T6">"spinner-overlay"</text:span></text:span><text:span text:style-name="Source_20_Text"><text:span text:style-name="T9"> *</text:span></text:span><text:span text:style-name="Source_20_Text"><text:span text:style-name="T10">ngIf</text:span></text:span><text:span text:style-name="Source_20_Text"><text:span text:style-name="T9">=</text:span></text:span><text:span text:style-name="Source_20_Text"><text:span text:style-name="T6">"isLoading$ | async"</text:span></text:span><text:span text:style-name="Source_20_Text"><text:span text:style-name="T9">&gt;</text:span></text:span></text:p>
      <text:p text:style-name="P18"><text:span text:style-name="Source_20_Text"><text:span text:style-name="T3"><text:s text:c="4"/></text:span></text:span><text:span text:style-name="Source_20_Text"><text:span text:style-name="T9">&lt;mat-progress-spinner </text:span></text:span><text:span text:style-name="Source_20_Text"><text:span text:style-name="T10">color</text:span></text:span><text:span text:style-name="Source_20_Text"><text:span text:style-name="T9">=</text:span></text:span><text:span text:style-name="Source_20_Text"><text:span text:style-name="T6">"primary"</text:span></text:span><text:span text:style-name="Source_20_Text"><text:span text:style-name="T9"> </text:span></text:span><text:span text:style-name="Source_20_Text"><text:span text:style-name="T10">mode</text:span></text:span><text:span text:style-name="Source_20_Text"><text:span text:style-name="T9">=</text:span></text:span><text:span text:style-name="Source_20_Text"><text:span text:style-name="T6">"indeterminate"</text:span></text:span><text:span text:style-name="Source_20_Text"><text:span text:style-name="T9">&gt;</text:span></text:span></text:p>
      <text:p text:style-name="P18"><text:span text:style-name="Source_20_Text"><text:span text:style-name="T3"><text:s text:c="4"/></text:span></text:span><text:span text:style-name="Source_20_Text"><text:span text:style-name="T9">&lt;/mat-progress-spinner&gt;</text:span></text:span></text:p>
      <text:p text:style-name="P18"><text:span text:style-name="Source_20_Text"><text:span text:style-name="T9">&lt;/div&gt;</text:span></text:span></text:p>
      <text:p text:style-name="P21"><text:span text:style-name="Strong_20_Emphasis"><text:span text:style-name="T2">/home/vj/Desktop/A/__myapp/datatables3/datatables/myapp-client/src/app/shared/spinner/spinner.component.css</text:span></text:span></text:p>
      <text:p text:style-name="P5">css</text:p>
      <text:p text:style-name="P18"><text:span text:style-name="Source_20_Text"><text:span text:style-name="T4">.spinner-overlay {</text:span></text:span></text:p>
      <text:p text:style-name="P18"><text:span text:style-name="Source_20_Text"><text:span text:style-name="T3"><text:s text:c="4"/></text:span></text:span><text:span text:style-name="Source_20_Text"><text:span text:style-name="T6">position</text:span></text:span><text:span text:style-name="Source_20_Text"><text:span text:style-name="T4">: fixed;</text:span></text:span></text:p>
      <text:p text:style-name="P18"><text:span text:style-name="Source_20_Text"><text:span text:style-name="T3"><text:s text:c="4"/></text:span></text:span><text:span text:style-name="Source_20_Text"><text:span text:style-name="T6">top</text:span></text:span><text:span text:style-name="Source_20_Text"><text:span text:style-name="T4">: 0;</text:span></text:span></text:p>
      <text:p text:style-name="P18"><text:span text:style-name="Source_20_Text"><text:span text:style-name="T3"><text:s text:c="4"/></text:span></text:span><text:span text:style-name="Source_20_Text"><text:span text:style-name="T6">left</text:span></text:span><text:span text:style-name="Source_20_Text"><text:span text:style-name="T4">: 0;</text:span></text:span></text:p>
      <text:p text:style-name="P18"><text:span text:style-name="Source_20_Text"><text:span text:style-name="T3"><text:s text:c="4"/></text:span></text:span><text:span text:style-name="Source_20_Text"><text:span text:style-name="T6">width</text:span></text:span><text:span text:style-name="Source_20_Text"><text:span text:style-name="T4">: 100%;</text:span></text:span></text:p>
      <text:p text:style-name="P18"><text:span text:style-name="Source_20_Text"><text:span text:style-name="T3"><text:s text:c="4"/></text:span></text:span><text:span text:style-name="Source_20_Text"><text:span text:style-name="T6">height</text:span></text:span><text:span text:style-name="Source_20_Text"><text:span text:style-name="T4">: 100%;</text:span></text:span></text:p>
      <text:p text:style-name="P18"><text:span text:style-name="Source_20_Text"><text:span text:style-name="T3"><text:s text:c="4"/></text:span></text:span><text:span text:style-name="Source_20_Text"><text:span text:style-name="T6">background-color</text:span></text:span><text:span text:style-name="Source_20_Text"><text:span text:style-name="T4">: </text:span></text:span><text:span text:style-name="Source_20_Text"><text:span text:style-name="T9">rgba</text:span></text:span><text:span text:style-name="Source_20_Text"><text:span text:style-name="T4">(0, 0, 0, 0.3);</text:span></text:span></text:p>
      <text:p text:style-name="P18"><text:span text:style-name="Source_20_Text"><text:span text:style-name="T3"><text:s text:c="4"/></text:span></text:span><text:span text:style-name="Source_20_Text"><text:span text:style-name="T6">display</text:span></text:span><text:span text:style-name="Source_20_Text"><text:span text:style-name="T4">: flex;</text:span></text:span></text:p>
      <text:p text:style-name="P18"><text:span text:style-name="Source_20_Text"><text:span text:style-name="T3"><text:s text:c="4"/></text:span></text:span><text:span text:style-name="Source_20_Text"><text:span text:style-name="T6">justify-content</text:span></text:span><text:span text:style-name="Source_20_Text"><text:span text:style-name="T4">: center;</text:span></text:span></text:p>
      <text:p text:style-name="P18"><text:span text:style-name="Source_20_Text"><text:span text:style-name="T3"><text:s text:c="4"/></text:span></text:span><text:span text:style-name="Source_20_Text"><text:span text:style-name="T6">align-items</text:span></text:span><text:span text:style-name="Source_20_Text"><text:span text:style-name="T4">: center;</text:span></text:span></text:p>
      <text:p text:style-name="P18"><text:span text:style-name="Source_20_Text"><text:span text:style-name="T3"><text:s text:c="4"/></text:span></text:span><text:span text:style-name="Source_20_Text"><text:span text:style-name="T6">z-index</text:span></text:span><text:span text:style-name="Source_20_Text"><text:span text:style-name="T4">: 9999;</text:span></text:span></text:p>
      <text:p text:style-name="P18"><text:span text:style-name="Source_20_Text"><text:span text:style-name="T3"><text:s text:c="4"/></text:span></text:span><text:span text:style-name="Source_20_Text"><text:span text:style-name="T11">/* Ensure it's on top of other content */</text:span></text:span></text:p>
      <text:p text:style-name="P18"><text:span text:style-name="Source_20_Text"><text:span text:style-name="T4">}</text:span></text:span></text:p>
      <text:p text:style-name="P21"><text:span text:style-name="Strong_20_Emphasis"><text:span text:style-name="T2">/home/vj/Desktop/A/__myapp/datatables3/datatables/myapp-client/src/app/shared/spinner/spinner.component.ts</text:span></text:span></text:p>
      <text:p text:style-name="P5">typescript</text:p>
      <text:p text:style-name="P18"><text:span text:style-name="Source_20_Text"><text:span text:style-name="T9">import</text:span></text:span><text:span text:style-name="Source_20_Text"><text:span text:style-name="T4"> { Component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CommonModule } </text:span></text:span><text:span text:style-name="Source_20_Text"><text:span text:style-name="T9">from</text:span></text:span><text:span text:style-name="Source_20_Text"><text:span text:style-name="T4"> </text:span></text:span><text:span text:style-name="Source_20_Text"><text:span text:style-name="T6">'@angular/common'</text:span></text:span><text:span text:style-name="Source_20_Text"><text:span text:style-name="T4">;</text:span></text:span></text:p>
      <text:p text:style-name="P18"><text:span text:style-name="Source_20_Text"><text:span text:style-name="T9">import</text:span></text:span><text:span text:style-name="Source_20_Text"><text:span text:style-name="T4"> { MatProgressSpinnerModule } </text:span></text:span><text:span text:style-name="Source_20_Text"><text:span text:style-name="T9">from</text:span></text:span><text:span text:style-name="Source_20_Text"><text:span text:style-name="T4"> </text:span></text:span><text:span text:style-name="Source_20_Text"><text:span text:style-name="T6">'@angular/material/progress-spinner'</text:span></text:span><text:span text:style-name="Source_20_Text"><text:span text:style-name="T4">;</text:span></text:span></text:p>
      <text:p text:style-name="P18"><text:span text:style-name="Source_20_Text"><text:span text:style-name="T9">import</text:span></text:span><text:span text:style-name="Source_20_Text"><text:span text:style-name="T4"> { SpinnerService } </text:span></text:span><text:span text:style-name="Source_20_Text"><text:span text:style-name="T9">from</text:span></text:span><text:span text:style-name="Source_20_Text"><text:span text:style-name="T4"> </text:span></text:span><text:span text:style-name="Source_20_Text"><text:span text:style-name="T6">'../../service/spinner.service'</text:span></text:span><text:span text:style-name="Source_20_Text"><text:span text:style-name="T4">;</text:span></text:span></text:p>
      <text:p text:style-name="P18"><text:span text:style-name="Source_20_Text"><text:span text:style-name="T9">import</text:span></text:span><text:span text:style-name="Source_20_Text"><text:span text:style-name="T4"> { Observable } </text:span></text:span><text:span text:style-name="Source_20_Text"><text:span text:style-name="T9">from</text:span></text:span><text:span text:style-name="Source_20_Text"><text:span text:style-name="T4"> </text:span></text:span><text:span text:style-name="Source_20_Text"><text:span text:style-name="T6">'rxjs'</text:span></text:span><text:span text:style-name="Source_20_Text"><text:span text:style-name="T4">;</text:span></text:span></text:p>
      <text:p text:style-name="P18"><text:span text:style-name="Source_20_Text"><text:span text:style-name="T13">@Component</text:span></text:span><text:span text:style-name="Source_20_Text"><text:span text:style-name="T4">({</text:span></text:span></text:p>
      <text:p text:style-name="P18"><text:span text:style-name="Source_20_Text"><text:span text:style-name="T3"><text:s text:c="4"/></text:span></text:span><text:span text:style-name="Source_20_Text"><text:span text:style-name="T10">selector</text:span></text:span><text:span text:style-name="Source_20_Text"><text:span text:style-name="T4">: </text:span></text:span><text:span text:style-name="Source_20_Text"><text:span text:style-name="T6">'app-spinner'</text:span></text:span><text:span text:style-name="Source_20_Text"><text:span text:style-name="T4">,</text:span></text:span></text:p>
      <text:p text:style-name="P18"><text:span text:style-name="Source_20_Text"><text:span text:style-name="T3"><text:s text:c="4"/></text:span></text:span><text:span text:style-name="Source_20_Text"><text:span text:style-name="T10">standalone</text:span></text:span><text:span text:style-name="Source_20_Text"><text:span text:style-name="T4">: </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10">imports</text:span></text:span><text:span text:style-name="Source_20_Text"><text:span text:style-name="T4">: [CommonModule, MatProgressSpinnerModule],</text:span></text:span></text:p>
      <text:p text:style-name="P18"><text:span text:style-name="Source_20_Text"><text:span text:style-name="T3"><text:s text:c="4"/></text:span></text:span><text:span text:style-name="Source_20_Text"><text:span text:style-name="T10">templateUrl</text:span></text:span><text:span text:style-name="Source_20_Text"><text:span text:style-name="T4">: </text:span></text:span><text:span text:style-name="Source_20_Text"><text:span text:style-name="T6">'./spinner.component.html'</text:span></text:span><text:span text:style-name="Source_20_Text"><text:span text:style-name="T4">,</text:span></text:span></text:p>
      <text:p text:style-name="P18"><text:span text:style-name="Source_20_Text"><text:span text:style-name="T3"><text:s text:c="4"/></text:span></text:span><text:span text:style-name="Source_20_Text"><text:span text:style-name="T10">styleUrls</text:span></text:span><text:span text:style-name="Source_20_Text"><text:span text:style-name="T4">: [</text:span></text:span><text:span text:style-name="Source_20_Text"><text:span text:style-name="T6">'./spinner.component.css'</text:span></text:span><text:span text:style-name="Source_20_Text"><text:span text:style-name="T4">],</text:span></text:span></text:p>
      <text:p text:style-name="P18"><text:soft-page-break/><text:span text:style-name="Source_20_Text"><text:span text:style-name="T4">})</text:span></text:span></text:p>
      <text:p text:style-name="P18"><text:span text:style-name="Source_20_Text"><text:span text:style-name="T9">export</text:span></text:span><text:span text:style-name="Source_20_Text"><text:span text:style-name="T4"> </text:span></text:span><text:span text:style-name="Source_20_Text"><text:span text:style-name="T9">class</text:span></text:span><text:span text:style-name="Source_20_Text"><text:span text:style-name="T4"> </text:span></text:span><text:span text:style-name="Source_20_Text"><text:span text:style-name="T6">SpinnerComponent</text:span></text:span><text:span text:style-name="Source_20_Text"><text:span text:style-name="T4"> {</text:span></text:span></text:p>
      <text:p text:style-name="P18"><text:span text:style-name="Source_20_Text"><text:span text:style-name="T3"><text:s text:c="4"/></text:span></text:span><text:span text:style-name="Source_20_Text"><text:span text:style-name="T10">isLoading$</text:span></text:span><text:span text:style-name="Source_20_Text"><text:span text:style-name="T4">: Observable&lt;</text:span></text:span><text:span text:style-name="Source_20_Text"><text:span text:style-name="T9">boolean</text:span></text:span><text:span text:style-name="Source_20_Text"><text:span text:style-name="T4">&gt;;</text:span></text:span></text:p>
      <text:p text:style-name="P18"><text:span text:style-name="Source_20_Text"><text:span text:style-name="T3"><text:s text:c="4"/></text:span></text:span><text:span text:style-name="Source_20_Text"><text:span text:style-name="T6">constructor</text:span></text:span><text:span text:style-name="Source_20_Text"><text:span text:style-name="T4">(</text:span></text:span><text:span text:style-name="Source_20_Text"><text:span text:style-name="T9">private</text:span></text:span><text:span text:style-name="Source_20_Text"><text:span text:style-name="T4"> spinnerService: SpinnerService) {</text:span></text:span></text:p>
      <text:p text:style-name="P18"><text:span text:style-name="Source_20_Text"><text:span text:style-name="T3"><text:s text:c="8"/></text:span></text:span><text:span text:style-name="Source_20_Text"><text:span text:style-name="T9">this</text:span></text:span><text:span text:style-name="Source_20_Text"><text:span text:style-name="T4">.isLoading$ = </text:span></text:span><text:span text:style-name="Source_20_Text"><text:span text:style-name="T9">this</text:span></text:span><text:span text:style-name="Source_20_Text"><text:span text:style-name="T4">.spinnerService.isLoading;</text:span></text:span></text:p>
      <text:p text:style-name="P18"><text:span text:style-name="Source_20_Text"><text:span text:style-name="T3"><text:s text:c="4"/></text:span></text:span><text:span text:style-name="Source_20_Text"><text:span text:style-name="T4">}</text:span></text:span></text:p>
      <text:p text:style-name="P18"><text:span text:style-name="Source_20_Text"><text:span text:style-name="T4">}</text:span></text:span></text:p>
      <text:h text:style-name="P17" text:outline-level="4"><text:span text:style-name="T2">3. Created the </text:span><text:span text:style-name="Source_20_Text"><text:span text:style-name="T5">SpinnerInterceptor</text:span></text:span></text:h>
      <text:p text:style-name="P21"><text:span text:style-name="T2">This interceptor automatically calls </text:span><text:span text:style-name="Source_20_Text"><text:span text:style-name="T5">spinnerService.show()</text:span></text:span><text:span text:style-name="T2"> when an HTTP request starts and </text:span><text:span text:style-name="Source_20_Text"><text:span text:style-name="T5">spinnerService.hide()</text:span></text:span><text:span text:style-name="T2"> when it completes (either successfully or with an error).</text:span></text:p>
      <text:p text:style-name="P21"><text:span text:style-name="Strong_20_Emphasis"><text:span text:style-name="T2">/home/vj/Desktop/A/__myapp/datatables3/datatables/myapp-client/src/app/shared/interceptor/spinner.interceptor.ts</text:span></text:span></text:p>
      <text:p text:style-name="P5">typescript</text:p>
      <text:p text:style-name="P18"><text:span text:style-name="Source_20_Text"><text:span text:style-name="T9">import</text:span></text:span><text:span text:style-name="Source_20_Text"><text:span text:style-name="T4"> {</text:span></text:span></text:p>
      <text:p text:style-name="P18"><text:span text:style-name="Source_20_Text"><text:span text:style-name="T3"><text:s text:c="4"/></text:span></text:span><text:span text:style-name="Source_20_Text"><text:span text:style-name="T4">HttpHandler,</text:span></text:span></text:p>
      <text:p text:style-name="P18"><text:span text:style-name="Source_20_Text"><text:span text:style-name="T3"><text:s text:c="4"/></text:span></text:span><text:span text:style-name="Source_20_Text"><text:span text:style-name="T4">HttpInterceptor,</text:span></text:span></text:p>
      <text:p text:style-name="P18"><text:span text:style-name="Source_20_Text"><text:span text:style-name="T3"><text:s text:c="4"/></text:span></text:span><text:span text:style-name="Source_20_Text"><text:span text:style-name="T4">HttpRequest,</text:span></text:span></text:p>
      <text:p text:style-name="P18"><text:span text:style-name="Source_20_Text"><text:span text:style-name="T4">} </text:span></text:span><text:span text:style-name="Source_20_Text"><text:span text:style-name="T9">from</text:span></text:span><text:span text:style-name="Source_20_Text"><text:span text:style-name="T4"> </text:span></text:span><text:span text:style-name="Source_20_Text"><text:span text:style-name="T6">'@angular/common/http'</text:span></text:span><text:span text:style-name="Source_20_Text"><text:span text:style-name="T4">;</text:span></text:span></text:p>
      <text:p text:style-name="P18"><text:span text:style-name="Source_20_Text"><text:span text:style-name="T9">import</text:span></text:span><text:span text:style-name="Source_20_Text"><text:span text:style-name="T4"> { Injectable } </text:span></text:span><text:span text:style-name="Source_20_Text"><text:span text:style-name="T9">from</text:span></text:span><text:span text:style-name="Source_20_Text"><text:span text:style-name="T4"> </text:span></text:span><text:span text:style-name="Source_20_Text"><text:span text:style-name="T6">'@angular/core'</text:span></text:span><text:span text:style-name="Source_20_Text"><text:span text:style-name="T4">;</text:span></text:span></text:p>
      <text:p text:style-name="P18"><text:span text:style-name="Source_20_Text"><text:span text:style-name="T9">import</text:span></text:span><text:span text:style-name="Source_20_Text"><text:span text:style-name="T4"> { finalize } </text:span></text:span><text:span text:style-name="Source_20_Text"><text:span text:style-name="T9">from</text:span></text:span><text:span text:style-name="Source_20_Text"><text:span text:style-name="T4"> </text:span></text:span><text:span text:style-name="Source_20_Text"><text:span text:style-name="T6">'rxjs/operators'</text:span></text:span><text:span text:style-name="Source_20_Text"><text:span text:style-name="T4">;</text:span></text:span></text:p>
      <text:p text:style-name="P18"><text:span text:style-name="Source_20_Text"><text:span text:style-name="T9">import</text:span></text:span><text:span text:style-name="Source_20_Text"><text:span text:style-name="T4"> { SpinnerService } </text:span></text:span><text:span text:style-name="Source_20_Text"><text:span text:style-name="T9">from</text:span></text:span><text:span text:style-name="Source_20_Text"><text:span text:style-name="T4"> </text:span></text:span><text:span text:style-name="Source_20_Text"><text:span text:style-name="T6">'../../service/spinner.service'</text:span></text:span><text:span text:style-name="Source_20_Text"><text:span text:style-name="T4">;</text:span></text:span></text:p>
      <text:p text:style-name="P18"/>
      <text:p text:style-name="P18"><text:span text:style-name="Source_20_Text"><text:span text:style-name="T13">@Injectable</text:span></text:span><text:span text:style-name="Source_20_Text"><text:span text:style-name="T4">()</text:span></text:span></text:p>
      <text:p text:style-name="P18"><text:span text:style-name="Source_20_Text"><text:span text:style-name="T9">export</text:span></text:span><text:span text:style-name="Source_20_Text"><text:span text:style-name="T4"> </text:span></text:span><text:span text:style-name="Source_20_Text"><text:span text:style-name="T9">class</text:span></text:span><text:span text:style-name="Source_20_Text"><text:span text:style-name="T4"> </text:span></text:span><text:span text:style-name="Source_20_Text"><text:span text:style-name="T6">SpinnerInterceptor</text:span></text:span><text:span text:style-name="Source_20_Text"><text:span text:style-name="T4"> </text:span></text:span><text:span text:style-name="Source_20_Text"><text:span text:style-name="T6">implements</text:span></text:span><text:span text:style-name="Source_20_Text"><text:span text:style-name="T4"> </text:span></text:span><text:span text:style-name="Source_20_Text"><text:span text:style-name="T6">HttpInterceptor</text:span></text:span><text:span text:style-name="Source_20_Text"><text:span text:style-name="T4"> {</text:span></text:span></text:p>
      <text:p text:style-name="P18"><text:span text:style-name="Source_20_Text"><text:span text:style-name="T3"><text:s text:c="4"/></text:span></text:span><text:span text:style-name="Source_20_Text"><text:span text:style-name="T6">constructor</text:span></text:span><text:span text:style-name="Source_20_Text"><text:span text:style-name="T4">(</text:span></text:span><text:span text:style-name="Source_20_Text"><text:span text:style-name="T9">private</text:span></text:span><text:span text:style-name="Source_20_Text"><text:span text:style-name="T4"> spinnerService: SpinnerService) { }</text:span></text:span></text:p>
      <text:p text:style-name="P18"/>
      <text:p text:style-name="P18"><text:span text:style-name="Source_20_Text"><text:span text:style-name="T3"><text:s text:c="4"/></text:span></text:span><text:span text:style-name="Source_20_Text"><text:span text:style-name="T6">intercept</text:span></text:span><text:span text:style-name="Source_20_Text"><text:span text:style-name="T4">(request: HttpRequest&lt;</text:span></text:span><text:span text:style-name="Source_20_Text"><text:span text:style-name="T9">any</text:span></text:span><text:span text:style-name="Source_20_Text"><text:span text:style-name="T4">&gt;, next: HttpHandler) {</text:span></text:span></text:p>
      <text:p text:style-name="P18"><text:span text:style-name="Source_20_Text"><text:span text:style-name="T3"><text:s text:c="8"/></text:span></text:span><text:span text:style-name="Source_20_Text"><text:span text:style-name="T9">this</text:span></text:span><text:span text:style-name="Source_20_Text"><text:span text:style-name="T4">.spinnerService.show();</text:span></text:span></text:p>
      <text:p text:style-name="P18"/>
      <text:p text:style-name="P18"><text:span text:style-name="Source_20_Text"><text:span text:style-name="T3"><text:s text:c="8"/></text:span></text:span><text:span text:style-name="Source_20_Text"><text:span text:style-name="T9">return</text:span></text:span><text:span text:style-name="Source_20_Text"><text:span text:style-name="T4"> next.handle(request).pipe(</text:span></text:span></text:p>
      <text:p text:style-name="P18"><text:span text:style-name="Source_20_Text"><text:span text:style-name="T3"><text:s text:c="12"/></text:span></text:span><text:span text:style-name="Source_20_Text"><text:span text:style-name="T4">finalize(() =&gt; {</text:span></text:span></text:p>
      <text:p text:style-name="P18"><text:span text:style-name="Source_20_Text"><text:span text:style-name="T3"><text:s text:c="16"/></text:span></text:span><text:span text:style-name="Source_20_Text"><text:span text:style-name="T9">this</text:span></text:span><text:span text:style-name="Source_20_Text"><text:span text:style-name="T4">.spinnerService.hide();</text:span></text:span></text:p>
      <text:p text:style-name="P18"><text:span text:style-name="Source_20_Text"><text:span text:style-name="T3"><text:s text:c="12"/></text:span></text:span><text:span text:style-name="Source_20_Text"><text:span text:style-name="T4">})</text:span></text:span></text:p>
      <text:p text:style-name="P18"><text:span text:style-name="Source_20_Text"><text:span text:style-name="T3"><text:s text:c="8"/></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text:span text:style-name="Source_20_Text"><text:span text:style-name="T4">}</text:span></text:span></text:p>
      <text:h text:style-name="P4" text:outline-level="4">4. Configured the Application</text:h>
      <text:p text:style-name="P21"><text:span text:style-name="T2">We registered the </text:span><text:span text:style-name="Source_20_Text"><text:span text:style-name="T5">SpinnerInterceptor</text:span></text:span><text:span text:style-name="T2"> in </text:span><text:a xlink:type="simple" xlink:href="code-assist-path:/home/vj/Desktop/A/__myapp/datatables3/datatables/myapp-client/src/app/app.config.ts" text:style-name="Internet_20_link" text:visited-style-name="Visited_20_Internet_20_Link"><text:span text:style-name="Source_20_Text"><text:span text:style-name="T7">app.config.ts</text:span></text:span></text:a><text:span text:style-name="T2"> and placed the </text:span><text:span text:style-name="Source_20_Text"><text:span text:style-name="T5">&lt;app-spinner&gt;</text:span></text:span><text:span text:style-name="T2"> tag in your root </text:span><text:a xlink:type="simple" xlink:href="code-assist-path:/home/vj/Desktop/A/__myapp/datatables3/datatables/myapp-client/src/app/app.component.html" text:style-name="Internet_20_link" text:visited-style-name="Visited_20_Internet_20_Link"><text:span text:style-name="Source_20_Text"><text:span text:style-name="T7">app.component.html</text:span></text:span></text:a><text:span text:style-name="T2"> so it can overlay the entire application.</text:span></text:p>
      <text:p text:style-name="P21"><text:soft-page-break/><text:span text:style-name="Strong_20_Emphasis"><text:span text:style-name="T2">/home/vj/Desktop/A/__myapp/datatables3/datatables/myapp-client/src/app/app.config.ts</text:span></text:span></text:p>
      <text:p text:style-name="P5">typescript</text:p>
      <text:p text:style-name="P18"><text:span text:style-name="Source_20_Text"><text:span text:style-name="T11">// ... imports</text:span></text:span></text:p>
      <text:p text:style-name="P18"><text:span text:style-name="Source_20_Text"><text:span text:style-name="T9">import</text:span></text:span><text:span text:style-name="Source_20_Text"><text:span text:style-name="T4"> { HTTP_INTERCEPTORS } </text:span></text:span><text:span text:style-name="Source_20_Text"><text:span text:style-name="T9">from</text:span></text:span><text:span text:style-name="Source_20_Text"><text:span text:style-name="T4"> </text:span></text:span><text:span text:style-name="Source_20_Text"><text:span text:style-name="T6">'@angular/common/http'</text:span></text:span><text:span text:style-name="Source_20_Text"><text:span text:style-name="T4">;</text:span></text:span></text:p>
      <text:p text:style-name="P18"><text:span text:style-name="Source_20_Text"><text:span text:style-name="T9">import</text:span></text:span><text:span text:style-name="Source_20_Text"><text:span text:style-name="T4"> { SpinnerInterceptor } </text:span></text:span><text:span text:style-name="Source_20_Text"><text:span text:style-name="T9">from</text:span></text:span><text:span text:style-name="Source_20_Text"><text:span text:style-name="T4"> </text:span></text:span><text:span text:style-name="Source_20_Text"><text:span text:style-name="T6">'./shared/interceptor/spinner.interceptor'</text:span></text:span><text:span text:style-name="Source_20_Text"><text:span text:style-name="T4">;</text:span></text:span></text:p>
      <text:p text:style-name="P18"/>
      <text:p text:style-name="P18"><text:span text:style-name="Source_20_Text"><text:span text:style-name="T9">export</text:span></text:span><text:span text:style-name="Source_20_Text"><text:span text:style-name="T4"> </text:span></text:span><text:span text:style-name="Source_20_Text"><text:span text:style-name="T9">const</text:span></text:span><text:span text:style-name="Source_20_Text"><text:span text:style-name="T4"> appConfig: ApplicationConfig = {</text:span></text:span></text:p>
      <text:p text:style-name="P18"><text:span text:style-name="Source_20_Text"><text:span text:style-name="T3"><text:s text:c="2"/></text:span></text:span><text:span text:style-name="Source_20_Text"><text:span text:style-name="T10">providers</text:span></text:span><text:span text:style-name="Source_20_Text"><text:span text:style-name="T4">: [</text:span></text:span></text:p>
      <text:p text:style-name="P18"><text:span text:style-name="Source_20_Text"><text:span text:style-name="T3"><text:s text:c="4"/></text:span></text:span><text:span text:style-name="Source_20_Text"><text:span text:style-name="T11">// ... other providers</text:span></text:span></text:p>
      <text:p text:style-name="P18"><text:span text:style-name="Source_20_Text"><text:span text:style-name="T3"><text:s text:c="4"/></text:span></text:span><text:span text:style-name="Source_20_Text"><text:span text:style-name="T4">{</text:span></text:span></text:p>
      <text:p text:style-name="P18"><text:span text:style-name="Source_20_Text"><text:span text:style-name="T3"><text:s text:c="6"/></text:span></text:span><text:span text:style-name="Source_20_Text"><text:span text:style-name="T10">provide</text:span></text:span><text:span text:style-name="Source_20_Text"><text:span text:style-name="T4">: HTTP_INTERCEPTORS,</text:span></text:span></text:p>
      <text:p text:style-name="P18"><text:span text:style-name="Source_20_Text"><text:span text:style-name="T3"><text:s text:c="6"/></text:span></text:span><text:span text:style-name="Source_20_Text"><text:span text:style-name="T10">useClass</text:span></text:span><text:span text:style-name="Source_20_Text"><text:span text:style-name="T4">: SpinnerInterceptor,</text:span></text:span></text:p>
      <text:p text:style-name="P18"><text:span text:style-name="Source_20_Text"><text:span text:style-name="T3"><text:s text:c="6"/></text:span></text:span><text:span text:style-name="Source_20_Text"><text:span text:style-name="T10">multi</text:span></text:span><text:span text:style-name="Source_20_Text"><text:span text:style-name="T4">: </text:span></text:span><text:span text:style-name="Source_20_Text"><text:span text:style-name="T6">true</text:span></text:span><text:span text:style-name="Source_20_Text"><text:span text:style-name="T4">,</text:span></text:span></text:p>
      <text:p text:style-name="P18"><text:span text:style-name="Source_20_Text"><text:span text:style-name="T3"><text:s text:c="4"/></text:span></text:span><text:span text:style-name="Source_20_Text"><text:span text:style-name="T4">},</text:span></text:span></text:p>
      <text:p text:style-name="P18"><text:span text:style-name="Source_20_Text"><text:span text:style-name="T3"><text:s text:c="2"/></text:span></text:span><text:span text:style-name="Source_20_Text"><text:span text:style-name="T4">]</text:span></text:span></text:p>
      <text:p text:style-name="P18"><text:span text:style-name="Source_20_Text"><text:span text:style-name="T4">};</text:span></text:span></text:p>
      <text:p text:style-name="P21"><text:span text:style-name="Strong_20_Emphasis"><text:span text:style-name="T2">/home/vj/Desktop/A/__myapp/datatables3/datatables/myapp-client/src/app/app.component.html</text:span></text:span></text:p>
      <text:p text:style-name="P5">html</text:p>
      <text:p text:style-name="P18"><text:span text:style-name="Source_20_Text"><text:span text:style-name="T4">// ...</text:span></text:span></text:p>
      <text:p text:style-name="P18"><text:span text:style-name="Source_20_Text"><text:span text:style-name="T3"><text:s text:c="8"/></text:span></text:span><text:span text:style-name="Source_20_Text"><text:span text:style-name="T9">&lt;div </text:span></text:span><text:span text:style-name="Source_20_Text"><text:span text:style-name="T10">class</text:span></text:span><text:span text:style-name="Source_20_Text"><text:span text:style-name="T9">=</text:span></text:span><text:span text:style-name="Source_20_Text"><text:span text:style-name="T6">"col"</text:span></text:span><text:span text:style-name="Source_20_Text"><text:span text:style-name="T9">&gt;</text:span></text:span></text:p>
      <text:p text:style-name="P18"><text:span text:style-name="Source_20_Text"><text:span text:style-name="T3"><text:s text:c="12"/></text:span></text:span><text:span text:style-name="Source_20_Text"><text:span text:style-name="T9">&lt;router-outlet /&gt;</text:span></text:span></text:p>
      <text:p text:style-name="P18"><text:span text:style-name="Source_20_Text"><text:span text:style-name="T3"><text:s text:c="12"/></text:span></text:span><text:span text:style-name="Source_20_Text"><text:span text:style-name="T9">&lt;app-spinner&gt;&lt;/app-spinner&gt;</text:span></text:span></text:p>
      <text:p text:style-name="P18"><text:span text:style-name="Source_20_Text"><text:span text:style-name="T3"><text:s text:c="8"/></text:span></text:span><text:span text:style-name="Source_20_Text"><text:span text:style-name="T9">&lt;/div&gt;</text:span></text:span></text:p>
      <text:p text:style-name="P18"><text:span text:style-name="Source_20_Text"><text:span text:style-name="T4">// ...</text:span></text:span></text:p>
      <text:h text:style-name="P17" text:outline-level="4"><text:span text:style-name="T2">5. Refactored </text:span><text:span text:style-name="Source_20_Text"><text:span text:style-name="T5">DataTables3Component</text:span></text:span></text:h>
      <text:p text:style-name="P21"><text:span text:style-name="T2">Finally, we removed all the manual loading logic (the </text:span><text:span text:style-name="Source_20_Text"><text:span text:style-name="T5">loading</text:span></text:span><text:span text:style-name="T2"> signal and </text:span><text:span text:style-name="Source_20_Text"><text:span text:style-name="T5">mat-spinner</text:span></text:span><text:span text:style-name="T2"> from the template) from </text:span><text:span text:style-name="Source_20_Text"><text:span text:style-name="T5">DataTables3Component</text:span></text:span><text:span text:style-name="T2">, as the new global interceptor now handles this automatically. Your component code is now much cleaner and only contains business logic.</text:span></text:p>
      <text:p text:style-name="P7">This covers the main steps we took to get your global spinner working. Let me know if you'd like to dive into any of these parts in more detail!</text:p>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23">DOCKER-COMPOSE</text:p>
      <text:p text:style-name="P10">Container myapp-backend is unhealthy. I see in docker desktop only this container but without any port mapping. The project is named myapp-jpa-server.</text:p>
      <text:h text:style-name="P2" text:outline-level="1">Gemini</text:h>
      <text:p text:style-name="P13">Thinking</text:p>
      <text:p text:style-name="P21"><text:span text:style-name="T2">Of course. It's frustrating when a container that should be working is marked as "unhealthy". That status, combined with the missing port mapping you're seeing in Docker Desktop, strongly suggests that the </text:span><text:span text:style-name="Source_20_Text"><text:span text:style-name="T5">myapp-backend</text:span></text:span><text:span text:style-name="T2"> container is stuck in a crash loop. The application inside is likely failing to start, so the container exits and restarts repeatedly.</text:span></text:p>
      <text:p text:style-name="P7">I've looked through your configuration and found two issues that are likely causing this problem.</text:p>
      <text:h text:style-name="P3" text:outline-level="3">Issues Found</text:h>
      <text:list xml:id="list1424110322" text:style-name="L2">
        <text:list-item>
          <text:p text:style-name="P33"><text:span text:style-name="Strong_20_Emphasis"><text:span text:style-name="T2">Invalid </text:span></text:span><text:a xlink:type="simple" xlink:href="code-assist-path:/home/vj/Desktop/A/backu20/datatables/myapp-jpa-server/Dockerfile" text:style-name="Internet_20_link" text:visited-style-name="Visited_20_Internet_20_Link"><text:span text:style-name="Strong_20_Emphasis"><text:span text:style-name="Source_20_Text"><text:span text:style-name="T7">Dockerfile</text:span></text:span></text:span></text:a><text:span text:style-name="Strong_20_Emphasis"><text:span text:style-name="T2"> </text:span></text:span><text:span text:style-name="Strong_20_Emphasis"><text:span text:style-name="Source_20_Text"><text:span text:style-name="T5">COPY</text:span></text:span></text:span><text:span text:style-name="Strong_20_Emphasis"><text:span text:style-name="T2"> path:</text:span></text:span><text:span text:style-name="T2"> In your </text:span><text:a xlink:type="simple" xlink:href="code-assist-path:/home/vj/Desktop/A/backu20/datatables/myapp-jpa-server/Dockerfile" text:style-name="Internet_20_link" text:visited-style-name="Visited_20_Internet_20_Link"><text:span text:style-name="Source_20_Text"><text:span text:style-name="T7">/home/vj/Desktop/A/backu20/datatables/myapp-jpa-server/Dockerfile</text:span></text:span></text:a><text:span text:style-name="T2">, the </text:span><text:span text:style-name="Source_20_Text"><text:span text:style-name="T5">COPY</text:span></text:span><text:span text:style-name="T2"> instruction uses an absolute path (</text:span><text:span text:style-name="Source_20_Text"><text:span text:style-name="T5">/target/*.jar</text:span></text:span><text:span text:style-name="T2">). This is incorrect. The path should be relative to the build context, so the leading slash must be removed. Without this fix, the application JAR is not being copied into the image, and the container has nothing to run, causing it to crash.</text:span></text:p>
        </text:list-item>
        <text:list-item>
          <text:p text:style-name="P33"><text:span text:style-name="Strong_20_Emphasis"><text:span text:style-name="T2">Invalid PostgreSQL Image Tag:</text:span></text:span><text:span text:style-name="T2"> In your </text:span><text:a xlink:type="simple" xlink:href="code-assist-path:/home/vj/Desktop/A/backu20/datatables/myapp-jpa-server/docker-compose.yml" text:style-name="Internet_20_link" text:visited-style-name="Visited_20_Internet_20_Link"><text:span text:style-name="Source_20_Text"><text:span text:style-name="T7">docker-compose.yml</text:span></text:span></text:a><text:span text:style-name="T2">, the </text:span><text:span text:style-name="Source_20_Text"><text:span text:style-name="T5">postgres</text:span></text:span><text:span text:style-name="T2"> service is configured to use the image </text:span><text:span text:style-name="Source_20_Text"><text:span text:style-name="T5">postgres:17.5</text:span></text:span><text:span text:style-name="T2">. This tag does not exist on Docker Hub, which could cause issues when trying to pull the image. I'll change it to </text:span><text:span text:style-name="Source_20_Text"><text:span text:style-name="T5">postgres:16</text:span></text:span><text:span text:style-name="T2">, which is a recent and stable version.</text:span></text:p>
        </text:list-item>
      </text:list>
      <text:p text:style-name="P7">Here are the necessary corrections for your files.</text:p>
      <text:h text:style-name="P16" text:outline-level="3"><text:span text:style-name="T2">Corrected </text:span><text:a xlink:type="simple" xlink:href="code-assist-path:/home/vj/Desktop/A/backu20/datatables/myapp-jpa-server/docker-compose.yml" text:style-name="Internet_20_link" text:visited-style-name="Visited_20_Internet_20_Link"><text:span text:style-name="Source_20_Text"><text:span text:style-name="T7">docker-compose.yml</text:span></text:span></text:a></text:h>
      <text:p text:style-name="P21"><text:span text:style-name="T2">I'll update the </text:span><text:span text:style-name="Source_20_Text"><text:span text:style-name="T5">postgres</text:span></text:span><text:span text:style-name="T2"> image tag to a valid one.</text:span></text:p>
      <text:p text:style-name="P11">docker-compose.yml</text:p>
      <text:p text:style-name="P6"><text:span text:style-name="T14">-1</text:span><text:span text:style-name="T15">+1</text:span></text:p>
      <text:p text:style-name="P18"><text:span text:style-name="Source_20_Text"><text:span text:style-name="T3"><text:s text:c="8"/></text:span></text:span><text:span text:style-name="Source_20_Text"><text:span text:style-name="T4">condition: service_healthy</text:span></text:span></text:p>
      <text:p text:style-name="P18"/>
      <text:p text:style-name="P18"><text:span text:style-name="Source_20_Text"><text:span text:style-name="T3"><text:s text:c="2"/></text:span></text:span><text:span text:style-name="Source_20_Text"><text:span text:style-name="T4">postgres:</text:span></text:span></text:p>
      <text:p text:style-name="P18"><text:span text:style-name="Source_20_Text"><text:span text:style-name="T3"><text:s text:c="4"/></text:span></text:span><text:span text:style-name="Source_20_Text"><text:span text:style-name="T4">image: postgres:17.5</text:span></text:span></text:p>
      <text:p text:style-name="P18"><text:span text:style-name="Source_20_Text"><text:span text:style-name="T3"><text:s text:c="4"/></text:span></text:span><text:span text:style-name="Source_20_Text"><text:span text:style-name="T4">image: postgres:16</text:span></text:span></text:p>
      <text:p text:style-name="P18"><text:span text:style-name="Source_20_Text"><text:span text:style-name="T3"><text:s text:c="4"/></text:span></text:span><text:span text:style-name="Source_20_Text"><text:span text:style-name="T4">container_name: myapp-postgres</text:span></text:span></text:p>
      <text:p text:style-name="P18"><text:span text:style-name="Source_20_Text"><text:span text:style-name="T3"><text:s text:c="4"/></text:span></text:span><text:span text:style-name="Source_20_Text"><text:span text:style-name="T4">environment:</text:span></text:span></text:p>
      <text:p text:style-name="P18"><text:span text:style-name="Source_20_Text"><text:span text:style-name="T3"><text:s text:c="6"/></text:span></text:span><text:span text:style-name="Source_20_Text"><text:span text:style-name="T4">POSTGRES_DB: postgres</text:span></text:span></text:p>
      <text:p text:style-name="P18"/>
      <text:h text:style-name="P16" text:outline-level="3"><text:span text:style-name="T2">Corrected </text:span><text:a xlink:type="simple" xlink:href="code-assist-path:/home/vj/Desktop/A/backu20/datatables/myapp-jpa-server/Dockerfile" text:style-name="Internet_20_link" text:visited-style-name="Visited_20_Internet_20_Link"><text:span text:style-name="Source_20_Text"><text:span text:style-name="T7">Dockerfile</text:span></text:span></text:a></text:h>
      <text:p text:style-name="P21"><text:span text:style-name="T2">Here is the fix for the </text:span><text:span text:style-name="Source_20_Text"><text:span text:style-name="T5">COPY</text:span></text:span><text:span text:style-name="T2"> instruction path.</text:span></text:p>
      <text:p text:style-name="P11">Dockerfile</text:p>
      <text:p text:style-name="P6"><text:span text:style-name="T14">-1</text:span><text:span text:style-name="T15">+1</text:span></text:p>
      <text:p text:style-name="P18"><text:span text:style-name="Source_20_Text"><text:span text:style-name="T9">WORKDIR</text:span></text:span><text:span text:style-name="Source_20_Text"><text:span text:style-name="T4"> /app</text:span></text:span></text:p>
      <text:p text:style-name="P18"/>
      <text:p text:style-name="P18"><text:span text:style-name="Source_20_Text"><text:span text:style-name="T11"># Copy the packaged application from the builder stage</text:span></text:span></text:p>
      <text:p text:style-name="P18"><text:soft-page-break/><text:span text:style-name="Source_20_Text"><text:span text:style-name="T9">COPY</text:span></text:span><text:span text:style-name="Source_20_Text"><text:span text:style-name="T4"> /target/*.jar app.jar</text:span></text:span></text:p>
      <text:p text:style-name="P18"><text:span text:style-name="Source_20_Text"><text:span text:style-name="T9">COPY</text:span></text:span><text:span text:style-name="Source_20_Text"><text:span text:style-name="T4"> target/*.jar app.jar</text:span></text:span></text:p>
      <text:p text:style-name="P18"/>
      <text:p text:style-name="P18"><text:span text:style-name="Source_20_Text"><text:span text:style-name="T11"># Expose the port the application runs on (e.g., 9090)</text:span></text:span></text:p>
      <text:p text:style-name="P18"><text:span text:style-name="Source_20_Text"><text:span text:style-name="T9">EXPOSE</text:span></text:span><text:span text:style-name="Source_20_Text"><text:span text:style-name="T4"> 9090</text:span></text:span></text:p>
      <text:p text:style-name="P18"/>
      <text:h text:style-name="P3" text:outline-level="3">What to do next</text:h>
      <text:list xml:id="list2826770294" text:style-name="L3">
        <text:list-item>
          <text:p text:style-name="P34"><text:span text:style-name="Strong_20_Emphasis"><text:span text:style-name="T2">Apply the changes</text:span></text:span><text:span text:style-name="T2"> to your </text:span><text:a xlink:type="simple" xlink:href="code-assist-path:/home/vj/Desktop/A/backu20/datatables/myapp-jpa-server/docker-compose.yml" text:style-name="Internet_20_link" text:visited-style-name="Visited_20_Internet_20_Link"><text:span text:style-name="Source_20_Text"><text:span text:style-name="T7">docker-compose.yml</text:span></text:span></text:a><text:span text:style-name="T2"> and </text:span><text:a xlink:type="simple" xlink:href="code-assist-path:/home/vj/Desktop/A/backu20/datatables/myapp-jpa-server/Dockerfile" text:style-name="Internet_20_link" text:visited-style-name="Visited_20_Internet_20_Link"><text:span text:style-name="Source_20_Text"><text:span text:style-name="T7">Dockerfile</text:span></text:span></text:a><text:span text:style-name="T2">.</text:span></text:p>
        </text:list-item>
        <text:list-item>
          <text:p text:style-name="P34"><text:span text:style-name="Strong_20_Emphasis"><text:span text:style-name="T2">Build your Java application:</text:span></text:span><text:span text:style-name="T2"> Before running Docker Compose, make sure you have a fresh build of your Spring Boot application. Navigate to the </text:span><text:span text:style-name="Source_20_Text"><text:span text:style-name="T5">/home/vj/Desktop/A/backu20/datatables/myapp-jpa-server/</text:span></text:span><text:span text:style-name="T2"> directory and run your build command (e.g., </text:span><text:span text:style-name="Source_20_Text"><text:span text:style-name="T5">mvn clean package</text:span></text:span><text:span text:style-name="T2"> or </text:span><text:span text:style-name="Source_20_Text"><text:span text:style-name="T5">gradle build</text:span></text:span><text:span text:style-name="T2">). This will create the JAR file in the </text:span><text:span text:style-name="Source_20_Text"><text:span text:style-name="T5">target</text:span></text:span><text:span text:style-name="T2"> directory.</text:span></text:p>
        </text:list-item>
        <text:list-item>
          <text:p text:style-name="P34"><text:span text:style-name="Strong_20_Emphasis"><text:span text:style-name="T2">Rebuild and run your containers:</text:span></text:span><text:span text:style-name="T2"> Open a terminal in the same directory as your </text:span><text:a xlink:type="simple" xlink:href="code-assist-path:/home/vj/Desktop/A/backu20/datatables/myapp-jpa-server/docker-compose.yml" text:style-name="Internet_20_link" text:visited-style-name="Visited_20_Internet_20_Link"><text:span text:style-name="Source_20_Text"><text:span text:style-name="T7">docker-compose.yml</text:span></text:span></text:a><text:span text:style-name="T2"> and run the following command. The </text:span><text:span text:style-name="Source_20_Text"><text:span text:style-name="T5">--build</text:span></text:span><text:span text:style-name="T2"> flag is important as it forces Docker to rebuild the </text:span><text:span text:style-name="Source_20_Text"><text:span text:style-name="T5">backend</text:span></text:span><text:span text:style-name="T2"> image with the corrected </text:span><text:a xlink:type="simple" xlink:href="code-assist-path:/home/vj/Desktop/A/backu20/datatables/myapp-jpa-server/Dockerfile" text:style-name="Internet_20_link" text:visited-style-name="Visited_20_Internet_20_Link"><text:span text:style-name="Source_20_Text"><text:span text:style-name="T7">Dockerfile</text:span></text:span></text:a><text:span text:style-name="T2">.</text:span></text:p>
          <text:p text:style-name="P26">bash</text:p>
          <text:p text:style-name="P27"><text:span text:style-name="Source_20_Text"><text:span text:style-name="T4">docker-compose up --build</text:span></text:span></text:p>
        </text:list-item>
      </text:list>
      <text:p text:style-name="P21"><text:span text:style-name="T2">After these steps, your </text:span><text:span text:style-name="Source_20_Text"><text:span text:style-name="T5">myapp-backend</text:span></text:span><text:span text:style-name="T2"> container should start correctly.</text:span></text:p>
      <text:p text:style-name="P21"><text:span text:style-name="T2">If you still encounter issues, the application itself might be failing to start for another reason (like a database connection problem). You can check the logs for the </text:span><text:span text:style-name="Source_20_Text"><text:span text:style-name="T5">backend</text:span></text:span><text:span text:style-name="T2"> service by running:</text:span></text:p>
      <text:p text:style-name="P5">bash</text:p>
      <text:p text:style-name="P18"><text:span text:style-name="Source_20_Text"><text:span text:style-name="T4">docker-compose logs backend</text:span></text:span></text:p>
      <text:p text:style-name="P7">This should give you the information you need to debug further.</text:p>
      <text:p text:style-name="P25">Prompts to try</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docker-compose up</text:p>
      <text:p text:style-name="P23">Creating network "myapp-jpa-server_default" with the default driver</text:p>
      <text:p text:style-name="P23">Creating myapp-jpa-server_myapp-postgres_1 ... done</text:p>
      <text:p text:style-name="P23">Creating myapp-frontend <text:s text:c="19"/>... done</text:p>
      <text:p text:style-name="P23">Creating myapp-jpa-server_backend_1 <text:s text:c="7"/>... done</text:p>
      <text:p text:style-name="P23">Attaching to myapp-frontend, myapp-jpa-server_myapp-postgres_1, myapp-jpa-server_backend_1</text:p>
      <text:p text:style-name="P23">myapp-postgres_1 <text:s/>| The files belonging to this database system will be owned by user "postgres".</text:p>
      <text:p text:style-name="P23">myapp-postgres_1 <text:s/>| This user must also own the server process.</text:p>
      <text:p text:style-name="P23">myapp-postgres_1 <text:s/>| </text:p>
      <text:p text:style-name="P23">myapp-postgres_1 <text:s/>| The database cluster will be initialized with locale "en_US.utf8".</text:p>
      <text:p text:style-name="P23">myapp-postgres_1 <text:s/>| The default database encoding has accordingly been set to "UTF8".</text:p>
      <text:p text:style-name="P23">myapp-postgres_1 <text:s/>| The default text search configuration will be set to "english".</text:p>
      <text:p text:style-name="P23">myapp-postgres_1 <text:s/>| </text:p>
      <text:p text:style-name="P23">myapp-postgres_1 <text:s/>| Data page checksums are disabled.</text:p>
      <text:p text:style-name="P23">myapp-postgres_1 <text:s/>| </text:p>
      <text:p text:style-name="P23"><text:soft-page-break/>myapp-postgres_1 <text:s/>| fixing permissions on existing directory /var/lib/postgresql/data ... ok</text:p>
      <text:p text:style-name="P23">myapp-frontend <text:s text:c="3"/>| /docker-entrypoint.sh: /docker-entrypoint.d/ is not empty, will attempt to perform configuration</text:p>
      <text:p text:style-name="P23">myapp-frontend <text:s text:c="3"/>| /docker-entrypoint.sh: Looking for shell scripts in /docker-entrypoint.d/</text:p>
      <text:p text:style-name="P23">myapp-frontend <text:s text:c="3"/>| /docker-entrypoint.sh: Launching /docker-entrypoint.d/10-listen-on-ipv6-by-default.sh</text:p>
      <text:p text:style-name="P23">myapp-frontend <text:s text:c="3"/>| 10-listen-on-ipv6-by-default.sh: info: Getting the checksum of /etc/nginx/conf.d/default.conf</text:p>
      <text:p text:style-name="P23">myapp-frontend <text:s text:c="3"/>| 10-listen-on-ipv6-by-default.sh: info: Enabled listen on IPv6 in /etc/nginx/conf.d/default.conf</text:p>
      <text:p text:style-name="P23">myapp-frontend <text:s text:c="3"/>| /docker-entrypoint.sh: Sourcing /docker-entrypoint.d/15-local-resolvers.envsh</text:p>
      <text:p text:style-name="P23">myapp-frontend <text:s text:c="3"/>| /docker-entrypoint.sh: Launching /docker-entrypoint.d/20-envsubst-on-templates.sh</text:p>
      <text:p text:style-name="P23">myapp-frontend <text:s text:c="3"/>| /docker-entrypoint.sh: Launching /docker-entrypoint.d/30-tune-worker-processes.sh</text:p>
      <text:p text:style-name="P23">myapp-postgres_1 <text:s/>| creating subdirectories ... ok</text:p>
      <text:p text:style-name="P23">myapp-postgres_1 <text:s/>| selecting dynamic shared memory implementation ... posix</text:p>
      <text:p text:style-name="P23"><text:soft-page-break/>myapp-postgres_1 <text:s/>| selecting default "max_connections" ... 100</text:p>
      <text:p text:style-name="P23">myapp-frontend <text:s text:c="3"/>| /docker-entrypoint.sh: Configuration complete; ready for start up</text:p>
      <text:p text:style-name="P23">myapp-frontend <text:s text:c="3"/>| 2025/09/13 21:34:38 [notice] 1#1: using the "epoll" event method</text:p>
      <text:p text:style-name="P23">myapp-frontend <text:s text:c="3"/>| 2025/09/13 21:34:38 [notice] 1#1: nginx/1.29.1</text:p>
      <text:p text:style-name="P23">myapp-frontend <text:s text:c="3"/>| 2025/09/13 21:34:38 [notice] 1#1: built by gcc 14.2.0 (Alpine 14.2.0) </text:p>
      <text:p text:style-name="P23">myapp-frontend <text:s text:c="3"/>| 2025/09/13 21:34:38 [notice] 1#1: OS: Linux 6.10.14-linuxkit</text:p>
      <text:p text:style-name="P23">myapp-frontend <text:s text:c="3"/>| 2025/09/13 21:34:38 [notice] 1#1: getrlimit(RLIMIT_NOFILE): 1048576:1048576</text:p>
      <text:p text:style-name="P23">myapp-frontend <text:s text:c="3"/>| 2025/09/13 21:34:38 [notice] 1#1: start worker processes</text:p>
      <text:p text:style-name="P23">myapp-postgres_1 <text:s/>| selecting default "shared_buffers" ... 128MB</text:p>
      <text:p text:style-name="P23">myapp-frontend <text:s text:c="3"/>| 2025/09/13 21:34:38 [notice] 1#1: start worker process 30</text:p>
      <text:p text:style-name="P23">myapp-postgres_1 <text:s/>| selecting default time zone ... Etc/UTC</text:p>
      <text:p text:style-name="P23">myapp-frontend <text:s text:c="3"/>| 2025/09/13 21:34:38 [notice] 1#1: start worker process 31</text:p>
      <text:p text:style-name="P23">myapp-postgres_1 <text:s/>| creating configuration files ... ok</text:p>
      <text:p text:style-name="P23">myapp-frontend <text:s text:c="3"/>| 2025/09/13 21:34:38 [notice] 1#1: start worker process 32</text:p>
      <text:p text:style-name="P23"><text:soft-page-break/>myapp-frontend <text:s text:c="3"/>| 2025/09/13 21:34:38 [notice] 1#1: start worker process 33</text:p>
      <text:p text:style-name="P23">myapp-frontend <text:s text:c="3"/>| 2025/09/13 21:34:38 [notice] 1#1: start worker process 34</text:p>
      <text:p text:style-name="P23">myapp-postgres_1 <text:s/>| running bootstrap script ... ok</text:p>
      <text:p text:style-name="P23">myapp-frontend <text:s text:c="3"/>| 2025/09/13 21:34:38 [notice] 1#1: start worker process 35</text:p>
      <text:p text:style-name="P23">myapp-frontend <text:s text:c="3"/>| 2025/09/13 21:34:38 [notice] 1#1: start worker process 36</text:p>
      <text:p text:style-name="P23">myapp-frontend <text:s text:c="3"/>| 2025/09/13 21:34:38 [notice] 1#1: start worker process 37</text:p>
      <text:p text:style-name="P23">myapp-frontend <text:s text:c="3"/>| 2025/09/13 21:34:38 [notice] 1#1: start worker process 38</text:p>
      <text:p text:style-name="P23">myapp-frontend <text:s text:c="3"/>| 2025/09/13 21:34:38 [notice] 1#1: start worker process 39</text:p>
      <text:p text:style-name="P23">myapp-frontend <text:s text:c="3"/>| 2025/09/13 21:34:38 [notice] 1#1: start worker process 40</text:p>
      <text:p text:style-name="P23">myapp-frontend <text:s text:c="3"/>| 2025/09/13 21:34:38 [notice] 1#1: start worker process 41</text:p>
      <text:p text:style-name="P23">myapp-postgres_1 <text:s/>| performing post-bootstrap initialization ... ok</text:p>
      <text:p text:style-name="P23">myapp-postgres_1 <text:s/>| syncing data to disk ... initdb: warning: enabling "trust" authentication for local connections</text:p>
      <text:p text:style-name="P23">myapp-postgres_1 <text:s/>| initdb: hint: You can change this by editing pg_hba.conf or using the option -A, or --auth-local and --auth-host, the next time you run initdb.</text:p>
      <text:p text:style-name="P23"><text:soft-page-break/>myapp-postgres_1 <text:s/>| ok</text:p>
      <text:p text:style-name="P23">myapp-postgres_1 <text:s/>| </text:p>
      <text:p text:style-name="P23">myapp-postgres_1 <text:s/>| </text:p>
      <text:p text:style-name="P23">myapp-postgres_1 <text:s/>| Success. You can now start the database server using:</text:p>
      <text:p text:style-name="P23">myapp-postgres_1 <text:s/>| </text:p>
      <text:p text:style-name="P23">myapp-postgres_1 <text:s/>| <text:s text:c="4"/>pg_ctl -D /var/lib/postgresql/data -l logfile start</text:p>
      <text:p text:style-name="P23">myapp-postgres_1 <text:s/>| </text:p>
      <text:p text:style-name="P23">myapp-postgres_1 <text:s/>| waiting for server to start....2025-09-13 21:34:38.996 UTC [47] LOG: <text:s/>starting PostgreSQL 17.5 (Debian 17.5-1.pgdg120+1) on x86_64-pc-linux-gnu, compiled by gcc (Debian 12.2.0-14) 12.2.0, 64-bit</text:p>
      <text:p text:style-name="P23">myapp-postgres_1 <text:s/>| 2025-09-13 21:34:38.997 UTC [47] LOG: <text:s/>listening on Unix socket "/var/run/postgresql/.s.PGSQL.5432"</text:p>
      <text:p text:style-name="P23">myapp-postgres_1 <text:s/>| 2025-09-13 21:34:39.000 UTC [50] LOG: <text:s/>database system was shut down at 2025-09-13 21:34:38 UTC</text:p>
      <text:p text:style-name="P23">myapp-postgres_1 <text:s/>| 2025-09-13 21:34:39.004 UTC [47] LOG: <text:s/>database system is ready to accept connections</text:p>
      <text:p text:style-name="P23">myapp-postgres_1 <text:s/>| <text:s/>done</text:p>
      <text:p text:style-name="P23">myapp-postgres_1 <text:s/>| server started</text:p>
      <text:p text:style-name="P23">myapp-postgres_1 <text:s/>| </text:p>
      <text:p text:style-name="P23">myapp-postgres_1 <text:s/>| /usr/local/bin/docker-entrypoint.sh: ignoring /docker-entrypoint-initdb.d/*</text:p>
      <text:p text:style-name="P23"><text:soft-page-break/>myapp-postgres_1 <text:s/>| </text:p>
      <text:p text:style-name="P23">myapp-postgres_1 <text:s/>| waiting for server to shut down....2025-09-13 21:34:39.118 UTC [47] LOG: <text:s/>received fast shutdown request</text:p>
      <text:p text:style-name="P23">myapp-postgres_1 <text:s/>| 2025-09-13 21:34:39.129 UTC [47] LOG: <text:s/>aborting any active transactions</text:p>
      <text:p text:style-name="P23">myapp-postgres_1 <text:s/>| 2025-09-13 21:34:39.131 UTC [47] LOG: <text:s/>background worker "logical replication launcher" (PID 53) exited with exit code 1</text:p>
      <text:p text:style-name="P23">myapp-postgres_1 <text:s/>| 2025-09-13 21:34:39.131 UTC [48] LOG: <text:s/>shutting down</text:p>
      <text:p text:style-name="P23">myapp-postgres_1 <text:s/>| 2025-09-13 21:34:39.132 UTC [48] LOG: <text:s/>checkpoint starting: shutdown immediate</text:p>
      <text:p text:style-name="P23">myapp-postgres_1 <text:s/>| 2025-09-13 21:34:39.138 UTC [48] LOG: <text:s/>checkpoint complete: wrote 3 buffers (0.0%); 0 WAL file(s) added, 0 removed, 0 recycled; write=0.002 s, sync=0.001 s, total=0.007 s; sync files=2, longest=0.001 s, average=0.001 s; distance=0 kB, estimate=0 kB; lsn=0/14E4FA0, redo lsn=0/14E4FA0</text:p>
      <text:p text:style-name="P23">myapp-postgres_1 <text:s/>| 2025-09-13 21:34:39.141 UTC [47] LOG: <text:s/>database system is shut down</text:p>
      <text:p text:style-name="P23">myapp-postgres_1 <text:s/>| <text:s/>done</text:p>
      <text:p text:style-name="P23">myapp-postgres_1 <text:s/>| server stopped</text:p>
      <text:p text:style-name="P23">myapp-postgres_1 <text:s/>| </text:p>
      <text:p text:style-name="P23">myapp-postgres_1 <text:s/>| PostgreSQL init process complete; ready for start up.</text:p>
      <text:p text:style-name="P23">myapp-postgres_1 <text:s/>| </text:p>
      <text:p text:style-name="P23"><text:soft-page-break/>myapp-postgres_1 <text:s/>| 2025-09-13 21:34:39.241 UTC [1] LOG: <text:s/>starting PostgreSQL 17.5 (Debian 17.5-1.pgdg120+1) on x86_64-pc-linux-gnu, compiled by gcc (Debian 12.2.0-14) 12.2.0, 64-bit</text:p>
      <text:p text:style-name="P23">myapp-postgres_1 <text:s/>| 2025-09-13 21:34:39.241 UTC [1] LOG: <text:s/>listening on IPv4 address "0.0.0.0", port 5432</text:p>
      <text:p text:style-name="P23">myapp-postgres_1 <text:s/>| 2025-09-13 21:34:39.241 UTC [1] LOG: <text:s/>listening on IPv6 address "::", port 5432</text:p>
      <text:p text:style-name="P23">myapp-postgres_1 <text:s/>| 2025-09-13 21:34:39.244 UTC [1] LOG: <text:s/>listening on Unix socket "/var/run/postgresql/.s.PGSQL.5432"</text:p>
      <text:p text:style-name="P23">myapp-postgres_1 <text:s/>| 2025-09-13 21:34:39.248 UTC [61] LOG: <text:s/>database system was shut down at 2025-09-13 21:34:39 UTC</text:p>
      <text:p text:style-name="P23">myapp-postgres_1 <text:s/>| 2025-09-13 21:34:39.252 UTC [1] LOG: <text:s/>database system is ready to accept connections</text:p>
      <text:p text:style-name="P23">backend_1 <text:s text:c="8"/>| </text:p>
      <text:p text:style-name="P23">backend_1 <text:s text:c="8"/>| <text:s text:c="2"/>. <text:s text:c="2"/>____ <text:s text:c="9"/>_ <text:s text:c="11"/>__ _ _</text:p>
      <text:p text:style-name="P23">backend_1 <text:s text:c="8"/>| <text:s/>/\\ / ___'_ __ _ _(_)_ __ <text:s/>__ _ \ \ \ \</text:p>
      <text:p text:style-name="P23">backend_1 <text:s text:c="8"/>| ( ( )\___ | '_ | '_| | '_ \/ _` | \ \ \ \</text:p>
      <text:p text:style-name="P23">backend_1 <text:s text:c="8"/>| <text:s/>\\/ <text:s/>___)| |_)| | | | | || (_| | <text:s/>) ) ) )</text:p>
      <text:p text:style-name="P23">backend_1 <text:s text:c="8"/>| <text:s text:c="2"/>' <text:s/>|____| .__|_| |_|_| |_\__, | / / / /</text:p>
      <text:p text:style-name="P23">backend_1 <text:s text:c="8"/>| <text:s/>=========|_|==============|___/=/_/_/_/</text:p>
      <text:p text:style-name="P23">backend_1 <text:s text:c="8"/>| </text:p>
      <text:p text:style-name="P23">backend_1 <text:s text:c="8"/>| <text:s/>:: Spring Boot :: <text:s text:c="15"/>(v3.5.5)</text:p>
      <text:p text:style-name="P23"><text:soft-page-break/>backend_1 <text:s text:c="8"/>| </text:p>
      <text:p text:style-name="P23">backend_1 <text:s text:c="8"/>| 2025-09-13T21:34:49.607Z <text:s/>INFO 1 --- [ <text:s text:c="10"/>main] com.angular.backend.BackendApplication <text:s text:c="2"/>: Starting BackendApplication v1.0.0 using Java 17.0.2 with PID 1 (/app/app.jar started by root in /app)</text:p>
      <text:p text:style-name="P23">backend_1 <text:s text:c="8"/>| 2025-09-13T21:34:49.609Z <text:s/>INFO 1 --- [ <text:s text:c="10"/>main] com.angular.backend.BackendApplication <text:s text:c="2"/>: No active profile set, falling back to 1 default profile: "default"</text:p>
      <text:p text:style-name="P23">backend_1 <text:s text:c="8"/>| 2025-09-13T21:34:50.167Z <text:s/>INFO 1 --- [ <text:s text:c="10"/>main] .s.d.r.c.RepositoryConfigurationDelegate : Bootstrapping Spring Data JPA repositories in DEFAULT mode.</text:p>
      <text:p text:style-name="P23">backend_1 <text:s text:c="8"/>| 2025-09-13T21:34:50.233Z <text:s/>INFO 1 --- [ <text:s text:c="10"/>main] .s.d.r.c.RepositoryConfigurationDelegate : Finished Spring Data repository scanning in 58 ms. Found 2 JPA repository interfaces.</text:p>
      <text:p text:style-name="P23">backend_1 <text:s text:c="8"/>| 2025-09-13T21:34:50.715Z <text:s/>INFO 1 --- [ <text:s text:c="10"/>main] o.s.b.w.embedded.tomcat.TomcatWebServer <text:s/>: Tomcat initialized with port 9090 (http)</text:p>
      <text:p text:style-name="P23">backend_1 <text:s text:c="8"/>| 2025-09-13T21:34:50.726Z <text:s/>INFO 1 --- [ <text:s text:c="10"/>main] <text:soft-page-break/>o.apache.catalina.core.StandardService <text:s text:c="2"/>: Starting service [Tomcat]</text:p>
      <text:p text:style-name="P23">backend_1 <text:s text:c="8"/>| 2025-09-13T21:34:50.726Z <text:s/>INFO 1 --- [ <text:s text:c="10"/>main] o.apache.catalina.core.StandardEngine <text:s text:c="3"/>: Starting Servlet engine: [Apache Tomcat/10.1.44]</text:p>
      <text:p text:style-name="P23">backend_1 <text:s text:c="8"/>| 2025-09-13T21:34:50.754Z <text:s/>INFO 1 --- [ <text:s text:c="10"/>main] o.a.c.c.C.[Tomcat].[localhost].[/] <text:s text:c="6"/>: Initializing Spring embedded WebApplicationContext</text:p>
      <text:p text:style-name="P23">backend_1 <text:s text:c="8"/>| 2025-09-13T21:34:50.755Z <text:s/>INFO 1 --- [ <text:s text:c="10"/>main] w.s.c.ServletWebServerApplicationContext : Root WebApplicationContext: initialization completed in 1107 ms</text:p>
      <text:p text:style-name="P23">backend_1 <text:s text:c="8"/>| 2025-09-13T21:34:50.954Z <text:s/>WARN 1 --- [ <text:s text:c="10"/>main] com.zaxxer.hikari.HikariConfig <text:s text:c="10"/>: HikariPool-1 - idleTimeout has been set but has no effect because the pool is operating as a fixed size pool.</text:p>
      <text:p text:style-name="P23">backend_1 <text:s text:c="8"/>| 2025-09-13T21:34:50.955Z <text:s/>INFO 1 --- [ <text:s text:c="10"/>main] com.zaxxer.hikari.HikariDataSource <text:s text:c="6"/>: HikariPool-1 - Starting...</text:p>
      <text:p text:style-name="P23">backend_1 <text:s text:c="8"/>| 2025-09-13T21:34:51.100Z <text:s/>INFO 1 --- [ <text:s text:c="10"/>main] com.zaxxer.hikari.pool.HikariPool <text:s text:c="7"/>: HikariPool-1 - Added connection org.postgresql.jdbc.PgConnection@67acfde9</text:p>
      <text:p text:style-name="P23"><text:soft-page-break/>backend_1 <text:s text:c="8"/>| 2025-09-13T21:34:51.101Z <text:s/>INFO 1 --- [ <text:s text:c="10"/>main] com.zaxxer.hikari.HikariDataSource <text:s text:c="6"/>: HikariPool-1 - Start completed.</text:p>
      <text:p text:style-name="P23">backend_1 <text:s text:c="8"/>| 2025-09-13T21:34:51.131Z <text:s/>INFO 1 --- [ <text:s text:c="10"/>main] org.flywaydb.core.FlywayExecutor <text:s text:c="8"/>: Database: jdbc:postgresql://myapp-postgres:5432/postgres (PostgreSQL 17.5)</text:p>
      <text:p text:style-name="P23">backend_1 <text:s text:c="8"/>| 2025-09-13T21:34:51.168Z <text:s/>INFO 1 --- [ <text:s text:c="10"/>main] o.f.c.i.s.JdbcTableSchemaHistory <text:s text:c="8"/>: Schema history table "public"."flyway_schema_history" does not exist yet</text:p>
      <text:p text:style-name="P23">backend_1 <text:s text:c="8"/>| 2025-09-13T21:34:51.173Z <text:s/>INFO 1 --- [ <text:s text:c="10"/>main] o.f.core.internal.command.DbValidate <text:s text:c="4"/>: Successfully validated 2 migrations (execution time 00:00.017s)</text:p>
      <text:p text:style-name="P23">backend_1 <text:s text:c="8"/>| 2025-09-13T21:34:51.191Z <text:s/>INFO 1 --- [ <text:s text:c="10"/>main] o.f.c.i.s.JdbcTableSchemaHistory <text:s text:c="8"/>: Creating Schema History table "public"."flyway_schema_history" ...</text:p>
      <text:p text:style-name="P23">backend_1 <text:s text:c="8"/>| 2025-09-13T21:34:51.253Z <text:s/>INFO 1 --- [ <text:s text:c="10"/>main] o.f.core.internal.command.DbMigrate <text:s text:c="5"/>: Current version of schema "public": &lt;&lt; Empty Schema &gt;&gt;</text:p>
      <text:p text:style-name="P23">backend_1 <text:s text:c="8"/>| 2025-09-13T21:34:51.260Z <text:s/>INFO 1 --- [ <text:s text:c="10"/>main] <text:soft-page-break/>o.f.core.internal.command.DbMigrate <text:s text:c="5"/>: Migrating schema "public" to version "1 - users table"</text:p>
      <text:p text:style-name="P23">backend_1 <text:s text:c="8"/>| 2025-09-13T21:34:51.289Z <text:s/>INFO 1 --- [ <text:s text:c="10"/>main] o.f.core.internal.command.DbMigrate <text:s text:c="5"/>: Migrating schema "public" to version "2 - employees table"</text:p>
      <text:p text:style-name="P23">backend_1 <text:s text:c="8"/>| 2025-09-13T21:34:51.302Z <text:s/>INFO 1 --- [ <text:s text:c="10"/>main] o.f.core.internal.command.DbMigrate <text:s text:c="5"/>: Successfully applied 2 migrations to schema "public", now at version v2 (execution time 00:00.011s)</text:p>
      <text:p text:style-name="P23">backend_1 <text:s text:c="8"/>| 2025-09-13T21:34:51.382Z <text:s/>INFO 1 --- [ <text:s text:c="10"/>main] o.hibernate.jpa.internal.util.LogHelper <text:s/>: HHH000204: Processing PersistenceUnitInfo [name: default]</text:p>
      <text:p text:style-name="P23">backend_1 <text:s text:c="8"/>| 2025-09-13T21:34:51.420Z <text:s/>INFO 1 --- [ <text:s text:c="10"/>main] org.hibernate.Version <text:s text:c="19"/>: HHH000412: Hibernate ORM core version 6.6.26.Final</text:p>
      <text:p text:style-name="P23">backend_1 <text:s text:c="8"/>| 2025-09-13T21:34:51.450Z <text:s/>INFO 1 --- [ <text:s text:c="10"/>main] o.h.c.internal.RegionFactoryInitiator <text:s text:c="3"/>: HHH000026: Second-level cache disabled</text:p>
      <text:p text:style-name="P23">backend_1 <text:s text:c="8"/>| 2025-09-13T21:34:51.652Z <text:s/>INFO 1 --- [ <text:s text:c="10"/>main] o.s.o.j.p.SpringPersistenceUnitInfo <text:s text:c="5"/>: No LoadTimeWeaver setup: ignoring JPA class transformer</text:p>
      <text:p text:style-name="P23">backend_1 <text:s text:c="8"/>| 2025-09-13T21:34:51.703Z <text:s/>WARN 1 --- [ <text:s text:c="10"/>main] org.hibernate.orm.deprecation <text:s text:c="11"/><text:soft-page-break/>: HHH90000025: PostgreSQLDialect does not need to be specified explicitly using 'hibernate.dialect' (remove the property setting and it will be selected by default)</text:p>
      <text:p text:style-name="P23">backend_1 <text:s text:c="8"/>| 2025-09-13T21:34:51.725Z <text:s/>INFO 1 --- [ <text:s text:c="10"/>main] org.hibernate.orm.connections.pooling <text:s text:c="3"/>: HHH10001005: Database info:</text:p>
      <text:p text:style-name="P23">backend_1 <text:s text:c="8"/>| <text:s text:c="4"/>Database JDBC URL [Connecting through datasource 'HikariDataSource (HikariPool-1)']</text:p>
      <text:p text:style-name="P23">backend_1 <text:s text:c="8"/>| <text:s text:c="4"/>Database driver: undefined/unknown</text:p>
      <text:p text:style-name="P23">backend_1 <text:s text:c="8"/>| <text:s text:c="4"/>Database version: 17.5</text:p>
      <text:p text:style-name="P23">backend_1 <text:s text:c="8"/>| <text:s text:c="4"/>Autocommit mode: undefined/unknown</text:p>
      <text:p text:style-name="P23">backend_1 <text:s text:c="8"/>| <text:s text:c="4"/>Isolation level: undefined/unknown</text:p>
      <text:p text:style-name="P23">backend_1 <text:s text:c="8"/>| <text:s text:c="4"/>Minimum pool size: undefined/unknown</text:p>
      <text:p text:style-name="P23">backend_1 <text:s text:c="8"/>| <text:s text:c="4"/>Maximum pool size: undefined/unknown</text:p>
      <text:p text:style-name="P23">backend_1 <text:s text:c="8"/>| 2025-09-13T21:34:52.246Z <text:s/>INFO 1 --- [ <text:s text:c="10"/>main] o.h.e.t.j.p.i.JtaPlatformInitiator <text:s text:c="6"/>: HHH000489: No JTA platform available (set 'hibernate.transaction.jta.platform' to enable JTA platform integration)</text:p>
      <text:p text:style-name="P23"><text:soft-page-break/>backend_1 <text:s text:c="8"/>| 2025-09-13T21:34:52.248Z <text:s/>INFO 1 --- [ <text:s text:c="10"/>main] j.LocalContainerEntityManagerFactoryBean : Initialized JPA EntityManagerFactory for persistence unit 'default'</text:p>
      <text:p text:style-name="P23">backend_1 <text:s text:c="8"/>| 2025-09-13T21:34:52.440Z <text:s/>INFO 1 --- [ <text:s text:c="10"/>main] o.s.d.j.r.query.QueryEnhancerFactory <text:s text:c="4"/>: Hibernate is in classpath; If applicable, HQL parser will be used.</text:p>
      <text:p text:style-name="P23">backend_1 <text:s text:c="8"/>| 2025-09-13T21:34:52.826Z <text:s/>WARN 1 --- [ <text:s text:c="10"/>main] JpaBaseConfiguration$JpaWebConfiguration : spring.jpa.open-in-view is enabled by default. Therefore, database queries may be performed during view rendering. Explicitly configure spring.jpa.open-in-view to disable this warning</text:p>
      <text:p text:style-name="P23">backend_1 <text:s text:c="8"/>| 2025-09-13T21:34:52.891Z <text:s/>WARN 1 --- [ <text:s text:c="10"/>main] .s.s.UserDetailsServiceAutoConfiguration : </text:p>
      <text:p text:style-name="P23">backend_1 <text:s text:c="8"/>| </text:p>
      <text:p text:style-name="P23">backend_1 <text:s text:c="8"/>| Using generated security password: 9ea6cd26-59b1-49f3-8d64-e0a1416eb92c</text:p>
      <text:p text:style-name="P23">backend_1 <text:s text:c="8"/>| </text:p>
      <text:p text:style-name="P23">backend_1 <text:s text:c="8"/>| This generated password is for development use only. Your security configuration must be updated before running your application in production.</text:p>
      <text:p text:style-name="P23"><text:soft-page-break/>backend_1 <text:s text:c="8"/>| </text:p>
      <text:p text:style-name="P29">backend_1 <text:s text:c="8"/>| 2025-09-13T21:34:52.897Z <text:s/>INFO 1 --- [ <text:s text:c="10"/>main] r$Initia<text:span text:style-name="T18">aa</text:span>lizeUserDetailsManagerConfigurer : Global Authentic<text:span text:style-name="T16">_myapp-postgres_1 ... donetopping myapp-frontend <text:s text:c="19"/>... donvj@mint:~/Desktop/A/backu20/datatables/myapp-jpa-server$ mvn clean install -DskipTests</text:span></text:p>
      <text:p text:style-name="P30">[INFO] Scanning for projects...</text:p>
      <text:p text:style-name="P30">[INFO] </text:p>
      <text:p text:style-name="P30">[INFO] --------------------&lt; com.angular:myapp-jpa-server &gt;--------------------</text:p>
      <text:p text:style-name="P30">[INFO] Building myapp-jpa-server 1.0.0</text:p>
      <text:p text:style-name="P30">[INFO] --------------------------------[ jar ]---------------------------------</text:p>
      <text:p text:style-name="P30">[INFO] </text:p>
      <text:p text:style-name="P30">[INFO] --- maven-clean-plugin:3.4.1:clean (default-clean) @ myapp-jpa-server ---</text:p>
      <text:p text:style-name="P30">[INFO] Deleting /home/vj/Desktop/A/backu20/datatables/myapp-jpa-server/target</text:p>
      <text:p text:style-name="P30">[INFO] </text:p>
      <text:p text:style-name="P30">[INFO] --- maven-resources-plugin:3.3.1:resources (default-resources) @ myapp-jpa-server ---</text:p>
      <text:p text:style-name="P30">[INFO] Copying 4 resources from src/main/resources to target/classes</text:p>
      <text:p text:style-name="P30">[INFO] Copying 2 resources from src/main/resources to target/classes</text:p>
      <text:p text:style-name="P30">[INFO] </text:p>
      <text:p text:style-name="P30">[INFO] --- maven-compiler-plugin:3.14.0:compile (default-compile) @ myapp-jpa-server ---</text:p>
      <text:p text:style-name="P30">[INFO] Recompiling the module because of changed source code.</text:p>
      <text:p text:style-name="P30">[INFO] Compiling 13 source files with javac [debug parameters release 17] to target/classes</text:p>
      <text:p text:style-name="P30">[INFO] </text:p>
      <text:p text:style-name="P30">[INFO] --- maven-resources-plugin:3.3.1:testResources (default-testResources) @ myapp-jpa-server ---</text:p>
      <text:p text:style-name="P30">[INFO] skip non existing resourceDirectory /home/vj/Desktop/A/backu20/datatables/myapp-jpa-server/src/test/resources</text:p>
      <text:p text:style-name="P30">[INFO] </text:p>
      <text:p text:style-name="P30">[INFO] --- maven-compiler-plugin:3.14.0:testCompile (default-testCompile) @ myapp-jpa-server ---</text:p>
      <text:p text:style-name="P30">[INFO] Recompiling the module because of changed dependency.</text:p>
      <text:p text:style-name="P30">[INFO] Compiling 7 source files with javac [debug parameters release 17] to target/test-classes</text:p>
      <text:p text:style-name="P30"><text:soft-page-break/>[INFO] </text:p>
      <text:p text:style-name="P30">[INFO] --- maven-surefire-plugin:3.5.3:test (default-test) @ myapp-jpa-server ---</text:p>
      <text:p text:style-name="P30">[INFO] Tests are skipped.</text:p>
      <text:p text:style-name="P30">[INFO] </text:p>
      <text:p text:style-name="P30">[INFO] --- maven-jar-plugin:3.4.2:jar (default-jar) @ myapp-jpa-server ---</text:p>
      <text:p text:style-name="P30">[INFO] Building jar: /home/vj/Desktop/A/backu20/datatables/myapp-jpa-server/target/myapp-jpa-server-1.0.0.jar</text:p>
      <text:p text:style-name="P30">[INFO] </text:p>
      <text:p text:style-name="P30">[INFO] --- spring-boot-maven-plugin:3.5.5:repackage (repackage) @ myapp-jpa-server ---</text:p>
      <text:p text:style-name="P30">[INFO] Replacing main artifact /home/vj/Desktop/A/backu20/datatables/myapp-jpa-server/target/myapp-jpa-server-1.0.0.jar with repackaged archive, adding nested dependencies in BOOT-INF/.</text:p>
      <text:p text:style-name="P30">[INFO] The original artifact has been renamed to /home/vj/Desktop/A/backu20/datatables/myapp-jpa-server/target/myapp-jpa-server-1.0.0.jar.original</text:p>
      <text:p text:style-name="P30">[INFO] </text:p>
      <text:p text:style-name="P30">[INFO] --- maven-install-plugin:3.1.4:install (default-install) @ myapp-jpa-server ---</text:p>
      <text:p text:style-name="P30">[INFO] Installing /home/vj/Desktop/A/backu20/datatables/myapp-jpa-server/pom.xml to /home/vj/.m2/repository/com/angular/myapp-jpa-server/1.0.0/myapp-jpa-server-1.0.0.pom</text:p>
      <text:p text:style-name="P30">[INFO] Installing /home/vj/Desktop/A/backu20/datatables/myapp-jpa-server/target/myapp-jpa-server-1.0.0.jar to /home/vj/.m2/repository/com/angular/myapp-jpa-server/1.0.0/myapp-jpa-server-1.0.0.jar</text:p>
      <text:p text:style-name="P30">[INFO] ------------------------------------------------------------------------</text:p>
      <text:p text:style-name="P30">[INFO] BUILD SUCCESS</text:p>
      <text:p text:style-name="P30">[INFO] ------------------------------------------------------------------------</text:p>
      <text:p text:style-name="P30">[INFO] Total time: <text:s/>2.268 s</text:p>
      <text:p text:style-name="P30">[INFO] Finished at: 2025-09-13T23:41:37+02:00</text:p>
      <text:p text:style-name="P30">[INFO] ------------------------------------------------------------------------</text:p>
      <text:p text:style-name="P30">vj@mint:~/Desktop/A/backu20/datatables/myapp-jpa-server$ docker-compose up</text:p>
      <text:p text:style-name="P30">ERROR: Network "myapp-jpa-server_default" needs to be recreated - option "com.docker.network.enable_ipv4" has changed</text:p>
      <text:p text:style-name="P30">vj@mint:~/Desktop/A/backu20/datatables/myapp-jpa-server$ docker-compose down</text:p>
      <text:p text:style-name="P30"><text:soft-page-break/>Removing myapp-jpa-server_backend_1 <text:s text:c="7"/>... doneemoving myapp-jpa-server_myapp-postgres_1 ... don</text:p>
      <text:p text:style-name="P30">Removing myapp-frontend <text:s text:c="19"/>... donRemoving network myapp-jpa-server_default</text:p>
      <text:p text:style-name="P30">vj@mint:~/Desktop/A/backu20/datatables/myapp-jpa-server$ docker-compose up</text:p>
      <text:p text:style-name="P30">Creating network "myapp-jpa-server_default" with the default driver</text:p>
      <text:p text:style-name="P30">Creating myapp-frontend <text:s text:c="19"/>... donereating myapp-jpa-server_myapp-postgres_1 ... don</text:p>
      <text:p text:style-name="P30">Creating myapp-jpa-server_backend_1 <text:s text:c="7"/>... done</text:p>
      <text:p text:style-name="P30">Attaching to myapp-jpa-server_myapp-postgres_1, myapp-frontend, myapp-jpa-server_backend_1</text:p>
      <text:p text:style-name="P30">myapp-frontend <text:s text:c="3"/>| /docker-entrypoint.sh: /docker-entrypoint.d/ is not empty, will attempt to perform configuration</text:p>
      <text:p text:style-name="P30">myapp-frontend <text:s text:c="3"/>| /docker-entrypoint.sh: Looking for shell scripts in /docker-entrypoint.d/</text:p>
      <text:p text:style-name="P30">myapp-frontend <text:s text:c="3"/>| /docker-entrypoint.sh: Launching /docker-entrypoint.d/10-listen-on-ipv6-by-default.sh</text:p>
      <text:p text:style-name="P30">myapp-postgres_1 <text:s/>| The files belonging to this database system will be owned by user "postgres".</text:p>
      <text:p text:style-name="P30">myapp-postgres_1 <text:s/>| This user must also own the server process.</text:p>
      <text:p text:style-name="P30">myapp-postgres_1 <text:s/>| </text:p>
      <text:p text:style-name="P30">myapp-postgres_1 <text:s/>| The database cluster will be initialized with locale "en_US.utf8".</text:p>
      <text:p text:style-name="P30">myapp-postgres_1 <text:s/>| The default database encoding has accordingly been set to "UTF8".</text:p>
      <text:p text:style-name="P30">myapp-postgres_1 <text:s/>| The default text search configuration will be set to "english".</text:p>
      <text:p text:style-name="P30">myapp-postgres_1 <text:s/>| </text:p>
      <text:p text:style-name="P30">myapp-postgres_1 <text:s/>| Data page checksums are disabled.</text:p>
      <text:p text:style-name="P30">myapp-postgres_1 <text:s/>| </text:p>
      <text:p text:style-name="P30">myapp-postgres_1 <text:s/>| fixing permissions on existing directory /var/lib/postgresql/data ... ok</text:p>
      <text:p text:style-name="P30">myapp-frontend <text:s text:c="3"/>| 10-listen-on-ipv6-by-default.sh: info: Getting the checksum of /etc/nginx/conf.d/default.conf</text:p>
      <text:p text:style-name="P30">myapp-frontend <text:s text:c="3"/>| 10-listen-on-ipv6-by-default.sh: info: Enabled listen on IPv6 in /etc/nginx/conf.d/default.conf</text:p>
      <text:p text:style-name="P30">myapp-frontend <text:s text:c="3"/>| /docker-entrypoint.sh: Sourcing /docker-entrypoint.d/15-local-resolvers.envsh</text:p>
      <text:p text:style-name="P30">myapp-postgres_1 <text:s/>| creating subdirectories ... ok</text:p>
      <text:p text:style-name="P30">myapp-frontend <text:s text:c="3"/>| /docker-entrypoint.sh: Launching /docker-entrypoint.d/20-envsubst-on-templates.sh</text:p>
      <text:p text:style-name="P30"><text:soft-page-break/>myapp-postgres_1 <text:s/>| selecting dynamic shared memory implementation ... posix</text:p>
      <text:p text:style-name="P30">myapp-frontend <text:s text:c="3"/>| /docker-entrypoint.sh: Launching /docker-entrypoint.d/30-tune-worker-processes.sh</text:p>
      <text:p text:style-name="P30">myapp-postgres_1 <text:s/>| selecting default "max_connections" ... 100</text:p>
      <text:p text:style-name="P30">myapp-postgres_1 <text:s/>| selecting default "shared_buffers" ... 128MB</text:p>
      <text:p text:style-name="P30">myapp-frontend <text:s text:c="3"/>| /docker-entrypoint.sh: Configuration complete; ready for start up</text:p>
      <text:p text:style-name="P30">myapp-frontend <text:s text:c="3"/>| 2025/09/13 21:41:56 [notice] 1#1: using the "epoll" event method</text:p>
      <text:p text:style-name="P30">myapp-frontend <text:s text:c="3"/>| 2025/09/13 21:41:56 [notice] 1#1: nginx/1.29.1</text:p>
      <text:p text:style-name="P30">myapp-frontend <text:s text:c="3"/>| 2025/09/13 21:41:56 [notice] 1#1: built by gcc 14.2.0 (Alpine 14.2.0) </text:p>
      <text:p text:style-name="P30">myapp-frontend <text:s text:c="3"/>| 2025/09/13 21:41:56 [notice] 1#1: OS: Linux 6.10.14-linuxkit</text:p>
      <text:p text:style-name="P30">myapp-frontend <text:s text:c="3"/>| 2025/09/13 21:41:56 [notice] 1#1: getrlimit(RLIMIT_NOFILE): 1048576:1048576</text:p>
      <text:p text:style-name="P30">myapp-postgres_1 <text:s/>| selecting default time zone ... Etc/UTC</text:p>
      <text:p text:style-name="P30">myapp-frontend <text:s text:c="3"/>| 2025/09/13 21:41:56 [notice] 1#1: start worker processes</text:p>
      <text:p text:style-name="P30">myapp-postgres_1 <text:s/>| creating configuration files ... ok</text:p>
      <text:p text:style-name="P30">myapp-postgres_1 <text:s/>| running bootstrap script ... ok</text:p>
      <text:p text:style-name="P30">myapp-postgres_1 <text:s/>| performing post-bootstrap initialization ... ok</text:p>
      <text:p text:style-name="P30">myapp-frontend <text:s text:c="3"/>| 2025/09/13 21:41:56 [notice] 1#1: start worker process 30</text:p>
      <text:p text:style-name="P30">myapp-postgres_1 <text:s/>| syncing data to disk ... ok</text:p>
      <text:p text:style-name="P30">myapp-postgres_1 <text:s/>| </text:p>
      <text:p text:style-name="P30">myapp-postgres_1 <text:s/>| </text:p>
      <text:p text:style-name="P30">myapp-postgres_1 <text:s/>| Success. You can now start the database server using:</text:p>
      <text:p text:style-name="P30">myapp-postgres_1 <text:s/>| </text:p>
      <text:p text:style-name="P30">myapp-postgres_1 <text:s/>| <text:s text:c="4"/>pg_ctl -D /var/lib/postgresql/data -l logfile start</text:p>
      <text:p text:style-name="P30">myapp-postgres_1 <text:s/>| </text:p>
      <text:p text:style-name="P30">myapp-frontend <text:s text:c="3"/>| 2025/09/13 21:41:56 [notice] 1#1: start worker process 31</text:p>
      <text:p text:style-name="P30">myapp-frontend <text:s text:c="3"/>| 2025/09/13 21:41:56 [notice] 1#1: start worker process 32</text:p>
      <text:p text:style-name="P30">myapp-postgres_1 <text:s/>| initdb: warning: enabling "trust" authentication for local connections</text:p>
      <text:p text:style-name="P30">myapp-postgres_1 <text:s/>| initdb: hint: You can change this by editing pg_hba.conf or using the option -A, or --auth-local and --auth-host, the next time you run initdb.</text:p>
      <text:p text:style-name="P30">myapp-frontend <text:s text:c="3"/>| 2025/09/13 21:41:56 [notice] 1#1: start worker process 33</text:p>
      <text:p text:style-name="P30">myapp-frontend <text:s text:c="3"/>| 2025/09/13 21:41:56 [notice] 1#1: start worker process 34</text:p>
      <text:p text:style-name="P30">myapp-frontend <text:s text:c="3"/>| 2025/09/13 21:41:56 [notice] 1#1: start worker process 35</text:p>
      <text:p text:style-name="P30">myapp-frontend <text:s text:c="3"/>| 2025/09/13 21:41:56 [notice] 1#1: start worker process 36</text:p>
      <text:p text:style-name="P30">myapp-frontend <text:s text:c="3"/>| 2025/09/13 21:41:56 [notice] 1#1: start worker process 37</text:p>
      <text:p text:style-name="P30"><text:soft-page-break/>myapp-postgres_1 <text:s/>| waiting for server to start....2025-09-13 21:41:56.597 UTC [48] LOG: <text:s/>starting PostgreSQL 17.5 (Debian 17.5-1.pgdg120+1) on x86_64-pc-linux-gnu, compiled by gcc (Debian 12.2.0-14) 12.2.0, 64-bit</text:p>
      <text:p text:style-name="P30">myapp-postgres_1 <text:s/>| 2025-09-13 21:41:56.599 UTC [48] LOG: <text:s/>listening on Unix socket "/var/run/postgresql/.s.PGSQL.5432"</text:p>
      <text:p text:style-name="P30">myapp-frontend <text:s text:c="3"/>| 2025/09/13 21:41:56 [notice] 1#1: start worker process 38</text:p>
      <text:p text:style-name="P30">myapp-frontend <text:s text:c="3"/>| 2025/09/13 21:41:56 [notice] 1#1: start worker process 39</text:p>
      <text:p text:style-name="P30">myapp-frontend <text:s text:c="3"/>| 2025/09/13 21:41:56 [notice] 1#1: start worker process 40</text:p>
      <text:p text:style-name="P30">myapp-frontend <text:s text:c="3"/>| 2025/09/13 21:41:56 [notice] 1#1: start worker process 41</text:p>
      <text:p text:style-name="P30">myapp-postgres_1 <text:s/>| 2025-09-13 21:41:56.602 UTC [51] LOG: <text:s/>database system was shut down at 2025-09-13 21:41:56 UTC</text:p>
      <text:p text:style-name="P30">myapp-postgres_1 <text:s/>| 2025-09-13 21:41:56.606 UTC [48] LOG: <text:s/>database system is ready to accept connections</text:p>
      <text:p text:style-name="P30">myapp-postgres_1 <text:s/>| <text:s/>done</text:p>
      <text:p text:style-name="P30">myapp-postgres_1 <text:s/>| server started</text:p>
      <text:p text:style-name="P30">myapp-postgres_1 <text:s/>| </text:p>
      <text:p text:style-name="P30">myapp-postgres_1 <text:s/>| /usr/local/bin/docker-entrypoint.sh: ignoring /docker-entrypoint-initdb.d/*</text:p>
      <text:p text:style-name="P30">myapp-postgres_1 <text:s/>| </text:p>
      <text:p text:style-name="P30">myapp-postgres_1 <text:s/>| 2025-09-13 21:41:56.718 UTC [48] LOG: <text:s/>received fast shutdown request</text:p>
      <text:p text:style-name="P30">myapp-postgres_1 <text:s/>| waiting for server to shut down....2025-09-13 21:41:56.728 UTC [48] LOG: <text:s/>aborting any active transactions</text:p>
      <text:p text:style-name="P30">myapp-postgres_1 <text:s/>| 2025-09-13 21:41:56.729 UTC [48] LOG: <text:s/>background worker "logical replication launcher" (PID 54) exited with exit code 1</text:p>
      <text:p text:style-name="P30">myapp-postgres_1 <text:s/>| 2025-09-13 21:41:56.729 UTC [49] LOG: <text:s/>shutting down</text:p>
      <text:p text:style-name="P30">myapp-postgres_1 <text:s/>| 2025-09-13 21:41:56.730 UTC [49] LOG: <text:s/>checkpoint starting: shutdown immediate</text:p>
      <text:p text:style-name="P30">myapp-postgres_1 <text:s/>| 2025-09-13 21:41:56.736 UTC [49] LOG: <text:s/>checkpoint complete: wrote 3 buffers (0.0%); 0 WAL file(s) added, 0 removed, 0 recycled; write=0.002 s, sync=0.001 s, total=0.007 s; sync files=2, longest=0.001 s, average=0.001 s; distance=0 kB, estimate=0 kB; lsn=0/14E4FA0, redo lsn=0/14E4FA0</text:p>
      <text:p text:style-name="P30">myapp-postgres_1 <text:s/>| 2025-09-13 21:41:56.739 UTC [48] LOG: <text:s/>database system is shut down</text:p>
      <text:p text:style-name="P30">myapp-postgres_1 <text:s/>| <text:s/>done</text:p>
      <text:p text:style-name="P30">myapp-postgres_1 <text:s/>| server stopped</text:p>
      <text:p text:style-name="P30">myapp-postgres_1 <text:s/>| </text:p>
      <text:p text:style-name="P30">myapp-postgres_1 <text:s/>| PostgreSQL init process complete; ready for start up.</text:p>
      <text:p text:style-name="P30">myapp-postgres_1 <text:s/>| </text:p>
      <text:p text:style-name="P30"><text:soft-page-break/>myapp-postgres_1 <text:s/>| 2025-09-13 21:41:56.857 UTC [1] LOG: <text:s/>starting PostgreSQL 17.5 (Debian 17.5-1.pgdg120+1) on x86_64-pc-linux-gnu, compiled by gcc (Debian 12.2.0-14) 12.2.0, 64-bit</text:p>
      <text:p text:style-name="P30">myapp-postgres_1 <text:s/>| 2025-09-13 21:41:56.857 UTC [1] LOG: <text:s/>listening on IPv4 address "0.0.0.0", port 5432</text:p>
      <text:p text:style-name="P30">myapp-postgres_1 <text:s/>| 2025-09-13 21:41:56.857 UTC [1] LOG: <text:s/>listening on IPv6 address "::", port 5432</text:p>
      <text:p text:style-name="P30">myapp-postgres_1 <text:s/>| 2025-09-13 21:41:56.859 UTC [1] LOG: <text:s/>listening on Unix socket "/var/run/postgresql/.s.PGSQL.5432"</text:p>
      <text:p text:style-name="P30">myapp-postgres_1 <text:s/>| 2025-09-13 21:41:56.862 UTC [62] LOG: <text:s/>database system was shut down at 2025-09-13 21:41:56 UTC</text:p>
      <text:p text:style-name="P30">myapp-postgres_1 <text:s/>| 2025-09-13 21:41:56.866 UTC [1] LOG: <text:s/>database system is ready to accept connections</text:p>
      <text:p text:style-name="P30">backend_1 <text:s text:c="8"/>| </text:p>
      <text:p text:style-name="P30">backend_1 <text:s text:c="8"/>| <text:s text:c="2"/>. <text:s text:c="2"/>____ <text:s text:c="9"/>_ <text:s text:c="11"/>__ _ _</text:p>
      <text:p text:style-name="P30">backend_1 <text:s text:c="8"/>| <text:s/>/\\ / ___'_ __ _ _(_)_ __ <text:s/>__ _ \ \ \ \</text:p>
      <text:p text:style-name="P30">backend_1 <text:s text:c="8"/>| ( ( )\___ | '_ | '_| | '_ \/ _` | \ \ \ \</text:p>
      <text:p text:style-name="P30">backend_1 <text:s text:c="8"/>| <text:s/>\\/ <text:s/>___)| |_)| | | | | || (_| | <text:s/>) ) ) )</text:p>
      <text:p text:style-name="P30">backend_1 <text:s text:c="8"/>| <text:s text:c="2"/>' <text:s/>|____| .__|_| |_|_| |_\__, | / / / /</text:p>
      <text:p text:style-name="P30">backend_1 <text:s text:c="8"/>| <text:s/>=========|_|==============|___/=/_/_/_/</text:p>
      <text:p text:style-name="P30">backend_1 <text:s text:c="8"/>| </text:p>
      <text:p text:style-name="P30">backend_1 <text:s text:c="8"/>| <text:s/>:: Spring Boot :: <text:s text:c="15"/>(v3.5.5)</text:p>
      <text:p text:style-name="P30">backend_1 <text:s text:c="8"/>| </text:p>
      <text:p text:style-name="P30">backend_1 <text:s text:c="8"/>| 2025-09-13T21:42:07.178Z <text:s/>INFO 1 --- [ <text:s text:c="10"/>main] com.angular.backend.BackendApplication <text:s text:c="2"/>: Starting BackendApplication v1.0.0 using Java 17.0.2 with PID 1 (/app/app.jar started by root in /app)</text:p>
      <text:p text:style-name="P30">backend_1 <text:s text:c="8"/>| 2025-09-13T21:42:07.181Z <text:s/>INFO 1 --- [ <text:s text:c="10"/>main] com.angular.backend.BackendApplication <text:s text:c="2"/>: No active profile set, falling back to 1 default profile: "default"</text:p>
      <text:p text:style-name="P30">backend_1 <text:s text:c="8"/>| 2025-09-13T21:42:07.876Z <text:s/>INFO 1 --- [ <text:s text:c="10"/>main] .s.d.r.c.RepositoryConfigurationDelegate : Bootstrapping Spring Data JPA repositories in DEFAULT mode.</text:p>
      <text:p text:style-name="P30">backend_1 <text:s text:c="8"/>| 2025-09-13T21:42:07.923Z <text:s/>INFO 1 --- [ <text:s text:c="10"/>main] .s.d.r.c.RepositoryConfigurationDelegate : Finished Spring Data repository scanning in 40 ms. Found 2 JPA repository interfaces.</text:p>
      <text:p text:style-name="P30">backend_1 <text:s text:c="8"/>| 2025-09-13T21:42:08.400Z <text:s/>INFO 1 --- [ <text:s text:c="10"/>main] o.s.b.w.embedded.tomcat.TomcatWebServer <text:s/>: Tomcat initialized with port 9090 (http)</text:p>
      <text:p text:style-name="P30">backend_1 <text:s text:c="8"/>| 2025-09-13T21:42:08.409Z <text:s/>INFO 1 --- [ <text:s text:c="10"/>main] o.apache.catalina.core.StandardService <text:s text:c="2"/>: Starting service [Tomcat]</text:p>
      <text:p text:style-name="P30"><text:soft-page-break/>backend_1 <text:s text:c="8"/>| 2025-09-13T21:42:08.409Z <text:s/>INFO 1 --- [ <text:s text:c="10"/>main] o.apache.catalina.core.StandardEngine <text:s text:c="3"/>: Starting Servlet engine: [Apache Tomcat/10.1.44]</text:p>
      <text:p text:style-name="P30">backend_1 <text:s text:c="8"/>| 2025-09-13T21:42:08.434Z <text:s/>INFO 1 --- [ <text:s text:c="10"/>main] o.a.c.c.C.[Tomcat].[localhost].[/] <text:s text:c="6"/>: Initializing Spring embedded WebApplicationContext</text:p>
      <text:p text:style-name="P30">backend_1 <text:s text:c="8"/>| 2025-09-13T21:42:08.436Z <text:s/>INFO 1 --- [ <text:s text:c="10"/>main] w.s.c.ServletWebServerApplicationContext : Root WebApplicationContext: initialization completed in 1212 ms</text:p>
      <text:p text:style-name="P30">backend_1 <text:s text:c="8"/>| 2025-09-13T21:42:08.637Z <text:s/>WARN 1 --- [ <text:s text:c="10"/>main] com.zaxxer.hikari.HikariConfig <text:s text:c="10"/>: HikariPool-1 - idleTimeout has been set but has no effect because the pool is operating as a fixed size pool.</text:p>
      <text:p text:style-name="P30">backend_1 <text:s text:c="8"/>| 2025-09-13T21:42:08.638Z <text:s/>INFO 1 --- [ <text:s text:c="10"/>main] com.zaxxer.hikari.HikariDataSource <text:s text:c="6"/>: HikariPool-1 - Starting...</text:p>
      <text:p text:style-name="P30">backend_1 <text:s text:c="8"/>| 2025-09-13T21:42:08.800Z <text:s/>INFO 1 --- [ <text:s text:c="10"/>main] com.zaxxer.hikari.pool.HikariPool <text:s text:c="7"/>: HikariPool-1 - Added connection org.postgresql.jdbc.PgConnection@1118d539</text:p>
      <text:p text:style-name="P30">backend_1 <text:s text:c="8"/>| 2025-09-13T21:42:08.803Z <text:s/>INFO 1 --- [ <text:s text:c="10"/>main] com.zaxxer.hikari.HikariDataSource <text:s text:c="6"/>: HikariPool-1 - Start completed.</text:p>
      <text:p text:style-name="P30">backend_1 <text:s text:c="8"/>| 2025-09-13T21:42:08.856Z <text:s/>INFO 1 --- [ <text:s text:c="10"/>main] org.flywaydb.core.FlywayExecutor <text:s text:c="8"/>: Database: jdbc:postgresql://myapp-postgres:5432/postgres (PostgreSQL 17.5)</text:p>
      <text:p text:style-name="P30">backend_1 <text:s text:c="8"/>| 2025-09-13T21:42:08.905Z <text:s/>INFO 1 --- [ <text:s text:c="10"/>main] o.f.c.i.s.JdbcTableSchemaHistory <text:s text:c="8"/>: Schema history table "public"."flyway_schema_history" does not exist yet</text:p>
      <text:p text:style-name="P30">backend_1 <text:s text:c="8"/>| 2025-09-13T21:42:08.910Z <text:s/>INFO 1 --- [ <text:s text:c="10"/>main] o.f.core.internal.command.DbValidate <text:s text:c="4"/>: Successfully validated 2 migrations (execution time 00:00.022s)</text:p>
      <text:p text:style-name="P30">backend_1 <text:s text:c="8"/>| 2025-09-13T21:42:08.927Z <text:s/>INFO 1 --- [ <text:s text:c="10"/>main] o.f.c.i.s.JdbcTableSchemaHistory <text:s text:c="8"/>: Creating Schema History table "public"."flyway_schema_history" ...</text:p>
      <text:p text:style-name="P30">backend_1 <text:s text:c="8"/>| 2025-09-13T21:42:08.970Z <text:s/>INFO 1 --- [ <text:s text:c="10"/>main] o.f.core.internal.command.DbMigrate <text:s text:c="5"/>: Current version of schema "public": &lt;&lt; Empty Schema &gt;&gt;</text:p>
      <text:p text:style-name="P30">backend_1 <text:s text:c="8"/>| 2025-09-13T21:42:08.974Z <text:s/>INFO 1 --- [ <text:s text:c="10"/>main] o.f.core.internal.command.DbMigrate <text:s text:c="5"/>: Migrating schema "public" to version "1 - users table"</text:p>
      <text:p text:style-name="P30">backend_1 <text:s text:c="8"/>| 2025-09-13T21:42:08.998Z <text:s/>INFO 1 --- [ <text:s text:c="10"/>main] o.f.core.internal.command.DbMigrate <text:s text:c="5"/>: Migrating schema "public" to version "2 - employees table"</text:p>
      <text:p text:style-name="P30"><text:soft-page-break/>backend_1 <text:s text:c="8"/>| 2025-09-13T21:42:09.017Z <text:s/>INFO 1 --- [ <text:s text:c="10"/>main] o.f.core.internal.command.DbMigrate <text:s text:c="5"/>: Successfully applied 2 migrations to schema "public", now at version v2 (execution time 00:00.010s)</text:p>
      <text:p text:style-name="P30">backend_1 <text:s text:c="8"/>| 2025-09-13T21:42:09.094Z <text:s/>INFO 1 --- [ <text:s text:c="10"/>main] o.hibernate.jpa.internal.util.LogHelper <text:s/>: HHH000204: Processing PersistenceUnitInfo [name: default]</text:p>
      <text:p text:style-name="P30">backend_1 <text:s text:c="8"/>| 2025-09-13T21:42:09.135Z <text:s/>INFO 1 --- [ <text:s text:c="10"/>main] org.hibernate.Version <text:s text:c="19"/>: HHH000412: Hibernate ORM core version 6.6.26.Final</text:p>
      <text:p text:style-name="P30">backend_1 <text:s text:c="8"/>| 2025-09-13T21:42:09.163Z <text:s/>INFO 1 --- [ <text:s text:c="10"/>main] o.h.c.internal.RegionFactoryInitiator <text:s text:c="3"/>: HHH000026: Second-level cache disabled</text:p>
      <text:p text:style-name="P30">backend_1 <text:s text:c="8"/>| 2025-09-13T21:42:09.362Z <text:s/>INFO 1 --- [ <text:s text:c="10"/>main] o.s.o.j.p.SpringPersistenceUnitInfo <text:s text:c="5"/>: No LoadTimeWeaver setup: ignoring JPA class transformer</text:p>
      <text:p text:style-name="P30">backend_1 <text:s text:c="8"/>| 2025-09-13T21:42:09.416Z <text:s/>WARN 1 --- [ <text:s text:c="10"/>main] org.hibernate.orm.deprecation <text:s text:c="11"/>: HHH90000025: PostgreSQLDialect does not need to be specified explicitly using 'hibernate.dialect' (remove the property setting and it will be selected by default)</text:p>
      <text:p text:style-name="P30">backend_1 <text:s text:c="8"/>| 2025-09-13T21:42:09.428Z <text:s/>INFO 1 --- [ <text:s text:c="10"/>main] org.hibernate.orm.connections.pooling <text:s text:c="3"/>: HHH10001005: Database info:</text:p>
      <text:p text:style-name="P30">backend_1 <text:s text:c="8"/>| <text:s text:c="4"/>Database JDBC URL [Connecting through datasource 'HikariDataSource (HikariPool-1)']</text:p>
      <text:p text:style-name="P30">backend_1 <text:s text:c="8"/>| <text:s text:c="4"/>Database driver: undefined/unknown</text:p>
      <text:p text:style-name="P30">backend_1 <text:s text:c="8"/>| <text:s text:c="4"/>Database version: 17.5</text:p>
      <text:p text:style-name="P30">backend_1 <text:s text:c="8"/>| <text:s text:c="4"/>Autocommit mode: undefined/unknown</text:p>
      <text:p text:style-name="P30">backend_1 <text:s text:c="8"/>| <text:s text:c="4"/>Isolation level: undefined/unknown</text:p>
      <text:p text:style-name="P30">backend_1 <text:s text:c="8"/>| <text:s text:c="4"/>Minimum pool size: undefined/unknown</text:p>
      <text:p text:style-name="P30">backend_1 <text:s text:c="8"/>| <text:s text:c="4"/>Maximum pool size: undefined/unknown</text:p>
      <text:p text:style-name="P30">backend_1 <text:s text:c="8"/>| 2025-09-13T21:42:10.042Z <text:s/>INFO 1 --- [ <text:s text:c="10"/>main] o.h.e.t.j.p.i.JtaPlatformInitiator <text:s text:c="6"/>: HHH000489: No JTA platform available (set 'hibernate.transaction.jta.platform' to enable JTA platform integration)</text:p>
      <text:p text:style-name="P30">backend_1 <text:s text:c="8"/>| 2025-09-13T21:42:10.044Z <text:s/>INFO 1 --- [ <text:s text:c="10"/>main] j.LocalContainerEntityManagerFactoryBean : Initialized JPA EntityManagerFactory for persistence unit 'default'</text:p>
      <text:p text:style-name="P30">backend_1 <text:s text:c="8"/>| 2025-09-13T21:42:10.340Z <text:s/>INFO 1 --- [ <text:s text:c="10"/>main] o.s.d.j.r.query.QueryEnhancerFactory <text:s text:c="4"/>: Hibernate is in classpath; If applicable, HQL parser will be used.</text:p>
      <text:p text:style-name="P30">backend_1 <text:s text:c="8"/>| 2025-09-13T21:42:11.048Z <text:s/>WARN 1 --- [ <text:s text:c="10"/>main] JpaBaseConfiguration$JpaWebConfiguration : spring.jpa.open-in-view is enabled by default. Therefore, database queries may be performed during view rendering. Explicitly configure spring.jpa.open-in-view to disable this warning</text:p>
      <text:p text:style-name="P30"><text:soft-page-break/>backend_1 <text:s text:c="8"/>| 2025-09-13T21:42:11.135Z <text:s/>WARN 1 --- [ <text:s text:c="10"/>main] .s.s.UserDetailsServiceAutoConfiguration : </text:p>
      <text:p text:style-name="P30">backend_1 <text:s text:c="8"/>| </text:p>
      <text:p text:style-name="P30">backend_1 <text:s text:c="8"/>| Using generated security password: 89316036-984e-43da-b461-d7f4c43c11f5</text:p>
      <text:p text:style-name="P30">backend_1 <text:s text:c="8"/>| </text:p>
      <text:p text:style-name="P30">backend_1 <text:s text:c="8"/>| This generated password is for development use only. Your security configuration must be updated before running your application in production.</text:p>
      <text:p text:style-name="P30">backend_1 <text:s text:c="8"/>| </text:p>
      <text:p text:style-name="P30">backend_1 <text:s text:c="8"/>| 2025-09-13T21:42:11.145Z <text:s/>INFO 1 --- [ <text:s text:c="10"/>main] r$InitializeUserDetailsManagerConfigurer : Global AuthenticationManager configured with UserDetailsService bean with name inMemoryUserDetailsManager</text:p>
      <text:p text:style-name="P30">backend_1 <text:s text:c="8"/>| 2025-09-13T21:42:12.127Z <text:s/>INFO 1 --- [ <text:s text:c="10"/>main] o.s.b.w.embedded.tomcat.TomcatWebServer <text:s/>: Tomcat started on port 9090 (http) with context path '/'</text:p>
      <text:p text:style-name="P30">backend_1 <text:s text:c="8"/>| 2025-09-13T21:42:12.143Z <text:s/>INFO 1 --- [ <text:s text:c="10"/>main] com.angular.backend.BackendApplication <text:s text:c="2"/>: Started BackendApplication in 5.282 seconds (process running for 5.591)</text:p>
      <text:p text:style-name="P23"/>
      <text:p text:style-name="P23"/>
      <text:p text:style-name="P23">Caused by: org.springframework.security.web.UnreachableFilterChainException: A filter chain that matches any request [...] has already been configured, which means that this filter chain [...] will never get invoked. Please use `HttpSecurity#securityMatcher` to ensure that there is only one filter chain configured for 'any request' and that the 'any request' filter chain is published la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2T02:16:24.646538666</meta:creation-date>
    <dc:date>2025-09-14T00:59:07.030986279</dc:date>
    <meta:editing-duration>PT18H7M8S</meta:editing-duration>
    <meta:editing-cycles>4</meta:editing-cycles>
    <meta:generator>LibreOffice/7.3.7.2$Linux_X86_64 LibreOffice_project/30$Build-2</meta:generator>
    <meta:document-statistic meta:table-count="0" meta:image-count="9" meta:object-count="0" meta:page-count="46" meta:paragraph-count="1099" meta:word-count="7188" meta:character-count="67041" meta:non-whitespace-character-count="56100"/>
  </office:meta>
</office:document-meta>
</file>