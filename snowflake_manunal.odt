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90B67BBED5.png" manifest:media-type="image/png"/>
  <manifest:file-entry manifest:full-path="Pictures/10000001000007800000049050A8D7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Ubuntu Mono" svg:font-family="'Ubuntu Mono', 'Liberation Mono'"/>
    <style:font-face style:name="system-ui" svg:font-family="system-ui, Ubuntu"/>
  </office:font-face-decls>
  <office:automatic-styles>
    <style:style style:name="P1" style:family="paragraph" style:parent-style-name="Text_20_body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margin-top="0in" fo:margin-bottom="0.0972in" style:contextual-spacing="false" fo:text-align="start" style:justify-single-word="false" style:writing-mode="lr-tb"/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top="0in" fo:margin-bottom="0.0972in" style:contextual-spacing="false" fo:text-align="start" style:justify-single-word="false" style:writing-mode="lr-tb"/>
      <style:text-properties fo:color="#c9211e" loext:opacity="100%" fo:font-size="20pt" style:font-size-asian="20pt" style:font-size-complex="20pt"/>
    </style:style>
    <style:style style:name="P4" style:family="paragraph" style:parent-style-name="Standard">
      <style:paragraph-properties fo:margin-top="0in" fo:margin-bottom="0.0972in" style:contextual-spacing="false" fo:text-align="start" style:justify-single-word="false" style:writing-mode="lr-tb"/>
      <style:text-properties style:font-name-asian="Liberation Serif1" style:font-name-complex="Liberation Serif1"/>
    </style:style>
    <style:style style:name="P5" style:family="paragraph" style:parent-style-name="Text_20_body">
      <style:paragraph-properties fo:margin-top="0in" fo:margin-bottom="0.0972in" style:contextual-spacing="false" fo:text-align="start" style:justify-single-word="false" style:writing-mode="lr-tb"/>
      <style:text-properties style:font-name-asian="Liberation Serif1" style:font-name-complex="Liberation Serif1"/>
    </style:style>
    <style:style style:name="P6" style:family="paragraph" style:parent-style-name="Text_20_body">
      <style:paragraph-properties fo:margin-top="0in" fo:margin-bottom="0.0972in" style:contextual-spacing="false" fo:text-align="start" style:justify-single-word="false" style:writing-mode="lr-tb"/>
    </style:style>
    <style:style style:name="P7" style:family="paragraph" style:parent-style-name="Text_20_body">
      <style:paragraph-properties fo:margin-left="0.4925in" fo:margin-right="0in" fo:margin-top="0in" fo:margin-bottom="0in" style:contextual-spacing="false" fo:text-align="start" style:justify-single-word="false" fo:orphans="2" fo:widows="2" fo:padding="0in" fo:border="none" style:shadow="none" style:writing-mode="lr-tb">
        <style:tab-stops>
          <style:tab-stop style:position="0.4925in"/>
        </style:tab-stops>
      </style:paragraph-properties>
      <style:text-properties fo:font-variant="normal" fo:text-transform="none" fo:color="#616161" loext:opacity="100%" style:font-name="system-ui" fo:font-size="10pt" fo:letter-spacing="normal" fo:font-style="normal" fo:font-weight="normal" style:font-size-asian="10pt" style:font-style-asian="normal" style:font-weight-asian="normal" style:font-name-complex="system-ui"/>
    </style:style>
    <style:style style:name="P8" style:family="paragraph" style:parent-style-name="Text_20_body">
      <style:paragraph-properties fo:margin-top="0in" fo:margin-bottom="0.0972in" style:contextual-spacing="false" fo:text-align="start" style:justify-single-word="false" style:writing-mode="lr-tb"/>
      <style:text-properties fo:color="#000000" loext:opacity="100%" fo:font-size="12pt" style:font-size-asian="12pt" style:font-size-complex="12pt"/>
    </style:style>
    <style:style style:name="P9" style:family="paragraph" style:parent-style-name="Text_20_body">
      <style:paragraph-properties fo:margin-top="0in" fo:margin-bottom="0.0972in" style:contextual-spacing="false" fo:text-align="start" style:justify-single-word="false" style:writing-mode="lr-tb"/>
      <style:text-properties fo:color="#ff0000" loext:opacity="100%" fo:font-size="20pt" style:font-size-asian="20pt" style:font-size-complex="20pt"/>
    </style:style>
    <style:style style:name="P10" style:family="paragraph" style:parent-style-name="Heading_20_5">
      <style:paragraph-properties fo:margin-left="0in" fo:margin-right="0in" fo:text-indent="0in" style:auto-text-indent="false"/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 style:list-style-name="WW8Num2">
      <style:paragraph-properties fo:margin-left="0.4925in" fo:margin-right="0in" fo:margin-top="0in" fo:margin-bottom="0in" style:contextual-spacing="false" fo:text-align="start" style:justify-single-word="false" fo:orphans="2" fo:widows="2" fo:text-indent="0in" style:auto-text-indent="false" fo:padding="0in" fo:border="none" style:shadow="none" style:writing-mode="lr-tb">
        <style:tab-stops>
          <style:tab-stop style:position="0.4925in"/>
        </style:tab-stops>
      </style:paragraph-properties>
    </style:style>
    <style:style style:name="P12" style:family="paragraph" style:parent-style-name="Text_20_body" style:list-style-name="WW8Num3">
      <style:paragraph-properties fo:margin-left="0.4925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13" style:family="paragraph" style:parent-style-name="Text_20_body" style:list-style-name="WW8Num3">
      <style:paragraph-properties fo:margin-left="0.4925in" fo:margin-right="0in" fo:text-indent="-0.1965in" style:auto-text-indent="false">
        <style:tab-stops>
          <style:tab-stop style:position="0in"/>
        </style:tab-stops>
      </style:paragraph-properties>
    </style:style>
    <style:style style:name="P14" style:family="paragraph" style:parent-style-name="Text_20_body">
      <style:paragraph-properties fo:margin-left="0.4925in" fo:margin-right="0in" fo:margin-top="0in" fo:margin-bottom="0in" style:contextual-spacing="false" fo:text-align="start" style:justify-single-word="false" fo:orphans="2" fo:widows="2" fo:padding="0in" fo:border="none" style:shadow="none" style:writing-mode="lr-tb">
        <style:tab-stops>
          <style:tab-stop style:position="0.4925in"/>
        </style:tab-stops>
      </style:paragraph-properties>
      <style:text-properties fo:font-variant="normal" fo:text-transform="none" fo:color="#616161" loext:opacity="100%" style:font-name="system-ui" fo:font-size="10pt" fo:letter-spacing="normal" fo:font-style="normal" fo:font-weight="normal" style:font-size-asian="10pt" style:font-style-asian="normal" style:font-weight-asian="normal" style:font-name-complex="system-ui"/>
    </style:style>
    <style:style style:name="P15" style:family="paragraph" style:parent-style-name="Text_20_body">
      <style:paragraph-properties fo:margin-left="0.4925in" fo:margin-right="0in" fo:margin-top="0in" fo:margin-bottom="0in" style:contextual-spacing="false" fo:text-align="start" style:justify-single-word="false" fo:orphans="2" fo:widows="2" fo:padding="0in" fo:border="none" style:shadow="none" style:writing-mode="lr-tb">
        <style:tab-stops>
          <style:tab-stop style:position="0.4925in"/>
        </style:tab-stops>
      </style:paragraph-properties>
      <style:text-properties fo:font-variant="normal" fo:text-transform="none" fo:color="#616161" loext:opacity="100%" style:font-name="system-ui" fo:font-size="10pt" fo:letter-spacing="normal" fo:font-style="normal" fo:font-weight="normal" officeooo:rsid="001c53cc" officeooo:paragraph-rsid="001c53cc" style:font-size-asian="10pt" style:font-style-asian="normal" style:font-weight-asian="normal" style:font-name-complex="system-ui"/>
    </style:style>
    <style:style style:name="T1" style:family="text">
      <style:text-properties fo:font-variant="normal" fo:text-transform="none" fo:color="#616161" loext:opacity="100%" style:font-name="system-ui" fo:font-size="10pt" fo:letter-spacing="normal" fo:font-style="normal" fo:font-weight="normal" style:font-size-asian="10pt" style:font-style-asian="normal" style:font-weight-asian="normal" style:font-name-complex="system-ui"/>
    </style:style>
    <style:style style:name="T2" style:family="text">
      <style:text-properties fo:font-variant="normal" fo:text-transform="none" fo:color="#a31515" loext:opacity="100%" style:font-name="Ubuntu Mono" fo:font-size="7.5pt" fo:letter-spacing="normal" fo:font-style="normal" fo:font-weight="normal" fo:background-color="#000000" loext:char-shading-value="0" style:font-size-asian="7.5pt" style:font-style-asian="normal" style:font-weight-asian="normal" style:font-name-complex="Ubuntu Mono" loext:padding="0in" loext:border="none" loext:shadow="none"/>
    </style:style>
    <style:style style:name="T3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c9211e" loext:opacity="100%" style:text-line-through-style="none" style:text-line-through-type="none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font-name-asian="Liberation Serif1" style:font-name-complex="Liberation Serif1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color="#000000" loext:opacity="100%" fo:font-size="12pt" style:font-name-asian="Liberation Serif1" style:font-size-asian="12pt" style:font-name-complex="Liberation Serif1" style:font-size-complex="12pt"/>
    </style:style>
    <style:style style:name="T8" style:family="text">
      <style:text-properties fo:color="#ff0000" loext:opacity="100%" fo:font-size="20pt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2" text:anchor-type="char" svg:width="6.2008in" svg:height="3.7717in" draw:z-index="1"><draw:image xlink:href="Pictures/10000001000007800000049050A8D763.png" xlink:type="simple" xlink:show="embed" xlink:actuate="onLoad" draw:mime-type="image/png"/></draw:frame></text:p>
      <text:p text:style-name="P7"/>
      <text:p text:style-name="P7"/>
      <text:p text:style-name="P7"><draw:frame draw:style-name="fr1" draw:name="Image1" text:anchor-type="char" svg:width="6.2008in" svg:height="3.7717in" draw:z-index="0"><draw:image xlink:href="Pictures/100000010000078000000490B67BBED5.png" xlink:type="simple" xlink:show="embed" xlink:actuate="onLoad" draw:mime-type="image/png"/></draw:frame></text:p>
      <text:p text:style-name="P7"/>
      <text:p text:style-name="P7">Role trust policy to allow the whole source account (put in the role's Trust relationships in account 839734131943):<text:line-break/>{<text:line-break/>"Version":"2012-10-17",<text:line-break/>"Statement":[<text:line-break/>{<text:line-break/><text:soft-page-break/>"Effect":"Allow",<text:line-break/>"Principal":{"AWS":"arn:aws:iam::260289090760:root"},<text:line-break/>"Action":"sts:AssumeRole"<text:line-break/>}<text:line-break/>]<text:line-break/>}<text:span text:style-name="T1"/></text:p>
      <text:list text:style-name="WW8Num2">
        <text:list-item>
          <text:p text:style-name="P11"><text:span text:style-name="T1">Least-privilege IAM policy to attach to </text:span><text:span text:style-name="Source_20_Text"><text:span text:style-name="T2">233p1000-s</text:span></text:span><text:span text:style-name="T1"> (in account 260289090760) to allow assuming that role:<text:line-break/>{<text:line-break/>"Version":"2012-10-17",<text:line-break/>"Statement":[<text:line-break/>{<text:line-break/>"Effect":"Allow",<text:line-break/>"Action":"sts:AssumeRole",<text:line-break/>"Resource":"arn:aws:iam::839734131943:role/snowflake2"<text:line-break/>}<text:line-break/>]<text:line-break/>}</text:span></text:p>
        </text:list-item>
      </text:list>
      <text:p text:style-name="P6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/><text:span text:style-name="T3"/></text:p>
      <text:h text:style-name="P10" text:outline-level="5" loext:marker-style-name="T3">Welcome to Snowflake!<text:span text:style-name="T3"/></text:h>
      <text:p text:style-name="P1">Your account has been activated. <text:span text:style-name="T3"/></text:p>
      <text:list text:style-name="WW8Num3">
        <text:list-item>
          <text:p text:style-name="P12" loext:marker-style-name="T3"><text:soft-page-break/><text:span text:style-name="T3">Username: </text:span><text:span text:style-name="Strong_20_Emphasis"><text:span text:style-name="T3">JANSNOWFLAKE</text:span></text:span><text:span text:style-name="T3"> </text:span></text:p>
        </text:list-item>
        <text:list-item>
          <text:p text:style-name="P13" loext:marker-style-name="T3"><text:span text:style-name="T3">Dedicated Login URL: </text:span><text:a xlink:type="simple" xlink:href="https://j06yswzb.r.eu-west-1.awstrack.me/L0/https:%2F%2Fbcznvub-qj04263.snowflakecomputing.com/1/0102019e3a181d57-f84fb397-7969-4713-8827-bff8a776a27c-000000/0eUU3ZsPs33gw5b7xTS9OzXrUSo=473" office:target-frame-name="_blank" xlink:show="new" text:style-name="Internet_20_link" text:visited-style-name="Visited_20_Internet_20_Link"><text:span text:style-name="Internet_20_link"><text:span text:style-name="T4">https://bcznvub-qj04263.snowflakecomputing.com</text:span></text:span></text:a><text:span text:style-name="T3"> </text:span></text:p>
        </text:list-item>
      </text:list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// Set the Roles, Warehouses and Databases</text:p>
      <text:p text:style-name="P6">USE ROLE ACCOUNTADMIN;</text:p>
      <text:p text:style-name="P6">USE WAREHOUSE COMPUTE_WH;</text:p>
      <text:p text:style-name="P6">USE SCHEMA MYDB.MYSCHEMA;</text:p>
      <text:p text:style-name="P6">use database mydb;<text:span text:style-name="T5"/></text:p>
      <text:p text:style-name="P5"><text:s/></text:p>
      <text:p text:style-name="P6">GRANT USAGE ON INTEGRATION s3_snowpipe_int TO ROLE ACCOUNTADMIN;</text:p>
      <text:p text:style-name="P6">// Create an Employee table</text:p>
      <text:p text:style-name="P6">CREATE OR REPLACE TABLE USER (<text:span text:style-name="T5"/></text:p>
      <text:p text:style-name="P6"><text:span text:style-name="T5"><text:s text:c="2"/></text:span>id INTEGER,</text:p>
      <text:p text:style-name="P6"><text:span text:style-name="T5"><text:s text:c="2"/></text:span>name VARCHAR(50),</text:p>
      <text:p text:style-name="P6"><text:span text:style-name="T5"><text:s text:c="2"/></text:span>location VARCHAR(50),</text:p>
      <text:p text:style-name="P6"><text:span text:style-name="T5"><text:s text:c="2"/></text:span>email VARCHAR(50)</text:p>
      <text:p text:style-name="P6">);</text:p>
      <text:p text:style-name="P6"/>
      <text:p text:style-name="P6"/>
      <text:p text:style-name="P6">CREATE <text:s/>OR REPLACE <text:s/>STORAGE INTEGRATION <text:s/>my_s3_integration<text:span text:style-name="T5"/></text:p>
      <text:p text:style-name="P6"><text:soft-page-break/><text:span text:style-name="T5"><text:s text:c="2"/></text:span>TYPE = EXTERNAL_STAGE</text:p>
      <text:p text:style-name="P6"><text:span text:style-name="T5"><text:s text:c="2"/></text:span>ENABLED = TRUE</text:p>
      <text:p text:style-name="P6"><text:span text:style-name="T5"><text:s text:c="2"/></text:span>STORAGE_PROVIDER = 'S3'</text:p>
      <text:p text:style-name="P6"><text:span text:style-name="T5"><text:s text:c="2"/></text:span>STORAGE_AWS_ROLE_ARN = 'arn:aws:iam::839734131943:role/snowflake2'</text:p>
      <text:p text:style-name="P6"><text:span text:style-name="T5"><text:s text:c="2"/></text:span>STORAGE_ALLOWED_LOCATIONS = ('*');</text:p>
      <text:p text:style-name="P6"/>
      <text:p text:style-name="P6"/>
      <text:p text:style-name="P6">CREATE OR REPLACE STAGE my_stage<text:span text:style-name="T5"/></text:p>
      <text:p text:style-name="P6"><text:span text:style-name="T5"><text:s text:c="2"/></text:span>URL = 's3://de-academy-training-bucket11/'</text:p>
      <text:p text:style-name="P6"><text:span text:style-name="T5"><text:s text:c="2"/></text:span>STORAGE_INTEGRATION = my_s3_integration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S3.sql</text:p>
      <text:p text:style-name="P6">DESCRIBE INTEGRATION my_s3_integration;</text:p>
      <text:p text:style-name="P6">LIST @my_stage;</text:p>
      <text:p text:style-name="P6">// Create an storage integration with s3 and iam role</text:p>
      <text:p text:style-name="P6">CREATE OR REPLACE STORAGE INTEGRATION S3_INT<text:span text:style-name="T5"/></text:p>
      <text:p text:style-name="P6"><text:span text:style-name="T5"><text:s text:c="2"/></text:span>TYPE = EXTERNAL_STAGE</text:p>
      <text:p text:style-name="P6"><text:span text:style-name="T5"><text:s text:c="2"/></text:span>STORAGE_PROVIDER = 'S3'</text:p>
      <text:p text:style-name="P6"><text:span text:style-name="T5"><text:s text:c="2"/></text:span>ENABLED = TRUE</text:p>
      <text:p text:style-name="P6"><text:span text:style-name="T5"><text:s text:c="2"/></text:span>STORAGE_AWS_ROLE_ARN = 'arn:aws:iam::839734131943:role/smowflakerole'</text:p>
      <text:p text:style-name="P6"><text:span text:style-name="T5"><text:s text:c="2"/></text:span>STORAGE_ALLOWED_LOCATIONS = ('s3://de-academy-training-bucket11/');</text:p>
      <text:p text:style-name="P6"/>
      <text:p text:style-name="P6">// Describe the storage integratio<text:span text:style-name="T5"/></text:p>
      <text:p text:style-name="P6"><text:span text:style-name="T5"><text:s text:c="2"/></text:span>//STORAGE_AWS_aws sts get-caller-identityROLE_ARN = 'arn:aws:iam::260289090760:user/233p1000-s'</text:p>
      <text:p text:style-name="P6">DESC INTEGRATION s3_int;</text:p>
      <text:p text:style-name="P6"><text:soft-page-break/></text:p>
      <text:p text:style-name="P6">//Create a file format</text:p>
      <text:p text:style-name="P6">CREATE OR REPLACE FILE FORMAT my_csv_format</text:p>
      <text:p text:style-name="P6">TYPE = 'CSV'</text:p>
      <text:p text:style-name="P6">FIELD_DELIMITER = ','</text:p>
      <text:p text:style-name="P6">RECORD_DELIMITER = '\n'</text:p>
      <text:p text:style-name="P6">SKIP_HEADER = 1;</text:p>
      <text:p text:style-name="P6"/>
      <text:p text:style-name="P6">SHOW ORGANIZATION ACCOUNTS;</text:p>
      <text:p text:style-name="P6"/>
      <text:p text:style-name="P6">//Create a external s3 stage</text:p>
      <text:p text:style-name="P6">CREATE OR REPLACE STAGE my_s3_stage</text:p>
      <text:p text:style-name="P6">STORAGE_INTEGRATION = S3_INT</text:p>
      <text:p text:style-name="P6">URL = 's3://de-academy-training-bucket11/' </text:p>
      <text:p text:style-name="P6">FILE_FORMAT = my_csv_format;</text:p>
      <text:p text:style-name="P6"/>
      <text:p text:style-name="P6"/>
      <text:p text:style-name="P6"/>
      <text:p text:style-name="P6"/>
      <text:p text:style-name="P6">//Access the external stage</text:p>
      <text:p text:style-name="P6">list @my_s3_stage;</text:p>
      <text:p text:style-name="P6"/>
      <text:p text:style-name="P6">DESCRIBE INTEGRATION s3_int;</text:p>
      <text:p text:style-name="P6">DESC STORAGE INTEGRATION s3_snowpipe_int;</text:p>
      <text:p text:style-name="P6">describe stage my_s3_stage;</text:p>
      <text:p text:style-name="P6"/>
      <text:p text:style-name="P6"/>
      <text:p text:style-name="P6"/>
      <text:p text:style-name="P6">COPY INTO USER</text:p>
      <text:p text:style-name="P6">FROM @my_s3_stage/user_table.csv </text:p>
      <text:p text:style-name="P6">FILE_FORMAT = (FORMAT_NAME = my_csv_format);</text:p>
      <text:p text:style-name="P6"/>
      <text:p text:style-name="P6"><text:soft-page-break/></text:p>
      <text:p text:style-name="P6">//Select data from the table</text:p>
      <text:p text:style-name="P6">SELECT * FROM USER;</text:p>
      <text:p text:style-name="P6"/>
      <text:p text:style-name="P6"/>
      <text:p text:style-name="P6"/>
      <text:p text:style-name="P6"/>
      <text:p text:style-name="P6">//////////////////////////////////////////</text:p>
      <text:p text:style-name="P6"/>
      <text:p text:style-name="P6"/>
      <text:p text:style-name="P6"/>
      <text:p text:style-name="P6"/>
      <text:p text:style-name="P6"/>
      <text:p text:style-name="P3">S3 EXTERNAL</text:p>
      <text:p text:style-name="P6"/>
      <text:p text:style-name="P6"/>
      <text:p text:style-name="P6"/>
      <text:p text:style-name="P6">//Set the Roles, Warehouses and Databases</text:p>
      <text:p text:style-name="P6"/>
      <text:p text:style-name="P6">USE ROLE ACCOUNTADMIN;</text:p>
      <text:p text:style-name="P6">USE WAREHOUSE COMPUTE_WH;</text:p>
      <text:p text:style-name="P6">use database mydb;</text:p>
      <text:p text:style-name="P6">USE SCHEMA MYDB.MYSCHEMA;</text:p>
      <text:p text:style-name="P6"/>
      <text:p text:style-name="P6"/>
      <text:p text:style-name="P6"/>
      <text:p text:style-name="P6">//Create an Employee table</text:p>
      <text:p text:style-name="P6">CREATE OR REPLACE TABLE EVENT (<text:span text:style-name="T5"/></text:p>
      <text:p text:style-name="P6"><text:span text:style-name="T5"><text:s text:c="4"/></text:span>EVENT VARIANT</text:p>
      <text:p text:style-name="P6">);</text:p>
      <text:p text:style-name="P6"/>
      <text:p text:style-name="P6"><text:soft-page-break/>//Create an storage integration with s3 and iam role</text:p>
      <text:p text:style-name="P6">CREATE OR REPLACE STORAGE INTEGRATION s3_snowpipe_int<text:span text:style-name="T5"/></text:p>
      <text:p text:style-name="P6"><text:span text:style-name="T5"><text:s text:c="2"/></text:span>TYPE = EXTERNAL_STAGE</text:p>
      <text:p text:style-name="P6"><text:span text:style-name="T5"><text:s text:c="2"/></text:span>STORAGE_PROVIDER = S3</text:p>
      <text:p text:style-name="P6"><text:span text:style-name="T5"><text:s text:c="2"/></text:span>STORAGE_AWS_ROLE_ARN = 'arn:aws:iam::839734131943:role/smowflakerole'</text:p>
      <text:p text:style-name="P6"><text:span text:style-name="T5"><text:s text:c="2"/></text:span>STORAGE_ALLOWED_LOCATIONS = ('s3://de-academy-training-bucket11/event/')</text:p>
      <text:p text:style-name="P6"><text:span text:style-name="T5"><text:s text:c="2"/></text:span>ENABLED = TRUE;</text:p>
      <text:p text:style-name="P5"><text:s/></text:p>
      <text:p text:style-name="P6">//Describe the storage integration</text:p>
      <text:p text:style-name="P6">DESC INTEGRATION s3_snowpipe_int;</text:p>
      <text:p text:style-name="P6"/>
      <text:p text:style-name="P6"/>
      <text:p text:style-name="P6">//Create a file format</text:p>
      <text:p text:style-name="P6">CREATE OR REPLACE FILE FORMAT my_json_format</text:p>
      <text:p text:style-name="P6">TYPE = 'JSON';</text:p>
      <text:p text:style-name="P6"/>
      <text:p text:style-name="P6">//Create a external s3 stage</text:p>
      <text:p text:style-name="P6">CREATE OR REPLACE STAGE my_s3_snowpipe_stage</text:p>
      <text:p text:style-name="P6">STORAGE_INTEGRATION = s3_snowpipe_int</text:p>
      <text:p text:style-name="P6">URL = 's3://de-academy-training-bucket11/event/'</text:p>
      <text:p text:style-name="P6">FILE_FORMAT = my_json_format;</text:p>
      <text:p text:style-name="P6"/>
      <text:p text:style-name="P6"/>
      <text:p text:style-name="P6"/>
      <text:p text:style-name="P6"/>
      <text:p text:style-name="P6">LIST @my_s3_snowpipe_stage;</text:p>
      <text:p text:style-name="P6"/>
      <text:p text:style-name="P6"/>
      <text:p text:style-name="P6">DESCRIBE STAGE my_s3_snowpipe_stage;</text:p>
      <text:p text:style-name="P6"/>
      <text:p text:style-name="P6">DESC INTEGRATION s3_snowpipe_int;</text:p>
      <text:p text:style-name="P6"/>
      <text:p text:style-name="P6"><text:soft-page-break/>DESCRIBE STORAGE INTEGRATION s3_snowpipe_int;</text:p>
      <text:p text:style-name="P6"/>
      <text:p text:style-name="P6">DESC STORAGE INTEGRATION s3_snowpipe_int;</text:p>
      <text:p text:style-name="P6">//###################</text:p>
      <text:p text:style-name="P6"/>
      <text:p text:style-name="P6">//Access the external stage</text:p>
      <text:p text:style-name="P6">list @my_s3_snowpipe_stage;</text:p>
      <text:p text:style-name="P6">SHOW STAGES;</text:p>
      <text:p text:style-name="P6">DESC STORAGE INTEGRATION s3_snowpipe_int;</text:p>
      <text:p text:style-name="P6">SELECT CURRENT_ROLE();</text:p>
      <text:p text:style-name="P6"/>
      <text:p text:style-name="P6">//Create a snowpipe to load the evenet data from s3</text:p>
      <text:p text:style-name="P6">create or replace pipe s3_pipe</text:p>
      <text:p text:style-name="P6">auto_ingest = true AS</text:p>
      <text:p text:style-name="P6">copy into event</text:p>
      <text:p text:style-name="P6">from @my_s3_snowpipe_stage</text:p>
      <text:p text:style-name="P6">FILE_FORMAT = (FORMAT_NAME = my_json_format);</text:p>
      <text:p text:style-name="P6"/>
      <text:p text:style-name="P6">//Select the status of the pipe</text:p>
      <text:p text:style-name="P6">SELECT SYSTEM$PIPE_STATUS('s3_pipe');</text:p>
      <text:p text:style-name="P6"/>
      <text:p text:style-name="P6">//Get the notification channel</text:p>
      <text:p text:style-name="P6">SHOW PIPES;</text:p>
      <text:p text:style-name="P6"/>
      <text:p text:style-name="P6">//Select data from the table</text:p>
      <text:p text:style-name="P6">SELECT * FROM event;</text:p>
      <text:p text:style-name="P6"/>
      <text:p text:style-name="P6"/>
      <text:p text:style-name="P5"><text:s text:c="8"/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FILE_FORMATS<text:span text:style-name="T6"/></text:p>
      <text:p text:style-name="P8">use role accountadmin;<text:span text:style-name="T6"/></text:p>
      <text:p text:style-name="P8">use warehouse compute_wh;<text:span text:style-name="T6"/></text:p>
      <text:p text:style-name="P8">USE SCHEMA MYDB.MYSCHEMA;<text:span text:style-name="T6"/></text:p>
      <text:p text:style-name="P8"/>
      <text:p text:style-name="P8">// Create an Employee table<text:span text:style-name="T6"/></text:p>
      <text:p text:style-name="P8">CREATE OR REPLACE TABLE STUDENT (<text:span text:style-name="T7"/></text:p>
      <text:p text:style-name="P6"><text:span text:style-name="T7"><text:s text:c="2"/></text:span><text:span text:style-name="T6">id INTEGER,</text:span></text:p>
      <text:p text:style-name="P6"><text:span text:style-name="T7"><text:s text:c="2"/></text:span><text:span text:style-name="T6">name VARCHAR(50),</text:span></text:p>
      <text:p text:style-name="P6"><text:span text:style-name="T7"><text:s text:c="2"/></text:span><text:span text:style-name="T6">age INTEGER,</text:span></text:p>
      <text:p text:style-name="P6"><text:span text:style-name="T7"><text:s text:c="2"/></text:span><text:span text:style-name="T6">marks INTEGER</text:span></text:p>
      <text:p text:style-name="P8">);<text:span text:style-name="T6"/></text:p>
      <text:p text:style-name="P8"/>
      <text:p text:style-name="P8">// Create a named stage<text:span text:style-name="T6"/></text:p>
      <text:p text:style-name="P8">CREATE OR REPLACE STAGE STUDENT_STAGE;<text:span text:style-name="T6"/></text:p>
      <text:p text:style-name="P8"/>
      <text:p text:style-name="P8">// Access the names internal stage<text:span text:style-name="T6"/></text:p>
      <text:p text:style-name="P8">LIST @STUDENT_STAGE;<text:span text:style-name="T6"/></text:p>
      <text:p text:style-name="P8"><text:soft-page-break/></text:p>
      <text:p text:style-name="P8">// Load data to customer table without file format<text:span text:style-name="T6"/></text:p>
      <text:p text:style-name="P8">COPY INTO STUDENT<text:span text:style-name="T6"/></text:p>
      <text:p text:style-name="P8">FROM @STUDENT_STAGE<text:span text:style-name="T6"/></text:p>
      <text:p text:style-name="P8">FILE_FORMAT = (TYPE = 'CSV' SKIP_HEADER = 1);<text:span text:style-name="T6"/></text:p>
      <text:p text:style-name="P8"/>
      <text:p text:style-name="P8">// Select data from the table<text:span text:style-name="T6"/></text:p>
      <text:p text:style-name="P8">SELECT * FROM STUDENT;<text:span text:style-name="T6"/></text:p>
      <text:p text:style-name="P8"/>
      <text:p text:style-name="P8">// Truncate the table<text:span text:style-name="T6"/></text:p>
      <text:p text:style-name="P8">TRUNCATE TABLE STUDENT;<text:span text:style-name="T6"/></text:p>
      <text:p text:style-name="P8"/>
      <text:p text:style-name="P8">// Create a CSV File format<text:span text:style-name="T6"/></text:p>
      <text:p text:style-name="P8">CREATE OR REPLACE FILE FORMAT CSV_FORMAT<text:span text:style-name="T7"/></text:p>
      <text:p text:style-name="P6"><text:span text:style-name="T7"><text:s text:c="2"/></text:span><text:span text:style-name="T6">TYPE = 'CSV'</text:span></text:p>
      <text:p text:style-name="P6"><text:span text:style-name="T7"><text:s text:c="2"/></text:span><text:span text:style-name="T6">FIELD_DELIMITER = ','</text:span></text:p>
      <text:p text:style-name="P6"><text:span text:style-name="T7"><text:s text:c="2"/></text:span><text:span text:style-name="T6">RECORD_DELIMITER = '\n'</text:span></text:p>
      <text:p text:style-name="P6"><text:span text:style-name="T7"><text:s text:c="2"/></text:span><text:span text:style-name="T6">SKIP_HEADER = 1;</text:span></text:p>
      <text:p text:style-name="P8"/>
      <text:p text:style-name="P8">// Load data to customer table with file format<text:span text:style-name="T6"/></text:p>
      <text:p text:style-name="P8">COPY INTO STUDENT<text:span text:style-name="T6"/></text:p>
      <text:p text:style-name="P8">FROM @STUDENT_STAGE<text:span text:style-name="T6"/></text:p>
      <text:p text:style-name="P8">FILE_FORMAT = (FORMAT_NAME = CSV_FORMAT);<text:span text:style-name="T6"/></text:p>
      <text:p text:style-name="P8"/>
      <text:p text:style-name="P8">// Select data from the table<text:span text:style-name="T6"/></text:p>
      <text:p text:style-name="P8">SELECT * FROM STUDENT;<text:span text:style-name="T6"/></text:p>
      <text:p text:style-name="P8"/>
      <text:p text:style-name="P8">// Create a JSON File format<text:span text:style-name="T6"/></text:p>
      <text:p text:style-name="P8">CREATE OR REPLACE FILE FORMAT MY_JSON_FORMAT<text:span text:style-name="T7"/></text:p>
      <text:p text:style-name="P6"><text:span text:style-name="T7"><text:s text:c="2"/></text:span><text:span text:style-name="T6">TYPE = 'JSON';</text:span></text:p>
      <text:p text:style-name="P8"/>
      <text:p text:style-name="P8"/>
      <text:p text:style-name="P8"><text:soft-page-break/>show file formats;<text:span text:style-name="T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pan text:style-name="T8">STAGES_AND_INTEGRATIONS</text:span><text:span text:style-name="T6"><text:line-break/>USE ROLE ACCOUNTADMIN;</text:span></text:p>
      <text:p text:style-name="P8">USE WAREHOUSE COMPUTE_WH;<text:span text:style-name="T6"/></text:p>
      <text:p text:style-name="P8">USE SCHEMA MYDB.MYSCHEMA;<text:span text:style-name="T6"/></text:p>
      <text:p text:style-name="P8">use database mydb;<text:span text:style-name="T6"/></text:p>
      <text:p text:style-name="P8"/>
      <text:p text:style-name="P8">DESC STORAGE INTEGRATION s3_snowpipe_int;<text:span text:style-name="T6"/></text:p>
      <text:p text:style-name="P8"/>
      <text:p text:style-name="P8">SHOW STORAGE INTEGRATIONS;<text:span text:style-name="T6"/></text:p>
      <text:p text:style-name="P8"/>
      <text:p text:style-name="P8"/>
      <text:p text:style-name="P8">CREATE OR REPLACE STORAGE INTEGRATION s3_snowpipe_int<text:span text:style-name="T7"/></text:p>
      <text:p text:style-name="P6"><text:span text:style-name="T7"><text:s text:c="2"/></text:span><text:span text:style-name="T6">TYPE = EXTERNAL_STAGE</text:span></text:p>
      <text:p text:style-name="P6"><text:span text:style-name="T7"><text:s text:c="2"/></text:span><text:span text:style-name="T6">STORAGE_PROVIDER = S3</text:span></text:p>
      <text:p text:style-name="P6"><text:span text:style-name="T7"><text:s text:c="2"/></text:span><text:span text:style-name="T6">ENABLED = TRUE</text:span></text:p>
      <text:p text:style-name="P6"><text:span text:style-name="T7"><text:s text:c="2"/></text:span><text:span text:style-name="T6">STORAGE_AWS_ROLE_ARN = 'arn:aws:iam::839734131943:role/snowflake_pipe'</text:span></text:p>
      <text:p text:style-name="P6"><text:span text:style-name="T7"><text:s text:c="2"/></text:span><text:span text:style-name="T6">STORAGE_ALLOWED_LOCATIONS = ('s3://de-academy-training-bucket123/event/');</text:span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RIGHTS<text:span text:style-name="T6"/></text:p>
      <text:p text:style-name="P8">-- Grant to a specific role<text:span text:style-name="T6"/></text:p>
      <text:p text:style-name="P8">GRANT USAGE ON STAGE MYDB.MYSCHEMA.MY_S3_SNOWPIPE_STAGE TO ROLE AmazonS3FullAccess;<text:span text:style-name="T6"/></text:p>
      <text:p text:style-name="P8"/>
      <text:p text:style-name="P8">-- If they also need to read files from the stage<text:span text:style-name="T6"/></text:p>
      <text:p text:style-name="P8">GRANT READ ON STAGE MYDB.MYSCHEMA.MY_S3_SNOWPIPE_STAGE TO ROLE AmazonS3FullAccess;<text:span text:style-name="T6"/></text:p>
      <text:p text:style-name="P8"/>
      <text:p text:style-name="P8">-- If they also need to write files to the stage<text:span text:style-name="T6"/></text:p>
      <text:p text:style-name="P8">GRANT WRITE ON STAGE MYDB.MYSCHEMA.MY_S3_SNOWPIPE_STAGE TO ROLE AmazonS3FullAccess;<text:span text:style-name="T6"/></text:p>
      <text:p text:style-name="P8"/>
      <text:p text:style-name="P8">GRANT USAGE ON DATABASE MYDB TO ROLE AmazonS3FullAccess;<text:span text:style-name="T6"/></text:p>
      <text:p text:style-name="P8">GRANT USAGE ON SCHEMA MYDB.MYSCHEMA TO ROLE AmazonS3FullAccess;<text:span text:style-name="T6"/></text:p>
      <text:p text:style-name="P8">GRANT USAGE ON INTEGRATION S3_SNOWPIPE_INT TO ROLE AmazonS3FullAccess;<text:span text:style-name="T6"/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DB<text:span text:style-name="T6"/></text:p>
      <text:p text:style-name="P8"/>
      <text:p text:style-name="P8">//ALTER ACCOUNT QJ04263 SET EDITION = 'ENTERPRISE';<text:span text:style-name="T6"/></text:p>
      <text:p text:style-name="P8"/>
      <text:p text:style-name="P8">//show accounts;<text:span text:style-name="T6"/></text:p>
      <text:p text:style-name="P8"/>
      <text:p text:style-name="P8"/>
      <text:p text:style-name="P8">use role accountadmin;<text:span text:style-name="T6"/></text:p>
      <text:p text:style-name="P8">use warehouse compute_wh;<text:span text:style-name="T6"/></text:p>
      <text:p text:style-name="P8"/>
      <text:p text:style-name="P8">create or replace database mydb;<text:span text:style-name="T6"/></text:p>
      <text:p text:style-name="P8"/>
      <text:p text:style-name="P8">create or replace schema MYDB.myschema;<text:span text:style-name="T6"/></text:p>
      <text:p text:style-name="P8"/>
      <text:p text:style-name="P8"/>
      <text:p text:style-name="P8">create or replace table PERMANENT_TABLE <text:span text:style-name="T6"/></text:p>
      <text:p text:style-name="P8">(<text:span text:style-name="T6"/></text:p>
      <text:p text:style-name="P6"><text:span text:style-name="T7"><text:s text:c="4"/></text:span><text:span text:style-name="T6">id int,</text:span></text:p>
      <text:p text:style-name="P6"><text:soft-page-break/><text:span text:style-name="T7"><text:s text:c="4"/></text:span><text:span text:style-name="T6">name string</text:span></text:p>
      <text:p text:style-name="P8">);<text:span text:style-name="T6"/></text:p>
      <text:p text:style-name="P8"/>
      <text:p text:style-name="P8">alter table PERMANENT_TABLE SET DATA_RETENTION_TIME_IN_DAYS = 1;<text:span text:style-name="T6"/></text:p>
      <text:p text:style-name="P8"/>
      <text:p text:style-name="P8">create or replace transient table TRASIENT_TABLE <text:span text:style-name="T6"/></text:p>
      <text:p text:style-name="P8">(<text:span text:style-name="T6"/></text:p>
      <text:p text:style-name="P6"><text:span text:style-name="T7"><text:s text:c="4"/></text:span><text:span text:style-name="T6">id int,</text:span></text:p>
      <text:p text:style-name="P6"><text:span text:style-name="T7"><text:s text:c="4"/></text:span><text:span text:style-name="T6">name string</text:span></text:p>
      <text:p text:style-name="P8">);<text:span text:style-name="T6"/></text:p>
      <text:p text:style-name="P8">alter table TRASIENT_TABLE SET DATA_RETENTION_TIME_IN_DAYS = 1;<text:span text:style-name="T6"/></text:p>
      <text:p text:style-name="P8"/>
      <text:p text:style-name="P8">create or replace temporary table TEMPORARY_TABLE <text:span text:style-name="T6"/></text:p>
      <text:p text:style-name="P8">(<text:span text:style-name="T6"/></text:p>
      <text:p text:style-name="P6"><text:span text:style-name="T7"><text:s text:c="4"/></text:span><text:span text:style-name="T6">id int,</text:span></text:p>
      <text:p text:style-name="P6"><text:span text:style-name="T7"><text:s text:c="4"/></text:span><text:span text:style-name="T6">name string</text:span></text:p>
      <text:p text:style-name="P8">);<text:span text:style-name="T6"/></text:p>
      <text:p text:style-name="P8">alter table TEMPORARY_TABLE SET DATA_RETENTION_TIME_IN_DAYS = 1;<text:span text:style-name="T6"/></text:p>
      <text:p text:style-name="P8">show tables;<text:span text:style-name="T6"/></text:p>
      <text:p text:style-name="P8"/>
      <text:p text:style-name="P8">create or replace TABLE employees (<text:span text:style-name="T6"/></text:p>
      <text:p text:style-name="P6"><text:span text:style-name="T7"><text:s text:c="4"/></text:span><text:span text:style-name="T6">id integer,</text:span></text:p>
      <text:p text:style-name="P6"><text:span text:style-name="T7"><text:s text:c="4"/></text:span><text:span text:style-name="T6">name varchar(50),</text:span></text:p>
      <text:p text:style-name="P6"><text:span text:style-name="T7"><text:s text:c="4"/></text:span><text:span text:style-name="T6">department varchar(50),</text:span></text:p>
      <text:p text:style-name="P6"><text:span text:style-name="T7"><text:s text:c="4"/></text:span><text:span text:style-name="T6">salary integer</text:span></text:p>
      <text:p text:style-name="P8">);<text:span text:style-name="T6"/></text:p>
      <text:p text:style-name="P8"/>
      <text:p text:style-name="P8">insert into employees (id, name, department, salary) <text:span text:style-name="T6"/></text:p>
      <text:p text:style-name="P8">values (1, 'Pat Fay', 'HR', 50000),<text:span text:style-name="T6"/></text:p>
      <text:p text:style-name="P6"><text:span text:style-name="T7"><text:s text:c="8"/></text:span><text:span text:style-name="T6">(2, 'Donald OConnel', 'IT', 75000),</text:span></text:p>
      <text:p text:style-name="P6"><text:span text:style-name="T7"><text:s text:c="8"/></text:span><text:span text:style-name="T6">(3, 'Steven King', 'Sales', 60000),</text:span></text:p>
      <text:p text:style-name="P6"><text:span text:style-name="T7"><text:s text:c="8"/></text:span><text:span text:style-name="T6">(4, 'Susan Mavris', 'IT', 80000),</text:span></text:p>
      <text:p text:style-name="P6"><text:soft-page-break/><text:span text:style-name="T7"><text:s text:c="8"/></text:span><text:span text:style-name="T6">(5, 'Jenifer Whalen', 'Marketing', 55000);</text:span></text:p>
      <text:p text:style-name="P8"/>
      <text:p text:style-name="P8"/>
      <text:p text:style-name="P8">select * from employees;<text:span text:style-name="T6"/></text:p>
      <text:p text:style-name="P8"/>
      <text:p text:style-name="P8"/>
      <text:p text:style-name="P8">create or replace VIEW it_imployees AS<text:span text:style-name="T6"/></text:p>
      <text:p text:style-name="P8">SELECT id, name, salary<text:span text:style-name="T6"/></text:p>
      <text:p text:style-name="P8">FROM employees<text:span text:style-name="T6"/></text:p>
      <text:p text:style-name="P8">WHERE department = 'IT';<text:span text:style-name="T6"/></text:p>
      <text:p text:style-name="P8"/>
      <text:p text:style-name="P8">select * from it_imployees;<text:span text:style-name="T6"/></text:p>
      <text:p text:style-name="P8"/>
      <text:p text:style-name="P8">create or replace secure VIEW hr_imployees AS<text:span text:style-name="T6"/></text:p>
      <text:p text:style-name="P8">SELECT id, name, salary<text:span text:style-name="T6"/></text:p>
      <text:p text:style-name="P8">FROM employees<text:span text:style-name="T6"/></text:p>
      <text:p text:style-name="P8">WHERE department = 'HR';<text:span text:style-name="T6"/></text:p>
      <text:p text:style-name="P8"/>
      <text:p text:style-name="P8">select * from hr_imployees;<text:span text:style-name="T6"/></text:p>
      <text:p text:style-name="P8"/>
      <text:p text:style-name="P8">Create or replace VIEW employee_sallaries<text:span text:style-name="T6"/></text:p>
      <text:p text:style-name="P8">AS SELECT<text:span text:style-name="T6"/></text:p>
      <text:p text:style-name="P8">department, <text:span text:style-name="T6"/></text:p>
      <text:p text:style-name="P8">SUM(salary) AS total_salary<text:span text:style-name="T6"/></text:p>
      <text:p text:style-name="P8">FROM employees<text:span text:style-name="T6"/></text:p>
      <text:p text:style-name="P8">GROUP BY department;<text:span text:style-name="T6"/></text:p>
      <text:p text:style-name="P8"/>
      <text:p text:style-name="P8">select * from employee_sallaries;<text:span text:style-name="T6"/></text:p>
      <text:p text:style-name="P8"/>
      <text:p text:style-name="P8"/>
      <text:p text:style-name="P8">create or replace MATERIALIZED VIEW materialized_eployee_salariries<text:span text:style-name="T6"/></text:p>
      <text:p text:style-name="P8">AS SELECT<text:span text:style-name="T6"/></text:p>
      <text:p text:style-name="P8"><text:soft-page-break/>department, <text:span text:style-name="T6"/></text:p>
      <text:p text:style-name="P8">SUM(salary) AS total_salary<text:span text:style-name="T6"/></text:p>
      <text:p text:style-name="P8">FROM employees <text:span text:style-name="T6"/></text:p>
      <text:p text:style-name="P8">GROUP BY department;<text:span text:style-name="T6"/></text:p>
      <text:p text:style-name="P8"/>
      <text:p text:style-name="P8">select * from materialized_eployee_salariries;<text:span text:style-name="T6"/></text:p>
      <text:p text:style-name="P8"/>
      <text:p text:style-name="P8">show views;<text:span text:style-name="T6"/></text:p>
      <text:p text:style-name="P8"/>
      <text:p text:style-name="P8"/>
      <text:p text:style-name="P8"/>
      <text:p text:style-name="P8"/>
      <text:p text:style-name="P8"/>
      <text:p text:style-name="P8">create or replace table customer (<text:span text:style-name="T6"/></text:p>
      <text:p text:style-name="P6"><text:span text:style-name="T7"><text:s text:c="4"/></text:span><text:span text:style-name="T6">id integer,</text:span></text:p>
      <text:p text:style-name="P6"><text:span text:style-name="T7"><text:s text:c="4"/></text:span><text:span text:style-name="T6">name varchar(50),</text:span></text:p>
      <text:p text:style-name="P6"><text:span text:style-name="T7"><text:s text:c="4"/></text:span><text:span text:style-name="T6">age integer,</text:span></text:p>
      <text:p text:style-name="P6"><text:span text:style-name="T7"><text:s text:c="4"/></text:span><text:span text:style-name="T6">state varchar(50)</text:span></text:p>
      <text:p text:style-name="P8"/>
      <text:p text:style-name="P8"/>
      <text:p text:style-name="P8">);<text:span text:style-name="T6"/></text:p>
      <text:p text:style-name="P8"/>
      <text:p text:style-name="P8">list @%customer;<text:span text:style-name="T6"/></text:p>
      <text:p text:style-name="P8"/>
      <text:p text:style-name="P8">list @~;<text:span text:style-name="T6"/></text:p>
      <text:p text:style-name="P8"/>
      <text:p text:style-name="P8">Create or replace STAGE CUSTOMER_STAGE;<text:span text:style-name="T6"/></text:p>
      <text:p text:style-name="P8"/>
      <text:p text:style-name="P8"/>
      <text:p text:style-name="P8">list @CUstomer_stage;<text:span text:style-name="T6"/></text:p>
      <text:p text:style-name="P8"/>
      <text:p text:style-name="P8"/>
      <text:p text:style-name="P8"><text:soft-page-break/>Truncate table customer;<text:span text:style-name="T6"/></text:p>
      <text:p text:style-name="P8"/>
      <text:p text:style-name="P8"/>
      <text:p text:style-name="P8">copy into customer<text:span text:style-name="T6"/></text:p>
      <text:p text:style-name="P8">FROM @customer_stage<text:span text:style-name="T6"/></text:p>
      <text:p text:style-name="P8">file_format = (TYPE= 'csv', skip_header = 1);<text:span text:style-name="T6"/></text:p>
      <text:p text:style-name="P8"/>
      <text:p text:style-name="P8">select * from customer;<text:span text:style-name="T6"/></text:p>
      <text:p text:style-name="P8"/>
      <text:p text:style-name="P8"/>
      <text:p text:style-name="P8">undrop schema myschema;<text:span text:style-name="T6"/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Ubuntu Mono" svg:font-family="'Ubuntu Mono', 'Liberation Mono'"/>
    <style:font-face style:name="system-ui" svg:font-family="system-ui, 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size-asian="12pt" style:font-weight-asian="bold" style:font-name-complex="FreeSans" style:font-family-complex="FreeSans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oto Sans Mono CJK SC" style:font-family-asian="'Noto Sans Mono CJK SC'" style:font-family-generic-asian="modern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WW8Num3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WW8Num3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WW8Num3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WW8Num3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WW8Num3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8T00:21:15.515018000</meta:creation-date>
    <dc:date>2026-05-23T15:35:19.433279372</dc:date>
    <meta:editing-cycles>11</meta:editing-cycles>
    <meta:editing-duration>PT8H45M36S</meta:editing-duration>
    <meta:generator>LibreOffice/24.2.7.2$Linux_X86_64 LibreOffice_project/420$Build-2</meta:generator>
    <meta:document-statistic meta:table-count="0" meta:image-count="2" meta:object-count="0" meta:page-count="17" meta:paragraph-count="260" meta:word-count="1008" meta:character-count="8030" meta:non-whitespace-character-count="7089"/>
  </office:meta>
</office:document-meta>
</file>